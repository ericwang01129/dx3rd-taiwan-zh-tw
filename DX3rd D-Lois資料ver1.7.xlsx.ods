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Microsoft Yahei" svg:font-family="'Microsoft Yahei'"/>
    <style:font-face style:name="PMingLiu" svg:font-family="PMingLiu"/>
    <style:font-face style:name="SimSun" svg:font-family="SimSu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9.84pt"/>
    </style:style>
    <style:style style:name="co2" style:family="table-column">
      <style:table-column-properties fo:break-before="auto" style:column-width="402.94pt"/>
    </style:style>
    <style:style style:name="co3" style:family="table-column">
      <style:table-column-properties fo:break-before="auto" style:column-width="45.41pt"/>
    </style:style>
    <style:style style:name="co4" style:family="table-column">
      <style:table-column-properties fo:break-before="auto" style:column-width="72.79pt"/>
    </style:style>
    <style:style style:name="co5" style:family="table-column">
      <style:table-column-properties fo:break-before="auto" style:column-width="56.21pt"/>
    </style:style>
    <style:style style:name="co6" style:family="table-column">
      <style:table-column-properties fo:break-before="auto" style:column-width="209.06pt"/>
    </style:style>
    <style:style style:name="co7" style:family="table-column">
      <style:table-column-properties fo:break-before="auto" style:column-width="356.74pt"/>
    </style:style>
    <style:style style:name="co8" style:family="table-column">
      <style:table-column-properties fo:break-before="auto" style:column-width="251.55pt"/>
    </style:style>
    <style:style style:name="co9" style:family="table-column">
      <style:table-column-properties fo:break-before="auto" style:column-width="68.46pt"/>
    </style:style>
    <style:style style:name="co10" style:family="table-column">
      <style:table-column-properties fo:break-before="auto" style:column-width="64.91pt"/>
    </style:style>
    <style:style style:name="co11" style:family="table-column">
      <style:table-column-properties fo:break-before="auto" style:column-width="2.21pt"/>
    </style:style>
    <style:style style:name="co12" style:family="table-column">
      <style:table-column-properties fo:break-before="auto" style:column-width="87.96pt"/>
    </style:style>
    <style:style style:name="co13" style:family="table-column">
      <style:table-column-properties fo:break-before="auto" style:column-width="136.26pt"/>
    </style:style>
    <style:style style:name="co14" style:family="table-column">
      <style:table-column-properties fo:break-before="auto" style:column-width="58.34pt"/>
    </style:style>
    <style:style style:name="co15" style:family="table-column">
      <style:table-column-properties fo:break-before="auto" style:column-width="176.6pt"/>
    </style:style>
    <style:style style:name="co16" style:family="table-column">
      <style:table-column-properties fo:break-before="auto" style:column-width="79.26pt"/>
    </style:style>
    <style:style style:name="co17" style:family="table-column">
      <style:table-column-properties fo:break-before="auto" style:column-width="129pt"/>
    </style:style>
    <style:style style:name="co18" style:family="table-column">
      <style:table-column-properties fo:break-before="auto" style:column-width="81.44pt"/>
    </style:style>
    <style:style style:name="co19" style:family="table-column">
      <style:table-column-properties fo:break-before="auto" style:column-width="77.84pt"/>
    </style:style>
    <style:style style:name="co20" style:family="table-column">
      <style:table-column-properties fo:break-before="auto" style:column-width="67.8pt"/>
    </style:style>
    <style:style style:name="co21" style:family="table-column">
      <style:table-column-properties fo:break-before="auto" style:column-width="605.51pt"/>
    </style:style>
    <style:style style:name="co22" style:family="table-column">
      <style:table-column-properties fo:break-before="auto" style:column-width="63.41pt"/>
    </style:style>
    <style:style style:name="co23" style:family="table-column">
      <style:table-column-properties fo:break-before="auto" style:column-width="106.64pt"/>
    </style:style>
    <style:style style:name="co24" style:family="table-column">
      <style:table-column-properties fo:break-before="auto" style:column-width="82.2pt"/>
    </style:style>
    <style:style style:name="co25" style:family="table-column">
      <style:table-column-properties fo:break-before="auto" style:column-width="54.06pt"/>
    </style:style>
    <style:style style:name="co26" style:family="table-column">
      <style:table-column-properties fo:break-before="auto" style:column-width="182.35pt"/>
    </style:style>
    <style:style style:name="co27" style:family="table-column">
      <style:table-column-properties fo:break-before="auto" style:column-width="55.5pt"/>
    </style:style>
    <style:style style:name="co28" style:family="table-column">
      <style:table-column-properties fo:break-before="auto" style:column-width="77.16pt"/>
    </style:style>
    <style:style style:name="co29" style:family="table-column">
      <style:table-column-properties fo:break-before="auto" style:column-width="70.64pt"/>
    </style:style>
    <style:style style:name="co30" style:family="table-column">
      <style:table-column-properties fo:break-before="auto" style:column-width="69.96pt"/>
    </style:style>
    <style:style style:name="co31" style:family="table-column">
      <style:table-column-properties fo:break-before="auto" style:column-width="282.56pt"/>
    </style:style>
    <style:style style:name="co32" style:family="table-column">
      <style:table-column-properties fo:break-before="auto" style:column-width="40.34pt"/>
    </style:style>
    <style:style style:name="co33" style:family="table-column">
      <style:table-column-properties fo:break-before="auto" style:column-width="53.29pt"/>
    </style:style>
    <style:style style:name="co34" style:family="table-column">
      <style:table-column-properties fo:break-before="auto" style:column-width="62.76pt"/>
    </style:style>
    <style:style style:name="co35" style:family="table-column">
      <style:table-column-properties fo:break-before="auto" style:column-width="57.71pt"/>
    </style:style>
    <style:style style:name="co36" style:family="table-column">
      <style:table-column-properties fo:break-before="auto" style:column-width="284.74pt"/>
    </style:style>
    <style:style style:name="co37" style:family="table-column">
      <style:table-column-properties fo:break-before="auto" style:column-width="61.26pt"/>
    </style:style>
    <style:style style:name="co38" style:family="table-column">
      <style:table-column-properties fo:break-before="auto" style:column-width="61.99pt"/>
    </style:style>
    <style:style style:name="co39" style:family="table-column">
      <style:table-column-properties fo:break-before="auto" style:column-width="97.34pt"/>
    </style:style>
    <style:style style:name="co40" style:family="table-column">
      <style:table-column-properties fo:break-before="auto" style:column-width="71.35pt"/>
    </style:style>
    <style:style style:name="co41" style:family="table-column">
      <style:table-column-properties fo:break-before="auto" style:column-width="69.14pt"/>
    </style:style>
    <style:style style:name="ro1" style:family="table-row">
      <style:table-row-properties style:row-height="15pt" fo:break-before="auto" style:use-optimal-row-height="true"/>
    </style:style>
    <style:style style:name="ro2" style:family="table-row">
      <style:table-row-properties style:row-height="12.76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49pt" fo:break-before="auto" style:use-optimal-row-height="false"/>
    </style:style>
    <style:style style:name="ro7" style:family="table-row">
      <style:table-row-properties style:row-height="31.49pt" fo:break-before="auto" style:use-optimal-row-height="false"/>
    </style:style>
    <style:style style:name="ro8" style:family="table-row">
      <style:table-row-properties style:row-height="16.5pt" fo:break-before="auto" style:use-optimal-row-height="false"/>
    </style:style>
    <style:style style:name="ta1" style:family="table" style:master-page-name="PageStyle_5f_更新紀錄">
      <style:table-properties table:display="true" style:writing-mode="lr-tb"/>
    </style:style>
    <style:style style:name="ta2" style:family="table" style:master-page-name="PageStyle_5f_D-Lois">
      <style:table-properties table:display="true" style:writing-mode="lr-tb"/>
    </style:style>
    <style:style style:name="ta3" style:family="table" style:master-page-name="PageStyle_5f_HR追加D-Lois">
      <style:table-properties table:display="true" style:writing-mode="lr-tb"/>
    </style:style>
    <style:style style:name="ta4" style:family="table" style:master-page-name="PageStyle_5f_D-lois_20_No.3_20_變異種異能力">
      <style:table-properties table:display="true" style:writing-mode="lr-tb"/>
    </style:style>
    <style:style style:name="ta5" style:family="table" style:master-page-name="PageStyle_5f_D-lois_20_No.12_20_古代種異能">
      <style:table-properties table:display="true" style:writing-mode="lr-tb"/>
    </style:style>
    <style:style style:name="ta6" style:family="table" style:master-page-name="PageStyle_5f_D-lois_20_No.23_20_天造者異能">
      <style:table-properties table:display="true" style:writing-mode="lr-tb"/>
    </style:style>
    <style:style style:name="ta7" style:family="table" style:master-page-name="PageStyle_5f_D-lois_20_NO.17_20_RB異能">
      <style:table-properties table:display="true" style:writing-mode="lr-tb"/>
    </style:style>
    <style:style style:name="ta8" style:family="table" style:master-page-name="PageStyle_5f_D-lois_20_No.11_20_秘密武器專用道具">
      <style:table-properties table:display="true" style:writing-mode="lr-tb"/>
    </style:style>
    <style:style style:name="ta9" style:family="table" style:master-page-name="PageStyle_5f_D-lois_20_No.98_20_遺產繼承者專用道具">
      <style:table-properties table:display="true" style:writing-mode="lr-tb"/>
    </style:style>
    <style:style style:name="ta10" style:family="table" style:master-page-name="PageStyle_5f_D-lois_20_No.CRC08_20_超能力者超能力">
      <style:table-properties table:display="true" style:writing-mode="lr-tb"/>
    </style:style>
    <style:style style:name="ta11" style:family="table" style:master-page-name="PageStyle_5f_D-lois_20_No.CRC11_20_咒物污染者專用道具_20_咒物">
      <style:table-properties table:display="true" style:writing-mode="lr-tb"/>
    </style:style>
    <style:style style:name="ta12" style:family="table" style:master-page-name="PageStyle_5f_D-lois_20_No.UA01_20_抗改變者異能">
      <style:table-properties table:display="true" style:writing-mode="lr-tb"/>
    </style:style>
    <style:style style:name="ta13" style:family="table" style:master-page-name="PageStyle_5f_D-lois_20_No.UA03_20_封具專用道具">
      <style:table-properties table:display="true" style:writing-mode="lr-tb"/>
    </style:style>
    <style:style style:name="ta14" style:family="table" style:master-page-name="PageStyle_5f_D-lois_20_No.UA11_20_本質的根源異能">
      <style:table-properties table:display="true" style:writing-mode="lr-tb"/>
    </style:style>
    <style:style style:name="ta15" style:family="table" style:master-page-name="PageStyle_5f_D-lois_20_No.RW06_20_前反派專用道具">
      <style:table-properties table:display="true" style:writing-mode="lr-tb"/>
    </style: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MingLiu" fo:font-size="24pt" fo:font-style="normal" fo:text-shadow="none" style:text-underline-style="none" fo:font-weight="bold" style:font-size-asian="24pt" style:font-style-asian="normal" style:font-weight-asian="bold" style:font-name-complex="PMingLiu" style:font-size-complex="24pt" style:font-style-complex="normal" style:font-weight-complex="bold"/>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MingLiu" fo:font-size="12pt" fo:font-style="normal" fo:text-shadow="none" style:text-underline-style="none" fo:font-weight="normal" style:font-size-asian="12pt" style:font-style-asian="normal" style:font-weight-asian="normal" style:font-name-complex="PMingLiu"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MingLiu" fo:font-size="10pt" fo:font-style="normal" fo:text-shadow="none" style:text-underline-style="none" fo:font-weight="normal" style:font-size-asian="10pt" style:font-style-asian="normal" style:font-weight-asian="normal" style:font-name-complex="PMingLiu" style:font-size-complex="10pt" style:font-style-complex="normal" style:font-weight-complex="normal"/>
    </style:style>
    <style:style style:name="ce4" style:family="table-cell" style:parent-style-name="Default">
      <style:table-cell-properties fo:border-bottom="1.76pt double-thin #000000" style:border-line-width-bottom="0.51pt 0.74pt 0.51pt"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PMingLiu" fo:font-size="10pt" fo:font-style="normal" fo:text-shadow="none" style:text-underline-style="none" fo:font-weight="bold" style:font-size-asian="10pt" style:font-style-asian="normal" style:font-weight-asian="bold" style:font-name-complex="PMingLiu" style:font-size-complex="10pt" style:font-style-complex="normal" style:font-weight-complex="bold"/>
    </style:style>
    <style:style style:name="ce5"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MingLiu" fo:font-size="24pt" fo:font-style="normal" fo:text-shadow="none" style:text-underline-style="none" fo:font-weight="bold" style:font-size-asian="24pt" style:font-style-asian="normal" style:font-weight-asian="bold" style:font-name-complex="PMingLiu" style:font-size-complex="24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MingLiu" fo:font-size="12pt" fo:font-style="normal" fo:text-shadow="none" style:text-underline-style="none" fo:font-weight="normal" style:font-size-asian="12pt" style:font-style-asian="normal" style:font-weight-asian="normal" style:font-name-complex="PMingLiu"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MingLiu" fo:font-size="10pt" fo:font-style="normal" fo:text-shadow="none" style:text-underline-style="none" fo:font-weight="normal" style:font-size-asian="10pt" style:font-style-asian="normal" style:font-weight-asian="normal" style:font-name-complex="PMingLiu" style:font-size-complex="10pt" style:font-style-complex="normal" style:font-weight-complex="normal"/>
    </style:style>
    <style:style style:name="ce13" style:family="table-cell" style:parent-style-name="Default">
      <style:table-cell-properties fo:border-bottom="1.76pt double-thin #000000" style:border-line-width-bottom="0.51pt 0.74pt 0.51pt"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bold" style:font-size-asian="10pt" style:font-style-asian="normal" style:font-weight-asian="bold" style:font-name-complex="SimSun" style:font-size-complex="10pt" style:font-style-complex="normal"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bold" style:font-size-asian="10pt" style:font-style-asian="normal" style:font-weight-asian="bold" style:font-name-complex="Microsoft Yahei" style:font-size-complex="10pt" style:font-style-complex="normal" style:font-weight-complex="bold"/>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c00000" style:text-outline="false" style:text-line-through-style="none" style:text-line-through-type="none" style:font-name="Microsoft Yahei" fo:font-size="10pt" fo:font-style="normal" fo:text-shadow="none" style:text-underline-style="none" fo:font-weight="bold" style:font-size-asian="10pt" style:font-style-asian="normal" style:font-weight-asian="bold" style:font-name-complex="Microsoft Yahei" style:font-size-complex="10pt" style:font-style-complex="normal" style:font-weight-complex="bold"/>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MingLiu" fo:font-size="10pt" fo:font-style="normal" fo:text-shadow="none" style:text-underline-style="none" fo:font-weight="normal" style:font-size-asian="10pt" style:font-style-asian="normal" style:font-weight-asian="normal" style:font-name-complex="PMingLiu" style:font-size-complex="10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c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normal" style:font-size-asian="11pt" style:font-style-asian="normal" style:font-weight-asian="normal" style:font-name-complex="SimSun"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PMingLiu" fo:font-size="10pt" fo:font-style="normal" fo:text-shadow="none" style:text-underline-style="none" fo:font-weight="normal" style:font-size-asian="10pt" style:font-style-asian="normal" style:font-weight-asian="normal" style:font-name-complex="PMingLiu"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normal" style:font-size-asian="11pt" style:font-style-asian="normal" style:font-weight-asian="normal" style:font-name-complex="SimSun" style:font-size-complex="11pt" style:font-style-complex="normal" style:font-weight-complex="normal"/>
    </style:style>
    <style:style style:name="ce22" style:family="table-cell" style:parent-style-name="Default">
      <style:table-cell-properties fo:border-bottom="1.76pt solid #000000" fo:background-color="#fbd4b4"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bold" style:font-size-asian="11pt" style:font-style-asian="normal" style:font-weight-asian="bold" style:font-name-complex="SimSun" style:font-size-complex="11pt" style:font-style-complex="normal" style:font-weight-complex="bold"/>
    </style:style>
    <style:style style:name="ce23" style:family="table-cell" style:parent-style-name="Default">
      <style:table-cell-properties fo:border-bottom="0.74pt solid #000000" fo:background-color="#fde9d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bold" style:font-size-asian="11pt" style:font-style-asian="normal" style:font-weight-asian="bold" style:font-name-complex="SimSun" style:font-size-complex="11pt" style:font-style-complex="normal" style:font-weight-complex="bold"/>
    </style:style>
    <style:style style:name="ce24" style:family="table-cell" style:parent-style-name="Default">
      <style:table-cell-properties fo:border-bottom="0.74pt solid #000000" fo:background-color="#fde9d9"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bold" style:font-size-asian="11pt" style:font-style-asian="normal" style:font-weight-asian="bold" style:font-name-complex="SimSun" style:font-size-complex="11pt" style:font-style-complex="normal" style:font-weight-complex="bold"/>
    </style:style>
    <style:style style:name="ce25" style:family="table-cell" style:parent-style-name="Default">
      <style:table-cell-properties fo:border-bottom="1.76pt solid #000000" fo:background-color="#fde9d9"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bold" style:font-size-asian="11pt" style:font-style-asian="normal" style:font-weight-asian="bold" style:font-name-complex="SimSun" style:font-size-complex="11pt" style:font-style-complex="normal" style:font-weight-complex="bold"/>
    </style:style>
    <style:style style:name="ce26" style:family="table-cell" style:parent-style-name="Default">
      <style:table-cell-properties fo:border-bottom="1.76pt solid #000000" fo:background-color="#fbd4b4"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bold" style:font-size-asian="11pt" style:font-style-asian="normal" style:font-weight-asian="bold" style:font-name-complex="SimSun" style:font-size-complex="11pt" style:font-style-complex="normal" style:font-weight-complex="bold"/>
    </style:style>
    <style:style style:name="ce27" style:family="table-cell" style:parent-style-name="Default">
      <style:table-cell-properties fo:border-bottom="0.74pt solid #000000"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bold" style:font-size-asian="11pt" style:font-style-asian="normal" style:font-weight-asian="bold" style:font-name-complex="SimSun" style:font-size-complex="11pt" style:font-style-complex="normal" style:font-weight-complex="bold"/>
    </style:style>
    <style:style style:name="ce28" style:family="table-cell" style:parent-style-name="Default">
      <style:table-cell-properties fo:background-color="#fde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bold" style:font-size-asian="11pt" style:font-style-asian="normal" style:font-weight-asian="bold" style:font-name-complex="SimSun" style:font-size-complex="11pt" style:font-style-complex="normal" style:font-weight-complex="bold"/>
    </style:style>
    <style:style style:name="ce29" style:family="table-cell" style:parent-style-name="Default">
      <style:table-cell-properties fo:background-color="#fde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bold" style:font-size-asian="11pt" style:font-style-asian="normal" style:font-weight-asian="bold" style:font-name-complex="SimSun" style:font-size-complex="11pt" style:font-style-complex="normal" style:font-weight-complex="bold"/>
    </style:style>
    <style:style style:name="ce30" style:family="table-cell" style:parent-style-name="Default">
      <style:table-cell-properties fo:border-bottom="1.76pt solid #000000"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bold" style:font-size-asian="11pt" style:font-style-asian="normal" style:font-weight-asian="bold" style:font-name-complex="SimSun" style:font-size-complex="11pt" style:font-style-complex="normal" style:font-weight-complex="bold"/>
    </style:style>
    <style:style style:name="ce31" style:family="table-cell" style:parent-style-name="Default">
      <style:table-cell-properties fo:border-bottom="0.74pt solid #000000"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32" style:family="table-cell" style:parent-style-name="Default">
      <style:table-cell-properties fo:background-color="#fde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33" style:family="table-cell" style:parent-style-name="Default">
      <style:table-cell-properties fo:background-color="#fde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34" style:family="table-cell" style:parent-style-name="Default">
      <style:table-cell-properties fo:border-bottom="1.76pt solid #000000"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35" style:family="table-cell" style:parent-style-name="Default">
      <style:table-cell-properties fo:border-bottom="1.76pt solid #000000" fo:background-color="#fbd4b4"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bold" style:font-size-asian="11pt" style:font-style-asian="normal" style:font-weight-asian="bold" style:font-name-complex="SimSun" style:font-size-complex="11pt" style:font-style-complex="normal" style:font-weight-complex="bold"/>
    </style:style>
    <style:style style:name="ce36" style:family="table-cell" style:parent-style-name="Default">
      <style:table-cell-properties fo:border-bottom="0.74pt solid #000000" fo:background-color="#fde9d9"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37" style:family="table-cell" style:parent-style-name="Default">
      <style:table-cell-properties fo:border-bottom="0.74pt solid #000000" fo:background-color="#fde9d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38" style:family="table-cell" style:parent-style-name="Default">
      <style:table-cell-properties fo:border-bottom="0.74pt solid #000000" fo:background-color="#fde9d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39" style:family="table-cell" style:parent-style-name="Default">
      <style:table-cell-properties fo:border-bottom="1.76pt solid #000000" fo:background-color="#fde9d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40"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1.76pt solid #000000" style:diagonal-bl-tr="none" style:diagonal-tl-br="none" style:text-align-source="value-type"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1.76pt solid #000000" fo:background-color="#fbd4b4"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1pt" fo:font-style="normal" fo:text-shadow="none" style:text-underline-style="none" fo:font-weight="bold" style:font-size-asian="11pt" style:font-style-asian="normal" style:font-weight-asian="bold" style:font-name-complex="SimSun" style:font-size-complex="11pt" style:font-style-complex="normal" style:font-weight-complex="bold"/>
    </style:style>
    <style:style style:name="ce46" style:family="table-cell" style:parent-style-name="Default">
      <style:table-cell-properties fo:border-bottom="0.74pt solid #000000" fo:background-color="#fde9d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47" style:family="table-cell" style:parent-style-name="Default">
      <style:table-cell-properties fo:border-bottom="1.76pt solid #000000" fo:background-color="#fde9d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48"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933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cd69"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5f497a"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366092"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5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e36c09"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76923c"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5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cc66"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5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79797"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8064a2"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7ac1d4"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33cc"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3f3f3f"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808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a5394"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38761d"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900ff"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PMingLiu" fo:font-size="12pt" fo:font-style="normal" fo:text-shadow="none" style:text-underline-style="none" fo:font-weight="bold" style:font-size-asian="12pt" style:font-style-asian="normal" style:font-weight-asian="bold" style:font-name-complex="PMingLiu" style:font-size-complex="12pt" style:font-style-complex="normal" style:font-weight-complex="bold"/>
    </style:style>
    <style:style style:name="ce7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933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7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MingLiu" fo:font-size="12pt" fo:font-style="normal" fo:text-shadow="none" style:text-underline-style="none" fo:font-weight="normal" style:font-size-asian="12pt" style:font-style-asian="normal" style:font-weight-asian="normal" style:font-name-complex="PMingLiu" style:font-size-complex="12pt" style:font-style-complex="normal" style:font-weight-complex="normal"/>
    </style:style>
    <style:style style:name="ce75"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7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7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SimSun" fo:font-size="13pt" fo:font-style="normal" fo:text-shadow="none" style:text-underline-style="none" fo:font-weight="normal" style:font-size-asian="13pt" style:font-style-asian="normal" style:font-weight-asian="normal" style:font-name-complex="SimSun" style:font-size-complex="13pt" style:font-style-complex="normal" style:font-weight-complex="normal"/>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MingLiu" fo:font-size="12pt" fo:font-style="normal" fo:text-shadow="none" style:text-underline-style="none" fo:font-weight="normal" style:font-size-asian="12pt" style:font-style-asian="normal" style:font-weight-asian="normal" style:font-name-complex="PMingLiu" style:font-size-complex="12pt" style:font-style-complex="normal" style:font-weight-complex="normal"/>
    </style:style>
    <style:style style:name="ce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808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8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cc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66cc"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8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93366"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8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99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8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b5394"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87" style:family="table-cell" style:parent-style-name="Default">
      <style:table-cell-properties fo:background-color="#f3f3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b5394"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88" style:family="table-cell" style:parent-style-name="Default">
      <style:table-cell-properties fo:background-color="#f3f3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89" style:family="table-cell" style:parent-style-name="Default">
      <style:table-cell-properties fo:background-color="#f3f3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900ff"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90" style:family="table-cell" style:parent-style-name="Default">
      <style:table-cell-properties fo:background-color="#f3f3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1c232"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93"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6pt" fo:font-style="normal" fo:text-shadow="none" style:text-underline-style="none" fo:font-weight="bold" style:font-size-asian="16pt" style:font-style-asian="normal" style:font-weight-asian="bold" style:font-name-complex="Microsoft Yahei" style:font-size-complex="16pt" style:font-style-complex="normal" style:font-weight-complex="bold"/>
    </style:style>
    <style:style style:name="ce94" style:family="table-cell" style:parent-style-name="Default">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bold" style:font-size-asian="10pt" style:font-style-asian="normal" style:font-weight-asian="bold" style:font-name-complex="Microsoft Yahei" style:font-size-complex="10pt" style:font-style-complex="normal" style:font-weight-complex="bold"/>
    </style:style>
    <style:style style:name="ce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9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6pt" fo:font-style="normal" fo:text-shadow="none" style:text-underline-style="none" fo:font-weight="bold" style:font-size-asian="16pt" style:font-style-asian="normal" style:font-weight-asian="bold" style:font-name-complex="Microsoft Yahei" style:font-size-complex="16pt" style:font-style-complex="normal" style:font-weight-complex="bold"/>
    </style:style>
    <style:style style:name="ce9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51pt 0.74pt 0.51pt"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70c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9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00" style:family="table-cell" style:parent-style-name="Default" style:data-style-name="N100">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bold" style:font-size-asian="10pt" style:font-style-asian="normal" style:font-weight-asian="bold" style:font-name-complex="Microsoft Yahei" style:font-size-complex="10pt" style:font-style-complex="normal" style:font-weight-complex="bold"/>
    </style:style>
    <style:style style:name="ce101" style:family="table-cell" style:parent-style-name="Default" style:data-style-name="N2013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02" style:family="table-cell" style:parent-style-name="Default">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bold" style:font-size-asian="10pt" style:font-style-asian="normal" style:font-weight-asian="bold" style:font-name-complex="Microsoft Yahei" style:font-size-complex="10pt" style:font-style-complex="normal" style:font-weight-complex="bold"/>
    </style:style>
    <style:style style:name="ce103"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51pt 0.74pt 0.51pt"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0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05"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06" style:family="table-cell" style:parent-style-name="Default">
      <style:table-cell-properties fo:border-bottom="1.76pt double-thin #000000" style:border-line-width-bottom="0.51pt 0.74pt 0.51pt"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double-thin #000000" style:border-line-width-top="0.51pt 0.74pt 0.51pt"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data-style-name="N100">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51pt 0.74pt 0.51pt"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09"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1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51pt 0.74pt 0.51pt"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1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16"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9pt" fo:font-style="normal" fo:text-shadow="none" style:text-underline-style="none" fo:font-weight="normal" style:font-size-asian="9pt" style:font-style-asian="normal" style:font-weight-asian="normal" style:font-name-complex="Microsoft Yahei" style:font-size-complex="9pt" style:font-style-complex="normal" style:font-weight-complex="normal"/>
    </style:style>
    <style:style style:name="ce12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8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71.33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9.82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36.3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4.84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56.33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1.31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76.32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06.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9900ff" style:font-name="SimSun" fo:font-size="12pt" fo:font-weight="bold" style:text-underline-style="none" style:text-underline-color="font-color" style:text-line-through-type="none" fo:font-style="normal" style:text-outline="false" fo:text-shadow="none" style:text-position="0% 100%" style:font-name-complex="SimSun" style:font-size-asian="12pt" style:font-size-complex="12pt" style:font-weight-asian="bold" style:font-weight-complex="bold" style:font-style-asian="normal" style:font-style-complex="normal"/>
    </style:style>
    <style:style style:name="T2" style:family="text">
      <style:text-properties fo:text-shadow="none" style:font-name="SimSun" fo:font-size="12pt" fo:font-weight="bold" style:text-underline-style="none" style:text-underline-color="font-color" style:text-line-through-type="none" fo:font-style="normal" style:text-outline="false" style:text-position="0% 100%" fo:color="#9900ff" style:font-name-complex="SimSun" style:font-size-asian="12pt" style:font-size-complex="12pt" style:font-weight-asian="bold" style:font-weight-complex="bold" style:font-style-asian="normal" style:font-style-complex="normal"/>
    </style:style>
    <style:style style:name="T3" style:family="text">
      <style:text-properties fo:color="#ff0000" style:font-name="SimSun" fo:font-size="12pt" fo:font-weight="bold" style:text-underline-style="none" style:text-underline-color="font-color" style:text-line-through-type="none" fo:font-style="normal" style:text-outline="false" fo:text-shadow="none" style:text-position="0% 100%" style:font-name-complex="SimSun" style:font-size-asian="12pt" style:font-size-complex="12pt" style:font-weight-asian="bold" style:font-weight-complex="bold" style:font-style-asian="normal" style:font-style-complex="normal"/>
    </style:style>
    <style:style style:name="T4" style:family="text">
      <style:text-properties fo:text-shadow="none" style:font-name="SimSun" fo:font-size="12pt" fo:font-weight="bold" style:text-underline-style="none" style:text-underline-color="font-color" style:text-line-through-type="none" fo:font-style="normal" style:text-outline="false" style:text-position="0% 100%" fo:color="#ff0000" style:font-name-complex="SimSun" style:font-size-asian="12pt" style:font-size-complex="12pt" style:font-weight-asian="bold" style:font-weight-complex="bold" style:font-style-asian="normal" style:font-style-complex="normal"/>
    </style:style>
    <style:style style:name="T5" style:family="text">
      <style:text-properties style:text-position="0% 100%" style:font-style-complex="normal" style:font-style-asian="normal" style:font-weight-complex="bold" style:font-weight-asian="bold" style:font-size-complex="12pt" style:font-size-asian="12pt" style:font-name-complex="SimSun" fo:color="#9900ff" fo:text-shadow="none" style:text-outline="false" fo:font-style="normal" style:text-line-through-type="none" style:text-underline-style="none" style:text-underline-color="font-color" fo:font-weight="bold" fo:font-size="12pt" style:font-name="SimSun"/>
    </style:style>
    <style:style style:name="T6" style:family="text">
      <style:text-properties fo:color="#ffcc00" style:font-name="SimSun" fo:font-size="12pt" fo:font-weight="bold" style:text-underline-style="none" style:text-underline-color="font-color" style:text-line-through-type="none" fo:font-style="normal" style:text-outline="false" fo:text-shadow="none" style:text-position="0% 100%" style:font-name-complex="SimSun" style:font-size-asian="12pt" style:font-size-complex="12pt" style:font-weight-asian="bold" style:font-weight-complex="bold" style:font-style-asian="normal" style:font-style-complex="normal"/>
    </style:style>
    <style:style style:name="T7" style:family="text">
      <style:text-properties fo:text-shadow="none" style:font-name="SimSun" fo:font-size="12pt" fo:font-weight="bold" style:text-underline-style="none" style:text-underline-color="font-color" style:text-line-through-type="none" fo:font-style="normal" style:text-outline="false" style:text-position="0% 100%" fo:color="#ffcc00" style:font-name-complex="SimSun" style:font-size-asian="12pt" style:font-size-complex="12pt" style:font-weight-asian="bold" style:font-weight-complex="bold" style:font-style-asian="normal" style:font-style-complex="normal"/>
    </style:style>
    <style:style style:name="T8" style:family="text">
      <style:text-properties fo:color="#993300" style:font-name="SimSun" fo:font-size="12pt" fo:font-weight="bold" style:text-underline-style="none" style:text-underline-color="font-color" style:text-line-through-type="none" fo:font-style="normal" style:text-outline="false" fo:text-shadow="none" style:text-position="0% 100%" style:font-name-complex="SimSun" style:font-size-asian="12pt" style:font-size-complex="12pt" style:font-weight-asian="bold" style:font-weight-complex="bold" style:font-style-asian="normal" style:font-style-complex="normal"/>
    </style:style>
    <style:style style:name="T9" style:family="text">
      <style:text-properties fo:text-shadow="none" style:font-name="SimSun" fo:font-size="12pt" fo:font-weight="normal" style:text-underline-style="none" style:text-underline-color="font-color" style:text-line-through-type="none" fo:font-style="normal" style:text-outline="false" style:text-position="0% 100%" fo:color="#000000" style:font-name-complex="SimSun" style:font-size-asian="12pt" style:font-size-complex="12pt" style:font-weight-asian="normal" style:font-weight-complex="normal" style:font-style-asian="normal" style:font-style-complex="normal"/>
    </style:style>
    <style:style style:name="T10" style:family="text">
      <style:text-properties fo:color="#000000" style:font-name="SimSun" fo:font-size="12pt" fo:font-weight="normal" style:text-underline-style="none" style:text-underline-color="font-color" style:text-line-through-type="none" fo:font-style="normal" style:text-outline="false" fo:text-shadow="none" style:text-position="0% 100%" style:font-name-complex="SimSun"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更新紀錄"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able:number-columns-spanned="2" table:number-rows-spanned="1">
            <text:p>Double Cross The 3rd Edition D-Lois資料</text:p>
          </table:table-cell>
          <table:covered-table-cell/>
          <table:table-cell table:style-name="ce10" table:number-columns-repeated="24"/>
          <table:table-cell table:number-columns-repeated="998"/>
        </table:table-row>
        <table:table-row table:style-name="ro1">
          <table:table-cell table:style-name="ce2" office:value-type="string" calcext:value-type="string" table:number-columns-spanned="2" table:number-rows-spanned="1">
            <text:p>目前對應規則：規則書一、二、上級、UG、PE、LM、IC、HR，已包括舞臺專用資料</text:p>
          </table:table-cell>
          <table:covered-table-cell/>
          <table:table-cell table:style-name="ce11" table:number-columns-repeated="24"/>
          <table:table-cell table:number-columns-repeated="998"/>
        </table:table-row>
        <table:table-row table:style-name="ro2">
          <table:table-cell table:style-name="ce3" table:number-columns-repeated="26"/>
          <table:table-cell table:number-columns-repeated="998"/>
        </table:table-row>
        <table:table-row table:style-name="ro2">
          <table:table-cell table:style-name="ce4" office:value-type="string" calcext:value-type="string">
            <text:p>更新日期</text:p>
          </table:table-cell>
          <table:table-cell table:style-name="ce4" office:value-type="string" calcext:value-type="string">
            <text:p>更新內容</text:p>
          </table:table-cell>
          <table:table-cell table:style-name="ce3" table:number-columns-repeated="24"/>
          <table:table-cell table:number-columns-repeated="998"/>
        </table:table-row>
        <table:table-row table:style-name="ro2">
          <table:table-cell table:style-name="ce5" office:value-type="date" office:date-value="2016-12-17" calcext:value-type="date">
            <text:p>2016/12/17</text:p>
          </table:table-cell>
          <table:table-cell table:style-name="ce8" office:value-type="string" calcext:value-type="string">
            <text:p>修正各種不明錯誤，對應LM擴充平衡更新，加入對應D-Lois追加的新異能。</text:p>
            <text:p>重新整理異能表，翻譯遺產承繼者道具表(LM)</text:p>
          </table:table-cell>
          <table:table-cell table:style-name="ce12"/>
          <table:table-cell table:style-name="ce3" table:number-columns-repeated="23"/>
          <table:table-cell table:number-columns-repeated="998"/>
        </table:table-row>
        <table:table-row table:style-name="ro2">
          <table:table-cell table:style-name="ce5" office:value-type="date" office:date-value="2020-10-20" calcext:value-type="date">
            <text:p>2020/10/20</text:p>
          </table:table-cell>
          <table:table-cell table:style-name="ce8" office:value-type="string" calcext:value-type="string">
            <text:p>天造者：偏轉→竭盡全力、加強→鞏固</text:p>
            <text:p>變異種:快轉→快進、爆裂化→爆發激漲</text:p>
            <text:p>古代種：接觸→指揮、重啟→重整、蘇生復活→復活(為了避免和敵人異能相撞)</text:p>
          </table:table-cell>
          <table:table-cell table:style-name="ce12"/>
          <table:table-cell table:style-name="ce3" table:number-columns-repeated="23"/>
          <table:table-cell table:number-columns-repeated="998"/>
        </table:table-row>
        <table:table-row table:style-name="ro2">
          <table:table-cell table:style-name="ce5" office:value-type="date" office:date-value="2020-11-02" calcext:value-type="date">
            <text:p>2020/11/2</text:p>
          </table:table-cell>
          <table:table-cell table:style-name="ce9" office:value-type="string" calcext:value-type="string">
            <text:p>修正了PE部分的FH專屬Dlois，優化了部分Dlois的文本，更新了秘密武器和遺產表，並追加了RB異能表</text:p>
          </table:table-cell>
          <table:table-cell table:style-name="ce12"/>
          <table:table-cell table:style-name="ce3" table:number-columns-repeated="23"/>
          <table:table-cell table:number-columns-repeated="998"/>
        </table:table-row>
        <table:table-row table:style-name="ro2">
          <table:table-cell table:style-name="ce5" office:value-type="date" office:date-value="2020-11-03" calcext:value-type="date">
            <text:p>2020/11/3</text:p>
          </table:table-cell>
          <table:table-cell table:style-name="ce9" office:value-type="string" calcext:value-type="string">
            <text:p>優化了各專屬異能的文本</text:p>
          </table:table-cell>
          <table:table-cell table:style-name="ce12"/>
          <table:table-cell table:style-name="ce3" table:number-columns-repeated="23"/>
          <table:table-cell table:number-columns-repeated="998"/>
        </table:table-row>
        <table:table-row table:style-name="ro2">
          <table:table-cell table:style-name="ce5" office:value-type="date" office:date-value="2021-03-27" calcext:value-type="date">
            <text:p>2021/3/27</text:p>
          </table:table-cell>
          <table:table-cell table:style-name="ce9" office:value-type="string" calcext:value-type="string">
            <text:p>追加了經過較對的HR新D-Lois，由於重名將原譯名“諜報員”的FH專用Dlois更名為日文原文“工作員”</text:p>
          </table:table-cell>
          <table:table-cell table:style-name="ce12"/>
          <table:table-cell table:style-name="ce3" table:number-columns-repeated="23"/>
          <table:table-cell table:number-columns-repeated="998"/>
        </table:table-row>
        <table:table-row table:style-name="ro2">
          <table:table-cell table:style-name="ce5" office:value-type="date" office:date-value="2021-08-06" calcext:value-type="date">
            <text:p>2021/8/6</text:p>
          </table:table-cell>
          <table:table-cell table:style-name="ce8" office:value-type="string" calcext:value-type="string">
            <text:p>修正了【複製體】、【人器合一】的文本錯誤，為【遺產繼承者】追加了詳述以遺產取得異能時的規則備註，優化了【人工精靈】的文本（雖然有點拗口但避免了導致和我自己一樣蠢蠢看成可以白嫖一個異能的文本模糊），追加了RU擴新增的六個D-Lois（解說文本過於長長，擇日再翻）</text:p>
          </table:table-cell>
          <table:table-cell table:style-name="ce12"/>
          <table:table-cell table:style-name="ce3" table:number-columns-repeated="23"/>
          <table:table-cell table:number-columns-repeated="998"/>
        </table:table-row>
        <table:table-row table:style-name="ro2">
          <table:table-cell table:style-name="ce5" office:value-type="date" office:date-value="2021-12-20" calcext:value-type="date">
            <text:p>2021/12/20</text:p>
          </table:table-cell>
          <table:table-cell table:style-name="ce9" office:value-type="string" calcext:value-type="string">
            <text:p>追加了混沌原核的【變異種】專屬異能《黃金鎮魂曲》</text:p>
          </table:table-cell>
          <table:table-cell table:style-name="ce12"/>
          <table:table-cell table:style-name="ce3" table:number-columns-repeated="23"/>
          <table:table-cell table:number-columns-repeated="998"/>
        </table:table-row>
        <table:table-row table:style-name="ro2">
          <table:table-cell table:style-name="ce5" office:value-type="date" office:date-value="2022-03-02" calcext:value-type="date">
            <text:p>2022/3/2</text:p>
          </table:table-cell>
          <table:table-cell table:style-name="ce9" office:value-type="string" calcext:value-type="string">
            <text:p>適配2022/2/22的勘誤(《黃金鎮魂曲》最大LV3→1)</text:p>
          </table:table-cell>
          <table:table-cell table:style-name="ce12"/>
          <table:table-cell table:style-name="ce3" table:number-columns-repeated="23"/>
          <table:table-cell table:number-columns-repeated="998"/>
        </table:table-row>
        <table:table-row table:style-name="ro2">
          <table:table-cell table:style-name="ce5" office:value-type="date" office:date-value="2022-04-09" calcext:value-type="date">
            <text:p>2022/4/9</text:p>
          </table:table-cell>
          <table:table-cell table:style-name="ce9" office:value-type="string" calcext:value-type="string">
            <text:p>所有D-Lois限定異能的限制部分由原本錯誤的「-」改為「D-Lois」、優化了【奇跡之血】的文本</text:p>
          </table:table-cell>
          <table:table-cell table:style-name="ce12"/>
          <table:table-cell table:style-name="ce3" table:number-columns-repeated="23"/>
          <table:table-cell table:number-columns-repeated="998"/>
        </table:table-row>
        <table:table-row table:style-name="ro2">
          <table:table-cell table:style-name="ce5" office:value-type="date" office:date-value="2025-08-16" calcext:value-type="date">
            <text:p>2025/8/16</text:p>
          </table:table-cell>
          <table:table-cell table:style-name="ce9" office:value-type="string" calcext:value-type="string">
            <text:p>終於想起來登記的：跟隨UA版本的新症候群D-Lois更新及文字修復</text:p>
          </table:table-cell>
          <table:table-cell table:style-name="ce12"/>
          <table:table-cell table:style-name="ce3" table:number-columns-repeated="23"/>
          <table:table-cell table:number-columns-repeated="998"/>
        </table:table-row>
        <table:table-row table:style-name="ro2">
          <table:table-cell table:style-name="ce6" office:value-type="date" office:date-value="2025-10-21" calcext:value-type="date">
            <text:p>2025/10/21</text:p>
          </table:table-cell>
          <table:table-cell table:style-name="ce9" office:value-type="string" calcext:value-type="string">
            <text:p>追加No.66~92號特殊舞臺D-Lois、OC書聖杯舞臺、平安京物怪錄舞臺D-Lois與NC書CRC舞臺D-Lois</text:p>
          </table:table-cell>
          <table:table-cell table:style-name="ce12"/>
          <table:table-cell table:style-name="ce3" table:number-columns-repeated="23"/>
          <table:table-cell table:number-columns-repeated="998"/>
        </table:table-row>
        <table:table-row table:style-name="ro2">
          <table:table-cell table:style-name="ce5" office:value-type="date" office:date-value="2025-10-29" calcext:value-type="date">
            <text:p>2025/10/29</text:p>
          </table:table-cell>
          <table:table-cell table:style-name="ce9" office:value-type="string" calcext:value-type="string">
            <text:p>勘誤No.68裁定者，追加了可以施加異常狀態《憎惡》</text:p>
          </table:table-cell>
          <table:table-cell table:style-name="ce12"/>
          <table:table-cell table:style-name="ce3" table:number-columns-repeated="23"/>
          <table:table-cell table:number-columns-repeated="998"/>
        </table:table-row>
        <table:table-row table:style-name="ro3">
          <table:table-cell table:style-name="ce5" office:value-type="date" office:date-value="2025-11-07" calcext:value-type="date">
            <text:p>2025/11/7</text:p>
          </table:table-cell>
          <table:table-cell table:style-name="ce9" office:value-type="string" calcext:value-type="string">
            <text:p>校對No.66~No.92, No.HG01~No.CRC15，咒物列表。超能力沒興趣所以放著不管</text:p>
          </table:table-cell>
          <table:table-cell table:style-name="ce12"/>
          <table:table-cell table:style-name="ce3" table:number-columns-repeated="23"/>
          <table:table-cell table:number-columns-repeated="998"/>
        </table:table-row>
        <table:table-row table:style-name="ro2">
          <table:table-cell table:style-name="ce5" office:value-type="date" office:date-value="2026-02-23" calcext:value-type="date">
            <text:p>2026/2/23</text:p>
          </table:table-cell>
          <table:table-cell table:style-name="ce7" office:value-type="string" calcext:value-type="string">
            <text:p>正式追加DF擴展的D-Lois</text:p>
          </table:table-cell>
          <table:table-cell table:style-name="ce3" table:number-columns-repeated="24"/>
          <table:table-cell table:number-columns-repeated="998"/>
        </table:table-row>
        <table:table-row table:style-name="ro2">
          <table:table-cell table:style-name="ce5" office:value-type="date" office:date-value="2026-02-25" calcext:value-type="date">
            <text:p>2026/2/25</text:p>
          </table:table-cell>
          <table:table-cell table:style-name="ce7" office:value-type="string" calcext:value-type="string">
            <text:p>追加RW擴展的D-Lois</text:p>
          </table:table-cell>
          <table:table-cell table:style-name="ce3" table:number-columns-repeated="24"/>
          <table:table-cell table:number-columns-repeated="998"/>
        </table:table-row>
        <table:table-row table:style-name="ro2">
          <table:table-cell table:style-name="ce5" office:value-type="date" office:date-value="2026-03-06" calcext:value-type="date">
            <text:p>2026/3/6</text:p>
          </table:table-cell>
          <table:table-cell table:style-name="ce7" office:value-type="string" calcext:value-type="string">
            <text:p>勘誤DF擴展的錯誤</text:p>
          </table:table-cell>
          <table:table-cell table:style-name="ce3" table:number-columns-repeated="24"/>
          <table:table-cell table:number-columns-repeated="998"/>
        </table:table-row>
        <table:table-row table:style-name="ro2" table:number-rows-repeated="18">
          <table:table-cell table:style-name="ce7" table:number-columns-repeated="2"/>
          <table:table-cell table:style-name="ce3" table:number-columns-repeated="24"/>
          <table:table-cell table:number-columns-repeated="998"/>
        </table:table-row>
        <table:table-row table:style-name="ro2" table:number-rows-repeated="962">
          <table:table-cell table:style-name="ce3" table:number-columns-repeated="26"/>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table table:name="D-Lois" table:style-name="ta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0" table:default-cell-style-name="Default"/>
        <table:table-column table:style-name="co4" table:number-columns-repeated="998" table:default-cell-style-name="Default"/>
        <table:table-row table:style-name="ro2">
          <table:table-cell table:style-name="ce13" office:value-type="string" calcext:value-type="string">
            <text:p>編號</text:p>
          </table:table-cell>
          <table:table-cell table:style-name="ce13" office:value-type="string" calcext:value-type="string">
            <text:p>名稱</text:p>
          </table:table-cell>
          <table:table-cell table:style-name="ce13" office:value-type="string" calcext:value-type="string">
            <text:p>解說</text:p>
          </table:table-cell>
          <table:table-cell table:style-name="ce13" office:value-type="string" calcext:value-type="string">
            <text:p>效果</text:p>
          </table:table-cell>
          <table:table-cell table:style-name="ce13" office:value-type="string" calcext:value-type="string">
            <text:p>參照</text:p>
          </table:table-cell>
          <table:table-cell table:style-name="ce13" office:value-type="string" calcext:value-type="string">
            <text:p>備註</text:p>
          </table:table-cell>
          <table:table-cell table:style-name="ce3" table:number-columns-repeated="20"/>
          <table:table-cell table:number-columns-repeated="998"/>
        </table:table-row>
        <table:table-row table:style-name="ro1">
          <table:table-cell table:style-name="ce14" office:value-type="string" calcext:value-type="string">
            <text:p>No.1</text:p>
          </table:table-cell>
          <table:table-cell table:style-name="ce14" office:value-type="string" calcext:value-type="string">
            <text:p>賢者之石 レネゲイドクリスタル Renegade Crystal</text:p>
          </table:table-cell>
          <table:table-cell table:style-name="ce17" office:value-type="string" calcext:value-type="string">
            <text:p>你是賢者之石的適合者。以半融合的狀態植入賢者之石。你可以行使它的力量，但同時也要承受石頭帶來的身體與精神上的痛苦。</text:p>
            <text:p>你可能是在實驗的結果或是偶然的事故中成為其擁有者，但是要用現有的手段拿出石頭是不可能的。</text:p>
            <text:p>賢者之石(背教者結晶)是一種高濃度R病毒封存在礦石之中的型態。植入石頭的人可以使R病毒的力量爆發性的增幅，但如果不是天生的適合者，植入的結果不是變成原菌就是死亡。另外，目前沒有人工再現賢者之石的案例。</text:p>
            <text:p>據說賢者之石會保有前持有者的意識跟記憶。</text:p>
          </table:table-cell>
          <table:table-cell table:style-name="ce17" office:value-type="string" calcext:value-type="string">
            <text:p>於你進行判定之前發動，此次判定的暴擊值-2(下限2)。</text:p>
            <text:p>使用了這個效果的主要階段結束時，你的侵蝕率+1D10。</text:p>
            <text:p>次數限制：劇本中一次。</text:p>
          </table:table-cell>
          <table:table-cell table:style-name="ce17" table:number-columns-repeated="2"/>
          <table:table-cell table:style-name="ce12" table:number-columns-repeated="20"/>
          <table:table-cell table:number-columns-repeated="998"/>
        </table:table-row>
        <table:table-row table:style-name="ro1">
          <table:table-cell table:style-name="ce14" office:value-type="string" calcext:value-type="string">
            <text:p>No.2</text:p>
          </table:table-cell>
          <table:table-cell table:style-name="ce14" office:value-type="string" calcext:value-type="string">
            <text:p>起源種 オリジナルレネゲイド Original Renegade</text:p>
          </table:table-cell>
          <table:table-cell table:style-name="ce17" office:value-type="string" calcext:value-type="string">
            <text:p>你是被二十年前在中東遺跡發現的R病毒所感染的，最初的超越者。可能是遺跡的關係者，或是當年空難的倖存者。</text:p>
            <text:p>你也可能是碰到其他古代遺跡或古代傳下來的R病毒相關遺物而受到感染覺醒的。</text:p>
            <text:p>但無論是哪一種形式，你體內的病毒跟現在在世界廣泛流傳的R病毒並不是一樣的東西，而是更特別的存在。特化能力強化的特性而不像一般超越者擁有的使肉體跟精神增幅的力量。</text:p>
          </table:table-cell>
          <table:table-cell table:style-name="ce17" office:value-type="string" calcext:value-type="string">
            <text:p>你有著專用的侵蝕率修正表，不再因為修正率而獲得判定骰的加成，但能力的等級上升效果會更容易獲得。</text:p>
            <text:p>侵蝕率修正表 </text:p>
            <text:p>侵蝕率　　　能力的等級上升</text:p>
            <text:p>0~79%　　　Lv+0</text:p>
            <text:p>80~99% 　　Lv+1</text:p>
            <text:p>100~149% 　Lv+2</text:p>
            <text:p>150~199% 　Lv+3</text:p>
            <text:p>200%~ 　　 Lv+4</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3</text:p>
          </table:table-cell>
          <table:table-cell table:style-name="ce14" office:value-type="string" calcext:value-type="string">
            <text:p>變異種：[症狀名] イレギュラー Irregular</text:p>
          </table:table-cell>
          <table:table-cell table:style-name="ce17" office:value-type="string" calcext:value-type="string">
            <text:p>雖然超越者的能力大多已經按照症狀與效果分門別類了，但是你體內的R病毒明顯是突變的病種。有著其他超越者沒有的「還沒有確認」的異常能力。那將是你最強的底牌吧。</text:p>
          </table:table-cell>
          <table:table-cell table:style-name="ce17" office:value-type="string" calcext:value-type="string">
            <text:p>取得該D露易絲時，選擇自己擁有的症狀的其中一個填入其中(ex.變異種：異變魔獸)。</text:p>
            <text:p>你可以從變異種專用異能中先免費取得一個異能Lv1，之後也可以消耗經驗值取得其他異能或提升異能等級。</text:p>
            <text:p>但是能夠成長的異能只有取得D-Lois時所選擇症候的變異種專用異能或者標記了「特殊」的變異種專用異能。</text:p>
            <text:p>你使用了異能的判定骰數總是會-1D，這個負面效果只能通過組合變異種專用的異能來解除</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4</text:p>
          </table:table-cell>
          <table:table-cell table:style-name="ce14" office:value-type="string" calcext:value-type="string">
            <text:p>對抗種 カウンターレネゲイド Counter Renegade</text:p>
          </table:table-cell>
          <table:table-cell table:style-name="ce17" office:value-type="string" calcext:value-type="string">
            <text:p>你是超越者殺手，像是白血球的存在，不知為何你擁有著只對其他超越者有害的攻擊手段，雖然使用時也會造成自己身體的損傷。</text:p>
          </table:table-cell>
          <table:table-cell table:style-name="ce17" office:value-type="string" calcext:value-type="string">
            <text:p>你的攻擊對象是超越者(包括原菌)時，攻擊的傷害+2D10。</text:p>
            <text:p>使用效果的主要階段結束後，你失去3點HP，即使會因此而導致HP降低至0或以下時也可以發動。</text:p>
            <text:p>範圍攻擊中有超越者跟非超越者時，只有超越者的傷害+2D10。</text:p>
            <text:p>範圍攻擊複數超越者時，不會額外減少HP(還是-3)。</text:p>
            <text:p>這個效果總是會隨著你的攻擊而發動，但是攻擊未能命中時，你不會因為這個D-lois的效果而失去HP</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5</text:p>
          </table:table-cell>
          <table:table-cell table:style-name="ce14" office:value-type="string" calcext:value-type="string">
            <text:p>實驗體 ロストナンバー Lost Number</text:p>
          </table:table-cell>
          <table:table-cell table:style-name="ce17" office:value-type="string" calcext:value-type="string">
            <text:p>你曾經參與跟R病毒相關的實驗，作為結果強化了肉體跟精神，但同時有著R病毒不穩定的代價。實驗體(Lost Number)是實驗結束或失敗後，因為相關情報都被消除而如此稱呼。可能是UGN，也可能是FH，可能是自願，可能是被害者。可能是唯一的倖存者。</text:p>
          </table:table-cell>
          <table:table-cell table:style-name="ce17" office:value-type="string" calcext:value-type="string">
            <text:p>取得時這D露易絲時，侵蝕值基本值+5並獲得自由能力值點數四點，可自由分配。</text:p>
            <text:p>能力值必須標注分配前的數值。ex.【肉體】5 (9)</text:p>
            <text:p>使用能力值進行判定時採用分配後的後者，但是成長需要的經驗點則看分配前的前者。</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6</text:p>
          </table:table-cell>
          <table:table-cell table:style-name="ce14" office:value-type="string" calcext:value-type="string">
            <text:p>戰鬥人格 デュアルフェイス Double Face</text:p>
          </table:table-cell>
          <table:table-cell table:style-name="ce17" office:value-type="string" calcext:value-type="string">
            <text:p>在你的體內，有著更熟悉R病毒的人格。這個人格只會在特定的條件下出現，並有著跟主人格相比數倍的戰鬥力。</text:p>
            <text:p>持有人格的原因可能是單純的雙重人格，或是實驗或訓練的結果。</text:p>
          </table:table-cell>
          <table:table-cell table:style-name="ce17" office:value-type="string" calcext:value-type="string">
            <text:p>當你的侵蝕率超過100%的時候，你的所有判定+5D，攻擊力+5(跟侵蝕率修正另外計算)。</text:p>
            <text:p>但是回歸階段時根據普通露易絲數量決定擲骰數後，回歸骰數-1D，進行雙倍回歸時，則於雙倍之後再-1D（假設有5個，則為5×2-1），進行追加回歸時則照常計算</text:p>
            <text:p>此外，第二人格的出現與是否達到100%侵蝕無關，即使沒有達到100%侵蝕時，在RP上也可以表現出第二人格的存在</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7</text:p>
          </table:table-cell>
          <table:table-cell table:style-name="ce14" office:value-type="string" calcext:value-type="string">
            <text:p>特權階級 ハイロード High Lord</text:p>
          </table:table-cell>
          <table:table-cell table:style-name="ce17" office:value-type="string" calcext:value-type="string">
            <text:p>你出身極端高貴。可能是國際企業的董事，某個國家的政要，甚至是UGN上層的成員。(請跟GM商談自己能扮演的角色)</text:p>
            <text:p>演出上，你有著支持他人，下達命令的習慣或才能。可能是使用特權階級的地位或財力，獨佔技術或專屬醫療班來源助他人。</text:p>
          </table:table-cell>
          <table:table-cell table:style-name="ce17" office:value-type="string" calcext:value-type="string">
            <text:p>自己可以把泰特司昇華所獲得的效果用在別人身上，像是增加對方的判定骰或降低對方的爆擊值。對象可與自己的泰特司昇華效果並用。</text:p>
            <text:p>但是你的泰特司昇華的效果中，「爆擊值-1(下限2)」的下限改為5。「爆擊值-1(下限5)」</text:p>
            <text:p>S露易絲的昇華不適用於此D露易絲的效果。</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8</text:p>
          </table:table-cell>
          <table:table-cell table:style-name="ce14" office:value-type="string" calcext:value-type="string">
            <text:p>生還者 リターナー Returner</text:p>
          </table:table-cell>
          <table:table-cell table:style-name="ce17" office:value-type="string" calcext:value-type="string">
            <text:p>你有著強大的自我，能夠從衝動中回歸，故被稱為「Returner」</text:p>
            <text:p>確實的認知自我與所在之地，藉此從R病毒的侵蝕中守住心靈。</text:p>
            <text:p>這可能是嚴格訓練的結果，或只是單純有絕對放不開手的記憶。</text:p>
          </table:table-cell>
          <table:table-cell table:style-name="ce17" office:value-type="string" calcext:value-type="string">
            <text:p>你在回溯階段時，根據普通露易絲數量決定擲骰數後，該數量必定+3D。</text:p>
            <text:p>(比方說剩餘6個一般露易絲時，一倍回溯是6+3=9D，雙倍是6X2+3=15D)</text:p>
            <text:p>你不能使用泰特司昇華的效果中「判定骰+10D」的效果</text:p>
            <text:p>這個D露易絲不能跟其他D露易絲並存，也不能重複取得</text:p>
          </table:table-cell>
          <table:table-cell table:style-name="ce17" table:number-columns-repeated="2"/>
          <table:table-cell table:style-name="ce20" table:number-columns-repeated="20"/>
          <table:table-cell table:number-columns-repeated="998"/>
        </table:table-row>
        <table:table-row table:style-name="ro1">
          <table:table-cell table:style-name="ce14" office:value-type="string" calcext:value-type="string">
            <text:p>No.9</text:p>
          </table:table-cell>
          <table:table-cell table:style-name="ce14" office:value-type="string" calcext:value-type="string">
            <text:p>複製體 デュプリケイト Duplicate</text:p>
          </table:table-cell>
          <table:table-cell table:style-name="ce17" office:value-type="string" calcext:value-type="string">
            <text:p>你是某個人的克隆體，繼承原典的不完全的記憶與一部份的能力。</text:p>
            <text:p>現在的技術雖然能複製擁有同樣基因的人類，但是現有的技術無法完整的複製能力，依然受限於個人差異的問題。</text:p>
            <text:p>超越者的複製依然不完全，別說能力，其他外觀上的特徵都可能有所差異。</text:p>
            <text:p>記憶方面可以跟GM討論設定。</text:p>
          </table:table-cell>
          <table:table-cell table:style-name="ce17" office:value-type="string" calcext:value-type="string">
            <text:p>從自己取得的症狀以外的症狀中，選擇並免費以LV1取得一個異能，但無法以此取得「限制:-」以外的異能和敵人專用異能。</text:p>
            <text:p>以該效果取得的「時機:常駐」以外的異能的侵蝕值+2，若以此取得「時機:常駐」的異能，則你的侵蝕率基本值+3。</text:p>
            <text:p>你可以繼續使用經驗來提升以該D-Lois取得的異能的等級，其最大等級不受你的血統影響，固定與原本記述的最大等級一致。</text:p>
          </table:table-cell>
          <table:table-cell table:style-name="ce17" office:value-type="string" calcext:value-type="string">
            <text:p>LM P65</text:p>
          </table:table-cell>
          <table:table-cell table:style-name="ce17"/>
          <table:table-cell table:style-name="ce3" table:number-columns-repeated="20"/>
          <table:table-cell table:number-columns-repeated="998"/>
        </table:table-row>
        <table:table-row table:style-name="ro1">
          <table:table-cell table:style-name="ce14" office:value-type="string" calcext:value-type="string">
            <text:p>No.10</text:p>
          </table:table-cell>
          <table:table-cell table:style-name="ce14" office:value-type="string" calcext:value-type="string">
            <text:p>傳承者：&lt;技能名&gt; サクセサー Successor</text:p>
          </table:table-cell>
          <table:table-cell table:style-name="ce17" office:value-type="string" calcext:value-type="string">
            <text:p>你繼承著家裡代代相傳的密傳之技。</text:p>
            <text:p>很可能是單子相傳的武術，或是帝王學或戰術理論等菁英教育，或是接受情報組織的培訓。就結果而言，你獲得他人難以模仿的高超技巧。</text:p>
          </table:table-cell>
          <table:table-cell table:style-name="ce17" office:value-type="string" calcext:value-type="string">
            <text:p>取得這D露易絲時，選擇一個技能填入(ex.傳承者：&lt;近戰&gt;)。</text:p>
            <text:p>進行該技能的判定之前可以發動，該判定爆擊值-1(下限5)。</text:p>
            <text:p>使用的主要階段結束後，HP-10。</text:p>
            <text:p>次數限制：場景中一次，劇本中合計三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11</text:p>
          </table:table-cell>
          <table:table-cell table:style-name="ce14" office:value-type="string" calcext:value-type="string">
            <text:p>秘密武器：道具名 トイボックス Toybox</text:p>
          </table:table-cell>
          <table:table-cell table:style-name="ce17" office:value-type="string" calcext:value-type="string">
            <text:p>你擁有一個特殊的道具。</text:p>
            <text:p>那個道具可能是UGN或是軍事組織開發的最新兵器或是試作品，其中也包刮被EXR病毒感染的特殊道具或是被R病毒感染的古代遺物。因為某種理由無法交給他人使用，可能是認證或資質上的問題。</text:p>
            <text:p>詳細的取得設定請跟GM討論。</text:p>
          </table:table-cell>
          <table:table-cell table:style-name="ce17" office:value-type="string" calcext:value-type="string">
            <text:p>取得這D露易絲時，可以不消費經驗點選擇一個秘密武器專用道具並常備化。之後可以消費經驗取得秘密武器專用道具，一共可以取得三個。</text:p>
            <text:p>取得的道具不能讓你以外的角色使用或裝備，就算持有也不能發揮效果</text:p>
            <text:p>初期侵蝕+5</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12</text:p>
          </table:table-cell>
          <table:table-cell table:style-name="ce14" office:value-type="string" calcext:value-type="string">
            <text:p>古代種 エンシェントレネゲイド Ancient Renegade</text:p>
          </table:table-cell>
          <table:table-cell table:style-name="ce17" office:value-type="string" calcext:value-type="string">
            <text:p>你是從古活到現在的超越者。寄宿在你身上的R病毒跟其超越者身上的有著非常不同的特性。</text:p>
            <text:p>古代的R病毒有著不會讓宿主老化，並給予現在的R病毒所沒有的能力。</text:p>
            <text:p>被這種病毒感染後，你的時間停滯，獲得不老的身體。但代價就是永遠的孤獨。</text:p>
            <text:p>你也可能是被其他古代種所感染的新生古代種。詳細設定請跟GM討論。</text:p>
          </table:table-cell>
          <table:table-cell table:style-name="ce17" office:value-type="string" calcext:value-type="string">
            <text:p>取得時這D露易絲時，可以從古代種專用能力中免費獲得一個能力Lv1。</text:p>
            <text:p>之後也可以消耗經驗值取得其他能力或提升能力等級。</text:p>
            <text:p>另外你將保持被感染時的模樣，不會老也不會死</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13</text:p>
          </table:table-cell>
          <table:table-cell table:style-name="ce14" office:value-type="string" calcext:value-type="string">
            <text:p>復仇者 アヴェンジャー Avenger</text:p>
          </table:table-cell>
          <table:table-cell table:style-name="ce17" office:value-type="string" calcext:value-type="string">
            <text:p>你抱有復仇的使命，而R病毒也因為你的仇恨而活性化。詳細設定可以跟GM討論。</text:p>
          </table:table-cell>
          <table:table-cell table:style-name="ce17" office:value-type="string" calcext:value-type="string">
            <text:p>傷害計算前使用，傷害值追加「【你的最大HP】減去【你現在的HP】」。</text:p>
            <text:p>次數限制：劇本中一次。</text:p>
            <text:p>取得時這D露易絲時，你的復仇對象必須是你的固定露易絲之一，並且變成泰特司。</text:p>
            <text:p>這個泰特司可以照常昇華，但劇本結束後仍然會以泰特司的樣子成為你的固定露易絲。</text:p>
            <text:p>你可以在你完成復仇後消除這個D露易絲。</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14</text:p>
          </table:table-cell>
          <table:table-cell table:style-name="ce14" office:value-type="string" calcext:value-type="string">
            <text:p>安定體 スタビリティ Stability</text:p>
          </table:table-cell>
          <table:table-cell table:style-name="ce17" office:value-type="string" calcext:value-type="string">
            <text:p>你擅長控制R病毒。跟其他超越者相比，你有著抵抗超越者之間衝動共鳴的抵抗力。因為有著使R病毒安定的能力而在研究員中被稱為安定體。</text:p>
            <text:p>你可能是熟練控制R病毒的方法，或是無自覺的抑制R病毒。或是單純性格上的安定，或是某種手術的結果。詳細設定可以跟GM討論</text:p>
          </table:table-cell>
          <table:table-cell table:style-name="ce17" office:value-type="string" calcext:value-type="string">
            <text:p>你在回溯階段擲骰後使用，可以再重骰一次，然後跟之前的結果中選擇一個使用。</text:p>
            <text:p>但是，重骰時必須使用之前所投擲的骰子數目，不能改成兩倍或改為一倍。此效果只能用於一倍或雙倍回溯，不能用於追加擲骰上。</text:p>
            <text:p>次數限制：劇本中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15</text:p>
          </table:table-cell>
          <table:table-cell table:style-name="ce14" office:value-type="string" calcext:value-type="string">
            <text:p>觸媒 カタリスト Catalyst</text:p>
          </table:table-cell>
          <table:table-cell table:style-name="ce17" office:value-type="string" calcext:value-type="string">
            <text:p>你有著活化他人的R病毒的能力。</text:p>
            <text:p>在R病毒中，有著不是強化宿主，而是促進其他R病毒活性化的特殊病毒，在研究員中被稱為觸媒。這個特殊性質目前無法再現，是一部份超越者的固有能力。觸媒的能力有可能極端不安定，需要用激昂的感情與對象的精神進行連結。因為能上升整體隊伍的戰力而在菁英中非常受歡迎。</text:p>
          </table:table-cell>
          <table:table-cell table:style-name="ce17" office:value-type="string" calcext:value-type="string">
            <text:p>在先攻階段時選擇你以外的一名登場角色。選擇的角色馬上進行主要階段，就算該角色已行動也能發動，而且就算主要階段結束後也不會變成【已行動】。對象必須是超越者或原菌。</text:p>
            <text:p>次數限制：劇本中一次。</text:p>
            <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16</text:p>
          </table:table-cell>
          <table:table-cell table:style-name="ce14" office:value-type="string" calcext:value-type="string">
            <text:p>特異點 シンギュラリティ Singularity</text:p>
          </table:table-cell>
          <table:table-cell table:style-name="ce17" office:value-type="string" calcext:value-type="string">
            <text:p>你有著註定人生波瀾萬丈的命運。獲得R病毒的力量，也不過就是你傳說的開始而已。</text:p>
            <text:p>身為特異點，你身上的R病毒會將異常的機率實現在你身上。你就像輕小說的主角一樣，機率再低的事故都會「偶然」的發生，像是身邊跟隨著惡作劇之神一般。從轉角撞到咬著麵包的女孩子，到為了保護朋友向神明宣戰等等，你的「不幸」迫使你被捲入各種事件，你的「幸運」會實現你的願望，命運逼迫你被造就成傳奇。當然只要在你的精神還是人類構造的時候，這些不過就是單純的異常的偶然。</text:p>
          </table:table-cell>
          <table:table-cell table:style-name="ce17" office:value-type="string" calcext:value-type="string">
            <text:p>任意判定前使用，該判定達成值+20。</text:p>
            <text:p>次數限制：劇本中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17</text:p>
          </table:table-cell>
          <table:table-cell table:style-name="ce14" office:value-type="string" calcext:value-type="string">
            <text:p>奇妙的鄰人 ストレンジネイバー Strange Neighbor</text:p>
          </table:table-cell>
          <table:table-cell table:style-name="ce17" office:value-type="string" calcext:value-type="string">
            <text:p>世界上的RB一個接著一個覺醒，而其中一個協力型RB，在某一天突然出現在你的體內。你注意到它的存在時，一定產生恐慌或是心理障礙吧。但是跨過那個混亂期，你與對方建立了牽絆。你獲得他的協助，學到其他超越者不可能做到的能力。</text:p>
          </table:table-cell>
          <table:table-cell table:style-name="ce17" office:value-type="string" calcext:value-type="string">
            <text:p>取得時這D露易絲時，可以從RB專用能力中免費獲得一個《起源：●●》的能力Lv1。</text:p>
            <text:p>之後也可以消耗經驗值取得《人類之鄰》以外的RB專用能力或提升能力等級。</text:p>
            <text:p>你被協力型的RB所憑依，名字跟形狀可自由設定。</text:p>
            <text:p>憑依的RB可以是與你意識共生，或是獨立型的角色，但規則上視作與角色為統一對象，GM認可的情況下可做為NPC登場。</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18</text:p>
          </table:table-cell>
          <table:table-cell table:style-name="ce14" office:value-type="string" calcext:value-type="string">
            <text:p>組織的助力 (UGN特工專用) バックウップ Backup</text:p>
          </table:table-cell>
          <table:table-cell table:style-name="ce17" office:value-type="string" calcext:value-type="string">
            <text:p>你接受UGN的後方支持。</text:p>
            <text:p>UGN是十幾年前設立的組織，接受包刮國際企業蘭徹斯特企業和其他企業跟國家的投資，在各方面有著重大影響力。</text:p>
            <text:p>其內部有著世界最高級的R病毒研究組織 「研究室R」。對超越者戰鬥的精英集團「打擊獵犬」。超越者專門的醫療班「白之手」。在R病毒關聯事件中，比UGN還要強力的支援組織是不存在的。</text:p>
          </table:table-cell>
          <table:table-cell table:style-name="ce17" office:value-type="string" calcext:value-type="string">
            <text:p>只限工作為【UGN特工】的角色可取得</text:p>
            <text:p>在任意判定前使用，將判定的能力值視為10，判定的技能視為Lv5來判定。</text:p>
            <text:p>使用這效果時接受侵蝕率的骰子修正跟泰特司昇華的效果。</text:p>
            <text:p>但該判定不能使用能力。</text:p>
            <text:p>(也就是說直接改成10D10+5加上其他修正)</text:p>
            <text:p>次數限制：劇本中三次。</text:p>
          </table:table-cell>
          <table:table-cell table:style-name="ce17"/>
          <table:table-cell table:style-name="ce17" office:value-type="string" calcext:value-type="string">
            <text:p>UGN特工專用</text:p>
          </table:table-cell>
          <table:table-cell table:style-name="ce3" table:number-columns-repeated="20"/>
          <table:table-cell table:number-columns-repeated="998"/>
        </table:table-row>
        <table:table-row table:style-name="ro1">
          <table:table-cell table:style-name="ce14" office:value-type="string" calcext:value-type="string">
            <text:p>No.19</text:p>
          </table:table-cell>
          <table:table-cell table:style-name="ce14" office:value-type="string" calcext:value-type="string">
            <text:p>領導者 (UGN支部長專用) リーダーシップ Leadership</text:p>
          </table:table-cell>
          <table:table-cell table:style-name="ce17" office:value-type="string" calcext:value-type="string">
            <text:p>你是UGN支部長中也特別優秀的領導者。</text:p>
            <text:p>UGN組織的性質使的他在各個國家會因為當地支部長的場合產生巨大變化。日本支部長的霧穀是當中的穩健派，與政府機關和公安員警等機關調整利害再行動的傾向。</text:p>
            <text:p>但是受到政變的影響，地方支部的許可權變得更大，主要是以都市的支部為單位在行動。</text:p>
          </table:table-cell>
          <table:table-cell table:style-name="ce17" office:value-type="string" calcext:value-type="string">
            <text:p>只限工作為【UGN支部長】的角色可取得</text:p>
            <text:p>場景內的角色的任意判定前使用，該判定+5D，爆擊值-1(下限5)</text:p>
            <text:p>次數限制：劇本中一次。</text:p>
          </table:table-cell>
          <table:table-cell table:style-name="ce17"/>
          <table:table-cell table:style-name="ce17" office:value-type="string" calcext:value-type="string">
            <text:p>UGN支部長專用</text:p>
          </table:table-cell>
          <table:table-cell table:style-name="ce3" table:number-columns-repeated="20"/>
          <table:table-cell table:number-columns-repeated="998"/>
        </table:table-row>
        <table:table-row table:style-name="ro1">
          <table:table-cell table:style-name="ce14" office:value-type="string" calcext:value-type="string">
            <text:p>No.20</text:p>
          </table:table-cell>
          <table:table-cell table:style-name="ce14" office:value-type="string" calcext:value-type="string">
            <text:p>精銳：&lt;技能名&gt; (UGN之子專用) トゥルーボーン True Bone</text:p>
          </table:table-cell>
          <table:table-cell table:style-name="ce17" office:value-type="string" calcext:value-type="string">
            <text:p>你是UGN從小培育的精銳。</text:p>
            <text:p>從出身或是年幼的時候就有著R病毒的關係，幼年期的你無法自在控制那股力量，因此從小就接受組織的訓練。訓練中變成怪物被處理掉的例子也不在少數。</text:p>
            <text:p>之後會受到其他的設施，針對其適性做專門性的訓練。因此即使是十幾歲的少年少女，也可能被培育成曆戰的傭兵跟經驗豐富的醫生。</text:p>
          </table:table-cell>
          <table:table-cell table:style-name="ce17" office:value-type="string" calcext:value-type="string">
            <text:p>只限工作為【UGN之子】的角色可取得</text:p>
            <text:p>取得這D露易絲時，選擇一個技能填入(ex.精銳：&lt;射擊&gt;)。</text:p>
            <text:p>該技能的等級自動+5，技能必須標注提升前的等級。ex.&lt;射擊&gt;5 (10)</text:p>
            <text:p>使用技能判定採用提升後的後者，但是成長需要的經驗點則看提升前的前者</text:p>
            <text:p>初期侵蝕+2</text:p>
          </table:table-cell>
          <table:table-cell table:style-name="ce17"/>
          <table:table-cell table:style-name="ce17" office:value-type="string" calcext:value-type="string">
            <text:p>UGN之子專用</text:p>
          </table:table-cell>
          <table:table-cell table:style-name="ce3" table:number-columns-repeated="20"/>
          <table:table-cell table:number-columns-repeated="998"/>
        </table:table-row>
        <table:table-row table:style-name="ro1">
          <table:table-cell table:style-name="ce14" office:value-type="string" calcext:value-type="string">
            <text:p>No.21</text:p>
          </table:table-cell>
          <table:table-cell table:style-name="ce14" office:value-type="string" calcext:value-type="string">
            <text:p>神格 (RB專用) ディエティ Deity</text:p>
          </table:table-cell>
          <table:table-cell table:style-name="ce17" office:value-type="string" calcext:value-type="string">
            <text:p>你是曾經接受信仰的神佛，或是某個地區孕育的自然神靈，或者是有著能與之匹敵的力量的RB。</text:p>
            <text:p>研究者間流傳著一種說法，過去傳說中出現的神靈，精靈，英雄是一種RB，而且可能存活至現代。對於不知道超越者存在前人而言，或許把他們視作惡魔或神祉吧。</text:p>
          </table:table-cell>
          <table:table-cell table:style-name="ce17" office:value-type="string" calcext:value-type="string">
            <text:p>只限工作為【背教者生命體】的角色可取得</text:p>
            <text:p>於先攻階段使用，你可以引起地震或颶風等天災，破壞場景內的一個建築或一個載具，或者使登場的一個交戰區內的集團戰鬥不能，但這個效果不會造成角色傷害，NPC的下場由GM決定。</text:p>
            <text:p>戰鬥中的發動時機是主動階段。</text:p>
            <text:p>次數限制：劇本中一次。</text:p>
          </table:table-cell>
          <table:table-cell table:style-name="ce17"/>
          <table:table-cell table:style-name="ce17" office:value-type="string" calcext:value-type="string">
            <text:p>RB專用</text:p>
          </table:table-cell>
          <table:table-cell table:style-name="ce3" table:number-columns-repeated="20"/>
          <table:table-cell table:number-columns-repeated="998"/>
        </table:table-row>
        <table:table-row table:style-name="ro1">
          <table:table-cell table:style-name="ce14" office:value-type="string" calcext:value-type="string">
            <text:p>No.22</text:p>
          </table:table-cell>
          <table:table-cell table:style-name="ce14" office:value-type="string" calcext:value-type="string">
            <text:p>轉生者 (RB專用) リインカーネーション Reincarnation</text:p>
          </table:table-cell>
          <table:table-cell table:style-name="ce17" office:value-type="string" calcext:value-type="string">
            <text:p>你有著不是你的人類的記憶，很可能是因為從誕生時就被繼承其記憶的R病毒所感染的原因吧，但就算有著人類的記憶，你不是人類的事時也不會改變。</text:p>
            <text:p>GM許可的話，可以創造出繼承死去角色記憶的轉生者。</text:p>
          </table:table-cell>
          <table:table-cell table:style-name="ce17" office:value-type="string" calcext:value-type="string">
            <text:p>只限工作為【背教者生命體】的角色可取得</text:p>
            <text:p>從自己取得的症狀以外的症狀中，選擇並免費獲得一個異能，其等級為[最大等級-3](最低Lv1)。取得的能力不能用經驗點升級</text:p>
            <text:p>但不能選擇有限制的異能，敵人專屬異能，【時機：常駐】的異能。</text:p>
            <text:p>取得的異能被視為【限制：100%】的異能，該能力的侵蝕率上升再+4</text:p>
          </table:table-cell>
          <table:table-cell table:style-name="ce17"/>
          <table:table-cell table:style-name="ce17" office:value-type="string" calcext:value-type="string">
            <text:p>RB專用</text:p>
          </table:table-cell>
          <table:table-cell table:style-name="ce3" table:number-columns-repeated="20"/>
          <table:table-cell table:number-columns-repeated="998"/>
        </table:table-row>
        <table:table-row table:style-name="ro1">
          <table:table-cell table:style-name="ce14" office:value-type="string" calcext:value-type="string">
            <text:p>No.23</text:p>
          </table:table-cell>
          <table:table-cell table:style-name="ce14" office:value-type="string" calcext:value-type="string">
            <text:p>天造者 (純血專用) 申し子 セレクティッド Selected</text:p>
          </table:table-cell>
          <table:table-cell table:style-name="ce17" office:value-type="string" calcext:value-type="string">
            <text:p>你極端的擅長使役R病毒的力量。純血種本來就比其他血統更能使用高威力的能力，但你的情況是再對自己的能力進行改造和調整，創造出新的能力。這只有能夠自在的操控R病毒的「被選上之人」才做得到。</text:p>
          </table:table-cell>
          <table:table-cell table:style-name="ce17" office:value-type="string" calcext:value-type="string">
            <text:p>只限血統為【純血種】的角色可取得</text:p>
            <text:p>你可以從天造者專用異能中先免費取得一個能力Lv1，之後也可以消耗經驗值提升該能力等級。</text:p>
            <text:p>但不能再取得其他天造者專用異能。</text:p>
          </table:table-cell>
          <table:table-cell table:style-name="ce17"/>
          <table:table-cell table:style-name="ce17" office:value-type="string" calcext:value-type="string">
            <text:p>純血專用</text:p>
          </table:table-cell>
          <table:table-cell table:style-name="ce3" table:number-columns-repeated="20"/>
          <table:table-cell table:number-columns-repeated="998"/>
        </table:table-row>
        <table:table-row table:style-name="ro1">
          <table:table-cell table:style-name="ce14" office:value-type="string" calcext:value-type="string">
            <text:p>No.24</text:p>
          </table:table-cell>
          <table:table-cell table:style-name="ce14" office:value-type="string" calcext:value-type="string">
            <text:p>超血統 (純血專用) フルブラッド Full Blood</text:p>
          </table:table-cell>
          <table:table-cell table:style-name="ce17" office:value-type="string" calcext:value-type="string">
            <text:p>你的能力比起其他純血種更加的純粹，將限定的一個能力更加的強化，甚至能跟原菌的能力匹敵。但是據說也更容易發生暴走狀態，也有著潛在的「比誰都更加純粹」的自尊心。</text:p>
          </table:table-cell>
          <table:table-cell table:style-name="ce17" office:value-type="string" calcext:value-type="string">
            <text:p>只限血統為【純血種】的角色可取得</text:p>
            <text:p>從習得的異能中選擇一個異能，該異能Lv+1，最大等級+2</text:p>
            <text:p>但你不能取得【結界化】【復蘇】【集中】【反射】以外的一般異能</text:p>
          </table:table-cell>
          <table:table-cell table:style-name="ce17"/>
          <table:table-cell table:style-name="ce17" office:value-type="string" calcext:value-type="string">
            <text:p>純血專用</text:p>
          </table:table-cell>
          <table:table-cell table:style-name="ce3" table:number-columns-repeated="20"/>
          <table:table-cell table:number-columns-repeated="998"/>
        </table:table-row>
        <table:table-row table:style-name="ro1">
          <table:table-cell table:style-name="ce14" office:value-type="string" calcext:value-type="string">
            <text:p>No.25</text:p>
          </table:table-cell>
          <table:table-cell table:style-name="ce14" office:value-type="string" calcext:value-type="string">
            <text:p>超侵蝕 (混血專用) ディープエローション Deep Erosion</text:p>
          </table:table-cell>
          <table:table-cell table:style-name="ce17" office:value-type="string" calcext:value-type="string">
            <text:p>你可以藉由混合兩種力量，藉此獲得爆發性的效果。</text:p>
            <text:p>混血種是同時擁有兩種症狀的超越者，可以組合出兩種症狀的能力，而這點有時候會發揮出相乘的效果而產生超乎想像的能力。這個現象在UGN中稱為超侵蝕，這個現象的例子非常稀少。</text:p>
          </table:table-cell>
          <table:table-cell table:style-name="ce17" office:value-type="string" calcext:value-type="string">
            <text:p>只限血統為【混血種】的角色可取得。</text:p>
            <text:p>從自己習得的異能中各症狀選擇一個異能，這兩個能力必須都是【時機：主要】並且是能互相組合的能力。</text:p>
            <text:p>使用這兩個能力的組合時，可以使該組合判定的達成值+10，攻擊力+10。</text:p>
            <text:p>次數限制：劇本中一次。</text:p>
          </table:table-cell>
          <table:table-cell table:style-name="ce17"/>
          <table:table-cell table:style-name="ce17" office:value-type="string" calcext:value-type="string">
            <text:p>混血專用</text:p>
          </table:table-cell>
          <table:table-cell table:style-name="ce3" table:number-columns-repeated="20"/>
          <table:table-cell table:number-columns-repeated="998"/>
        </table:table-row>
        <table:table-row table:style-name="ro1">
          <table:table-cell table:style-name="ce14" office:value-type="string" calcext:value-type="string">
            <text:p>No.26</text:p>
          </table:table-cell>
          <table:table-cell table:style-name="ce14" office:value-type="string" calcext:value-type="string">
            <text:p>亞純血 (混血專用) デミブリード Demi-Bleed</text:p>
          </table:table-cell>
          <table:table-cell table:style-name="ce17" office:value-type="string" calcext:value-type="string">
            <text:p>你是混血種當中，特別傾向其中一種症狀的特殊血統。一般來說，混血種的兩種症狀應該是均衡的狀態，但亞純血的其中一種症狀會非常強力，而另一個症狀會弱化。這在混血種當中是非常罕見的，有著雙親都是同一症狀的純血種而誕生的天生亞純血，或是藉由藥物強化特定症狀的後天亞純血。</text:p>
          </table:table-cell>
          <table:table-cell table:style-name="ce17" office:value-type="string" calcext:value-type="string">
            <text:p>只限血統為【混血種】的角色可取得。</text:p>
            <text:p>可以免費取得兩種症狀中的一個【限制：純血】的能力Lv1，但是不能升級</text:p>
            <text:p>而且不能取得另一個症狀的【限制：100%】的能力</text:p>
          </table:table-cell>
          <table:table-cell table:style-name="ce17"/>
          <table:table-cell table:style-name="ce17" office:value-type="string" calcext:value-type="string">
            <text:p>混血專用</text:p>
          </table:table-cell>
          <table:table-cell table:style-name="ce3" table:number-columns-repeated="20"/>
          <table:table-cell table:number-columns-repeated="998"/>
        </table:table-row>
        <table:table-row table:style-name="ro1">
          <table:table-cell table:style-name="ce14" office:value-type="string" calcext:value-type="string">
            <text:p>No.27</text:p>
          </table:table-cell>
          <table:table-cell table:style-name="ce14" office:value-type="string" calcext:value-type="string">
            <text:p>奇跡之血 (混合專用) ミラクルブリーディング Miracle Bleeding</text:p>
          </table:table-cell>
          <table:table-cell table:style-name="ce17" office:value-type="string" calcext:value-type="string">
            <text:p>你能夠自在的操控所有的三種症狀。這是必須要有天生的才能加上自殘一般的努力才能達到的境界。某種程度上，你是這個被這個新時代所選上的人。</text:p>
          </table:table-cell>
          <table:table-cell table:style-name="ce17" office:value-type="string" calcext:value-type="string">
            <text:p>該D-Lois僅限【三種混合種】的角色可以取得。</text:p>
            <text:p>于你組合異能時，其合計的侵蝕值-4（最低為1），但該組合之中必須至少包含屬_xffff_你所取得的三種症候之中的異能各一個。譬如說你的症候為冰炎奇蜥、疾速靈猿和變異魔獸，則必須至少為由冰炎奇蜥、疾速靈猿異能和變異魔獸的異能各一組成的三個異能組合。</text:p>
          </table:table-cell>
          <table:table-cell table:style-name="ce17"/>
          <table:table-cell table:style-name="ce17" office:value-type="string" calcext:value-type="string">
            <text:p>三種混合種專用</text:p>
          </table:table-cell>
          <table:table-cell table:style-name="ce3" table:number-columns-repeated="20"/>
          <table:table-cell table:number-columns-repeated="998"/>
        </table:table-row>
        <table:table-row table:style-name="ro1">
          <table:table-cell table:style-name="ce14" office:value-type="string" calcext:value-type="string">
            <text:p>No.28</text:p>
          </table:table-cell>
          <table:table-cell table:style-name="ce14" office:value-type="string" calcext:value-type="string">
            <text:p>業師 (混合專用) スペシャリスト Specialist</text:p>
          </table:table-cell>
          <table:table-cell table:style-name="ce17" office:value-type="string" calcext:value-type="string">
            <text:p>你有這最得意的技術，被視作必殺技的能力。</text:p>
            <text:p>在混合種當中，你是特別不器用的。只對其中一個能力進行特訓，大家都無法理解你的行為，嘲諷你的頑固跟愚蠢。但是總有一天，你那千錘百煉的能力會發揮它的作用吧。</text:p>
          </table:table-cell>
          <table:table-cell table:style-name="ce17" office:value-type="string" calcext:value-type="string">
            <text:p>該D-Lois僅限【三種混合種】的角色可以取得。</text:p>
            <text:p>可免費取得一個你所取得的非侯選症狀中的【限制：100%】的異能Lv1</text:p>
            <text:p>或免費取得一個你所取得的侯選症狀的【限制：80%】的異能Lv1</text:p>
            <text:p>該能力的最大等級不受到混合種的「最大等級-1」的懲罰，最大等級保持原樣</text:p>
            <text:p>選擇的異能的侵蝕率上升+2</text:p>
            <text:p>如果選擇的異能是【時機：常駐】的話，初期侵蝕+3</text:p>
          </table:table-cell>
          <table:table-cell table:style-name="ce17"/>
          <table:table-cell table:style-name="ce17" office:value-type="string" calcext:value-type="string">
            <text:p>三種混合種專用</text:p>
          </table:table-cell>
          <table:table-cell table:style-name="ce3" table:number-columns-repeated="20"/>
          <table:table-cell table:number-columns-repeated="998"/>
        </table:table-row>
        <table:table-row table:style-name="ro1">
          <table:table-cell table:style-name="ce14" office:value-type="string" calcext:value-type="string">
            <text:p>No.29</text:p>
          </table:table-cell>
          <table:table-cell table:style-name="ce14" office:value-type="string" calcext:value-type="string">
            <text:p>光之使 (天使光環專用) ライトブリンガー Light Bringer</text:p>
          </table:table-cell>
          <table:table-cell table:style-name="ce17" office:value-type="string" calcext:value-type="string">
            <text:p>你是特別擅長使用光的光環能力者。你發出的光比其他光環能力者更加耀眼，給人神聖的印象。原本只是改變光的行進方向的能力，你的情況說不定是對光子本身產生影響，有些研究者如此假設。</text:p>
            <text:p>你或許曾聽說過【闇之使】的特殊光環能力者，對方有著能夠吞噬一切光明的黑暗，或許有一天你會遭遇到它吧。</text:p>
          </table:table-cell>
          <table:table-cell table:style-name="ce17" office:value-type="string" calcext:value-type="string">
            <text:p>只限症狀為【天使光環】的角色可取得。</text:p>
            <text:p>自動獲得異能【光之指】Lv1，可使用經驗提升等級。</text:p>
            <text:p>這異能視為天使光環的異能</text:p>
            <text:p>光之指 </text:p>
            <text:p>最大等級：3 </text:p>
            <text:p>時機：主要/回應動作 </text:p>
            <text:p>技能：症侯 難易度：- </text:p>
            <text:p>對象：- </text:p>
            <text:p>射程：- </text:p>
            <text:p>侵蝕：2 </text:p>
            <text:p>限制：D露易絲 </text:p>
            <text:p>組合時，判定骰+[Lv+2]D 擅長操控光線的能力</text:p>
          </table:table-cell>
          <table:table-cell table:style-name="ce17"/>
          <table:table-cell table:style-name="ce17" office:value-type="string" calcext:value-type="string">
            <text:p>天使光環專用</text:p>
          </table:table-cell>
          <table:table-cell table:style-name="ce3" table:number-columns-repeated="20"/>
          <table:table-cell table:number-columns-repeated="998"/>
        </table:table-row>
        <table:table-row table:style-name="ro1">
          <table:table-cell table:style-name="ce14" office:value-type="string" calcext:value-type="string">
            <text:p>No.30</text:p>
          </table:table-cell>
          <table:table-cell table:style-name="ce14" office:value-type="string" calcext:value-type="string">
            <text:p>闇之使 (天使光環專用) ダークロード Dark Lord</text:p>
          </table:table-cell>
          <table:table-cell table:style-name="ce17" office:value-type="string" calcext:value-type="string">
            <text:p>你是光環能力者當中非常特殊的操控黑暗的超越者。</text:p>
            <text:p>你發出的黑色之光，在黑夜之中也非常顯眼，能將所有事物都染上漆黑的顏色。那可能是吞噬光明的黑暗物質，任何閃耀輝煌之物，在你面前只會染上黑闇。</text:p>
            <text:p>你或許曾聽說過【光之使】的特殊光環能力者，對方有著能夠驅逐一切黑暗的光明，或許有一天你會遭遇到它吧。</text:p>
          </table:table-cell>
          <table:table-cell table:style-name="ce17" office:value-type="string" calcext:value-type="string">
            <text:p>只限症狀為【天使光環】的角色可取得。</text:p>
            <text:p>自動獲得異能【闇之指】Lv1，可使用經驗提升等級。</text:p>
            <text:p>這異能視為天使光環的異能</text:p>
            <text:p>闇之指 </text:p>
            <text:p>最大等級：3 </text:p>
            <text:p>時機：自動動作 </text:p>
            <text:p>技能：- </text:p>
            <text:p>難易度：自動成功 </text:p>
            <text:p>對象：單體 </text:p>
            <text:p>射程：視界 </text:p>
            <text:p>侵蝕：7 </text:p>
            <text:p>限制：D露易絲</text:p>
            <text:p>次數：LV/劇本 </text:p>
            <text:p>效果：對方判定前使用，該判定的CT+1 一回合只能使用一次 </text:p>
            <text:p>創造絕對的黑暗阻礙行動的能力</text:p>
          </table:table-cell>
          <table:table-cell table:style-name="ce17"/>
          <table:table-cell table:style-name="ce17" office:value-type="string" calcext:value-type="string">
            <text:p>天使光環專用</text:p>
          </table:table-cell>
          <table:table-cell table:style-name="ce3" table:number-columns-repeated="20"/>
          <table:table-cell table:number-columns-repeated="998"/>
        </table:table-row>
        <table:table-row table:style-name="ro1">
          <table:table-cell table:style-name="ce14" office:value-type="string" calcext:value-type="string">
            <text:p>No.31</text:p>
          </table:table-cell>
          <table:table-cell table:style-name="ce14" office:value-type="string" calcext:value-type="string">
            <text:p>邪眼 (重力魔眼專用) イーヴルアイ Evil Eye</text:p>
          </table:table-cell>
          <table:table-cell table:style-name="ce17" office:value-type="string" calcext:value-type="string">
            <text:p>你有著被稱為「邪眼」的特殊的眼睛，那眼睛有著增幅魔神能力的力量。使用時你的單眼或雙眼會染上漆黑，同時發揮出更強大的重力壓制。給予他人不幸的漆黑邪眼，其持有者也絕對不能算上幸運。</text:p>
          </table:table-cell>
          <table:table-cell table:style-name="ce17" office:value-type="string" calcext:value-type="string">
            <text:p>只限症狀為【重力魔眼】的角色可取得。</text:p>
            <text:p>【無形之手】【巨人之斧】【黑之鐵錘】【漆黑之拳】【瞬速之刃】【斥力之槌】【魔彈射手】【霸皇幻魔眼】【黑星之門】</text:p>
            <text:p>以上異能追加「命中時，該回合內對方的所有判定骰-1D」的效果。</text:p>
            <text:p/>
            <text:p>但是你所使用的所有【難易度：自動成功】的「判定骰+nD」的異能，其追加的判定骰-1D(最低0)。比方說「判定骰+2D」將會變成「判定骰+1D」。這個懲罰不只適用於【重力魔眼】的異能。</text:p>
          </table:table-cell>
          <table:table-cell table:style-name="ce17"/>
          <table:table-cell table:style-name="ce17" office:value-type="string" calcext:value-type="string">
            <text:p>重力魔眼專用</text:p>
          </table:table-cell>
          <table:table-cell table:style-name="ce3" table:number-columns-repeated="20"/>
          <table:table-cell table:number-columns-repeated="998"/>
        </table:table-row>
        <table:table-row table:style-name="ro1">
          <table:table-cell table:style-name="ce14" office:value-type="string" calcext:value-type="string">
            <text:p>No.32</text:p>
          </table:table-cell>
          <table:table-cell table:style-name="ce14" office:value-type="string" calcext:value-type="string">
            <text:p>時間使 (重力魔眼專用) クロノトリガー Chrono Trigger</text:p>
          </table:table-cell>
          <table:table-cell table:style-name="ce17" office:value-type="string" calcext:value-type="string">
            <text:p>你有著極其微小的回溯時間的能力</text:p>
            <text:p>你持有的特異能實際上無法測定，連存在與否都受到質疑。但你自己明確知道，你有著逆行或跳過瞬間的能力，儘管能做到的只有那短短的一瞬間，但那的確成為數次拯救你性命的鬼牌。</text:p>
          </table:table-cell>
          <table:table-cell table:style-name="ce17" office:value-type="string" calcext:value-type="string">
            <text:p>只限症狀為【重力魔眼】的角色可取得。</text:p>
            <text:p>在你任何判定擲骰後使用，任意一顆骰子的骰目進行正負一的修正，可以藉由這效果超過爆擊值達成大成功。使用後侵蝕率+1D10。</text:p>
            <text:p>次數限制：劇本中 3 次。可以對同一判定使用多次，但是不能對同一顆骰子使用兩次。(最多正負一，做不到正負二的修正)</text:p>
          </table:table-cell>
          <table:table-cell table:style-name="ce17"/>
          <table:table-cell table:style-name="ce17" office:value-type="string" calcext:value-type="string">
            <text:p>重力魔眼專用</text:p>
          </table:table-cell>
          <table:table-cell table:style-name="ce3" table:number-columns-repeated="20"/>
          <table:table-cell table:number-columns-repeated="998"/>
        </table:table-row>
        <table:table-row table:style-name="ro1">
          <table:table-cell table:style-name="ce14" office:value-type="string" calcext:value-type="string">
            <text:p>No.33</text:p>
          </table:table-cell>
          <table:table-cell table:style-name="ce14" office:value-type="string" calcext:value-type="string">
            <text:p>雷帝 (雷擊黑犬專用) サンダーロード Thunder Lord</text:p>
          </table:table-cell>
          <table:table-cell table:style-name="ce17" office:value-type="string" calcext:value-type="string">
            <text:p>你身上的發電細胞有著特異的性質，可以發出比平常大上數倍的電力，但也因此很難控制。雖然有著容易暴走的缺點，但那份強大的力量確實能夠粉碎所有的敵人。</text:p>
          </table:table-cell>
          <table:table-cell table:style-name="ce17" office:value-type="string" calcext:value-type="string">
            <text:p>只限症狀為【雷擊黑犬】的角色可取得。</text:p>
            <text:p>自動獲得異能【禦雷】Lv1，可使用經驗提升等級。</text:p>
            <text:p>這異能視為雷擊黑犬的異能</text:p>
            <text:p>禦雷 </text:p>
            <text:p>最大等級：3</text:p>
            <text:p>時機：主要動作</text:p>
            <text:p>技能：症侯</text:p>
            <text:p>難易度：對決</text:p>
            <text:p>對象：-</text:p>
            <text:p>射程：-</text:p>
            <text:p>侵蝕：4</text:p>
            <text:p>限制：D露易絲</text:p>
            <text:p>次數：LV/劇本</text:p>
            <text:p>效果：組合時，判定骰-2D，攻擊+3D10 </text:p>
            <text:p>增幅生體電流的能力 ミカヅチ 取自日本雷神建禦雷（タケミカヅチ）</text:p>
          </table:table-cell>
          <table:table-cell table:style-name="ce17"/>
          <table:table-cell table:style-name="ce17" office:value-type="string" calcext:value-type="string">
            <text:p>雷擊黑犬專用</text:p>
          </table:table-cell>
          <table:table-cell table:style-name="ce3" table:number-columns-repeated="20"/>
          <table:table-cell table:number-columns-repeated="998"/>
        </table:table-row>
        <table:table-row table:style-name="ro1">
          <table:table-cell table:style-name="ce14" office:value-type="string" calcext:value-type="string">
            <text:p>No.34</text:p>
          </table:table-cell>
          <table:table-cell table:style-name="ce14" office:value-type="string" calcext:value-type="string">
            <text:p>機械兵 (雷擊黑犬專用) フルボーグ Full Borg</text:p>
          </table:table-cell>
          <table:table-cell table:style-name="ce17" office:value-type="string" calcext:value-type="string">
            <text:p>你的肉體有大半都被機械所取代，這多是在軍隊或是其他軍事組織下所改造的機械士兵，但也有進行自我改造獲得強大肉體的例子。</text:p>
            <text:p>很可能，除了腦部以外全部都是機械改造的結果，但被人工皮膚所覆蓋著，外觀跟觸感和普通人類幾乎沒有差別。只有注意力強的人或是特殊的監視設備才能發現你的異常。</text:p>
            <text:p>具體改造程度可以跟GM討論。</text:p>
          </table:table-cell>
          <table:table-cell table:style-name="ce17" office:value-type="string" calcext:value-type="string">
            <text:p>只限症狀為【雷擊黑犬】的角色可取得。</text:p>
            <text:p>所受HP傷害固定-10，但【邪毒】的傷害不能減輕</text:p>
            <text:p>初期侵蝕+5</text:p>
            <text:p>進行知覺對決的話可能發現你的真身。</text:p>
          </table:table-cell>
          <table:table-cell table:style-name="ce17"/>
          <table:table-cell table:style-name="ce17" office:value-type="string" calcext:value-type="string">
            <text:p>雷擊黑犬專用</text:p>
          </table:table-cell>
          <table:table-cell table:style-name="ce3" table:number-columns-repeated="20"/>
          <table:table-cell table:number-columns-repeated="998"/>
        </table:table-row>
        <table:table-row table:style-name="ro1">
          <table:table-cell table:style-name="ce14" office:value-type="string" calcext:value-type="string">
            <text:p>No.35</text:p>
          </table:table-cell>
          <table:table-cell table:style-name="ce14" office:value-type="string" calcext:value-type="string">
            <text:p>吸血鬼 (鮮血真祖專用) ヴァンパイア Vampire</text:p>
          </table:table-cell>
          <table:table-cell table:style-name="ce17" office:value-type="string" calcext:value-type="string">
            <text:p>你的血液滿溢著生命的精華，其力量可以讓瀕死之人再生。</text:p>
            <text:p>這個能力一般是因為由口攝取他人的血液後才發現的，因此你也不例外，有著因為什麼原因喝下血液的經驗。</text:p>
            <text:p>在這當中，有因為這個能力的發現而積極攝取血液的超越者，就像是傳說中的吸血鬼。</text:p>
          </table:table-cell>
          <table:table-cell table:style-name="ce17" office:value-type="string" calcext:value-type="string">
            <text:p>只限症狀為【鮮血真祖】的角色可取得。</text:p>
            <text:p>自動獲得異能【赤之聖餐】Lv1，可使用經驗提升等級。</text:p>
            <text:p>這異能視為鮮血真祖的異能</text:p>
            <text:p>同時，你不能取得或使用【赤色的從者】的異能</text:p>
            <text:p>赤之聖餐 </text:p>
            <text:p>最大等級：3 </text:p>
            <text:p>時機：準備階段 </text:p>
            <text:p>技能：- </text:p>
            <text:p>難易度：自動成功 </text:p>
            <text:p>對象：單體 </text:p>
            <text:p>射程：至近 </text:p>
            <text:p>侵蝕：3 </text:p>
            <text:p>限制：D露易絲</text:p>
            <text:p>次數：1/場景  </text:p>
            <text:p>效果：解除對象的【戰鬥不能】狀態，HP+[Lv×5] 。 </text:p>
            <text:p>用血液寄宿的力量對肉體再構成的能力</text:p>
          </table:table-cell>
          <table:table-cell table:style-name="ce17"/>
          <table:table-cell table:style-name="ce17" office:value-type="string" calcext:value-type="string">
            <text:p>鮮血真祖專用</text:p>
          </table:table-cell>
          <table:table-cell table:style-name="ce3" table:number-columns-repeated="20"/>
          <table:table-cell table:number-columns-repeated="998"/>
        </table:table-row>
        <table:table-row table:style-name="ro1">
          <table:table-cell table:style-name="ce14" office:value-type="string" calcext:value-type="string">
            <text:p>No.36</text:p>
          </table:table-cell>
          <table:table-cell table:style-name="ce14" office:value-type="string" calcext:value-type="string">
            <text:p>黃昏支配者 (鮮血真祖專用) マスター．オブ．トワイライト Master of Twilight</text:p>
          </table:table-cell>
          <table:table-cell table:style-name="ce17" office:value-type="string" calcext:value-type="string">
            <text:p>你是擅長使役從者的血祖能力者。</text:p>
            <text:p>能比誰更快的創作出從者。但做出的從者有些朦朧，就像是黃昏下投影出的影法師一樣。</text:p>
            <text:p>黃昏在日語中有著「誰是他」的別名。黃昏之下，人與魔與影，難以分別，因此又稱為「逢魔之刻」。你的從者難以被辨認，不知是敵是友，在這渾沌的時刻，是你的人偶劇的開場。</text:p>
            <text:p>(以上注明，都是規則書上的原句)</text:p>
          </table:table-cell>
          <table:table-cell table:style-name="ce17" office:value-type="string" calcext:value-type="string">
            <text:p>只限症狀為【鮮血真祖】的角色可取得。</text:p>
            <text:p>自動獲得異能【從者的行軍】Lv1，可使用經驗提升等級。</text:p>
            <text:p>這異能視為鮮血真祖的異能</text:p>
            <text:p>從者的行軍 </text:p>
            <text:p>最大等級：3 </text:p>
            <text:p>時機：準備階段 </text:p>
            <text:p>技能：- </text:p>
            <text:p>難易度：自動成功 </text:p>
            <text:p>對象：自身 </text:p>
            <text:p>射程：至近 </text:p>
            <text:p>侵蝕：5 </text:p>
            <text:p>限制：D露易絲</text:p>
            <text:p>次數：LV/劇本 </text:p>
            <text:p>效果：讓你可以在設置階段使用【赤色從者】，這時不能再跟其他能力做組合 因為是準備階段，出來的從者為【未行動】 </text:p>
            <text:p>更快創造出從者的能力</text:p>
          </table:table-cell>
          <table:table-cell table:style-name="ce17"/>
          <table:table-cell table:style-name="ce17" office:value-type="string" calcext:value-type="string">
            <text:p>鮮血真祖專用</text:p>
          </table:table-cell>
          <table:table-cell table:style-name="ce3" table:number-columns-repeated="20"/>
          <table:table-cell table:number-columns-repeated="998"/>
        </table:table-row>
        <table:table-row table:style-name="ro1">
          <table:table-cell table:style-name="ce14" office:value-type="string" calcext:value-type="string">
            <text:p>No.37</text:p>
          </table:table-cell>
          <table:table-cell table:style-name="ce14" office:value-type="string" calcext:value-type="string">
            <text:p>野獸本能 (變異魔獸) ビーストハート Beast Heart</text:p>
          </table:table-cell>
          <table:table-cell table:style-name="ce17" office:value-type="string" calcext:value-type="string">
            <text:p>在你身體深處，潛藏著令人恐懼的野獸的本能。</text:p>
            <text:p>平常並不會對你的日常生活帶來影響，就像沒有在狩獵的猛獸在安穩沉眠一樣。但是一旦被捲入戰鬥，你體內的野獸就會覺醒，比其他魔獸能力者更快變身或進入戰鬥型態，然後盡己所能地揮舞暴力。</text:p>
            <text:p>普通的動物跟感覺敏銳的人類會察覺你體內的野獸而本能的產生恐懼。</text:p>
          </table:table-cell>
          <table:table-cell table:style-name="ce17" office:value-type="string" calcext:value-type="string">
            <text:p>只限症狀為【變異魔獸】的角色可取得。</text:p>
            <text:p>你可以在準備階段讓一個【時機：次要行動】的變異魔獸異能當成【時機：準備階段】使用，使用這個效果的準備階段結束後，你的侵蝕率+5。</text:p>
            <text:p>次數限制：場景中一次。</text:p>
            <text:p>另外，NPC的動物會敬畏你，恐懼你，對你順從。</text:p>
          </table:table-cell>
          <table:table-cell table:style-name="ce17"/>
          <table:table-cell table:style-name="ce17" office:value-type="string" calcext:value-type="string">
            <text:p>變異魔獸專用</text:p>
          </table:table-cell>
          <table:table-cell table:style-name="ce3" table:number-columns-repeated="20"/>
          <table:table-cell table:number-columns-repeated="998"/>
        </table:table-row>
        <table:table-row table:style-name="ro1">
          <table:table-cell table:style-name="ce14" office:value-type="string" calcext:value-type="string">
            <text:p>No.38</text:p>
          </table:table-cell>
          <table:table-cell table:style-name="ce14" office:value-type="string" calcext:value-type="string">
            <text:p>羅剎 (變異魔獸專用) タイラント Tyrant</text:p>
          </table:table-cell>
          <table:table-cell table:style-name="ce17" office:value-type="string" calcext:value-type="string">
            <text:p>你有著光從外表看不出來的怪力。能夠輕易地扭曲鐵棒，甚至跟大型重機相匹敵。雖然你在日常生活中能自由控制那股力量，一旦進入戰鬥中，就很難制禦，而且也沒有能承受你怪力的武器，只會變成一堆一用即棄的廢鐵。</text:p>
            <text:p>(ex.平和島靜雄)</text:p>
          </table:table-cell>
          <table:table-cell table:style-name="ce17" office:value-type="string" calcext:value-type="string">
            <text:p>只限症狀為【變異魔獸】的角色可取得。</text:p>
            <text:p>你的近戰攻擊，攻擊力固定+8</text:p>
            <text:p>但是使用空手以外的武器進行近戰攻擊時，該武器必在攻擊的主要階段結束時被破壞。</text:p>
          </table:table-cell>
          <table:table-cell table:style-name="ce17"/>
          <table:table-cell table:style-name="ce17" office:value-type="string" calcext:value-type="string">
            <text:p>變異魔獸專用</text:p>
          </table:table-cell>
          <table:table-cell table:style-name="ce3" table:number-columns-repeated="20"/>
          <table:table-cell table:number-columns-repeated="998"/>
        </table:table-row>
        <table:table-row table:style-name="ro1">
          <table:table-cell table:style-name="ce14" office:value-type="string" calcext:value-type="string">
            <text:p>No.39</text:p>
          </table:table-cell>
          <table:table-cell table:style-name="ce14" office:value-type="string" calcext:value-type="string">
            <text:p>異形 (流亡畸體專用) フリークス Freaks</text:p>
          </table:table-cell>
          <table:table-cell table:style-name="ce17" office:value-type="string" calcext:value-type="string">
            <text:p>你的身體上有著非常明顯的，異樣的特徵。對於不知道超越者跟R病毒存在的人而言，你不過就是個一目了然的怪物。</text:p>
            <text:p>具體特徵可以跟GM討論，但就算手腕變成鉤爪狀也不會改變空手的武器資料。</text:p>
          </table:table-cell>
          <table:table-cell table:style-name="ce17" office:value-type="string" calcext:value-type="string">
            <text:p>只限症狀為【流亡畸體】的角色可取得。</text:p>
            <text:p>自動獲得異能【聖痕】Lv1，可使用經驗提升等級。</text:p>
            <text:p>這異能視為流亡畸體的異能</text:p>
            <text:p>聖痕 </text:p>
            <text:p>最大等級：3 </text:p>
            <text:p>時機：主要動作 </text:p>
            <text:p>技能：症狀 </text:p>
            <text:p>難易度：自動成功 </text:p>
            <text:p>對象：- </text:p>
            <text:p>射程：- </text:p>
            <text:p>侵蝕：0 </text:p>
            <text:p>限制：D露易絲 </text:p>
            <text:p>次數：3/劇本</text:p>
            <text:p>效果：組合時，侵蝕上升 - [Lv] (最低 1)。  </text:p>
            <text:p>使用變異的肉體，使R病毒的影響降到最低的能力</text:p>
          </table:table-cell>
          <table:table-cell table:style-name="ce17"/>
          <table:table-cell table:style-name="ce17" office:value-type="string" calcext:value-type="string">
            <text:p>流亡畸體專用</text:p>
          </table:table-cell>
          <table:table-cell table:style-name="ce3" table:number-columns-repeated="20"/>
          <table:table-cell table:number-columns-repeated="998"/>
        </table:table-row>
        <table:table-row table:style-name="ro1">
          <table:table-cell table:style-name="ce14" office:value-type="string" calcext:value-type="string">
            <text:p>No.40</text:p>
          </table:table-cell>
          <table:table-cell table:style-name="ce14" office:value-type="string" calcext:value-type="string">
            <text:p>人器合一 (流亡畸體專用) ツールマスター Tool Master</text:p>
          </table:table-cell>
          <table:table-cell table:style-name="ce17" office:value-type="string" calcext:value-type="string">
            <text:p>你有著與道具一體化，更上手的使用道具的技術。</text:p>
            <text:p>與武器一體化的話，那武器就像你的手足一樣可自由操控。與電腦一體化的話，會有著網路與大腦直聯的感覺。與車一體化的話，會感受到風吹過車體的觸感，將車輪視作自己的腳。</text:p>
            <text:p>雖然流變能力者有著與他人融合的能力存在，但像你那樣跟無機物融合並發揮效果的例子幾乎沒有二例。研究員提出一種假說，你體內的R病毒，性質上可能非常接近會感染器物的EX R病毒，因此才有著與道具的高親和性。</text:p>
          </table:table-cell>
          <table:table-cell table:style-name="ce17" office:value-type="string" calcext:value-type="string">
            <text:p>你使用了與你一體化的道具的判定的骰數+3D，這個效果只要是使用了「種類：關聯」以外道具的判定就可以適用。但即是使用多個道具的判定，這個效果也不會因此而迭加。</text:p>
            <text:p>此外，以空手以外武器進行的格擋，格擋值+5，但你以空手進行攻擊的判定骰數-3D。</text:p>
            <text:p>一體化和解除一體化均為自動動作，任何時候都可以進行宣言。你的肉體會因為一體化而產生變形，但不會因此而導致你的肉體或是道具被破壞。</text:p>
          </table:table-cell>
          <table:table-cell table:style-name="ce17" office:value-type="string" calcext:value-type="string">
            <text:p>LM P80</text:p>
          </table:table-cell>
          <table:table-cell table:style-name="ce17" office:value-type="string" calcext:value-type="string">
            <text:p>流亡畸體專用</text:p>
          </table:table-cell>
          <table:table-cell table:style-name="ce3" table:number-columns-repeated="20"/>
          <table:table-cell table:number-columns-repeated="998"/>
        </table:table-row>
        <table:table-row table:style-name="ro1">
          <table:table-cell table:style-name="ce14" office:value-type="string" calcext:value-type="string">
            <text:p>No.41</text:p>
          </table:table-cell>
          <table:table-cell table:style-name="ce14" office:value-type="string" calcext:value-type="string">
            <text:p>高速之星 (疾速靈猿專用) 神速の擔い手 スピードスター Speed Star</text:p>
          </table:table-cell>
          <table:table-cell table:style-name="ce17" office:value-type="string" calcext:value-type="string">
            <text:p>你是極端特化速度的超越者。越是以高速移動，你體內的R病毒就越活性化，分泌腦內麻藥，讓你前往更快的境界。</text:p>
            <text:p>這已經是一種衝動，無法抑制想要加快的衝動，遲早有一天會死在這個速度之下，但你應該也不會後悔吧。</text:p>
          </table:table-cell>
          <table:table-cell table:style-name="ce17" office:value-type="string" calcext:value-type="string">
            <text:p>只限症狀為【疾速靈猿】的角色可取得。</text:p>
            <text:p>自動獲得異能【高速之星】Lv1，可使用經驗提升等級。</text:p>
            <text:p>這異能視為疾速靈猿的異能</text:p>
            <text:p>高速之星 (スピードスター Speed Star)</text:p>
            <text:p>最大等級：1 </text:p>
            <text:p>時機：準備階段 </text:p>
            <text:p>技能：- </text:p>
            <text:p>難易度：自動成功 </text:p>
            <text:p>對象：自身 </text:p>
            <text:p>射程：至近 </text:p>
            <text:p>侵蝕：3 </text:p>
            <text:p>限制：D露易絲 </text:p>
            <text:p>次數：1/場景</text:p>
            <text:p>效果：這回合，你給予的傷害+【行動值】 </text:p>
            <text:p>但是這回合，你不能進行回應階段 </text:p>
            <text:p>藉由速度增加傷害的能力</text:p>
          </table:table-cell>
          <table:table-cell table:style-name="ce17"/>
          <table:table-cell table:style-name="ce17" office:value-type="string" calcext:value-type="string">
            <text:p>疾速靈猿專用</text:p>
          </table:table-cell>
          <table:table-cell table:style-name="ce3" table:number-columns-repeated="20"/>
          <table:table-cell table:number-columns-repeated="998"/>
        </table:table-row>
        <table:table-row table:style-name="ro1">
          <table:table-cell table:style-name="ce14" office:value-type="string" calcext:value-type="string">
            <text:p>No.42</text:p>
          </table:table-cell>
          <table:table-cell table:style-name="ce14" office:value-type="string" calcext:value-type="string">
            <text:p>音波使 (疾速靈猿專用) ソニックマスター Sonic Master</text:p>
          </table:table-cell>
          <table:table-cell table:style-name="ce17" office:value-type="string" calcext:value-type="string">
            <text:p>你是靈猴的能力者當中特別擅長操控音波的類型。</text:p>
            <text:p>你被視為「音之使役者」而被恐懼，因此避開與你對話的人也存在吧，因為你光是聲音，都能成為銳利的刀刃。</text:p>
            <text:p>另外，雖然普通的聲音不能在真空中傳播，但是靈猴能力者放出的聲音能藉由【結界化】放出的特殊物質來傳遞，因此能力不會受到所在地的影響。</text:p>
          </table:table-cell>
          <table:table-cell table:style-name="ce17" office:value-type="string" calcext:value-type="string">
            <text:p>只限症狀為【疾速靈猿】的角色可取得。</text:p>
            <text:p>自動獲得異能【音域之王】Lv1，可使用經驗提升等級。</text:p>
            <text:p>這異能視為疾速靈猿的異能</text:p>
            <text:p>音域之王 (音界の王)</text:p>
            <text:p>最大等級：3 </text:p>
            <text:p>時機：主動動作 </text:p>
            <text:p>技能：症候 </text:p>
            <text:p>難易度：- </text:p>
            <text:p>對象：- </text:p>
            <text:p>對象：- </text:p>
            <text:p>侵蝕：6 </text:p>
            <text:p>限制：D露易絲 </text:p>
            <text:p>次數：LV/劇本</text:p>
            <text:p>效果：組合的其他【疾速靈猿】異能等級+1。 可超過最大等級，但不能因此增加能力的使用次數。 </text:p>
            <text:p>用自己的力量變換音域的能力</text:p>
          </table:table-cell>
          <table:table-cell table:style-name="ce17"/>
          <table:table-cell table:style-name="ce17" office:value-type="string" calcext:value-type="string">
            <text:p>疾速靈猿專用</text:p>
          </table:table-cell>
          <table:table-cell table:style-name="ce3" table:number-columns-repeated="20"/>
          <table:table-cell table:number-columns-repeated="998"/>
        </table:table-row>
        <table:table-row table:style-name="ro1">
          <table:table-cell table:style-name="ce14" office:value-type="string" calcext:value-type="string">
            <text:p>No.43</text:p>
          </table:table-cell>
          <table:table-cell table:style-name="ce14" office:value-type="string" calcext:value-type="string">
            <text:p>煉金術師 (煉金化形專用) アルケミスト Alchemist</text:p>
          </table:table-cell>
          <table:table-cell table:style-name="ce17" office:value-type="string" calcext:value-type="string">
            <text:p>你是非常擅長物質變化的能力者，因此被稱呼為「煉金術師」。</text:p>
            <text:p>你掌握著煉金術的奧義，自由自在地創造與轉換物質，就像支配著物質一樣。過去被稱為煉金術師的人物，或許也是跟你一樣的超越者也說不一定。</text:p>
          </table:table-cell>
          <table:table-cell table:style-name="ce17" office:value-type="string" calcext:value-type="string">
            <text:p>只限症狀為【煉金化形】的角色可取得。</text:p>
            <text:p>你用能力做出的道具將會受到以下的修正：</text:p>
            <text:p>【盔甲創造】：裝甲值+6</text:p>
            <text:p>【載具變換】：攻擊力+4，全力移動距離+10m</text:p>
            <text:p>【無限武器】：攻擊力+5</text:p>
            <text:p>【百槍】：攻擊力+5</text:p>
            <text:p>【盾牌創造】：格擋值+3</text:p>
            <text:p>但同時，使用上述異能的侵蝕上升+2</text:p>
          </table:table-cell>
          <table:table-cell table:style-name="ce17"/>
          <table:table-cell table:style-name="ce17" office:value-type="string" calcext:value-type="string">
            <text:p>煉金化形專用</text:p>
          </table:table-cell>
          <table:table-cell table:style-name="ce3" table:number-columns-repeated="20"/>
          <table:table-cell table:number-columns-repeated="998"/>
        </table:table-row>
        <table:table-row table:style-name="ro1">
          <table:table-cell table:style-name="ce14" office:value-type="string" calcext:value-type="string">
            <text:p>No.44</text:p>
          </table:table-cell>
          <table:table-cell table:style-name="ce14" office:value-type="string" calcext:value-type="string">
            <text:p>沙塵使 (煉金化形專用) サンドマン Sand Man</text:p>
          </table:table-cell>
          <table:table-cell table:style-name="ce17" office:value-type="string" calcext:value-type="string">
            <text:p>你是擅長操控砂的能力者，因此被稱為「砂之使役者」。</text:p>
            <text:p>你的砂並非自然物，而是R病毒生成的特殊物質，夢現能力者可以無限的生成並操控這種砂子。</text:p>
            <text:p>你有著瞬間生成砂子，使任何行動無力化。即使是斬擊，炮彈，火焰，在你的砂面前也是無力的。</text:p>
          </table:table-cell>
          <table:table-cell table:style-name="ce17" office:value-type="string" calcext:value-type="string">
            <text:p>只限症狀為【煉金化形】的角色可取得。</text:p>
            <text:p>自動獲得異能【沙塵城壁】Lv1，可使用經驗提升等級。</text:p>
            <text:p>這異能視為煉金化形的異能</text:p>
            <text:p>同時，你不能取得跟使用【無限武器】和【百槍】</text:p>
            <text:p>砂塵城壁 </text:p>
            <text:p>最大等級：3 </text:p>
            <text:p>時機：自動動作 </text:p>
            <text:p>技能：- </text:p>
            <text:p>難易度：自動成功 </text:p>
            <text:p>對象：單體 </text:p>
            <text:p>射程：視界 </text:p>
            <text:p>侵蝕：1D10 </text:p>
            <text:p>限制：D露易絲 </text:p>
            <text:p>次數：1/劇本</text:p>
            <text:p>效果：對象受到HP傷害前使用，對方預定受到的HP傷害變成零。 </text:p>
            <text:p>該主要階段結束後，你的HP - [10-Lv]。  </text:p>
            <text:p>用大量的沙塵做出牆壁，防禦攻擊的能力</text:p>
          </table:table-cell>
          <table:table-cell table:style-name="ce17"/>
          <table:table-cell table:style-name="ce17" office:value-type="string" calcext:value-type="string">
            <text:p>煉金化形專用</text:p>
          </table:table-cell>
          <table:table-cell table:style-name="ce3" table:number-columns-repeated="20"/>
          <table:table-cell table:number-columns-repeated="998"/>
        </table:table-row>
        <table:table-row table:style-name="ro1">
          <table:table-cell table:style-name="ce14" office:value-type="string" calcext:value-type="string">
            <text:p>No.45</text:p>
          </table:table-cell>
          <table:table-cell table:style-name="ce14" office:value-type="string" calcext:value-type="string">
            <text:p>天才 (神腦演算專用) ジーニアス Genius</text:p>
          </table:table-cell>
          <table:table-cell table:style-name="ce17" office:value-type="string" calcext:value-type="string">
            <text:p>你是毫無疑問的天才，甚至可以說是全才。人類的所有活動領域，包刮學問，藝術，運動，哲學，全部都難不倒你，甚至只是用看的就能理解全貌。</text:p>
          </table:table-cell>
          <table:table-cell table:style-name="ce17" office:value-type="string" calcext:value-type="string">
            <text:p>只限症狀為【神腦演算】的角色可取得。</text:p>
            <text:p>自動獲得異能【天才】Lv1，可使用經驗提升等級。</text:p>
            <text:p>這異能視為神腦演算的異能</text:p>
            <text:p>天才 </text:p>
            <text:p>最大等級：3 </text:p>
            <text:p>時機：自動動作 </text:p>
            <text:p>技能：- </text:p>
            <text:p>難易度：自動成功 </text:p>
            <text:p>對象：自身 </text:p>
            <text:p>射程：至近 </text:p>
            <text:p>侵蝕：1D10 </text:p>
            <text:p>限制：D露易絲 </text:p>
            <text:p>次數：LV/劇本</text:p>
            <text:p>任意判定後使用，達成值+【精神】。 </text:p>
            <text:p>抓住全部才能的能力</text:p>
          </table:table-cell>
          <table:table-cell table:style-name="ce17"/>
          <table:table-cell table:style-name="ce17" office:value-type="string" calcext:value-type="string">
            <text:p>神腦演算專用</text:p>
          </table:table-cell>
          <table:table-cell table:style-name="ce3" table:number-columns-repeated="20"/>
          <table:table-cell table:number-columns-repeated="998"/>
        </table:table-row>
        <table:table-row table:style-name="ro1">
          <table:table-cell table:style-name="ce14" office:value-type="string" calcext:value-type="string">
            <text:p>No.46</text:p>
          </table:table-cell>
          <table:table-cell table:style-name="ce14" office:value-type="string" calcext:value-type="string">
            <text:p>達人 ：【能力名】(神腦演算專用) アデプト Adept</text:p>
          </table:table-cell>
          <table:table-cell table:style-name="ce17" office:value-type="string" calcext:value-type="string">
            <text:p>你是專精于一個行為的達人。貫徹到極限的技藝非常人所能及，鐵棒可以像名刀一樣斬切，古舊手槍可以發揮出大炮的威力。劍術，格鬥術，槍鬥術等等，你鑽研出的結果就是神技。</text:p>
            <text:p>(雖然嚴格來說，這項能力還可以用在藝術跟學問上，但是因為此能力效果為戰鬥取向，請盡力配合)</text:p>
          </table:table-cell>
          <table:table-cell table:style-name="ce17" office:value-type="string" calcext:value-type="string">
            <text:p>只限症狀為【神腦演算】的角色可取得。</text:p>
            <text:p>取得這D露易絲時，選擇一個異能填入(ex.達人：&lt;守護之彈&gt;)。</text:p>
            <text:p>該異能追加以下效果：</text:p>
            <text:p>組合時的命中判定+2D</text:p>
            <text:p>組合時的攻擊力+5</text:p>
            <text:p>侵蝕上升+2</text:p>
            <text:p>只要GM許可，可在開團前整理角色卡時變更選擇的異能。</text:p>
          </table:table-cell>
          <table:table-cell table:style-name="ce17"/>
          <table:table-cell table:style-name="ce17" office:value-type="string" calcext:value-type="string">
            <text:p>神腦演算專用</text:p>
          </table:table-cell>
          <table:table-cell table:style-name="ce3" table:number-columns-repeated="20"/>
          <table:table-cell table:number-columns-repeated="998"/>
        </table:table-row>
        <table:table-row table:style-name="ro1">
          <table:table-cell table:style-name="ce14" office:value-type="string" calcext:value-type="string">
            <text:p>No.47</text:p>
          </table:table-cell>
          <table:table-cell table:style-name="ce14" office:value-type="string" calcext:value-type="string">
            <text:p>黃金領域 (冥府領域專用) エリュシオン Elysium</text:p>
          </table:table-cell>
          <table:table-cell table:style-name="ce17" office:value-type="string" calcext:value-type="string">
            <text:p>你所展開的領域，跟其他領王能力者相比，有一股特殊的光輝，被科學家稱為「黃金領域」。在這個領域之內，你的R病毒會變得極端具有攻擊性，同時過於活性化的R病毒會讓你的精神難以集中，這股能力是一把雙面刃，但是你如何得到這力量卻依然不明了。</text:p>
            <text:p>放出的光輝不一定要是金色，具體內容可以跟GM討論。</text:p>
          </table:table-cell>
          <table:table-cell table:style-name="ce17" office:value-type="string" calcext:value-type="string">
            <text:p>只限症狀為【冥府領域】的角色可取得。</text:p>
            <text:p>自動獲得異能【獨裁者】Lv1，可使用經驗提升等級。</text:p>
            <text:p>這異能視為冥府領域的異能</text:p>
            <text:p>獨裁者 (ディクタトル dictator) </text:p>
            <text:p>最大等級：3 </text:p>
            <text:p>時機：準備階段 </text:p>
            <text:p>技能：- </text:p>
            <text:p>難易度：自動成功 </text:p>
            <text:p>對象：自身 </text:p>
            <text:p>射程：至近 </text:p>
            <text:p>侵蝕：3 </text:p>
            <text:p>限制：D露易絲 </text:p>
            <text:p>次數：LV/劇本</text:p>
            <text:p>效果：這回合，組合冥府領域異能的攻擊傷害+10 使用這能力後，受到【恍惚】狀態 </text:p>
            <text:p>使領域內滿溢黃金的光輝的能力</text:p>
          </table:table-cell>
          <table:table-cell table:style-name="ce17"/>
          <table:table-cell table:style-name="ce17" office:value-type="string" calcext:value-type="string">
            <text:p>冥府領域專用</text:p>
          </table:table-cell>
          <table:table-cell table:style-name="ce3" table:number-columns-repeated="20"/>
          <table:table-cell table:number-columns-repeated="998"/>
        </table:table-row>
        <table:table-row table:style-name="ro1">
          <table:table-cell table:style-name="ce14" office:value-type="string" calcext:value-type="string">
            <text:p>No.48</text:p>
          </table:table-cell>
          <table:table-cell table:style-name="ce14" office:value-type="string" calcext:value-type="string">
            <text:p>馴獸大師 (冥府領域專用) マスターテイマー Master Tamer</text:p>
          </table:table-cell>
          <table:table-cell table:style-name="ce17" office:value-type="string" calcext:value-type="string">
            <text:p>你與動物的親和性極高。至於辦到的方式由你自由決定。</text:p>
            <text:p>【馴獸使】的能力能取得的動物通常只有一隻，但這個能力能讓你操控複數甚至大量的動物。不過，你的【馴獸使】能力不會有資料上的變化。</text:p>
          </table:table-cell>
          <table:table-cell table:style-name="ce17" office:value-type="string" calcext:value-type="string">
            <text:p>只限症狀為【冥府領域】的角色可取得。</text:p>
            <text:p>自動獲得異能【馴獸攻擊】Lv1，可使用經驗提升等級。</text:p>
            <text:p>這異能視為冥府領域的異能</text:p>
            <text:p>另外，你能馬上跟動物NPC變得友好</text:p>
            <text:p>馴獸攻擊 (アニマルアタック Animal Attack)</text:p>
            <text:p>最大等級：3 </text:p>
            <text:p>時機：主要動作 </text:p>
            <text:p>技能：&lt;RC&gt;&lt;交涉&gt; </text:p>
            <text:p>難易度：對決 </text:p>
            <text:p>對象：- </text:p>
            <text:p>射程：視界 </text:p>
            <text:p>侵蝕：2 </text:p>
            <text:p>限制：D露易絲 </text:p>
            <text:p>次數：3/劇本</text:p>
            <text:p>效果：進行攻擊+[Lv×4]的射擊攻擊。 </text:p>
            <text:p>驅使動物進行猛烈攻擊的能力</text:p>
          </table:table-cell>
          <table:table-cell table:style-name="ce17"/>
          <table:table-cell table:style-name="ce17" office:value-type="string" calcext:value-type="string">
            <text:p>冥府領域專用</text:p>
          </table:table-cell>
          <table:table-cell table:style-name="ce3" table:number-columns-repeated="20"/>
          <table:table-cell table:number-columns-repeated="998"/>
        </table:table-row>
        <table:table-row table:style-name="ro1">
          <table:table-cell table:style-name="ce14" office:value-type="string" calcext:value-type="string">
            <text:p>No.49</text:p>
          </table:table-cell>
          <table:table-cell table:style-name="ce14" office:value-type="string" calcext:value-type="string">
            <text:p>永恆之火 (冰炎奇蜥專用) エターナルブレイズ Eternal Blaze</text:p>
          </table:table-cell>
          <table:table-cell table:style-name="ce17" office:value-type="string" calcext:value-type="string">
            <text:p>你是冰炎能力者當中，特別擅長操控火焰的能力者。</text:p>
            <text:p>雖然還是能使用冰系的能力，但你就是對火焰有更高的適性，你產生的高溫高熱，一般的超越者是無法相比的。</text:p>
            <text:p>你或許聽過「絕對零度」這個操控極低溫的超越者的存在。即使如此，你也相信，兩者對決後，勝利的絕對是自己。</text:p>
            <text:p>「我是火之使者，再現灼熱地域的，『真正的』的冰炎能力者」</text:p>
          </table:table-cell>
          <table:table-cell table:style-name="ce17" office:value-type="string" calcext:value-type="string">
            <text:p>只限症狀為【冰炎奇蜥】的角色可取得。</text:p>
            <text:p>自動獲得異能【永恆之火】Lv1，可使用經驗提升等級。</text:p>
            <text:p>這異能視為冰炎奇蜥的異能 </text:p>
            <text:p>永恆之火 (エターナルブレイズ Eternal Blaze)</text:p>
            <text:p>最大等級：3 </text:p>
            <text:p>時機：準備階段</text:p>
            <text:p>技能：- </text:p>
            <text:p>難易度：自動成功</text:p>
            <text:p>對象：自身 </text:p>
            <text:p>射程：至近 </text:p>
            <text:p>侵蝕：4 </text:p>
            <text:p>限制：D露易絲 </text:p>
            <text:p>效果：這回合，組合冰炎能力的攻擊傷害+[Lv×4] </text:p>
            <text:p>同時你的【行動值】-5 </text:p>
            <text:p>產生大量熱量造成重大傷害的能力</text:p>
          </table:table-cell>
          <table:table-cell table:style-name="ce17"/>
          <table:table-cell table:style-name="ce17" office:value-type="string" calcext:value-type="string">
            <text:p>冰炎奇蜥專用</text:p>
          </table:table-cell>
          <table:table-cell table:style-name="ce3" table:number-columns-repeated="20"/>
          <table:table-cell table:number-columns-repeated="998"/>
        </table:table-row>
        <table:table-row table:style-name="ro1">
          <table:table-cell table:style-name="ce14" office:value-type="string" calcext:value-type="string">
            <text:p>No.50</text:p>
          </table:table-cell>
          <table:table-cell table:style-name="ce14" office:value-type="string" calcext:value-type="string">
            <text:p>絕對零度 (冰炎奇蜥專用) アブソリュート．ゼロ Absolute Zero</text:p>
          </table:table-cell>
          <table:table-cell table:style-name="ce17" office:value-type="string" calcext:value-type="string">
            <text:p>你是冰炎能力者當中，特別擅長操控寒冰的能力者。</text:p>
            <text:p>你的低溫連火焰都能凍結，而這並非只是比喻。你的低溫連分子運動都能停止，大氣都能凍結，區區火焰當然也不再是例外。像是宇宙熱寂的象徵，讓萬物被低溫所吞噬。</text:p>
            <text:p>雖然還是能使用火系的能力，但你就是對寒冰有更高的適性。</text:p>
            <text:p>你或許聽過「永恆之火」這個操控超高溫的超越者的存在。即使如此，你也相信，兩者對決後，勝利的絕對是自己。</text:p>
            <text:p>「我是冰之使者，操控絕對零度的，『真正的』的冰炎能力者」</text:p>
          </table:table-cell>
          <table:table-cell table:style-name="ce17" office:value-type="string" calcext:value-type="string">
            <text:p>只限症狀為【冰炎奇蜥】的角色可取得。</text:p>
            <text:p>你必須先取得【集中：冰炎奇蜥】或【反射：冰炎奇蜥】的能力</text:p>
            <text:p>在【集中：冰炎奇蜥】和【反射：冰炎奇蜥】之中選擇一個能力。</text:p>
            <text:p>選擇的異能組合時的判定骰+3D</text:p>
            <text:p>但是選擇的異能的上升侵蝕率改為+3</text:p>
          </table:table-cell>
          <table:table-cell table:style-name="ce17"/>
          <table:table-cell table:style-name="ce17" office:value-type="string" calcext:value-type="string">
            <text:p>冰炎奇蜥專用</text:p>
          </table:table-cell>
          <table:table-cell table:style-name="ce3" table:number-columns-repeated="20"/>
          <table:table-cell table:number-columns-repeated="998"/>
        </table:table-row>
        <table:table-row table:style-name="ro1">
          <table:table-cell table:style-name="ce14" office:value-type="string" calcext:value-type="string">
            <text:p>No.51</text:p>
          </table:table-cell>
          <table:table-cell table:style-name="ce14" office:value-type="string" calcext:value-type="string">
            <text:p>記憶探索者 (幻象惑星專用) メモリダイバー Memory Diver</text:p>
          </table:table-cell>
          <table:table-cell table:style-name="ce17" office:value-type="string" calcext:value-type="string">
            <text:p>你是被稱為「記憶探索者」的特殊的超越者。</text:p>
            <text:p>原本幻星能力者是藉由分泌賀爾蒙來混亂對方的精神跟記憶，或反過來使對方安定。那只是一種化學反應，幻星能力者不能直接干涉他人的精神，最多只是從外面控制對方腦內物質的分泌而已。</text:p>
            <text:p>但你卻不同，你能夠確實以假想現實的方式認知到對象的精神構造，記憶，感情。能夠操作對方的精神與情緒，還能藉此力量重新找回對方所失去的人與人之間的牽絆。但是深入同調的行為會導致自己的心靈非常的疲勞。</text:p>
          </table:table-cell>
          <table:table-cell table:style-name="ce17" office:value-type="string" calcext:value-type="string">
            <text:p>只限症狀為【幻象惑星】的角色可取得。</text:p>
            <text:p>發動時機是自動行動。使場景內登場的一個角色的一個泰特司變回露易絲。</text:p>
            <text:p>必須獲得對方同意，變更的泰特司必須由對方所選擇，可以選擇已經昇華的泰特司變回露易絲。</text:p>
            <text:p>使用後，侵蝕上升1D10</text:p>
            <text:p>次數限制：劇本中一次。</text:p>
          </table:table-cell>
          <table:table-cell table:style-name="ce17"/>
          <table:table-cell table:style-name="ce17" office:value-type="string" calcext:value-type="string">
            <text:p>幻象惑星專用</text:p>
          </table:table-cell>
          <table:table-cell table:style-name="ce3" table:number-columns-repeated="20"/>
          <table:table-cell table:number-columns-repeated="998"/>
        </table:table-row>
        <table:table-row table:style-name="ro1">
          <table:table-cell table:style-name="ce14" office:value-type="string" calcext:value-type="string">
            <text:p>No.52</text:p>
          </table:table-cell>
          <table:table-cell table:style-name="ce14" office:value-type="string" calcext:value-type="string">
            <text:p>溫柔奇跡 (幻象惑星專用) カインドマジック Kind Magic</text:p>
          </table:table-cell>
          <table:table-cell table:style-name="ce17" office:value-type="string" calcext:value-type="string">
            <text:p>你有著與他人有著共感的能力，不是單純的同情，而是連物理上的疼痛都一起分擔的心靈連結。</text:p>
            <text:p>你不把自己受到的苦痛視為苦痛，但是看到他人痛苦的姿態這件事，對你來說才是真正的痛苦。這份溫柔讓你的R病毒產生變異。他人痛苦時，你能分擔對方一半的痛苦，這份溫柔的能力拯救了許多人，而你也不會畏懼分擔那份痛苦。</text:p>
            <text:p>你那顆堅韌的心才是你真正的強大。</text:p>
          </table:table-cell>
          <table:table-cell table:style-name="ce17" office:value-type="string" calcext:value-type="string">
            <text:p>只限症狀為【幻象惑星】的角色可取得。</text:p>
            <text:p>自動獲得異能【同甘共苦】Lv1，可使用經驗提升等級。</text:p>
            <text:p>這異能視為幻象惑星的異能</text:p>
            <text:p>同甘共苦 (ディヴィジョン Division)</text:p>
            <text:p>最大等級：3 </text:p>
            <text:p>時機：自動動作 </text:p>
            <text:p>技能：- </text:p>
            <text:p>難易度：自動成功 </text:p>
            <text:p>對象：單體 </text:p>
            <text:p>射程：視界 </text:p>
            <text:p>侵蝕：1D10 </text:p>
            <text:p>限制：D露易絲 </text:p>
            <text:p>次數：LV/劇本</text:p>
            <text:p>效果：對象受到HP傷害時使用，該傷害除以二(無條件舍去) </text:p>
            <text:p>同時自己也受到同等的傷害。 </text:p>
            <text:p>與他人分擔痛苦的能力</text:p>
          </table:table-cell>
          <table:table-cell table:style-name="ce17"/>
          <table:table-cell table:style-name="ce17" office:value-type="string" calcext:value-type="string">
            <text:p>幻象惑星專用</text:p>
          </table:table-cell>
          <table:table-cell table:style-name="ce3" table:number-columns-repeated="20"/>
          <table:table-cell table:number-columns-repeated="998"/>
        </table:table-row>
        <table:table-row table:style-name="ro1">
          <table:table-cell table:style-name="ce14" office:value-type="string" calcext:value-type="string">
            <text:p>No.53</text:p>
          </table:table-cell>
          <table:table-cell table:style-name="ce15" office:value-type="string" calcext:value-type="string">
            <text:p>強化兵(FH專用) バーサーカー　Super Soilder</text:p>
          </table:table-cell>
          <table:table-cell table:style-name="ce18" office:value-type="string" calcext:value-type="string">
            <text:p>你是經常參與戰鬥任務的ＦＨ特務。他人也只對你所擅長的蠻力有所期待。殺戮是你的專長，你的刀刃能輕易撕裂裝甲，你的子彈能輕易命中要害。這份能力可能是你的天分，亦或是訓練的結果。但要注意你心中的黑暗慢慢的在侵蝕著你，遲早會整個吞掉你的靈魂，使你成為只會破壞的怪物。</text:p>
          </table:table-cell>
          <table:table-cell table:style-name="ce18" office:value-type="string" calcext:value-type="string">
            <text:p>只有職業為【FH】相關的角色可以取得</text:p>
            <text:p>你進行的所有近戰、射擊攻擊的傷害+2D10</text:p>
            <text:p>此外，你可以照常消耗常備點來常備化FH專用道具，以該D-Lois取得的道具基本上除你以外均無法使用和裝備，即時持有也無法受到其效果影響。</text:p>
            <text:p>但是，你進行的&lt;意志&gt;判定達成值總是-5（不會因此降低到0以下），請注意這個效果也會應用於衝動判定之上</text:p>
          </table:table-cell>
          <table:table-cell table:style-name="ce18" office:value-type="string" calcext:value-type="string">
            <text:p>PE P32</text:p>
          </table:table-cell>
          <table:table-cell table:style-name="ce18" office:value-type="string" calcext:value-type="string">
            <text:p>FH專用</text:p>
          </table:table-cell>
          <table:table-cell table:style-name="ce3" table:number-columns-repeated="20"/>
          <table:table-cell table:number-columns-repeated="998"/>
        </table:table-row>
        <table:table-row table:style-name="ro1">
          <table:table-cell table:style-name="ce14" office:value-type="string" calcext:value-type="string">
            <text:p>No.54</text:p>
          </table:table-cell>
          <table:table-cell table:style-name="ce15" office:value-type="string" calcext:value-type="string">
            <text:p>裝備者(FH專用) アイテムユーザー Item Master</text:p>
          </table:table-cell>
          <table:table-cell table:style-name="ce18" office:value-type="string" calcext:value-type="string">
            <text:p>ＦＨ有著各種不為人知的科技。這些科技被用來生產各種具有特殊功能的道具，而其中一種為你所擁有。這些道具非常先進，但其原理不只對外界，對於ＦＨ自己來說也是一個黑盒子。你是掌管其中一個道具的人，也靠著道具獲得相對較高的成就。這個道具已經像是你身體的一部份，只要有它，就有著不輸給任何的人的自信</text:p>
          </table:table-cell>
          <table:table-cell table:style-name="ce18" office:value-type="string" calcext:value-type="string">
            <text:p>只有職業為【FH】相關的角色可以取得</text:p>
            <text:p>免費取得一件常備點在40以下的道具，可以選擇且不限於FH專用道具，但不能取得特殊道具和其他D露易斯的專用道具，通過該效果取得的道具雖然可以交給其他角色，但是你以外的角色無法使用該道具。</text:p>
            <text:p>取得該D-Lois時，你的侵蝕率基本值＋２</text:p>
            <text:p/>
            <text:p>此外，你可以照常消耗常備點來常備化FH專用道具，以該D-Lois取得的道具基本上除你以外均無法使用和裝備，即時持有也無法受到其效果影響。</text:p>
          </table:table-cell>
          <table:table-cell table:style-name="ce18" office:value-type="string" calcext:value-type="string">
            <text:p>PE P33</text:p>
          </table:table-cell>
          <table:table-cell table:style-name="ce18" office:value-type="string" calcext:value-type="string">
            <text:p>FH專用</text:p>
          </table:table-cell>
          <table:table-cell table:style-name="ce3" table:number-columns-repeated="20"/>
          <table:table-cell table:number-columns-repeated="998"/>
        </table:table-row>
        <table:table-row table:style-name="ro1">
          <table:table-cell table:style-name="ce14" office:value-type="string" calcext:value-type="string">
            <text:p>No.55</text:p>
          </table:table-cell>
          <table:table-cell table:style-name="ce15" office:value-type="string" calcext:value-type="string">
            <text:p>不死者(FH專用) アンデッド Undead</text:p>
          </table:table-cell>
          <table:table-cell table:style-name="ce18" office:value-type="string" calcext:value-type="string">
            <text:p>你是非常罕見的超越者，即使侵蝕率超過100%也能夠「回歸」，因此很難成為原菌。你可能經常接受會使得侵蝕率大幅上升的危險任務，但即使任務失敗，你最後還是回得來，你的部下將你是為不死之身。</text:p>
            <text:p>這種特性的原因還是未知，這可能是源自意志的力量，變異的生理或病毒，或是某個實驗的結果。有些人認為你早就已經是一個擅長隱藏自己的原菌，事實上，UGN的檔案中也直接將你視為原菌而視為清除原菌的首要目標吧。</text:p>
          </table:table-cell>
          <table:table-cell table:style-name="ce18" office:value-type="string" calcext:value-type="string">
            <text:p>只有職業為【FH】相關的角色可以取得</text:p>
            <text:p>回溯階段時，只要侵蝕率小於119%以下，就不會變成原菌，且可以獲得侵蝕率大於100%的獎勵經驗值。</text:p>
            <text:p>取得了該D-Lois時，你無法受到昇華Titus的「打消不利效果」和「從戰鬥不能狀態中回復」兩種效果以外的效果，但S-Lois則可以照常使用</text:p>
            <text:p/>
            <text:p>此外，你可以照常消耗常備點來常備化FH專用道具，以該D-Lois取得的道具基本上除你以外均無法使用和裝備，即時持有也無法受到其效果影響。</text:p>
            <text:p>這個D露易絲無法跟其他D露易絲並存，當然也不能重複取得</text:p>
          </table:table-cell>
          <table:table-cell table:style-name="ce18" office:value-type="string" calcext:value-type="string">
            <text:p>PE P33</text:p>
          </table:table-cell>
          <table:table-cell table:style-name="ce18" office:value-type="string" calcext:value-type="string">
            <text:p>FH專用</text:p>
          </table:table-cell>
          <table:table-cell table:style-name="ce3" table:number-columns-repeated="20"/>
          <table:table-cell table:number-columns-repeated="998"/>
        </table:table-row>
        <table:table-row table:style-name="ro1">
          <table:table-cell table:style-name="ce14" office:value-type="string" calcext:value-type="string">
            <text:p>No.56</text:p>
          </table:table-cell>
          <table:table-cell table:style-name="ce15" office:value-type="string" calcext:value-type="string">
            <text:p>破壞之子(FH之子專用) チルドレン Destructive Child</text:p>
          </table:table-cell>
          <table:table-cell table:style-name="ce18" office:value-type="string" calcext:value-type="string">
            <text:p>你是ＦＨ之子，出生並成長於組織之中。可以與ＧＭ討論成為ＦＨ之子的背景。</text:p>
            <text:p>與ＵＧＮ之子相比，ＦＨ受到更有效率的開發，也失去對於人類而言重要的東西。但這些孩子天生的力量並非普通超越者能相比。訓練完成的孩子會退居幕後，只在重要任務中出場，他們是ＦＨ的王牌，因此能說ＦＨ非常珍愛他們。</text:p>
          </table:table-cell>
          <table:table-cell table:style-name="ce18" office:value-type="string" calcext:value-type="string">
            <text:p>只有職業為【ＦＨ之子】的角色可以取得</text:p>
            <text:p>選擇一個你取得的，不是「時機：常駐」的異能。</text:p>
            <text:p>該異能的等級和最大等級各＋１，但其侵蝕率值＋２</text:p>
            <text:p/>
            <text:p>此外，你可以照常消耗常備點來常備化FH專用道具，以該D-Lois取得的道具基本上除你以外均無法使用和裝備，即時持有也無法受到其效果影響。</text:p>
          </table:table-cell>
          <table:table-cell table:style-name="ce18" office:value-type="string" calcext:value-type="string">
            <text:p>PE P34</text:p>
          </table:table-cell>
          <table:table-cell table:style-name="ce18" office:value-type="string" calcext:value-type="string">
            <text:p>FH之子專用</text:p>
          </table:table-cell>
          <table:table-cell table:style-name="ce3" table:number-columns-repeated="20"/>
          <table:table-cell table:number-columns-repeated="998"/>
        </table:table-row>
        <table:table-row table:style-name="ro1">
          <table:table-cell table:style-name="ce14" office:value-type="string" calcext:value-type="string">
            <text:p>No.57</text:p>
          </table:table-cell>
          <table:table-cell table:style-name="ce15" office:value-type="string" calcext:value-type="string">
            <text:p>工作員(FH單元隊長專用) マグネイト Magnate／Spy</text:p>
          </table:table-cell>
          <table:table-cell table:style-name="ce18" office:value-type="string" calcext:value-type="string">
            <text:p>你是一個擅長操控情報的特務。你已經將許多情報掩埋在黑暗之中，抹消的紀錄情報包刮犯罪紀錄或過去經歷。你可能是藉由個人技術，組織資源，藥物或催眠技術，甚至是Ｒ病毒的力量來完成你的工作。現代社會中，情報就是力量，因此你的價值遠大於一個戰鬥小隊，也因此被ＵＧＮ所標注。</text:p>
            <text:p>注意，你必須將ＦＨ和其秘密保持在黑暗中。</text:p>
          </table:table-cell>
          <table:table-cell table:style-name="ce18" office:value-type="string" calcext:value-type="string">
            <text:p>只有職業為【ＦＨ單元隊長】的角色可以取得</text:p>
            <text:p>你可以選擇一份情報並掩蓋或捏造之。即使是抹消犯罪記錄、捏造某人的記憶或是改變恐怖行動的計畫等也能做到，所造成的影響由GM決定</text:p>
            <text:p>但首先你必須先通過目標值為30的【精神】判定以獲取你欲掩蓋/捏造之事的真實情況，此時你每使用一點財產點都會使目標值+1.這個效果一個劇本中只能使用一次</text:p>
            <text:p/>
            <text:p>此外，你可以照常消耗常備點來常備化FH專用道具，以該D-Lois取得的道具基本上除你以外均無法使用和裝備，即時持有也無法受到其效果影響。</text:p>
          </table:table-cell>
          <table:table-cell table:style-name="ce18" office:value-type="string" calcext:value-type="string">
            <text:p>PE P34</text:p>
          </table:table-cell>
          <table:table-cell table:style-name="ce18" office:value-type="string" calcext:value-type="string">
            <text:p>FH單元隊長專用</text:p>
          </table:table-cell>
          <table:table-cell table:style-name="ce3" table:number-columns-repeated="20"/>
          <table:table-cell table:number-columns-repeated="998"/>
        </table:table-row>
        <table:table-row table:style-name="ro1">
          <table:table-cell table:style-name="ce14" office:value-type="string" calcext:value-type="string">
            <text:p>No.58</text:p>
          </table:table-cell>
          <table:table-cell table:style-name="ce14" office:value-type="string" calcext:value-type="string">
            <text:p>愚者黃金 デミクリスタル Demi-Crystal</text:p>
          </table:table-cell>
          <table:table-cell table:style-name="ce17" office:value-type="string" calcext:value-type="string">
            <text:p>你擁有的是愚者黃金，一種人造的賢者之石，然而到現在仍沒有任何一個組織能重現真正的賢者之石的力量。這偽物比真物弱小很多而被稱作愚人金，所有正常的科學家都將其視為垃圾。問題在於為何你擁有這個東西，是科學家用偽造品進行實驗的結果？是你所犧牲許多所創造出來的失敗品？還是一顆失去力量的真正賢者之石？。</text:p>
          </table:table-cell>
          <table:table-cell table:style-name="ce17" office:value-type="string" calcext:value-type="string">
            <text:p>使用異能的判定前發動，所有使用的異能等級＋１。</text:p>
            <text:p>可超過其最大等級，但不能增加其使用次數。</text:p>
            <text:p>該主要階段結束後，ＨＰ－２Ｄ１０</text:p>
            <text:p>次數限制：劇本中一次</text:p>
            <text:p/>
            <text:p>擁有這個Ｄ露易絲的角色死亡時，屍體會變成灰燼，留下燃盡的愚人黃金。GM可以為這個現象做出額外的故事。</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59</text:p>
          </table:table-cell>
          <table:table-cell table:style-name="ce14" office:value-type="string" calcext:value-type="string">
            <text:p>特別的存在：(露易斯) オンリーユー Only You／Special One</text:p>
          </table:table-cell>
          <table:table-cell table:style-name="ce17" office:value-type="string" calcext:value-type="string">
            <text:p>對特定的人物有著強烈的情感，遠比對他人的情感更為熾熱，那可以是愛情，忠誠，也可能是負面的憤怒或憎恨。因此對象對你來說是一個特別的存在，在你的心中佔有獨特的地位。這份情感可以化作你的盾牌和刀劍，但若是失去，痛苦將撕裂你的心。</text:p>
          </table:table-cell>
          <table:table-cell table:style-name="ce17" office:value-type="string" calcext:value-type="string">
            <text:p>選擇一個露易斯設為你的「特別的存在」。可以在遊戲開始前或進行中設定。</text:p>
            <text:p>選擇的露易斯變成泰特司的時候，你在回溯階段不能選擇用露易斯兩倍數量擲骰減少侵蝕率。追加擲骰可照常使用。</text:p>
            <text:p/>
            <text:p>當你進行傷害擲骰時發動，無視對方格擋值與裝甲值，其他角色不能保護對方。</text:p>
            <text:p>次數限制：劇本中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60</text:p>
          </table:table-cell>
          <table:table-cell table:style-name="ce14" office:value-type="string" calcext:value-type="string">
            <text:p>活死人 リヴィングデッド Living Dead</text:p>
          </table:table-cell>
          <table:table-cell table:style-name="ce17" office:value-type="string" calcext:value-type="string">
            <text:p>你曾經死過一次，當你回歸之後，你會發現你已經失去許多東西，甚至連你的存在都可能早已被抹消。如果夠幸運的話，距離死亡與復活的週期夠短的話，說不定還能回到原來的生活。你有可能是死在原菌手上的普通人，變成超越者之後才重生。</text:p>
          </table:table-cell>
          <table:table-cell table:style-name="ce17" office:value-type="string" calcext:value-type="string">
            <text:p>受到的所有傷害－２Ｄ１０。</text:p>
            <text:p>回溯階段時，根據露易斯數量擲骰的骰目中，必須將最大的一個數值變成１</text:p>
            <text:p>（ｅｘ．假如你丟三顆骰子，丟出８，８，４。那你必須將一個８變成１，變成１，８，４，侵蝕率下降值從２０變成１３）</text:p>
            <text:p>以雙倍數量擲骰時亦適用，但追加擲骰則照常。</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61</text:p>
          </table:table-cell>
          <table:table-cell table:style-name="ce14" office:value-type="string" calcext:value-type="string">
            <text:p>活傳奇 リヴィングレジェンド Living Legend</text:p>
          </table:table-cell>
          <table:table-cell table:style-name="ce17" office:value-type="string" calcext:value-type="string">
            <text:p>「你想聽我的故事嗎？我是一個傳奇殺手，我專殺那些對作惡豪不自覺的混蛋，但常只收取一聲感謝，這跟金錢無關，而是為了自己的心。正因如此，我才會來殺你，並且為了殺你，買下一艘太空船來到這裡的。那麼，開始遊戲吧。」(D露易斯介紹時附贈的舉例，因為蠻喜歡的所以節錄片段放上來)</text:p>
            <text:p>你是個活生生的傳奇人物，名聲廣播，藉由你的個人魅力與聲望，你可以輕鬆取得任何你想要的東西。你可以自由設定你的名聲源自於你的能力，運氣，還是其他原因。</text:p>
          </table:table-cell>
          <table:table-cell table:style-name="ce17" office:value-type="string" calcext:value-type="string">
            <text:p>採購判定時，可以代替擲骰使用這個D露易絲的能力，直接取得想要的道具。</text:p>
            <text:p>不能藉此取得「不可購入」的道具，特殊道具，D露易斯專用道具。</text:p>
            <text:p>取得的道具在劇本結束後消失</text:p>
            <text:p>ＧＭ可以選擇拒絕效果的使用，這時候不消耗使用次數。</text:p>
            <text:p>次數限制：劇本中一次</text:p>
            <text:p/>
            <text:p>可以用此效果取得沒有資料的道具，包刮建築物或組織。但是請注意，買下敵人的組織不代表對方會對你表示忠誠。</text:p>
            <text:p/>
            <text:p>回溯階段時，根據露易絲數量決定擲骰數後，該數量必定－１Ｄ。包刮兩倍擲骰。追加擲骰的時候照常。</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62</text:p>
          </table:table-cell>
          <table:table-cell table:style-name="ce14" office:value-type="string" calcext:value-type="string">
            <text:p>守護者 ガーディアン Guardian</text:p>
          </table:table-cell>
          <table:table-cell table:style-name="ce17" office:value-type="string" calcext:value-type="string">
            <text:p>奉獻自己去保護他人，比起自己更不願看到他人受傷。只有過於慈愛或過於自責的人才會有的生活型態。</text:p>
          </table:table-cell>
          <table:table-cell table:style-name="ce17" office:value-type="string" calcext:value-type="string">
            <text:p>當場景中的角色受到攻擊時使用，該攻擊的攻擊對象變更為自己，由自己來進行反應動作與接受傷害。 該攻擊的攻擊對象不能再藉由其他能力，道具，D露易斯的效果來變更。也不能將自己受到的傷害轉移給其他角色。 該主要階段結束後，侵蝕率＋１Ｄ１０。 次數限制：劇本中一次你不能使用泰特司昇華的效果中「判定＋１０Ｄ」的效果</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63</text:p>
          </table:table-cell>
          <table:table-cell table:style-name="ce14" office:value-type="string" calcext:value-type="string">
            <text:p>調和者 ハーモナイザー Harmonizer</text:p>
          </table:table-cell>
          <table:table-cell table:style-name="ce17" office:value-type="string" calcext:value-type="string">
            <text:p>「放心吧，這次有我在，你不用再犧牲任何東西了。」</text:p>
            <text:p>你有著能刺激他人自愈力的能力，但這項能力不是用在醫療用途上，而是使對方能夠抵抗Ｒ病毒。藉由刺激細胞，你能夠控制侵蝕率的上升，使對象與Ｒ病毒保持平衡。</text:p>
            <text:p>科學家將你視為「調和者」，你的協調能力對於其他超越者而言是非常渴望的，但是你每次使用這能力時，自己對於Ｒ病毒的抵抗力會變弱。</text:p>
          </table:table-cell>
          <table:table-cell table:style-name="ce17" office:value-type="string" calcext:value-type="string">
            <text:p>其他角色使用能力時使用，該能力的侵蝕率上升變為０</text:p>
            <text:p>只能消除一個能力的侵蝕率上升值，當角色組合能力時，只能從中選擇一個。</text:p>
            <text:p>使用後，自己的侵蝕率＋１Ｄ１０。</text:p>
            <text:p>次數限制：劇本中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64</text:p>
          </table:table-cell>
          <table:table-cell table:style-name="ce14" office:value-type="string" calcext:value-type="string">
            <text:p>傍依之影 (噬身影蛇專用) シャドウバディ Shadow Buddy</text:p>
          </table:table-cell>
          <table:table-cell table:style-name="ce17" office:value-type="string" calcext:value-type="string">
            <text:p>所有銜尾蛇症狀超越者都有奇怪的能力，但你，或是你的影子，卻是其中稀奇的例子。你的影子是個化身，一個擁有自己獨有能力跟意志的超越者。化身通常基於人類的傳說或故事，他們可能會長得像傳說中的幻獸，或是漫畫書中的英雄。據說這個形象是他們搜尋宿主的精神和潛意識得來的結果。</text:p>
            <text:p>（因為這個Ｄ露易斯，使得銜尾蛇也常被視為替身使者或Ｐｅｒｓｏｎａ）</text:p>
          </table:table-cell>
          <table:table-cell table:style-name="ce17" office:value-type="string" calcext:value-type="string">
            <text:p>只限症狀為【噬身影蛇】的角色可取得。 </text:p>
            <text:p>選擇一個自己沒有的症狀的異能並免費取得該異能Lv1。 </text:p>
            <text:p>選擇的能力不能是【時機：常駐】，不能選擇敵人專用能力，不能選擇【限制：－】以外的能力。 該能力的侵蝕率上升＋１。 </text:p>
            <text:p>選擇的能力視為【原初】系列的能力，也就是說視為噬身影蛇症狀的能力。 詳細規則參照銜尾蛇症狀的能力複製原則 </text:p>
            <text:p>使用這個能力時，可能會顯現出你的化身。</text:p>
          </table:table-cell>
          <table:table-cell table:style-name="ce17"/>
          <table:table-cell table:style-name="ce17" office:value-type="string" calcext:value-type="string">
            <text:p>噬身影蛇專用</text:p>
          </table:table-cell>
          <table:table-cell table:style-name="ce3" table:number-columns-repeated="20"/>
          <table:table-cell table:number-columns-repeated="998"/>
        </table:table-row>
        <table:table-row table:style-name="ro1">
          <table:table-cell table:style-name="ce14" office:value-type="string" calcext:value-type="string">
            <text:p>No.65</text:p>
          </table:table-cell>
          <table:table-cell table:style-name="ce14" office:value-type="string" calcext:value-type="string">
            <text:p>輪回之獸 (噬身影蛇專用) アルマ・レグナム Anima Regium</text:p>
          </table:table-cell>
          <table:table-cell table:style-name="ce17" office:value-type="string" calcext:value-type="string">
            <text:p>輪回之獸是在現代非常稀有的特殊超越者。他們是具由不死性的強大生命，每當死亡，他們會複製自我並附身到附近的人類身上。</text:p>
            <text:p>被輪回之獸寄生的人類會獲得強大的力量，但同時必須面對強大的衝動。他們常常變成原菌，難以消滅，再加上其特性會不斷帶著其破壞性到另一個身軀。</text:p>
            <text:p>你是其中非常稀有的例子，即使被輪回之獸附身也沒有失去理智，這可能是因為你的銜尾蛇的症狀或是其他因素拯救了你，但沒人知道確切原因。</text:p>
            <text:p>（簡單來說是會讓你變成虛的Ｄ露易斯）</text:p>
          </table:table-cell>
          <table:table-cell table:style-name="ce17" office:value-type="string" calcext:value-type="string">
            <text:p>只限症狀為【噬身影蛇】的角色可取得。 角色進行判定時使用，使該判定強制失敗。使用這效果時，需消費一個泰特司。 不能對【難易度：自動成功】或是其他不需要判定的能力或效果使用。 次數限制：劇本中一次 當你進入【暴走】狀態時，你會變成一個白色面具的雙足怪物。這個變身會跟著【暴走】的解除而回復原狀。只要沒變成原菌，就算是怪物型態也能保持理智。但一旦變成原菌，身心都會變成怪物並無法恢復原狀。</text:p>
          </table:table-cell>
          <table:table-cell table:style-name="ce17"/>
          <table:table-cell table:style-name="ce17" office:value-type="string" calcext:value-type="string">
            <text:p>噬身影蛇專用</text:p>
          </table:table-cell>
          <table:table-cell table:style-name="ce3" table:number-columns-repeated="20"/>
          <table:table-cell table:number-columns-repeated="998"/>
        </table:table-row>
        <table:table-row table:style-name="ro1">
          <table:table-cell table:style-name="ce14" office:value-type="string" calcext:value-type="string">
            <text:p>No.66</text:p>
          </table:table-cell>
          <table:table-cell table:style-name="ce14" office:value-type="string" calcext:value-type="string">
            <text:p>頂點之證 シュープリームスチューデント</text:p>
          </table:table-cell>
          <table:table-cell table:style-name="ce17" office:value-type="string" calcext:value-type="string">
            <text:p>你被歸類為SS級學生。</text:p>
            <text:p>通常，能力的級別以S級為最高。然而，你擁有的潛力遠遠超越了S級的範疇。</text:p>
            <text:p>你所驅使的力量，即使在眾多超越者學生中也是出類拔萃的。至於你為何能獲得如此強大的力量，由你自行決定。</text:p>
            <text:p>如果你不想公開自己的SS級身份，也可以偽裝成任意級別。請與GM商量後決定你的表面級別。即使如此，學園高層仍然知道你的真實SS級身份。</text:p>
          </table:table-cell>
          <table:table-cell table:style-name="ce17" office:value-type="string" calcext:value-type="string">
            <text:p>此D-Lois只能在「舞臺：超越者學園」中使用。</text:p>
            <text:p>你獲得獨特道具「SS級」，數據如下。你不能獲得其他「種類：級別」的獨特道具。</text:p>
            <text:p/>
            <text:p>SS級</text:p>
            <text:p>種類：級別</text:p>
            <text:p>購買/常備化：</text:p>
            <text:p>購入不可/不可</text:p>
            <text:p>說明：被授予SS級的證明。SS級的稱呼還沒有確定。</text:p>
            <text:p>使用異能前宣言使用。該異能若為「對象：單體」則變更為「對象：範圍（選擇）」；若為「對象：範圍（選擇）」則變更為「射程：視界」「對象：場景（選擇）」。組合多個異能使用時，該效果適用於最終決定的目標。使用此效果時，你的侵蝕率+10。該效果一劇本可以使用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67</text:p>
          </table:table-cell>
          <table:table-cell table:style-name="ce14" office:value-type="string" calcext:value-type="string">
            <text:p>無法測定 エクストラ</text:p>
          </table:table-cell>
          <table:table-cell table:style-name="ce17" office:value-type="string" calcext:value-type="string">
            <text:p>你被歸類為"EX級"。</text:p>
            <text:p>通常，能力的級別被分為C到S級。只要看見級別，大致可以預測一個人能夠做到什麼程度的事情。</text:p>
            <text:p>但是，有一個例外。那就是你——EX級超越者。</text:p>
            <text:p>EX級是完全無法預測的。</text:p>
            <text:p>正常情況下，你的輸出功率頂多只有C級水準，但在危機情況下，有時甚至能發揮出淩駕SS級的力量。學園方面正在謹慎地將你作為珍貴樣本進行觀察。然而，要解明你的能力，還需要更多時間。</text:p>
            <text:p>另外，為了方便起見，你被賦予了從C到S中的某一個級別。你可以選擇知道自己實際上是EX級的事實，也可以選擇不知道。</text:p>
          </table:table-cell>
          <table:table-cell table:style-name="ce17" office:value-type="string" calcext:value-type="string">
            <text:p>此D-Lois只能在「舞臺：超越者學園」中使用。</text:p>
            <text:p>你獲得獨特道具「EX級」。數據如下。你不能獲得其他「種類：級別」的獨特道具。</text:p>
            <text:p/>
            <text:p>EX級</text:p>
            <text:p>種類：級別</text:p>
            <text:p>購買/常備化：</text:p>
            <text:p>購入不可／不可</text:p>
            <text:p>說明：被授予EX級的證明。EX級的稱呼還沒有確定。</text:p>
            <text:p>準備階段使用。該回合中，你取得的「時機：常駐」以外的所有異能的等級和最大等級+1。然而，此效果不會改變異能的使用次數。使用此效果後，在該回合的結算階段你的HP將變為0。該效果一劇本可以使用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68</text:p>
          </table:table-cell>
          <table:table-cell table:style-name="ce14" office:value-type="string" calcext:value-type="string">
            <text:p>裁定者 パックチーフ</text:p>
          </table:table-cell>
          <table:table-cell table:style-name="ce17" office:value-type="string" calcext:value-type="string">
            <text:p>你是一位在學園內擁有極高權力的學生，全因你擔任著特殊的職位。</text:p>
            <text:p>無論是學生會幹部、風紀委員長還是學生宿舍的舍監等，種類各異，但共同點是這些職位都站在「維護學園秩序」的一方。</text:p>
            <text:p>在超越者雲集的學園中，維持秩序絕非易事。因此，賦予你的權限遠比一般學校組織中的同等職位更加強大。</text:p>
            <text:p>請不要誤解，你所擁有的權力絕非賦予你個人，而是賦予你所擔任的職位。切勿忘記，權力伴隨著責任。</text:p>
            <text:p>你擔任何種職位，可在與GM商量後自由決定。</text:p>
          </table:table-cell>
          <table:table-cell table:style-name="ce17" office:value-type="string" calcext:value-type="string">
            <text:p>此D-Lois只能在「舞臺：超越者學園」中使用。</text:p>
            <text:p>先攻階段使用。你可以對場景中出現的一名角色施加任意一種不良狀態。若選擇憎惡，憎惡的對象由你指定。若需要等級，則為5級。 透過此D-Lois施加的不良狀態無法以異能或道具效果回復。注意，通過昇華Titus，D-Lois或E-Lois的效果，仍然可以回復由此D-Lois施加的不良狀態。該效果一劇本可以使用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69</text:p>
          </table:table-cell>
          <table:table-cell table:style-name="ce14" office:value-type="string" calcext:value-type="string">
            <text:p>學生王者 ヘラクレス</text:p>
          </table:table-cell>
          <table:table-cell table:style-name="ce17" office:value-type="string" calcext:value-type="string">
            <text:p>你是模擬戰鬥課程"R戰鬥"的冠軍。無數的學生和教師...不，「觀眾」們將你比作希臘神話英雄，稱你為「赫拉克勒斯」並讚頌著你。</text:p>
            <text:p>"R戰鬥"的內容非常多元化，從格鬥技和槍戰、馬上長槍決鬥等直接戰鬥，到展示超越人類極限的運動競技，再到使用載具的競速賽，甚至還包括將對手辯論到崩潰的邏輯·決鬥。不僅有個人競技，也有各種各樣的團體競技。</text:p>
            <text:p>關於你是哪一個領域的「赫拉克勒斯」，請與GM商量後自由決定詳細設定。作為赫拉克勒斯的你在學園內是名人。觀眾中也會有人想打敗你，成為新的赫拉克勒斯。</text:p>
            <text:p>此外，你也可以設定為目前已從R戰鬥一線退役的「前赫拉克勒斯」。即使如此，只要你擁有這個D-Lois，你的名字仍會作為不朽的傳說響徹學園。</text:p>
          </table:table-cell>
          <table:table-cell table:style-name="ce17" office:value-type="string" calcext:value-type="string">
            <text:p>此D-Lois只能在「舞臺：超越者學園」中使用。</text:p>
            <text:p>取得該D-Lois時指定一項技能。在你進行指定技能的判定前使用。該判定的達成值+1D。該效果一劇本可以使用三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70</text:p>
          </table:table-cell>
          <table:table-cell table:style-name="ce14" office:value-type="string" calcext:value-type="string">
            <text:p>學園天使 スクールエンジェル</text:p>
          </table:table-cell>
          <table:table-cell table:style-name="ce17" office:value-type="string" calcext:value-type="string">
            <text:p>你在學園內是家喻戶曉的名人。</text:p>
            <text:p>無論是由藝能研究部製作的超級偶像、將即將廢部的弱小社團在短時間內提升為強勢社團的傳奇部長、美貌程度讓環球小姐都望塵莫及的絕世美人，或者是小學時代就被預言必定獲得全球首個諾貝爾獎的超越科學部新星——你就是這樣的人物之一。</text:p>
            <text:p>你的存在本身就能鼓舞他人。你是以學生形象出現的美德、規範、希望，是人類潛能的化身。</text:p>
            <text:p>沒有人能夠忽視你的存在。當然，因為知名度高，嫉妒你的人也不少。有光明就有陰影。引人注目的同時也意味著會樹立更多敵人。然而，這也是成名的宿命。或許你擁有的光芒甚至能照亮陰影——也說不定。</text:p>
          </table:table-cell>
          <table:table-cell table:style-name="ce17" office:value-type="string" calcext:value-type="string">
            <text:p>此D-Lois只能在「舞臺：超越者學園」中使用。</text:p>
            <text:p>在場景中登場的你以外的角色進行判定後立即使用，該判定的達成值+5。該效果無法對你自身使用。該效果一劇本可以使用三次。此外，由於你過於有名，無法隱藏自己的行蹤，當你進行任何試圖向他人隱藏自己的判定時，判定骰數-5個。</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71</text:p>
          </table:table-cell>
          <table:table-cell table:style-name="ce14" office:value-type="string" calcext:value-type="string">
            <text:p>宿命之子 チャイルドオブフェイト</text:p>
          </table:table-cell>
          <table:table-cell table:style-name="ce17" office:value-type="string" calcext:value-type="string">
            <text:p>你與學園島有著奇妙的緣分。</text:p>
            <text:p>你體內的背教者在這座島上顯示出不可思議的活性。研究者們推測這可能是由島內存在的某種影響物所引起，但真相仍然是個謎。</text:p>
            <text:p>唯一確定的是，當你身處學園島時，你作為超越者的力量會顯著增強。</text:p>
          </table:table-cell>
          <table:table-cell table:style-name="ce17" office:value-type="string" calcext:value-type="string">
            <text:p>此D-Lois只能在「舞臺：超越者學園」中使用。</text:p>
            <text:p>你免費取得異能【最大化】Lv1。</text:p>
            <text:p/>
            <text:p>最大化</text:p>
            <text:p>最大等級：1 </text:p>
            <text:p>時機：準備階段 </text:p>
            <text:p>技能：- </text:p>
            <text:p>難易度：自動成功</text:p>
            <text:p>對象：自身 </text:p>
            <text:p>射程：至近</text:p>
            <text:p>侵蝕值：7 </text:p>
            <text:p>限制：D-Lois</text:p>
            <text:p>次數：1/劇本</text:p>
            <text:p>效果：最大程度釋放從島上流入的力量的異能。</text:p>
            <text:p>該回合間，你使用的所有異能判定的暴擊值-1(下限值6)。使用此異能會使你失去20點HP。</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72</text:p>
          </table:table-cell>
          <table:table-cell table:style-name="ce14" office:value-type="string" calcext:value-type="string">
            <text:p>番長 ウォーロード</text:p>
          </table:table-cell>
          <table:table-cell table:style-name="ce17" office:value-type="string" calcext:value-type="string">
            <text:p>你是番長。</text:p>
            <text:p>這與一般社會中的"不良頭子"有著微妙的不同。學園內存在著一個稱為番長連的自警團組織。這是一個為了保護宿舍學生而組織的戰鬥集團，由12個小隊組成，各隊長被授予從1番到12番的番號，因此被稱為"番長"。雖然不是非法團體，但與學生會和風紀委員會等組織的關係有些緊張。有人將他們斷定為"不過是不良學生的私人武裝"。番長連的各隊長，也就是"持有番號者"被稱為番長或戰爭之王（Warlord），無一例外都是能一騎當千的猛士。女性則被稱為戰爭少女（War Maiden）。你的番號可以與GM商量後自由決定。</text:p>
          </table:table-cell>
          <table:table-cell table:style-name="ce17" office:value-type="string" calcext:value-type="string">
            <text:p>此D-Lois只能在「舞臺：超越者學園」中使用。</text:p>
            <text:p>你免費取得異能【威壓】Lv1，可使用經驗提升等級。</text:p>
            <text:p/>
            <text:p>威壓 </text:p>
            <text:p>最大等級：3 </text:p>
            <text:p>時機：主要動作 </text:p>
            <text:p>技能：參照效果 </text:p>
            <text:p>難易度：對決 </text:p>
            <text:p>對象：場景(選擇) </text:p>
            <text:p>射程：視界</text:p>
            <text:p>侵蝕值：5 </text:p>
            <text:p>限制：D-Lois</text:p>
            <text:p>效果：用殺氣壓制敵人的異能。</text:p>
            <text:p>取得該D-Lois時指定一項技能，此異能的技能為所指定的技能。只能以類型：集團的敵人為對象。異能的命中判定暴擊值-LV(下限值7)，命中後使目標戰鬥不能。該異能不可與其他異能組合。</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73</text:p>
          </table:table-cell>
          <table:table-cell table:style-name="ce14" office:value-type="string" calcext:value-type="string">
            <text:p>訪問者 フリーパス</text:p>
          </table:table-cell>
          <table:table-cell table:style-name="ce17" office:value-type="string" calcext:value-type="string">
            <text:p>這個D-Lois表示你是可以自由出入魔街的特殊人群。</text:p>
            <text:p>魔街是一座居民大多為超越者、在世界上獨樹一幟的特殊都市。因此，超越者之間的戰鬥頻繁發生，甚至連防衛隊的反超越者部隊都難以應對。</text:p>
            <text:p>由於魔街的超越者給人以比其他地區更加強大的印象，所以不少超越者自稱是"魔街回歸者"。不過，大多數只是為了提高聲望而吹噓的謊言。</text:p>
            <text:p>你與那些冒牌的"魔街回歸者"不同，你是真正的"魔街回歸者"。或者，你也可以是從外地闖入魔街的亡命之徒。</text:p>
            <text:p>不管原因為何，你能夠自由進出本來禁止出入的魔街。你可以自由決定原因，例如獲得了美國政府或UGN等組織授予的特權，或者購買了特權，又或是知道隱秘通道等。</text:p>
            <text:p>但是，你獲得的許可僅限於往返魔街。魔街的信息是應該對世界保密的資料。如果試圖向公眾傳播，將會受到政府或UGN的壓力，被強行壓制。</text:p>
          </table:table-cell>
          <table:table-cell table:style-name="ce17" office:value-type="string" calcext:value-type="string">
            <text:p>此D-Lois只能在「舞臺：魔街」中取得。</text:p>
            <text:p/>
            <text:p>你可以從魔街前往其他舞臺。反之，也可以從其他舞臺進入魔街。此外，即使在其他舞臺，你也能使用魔街專用的道具。但是，進出魔街或使用魔街專用道具需要獲得GM的許可。</text:p>
            <text:p>你不得在魔街以外的舞臺談論關於魔街的位置或逃脫方法等信息。能談論到什麼程度由GM決定。</text:p>
            <text:p>此外，在魔街生活的你比外界的超越者更常使用能力，因此精通異能的運用。你組合了異能進行的判定骰數+1個。</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74</text:p>
          </table:table-cell>
          <table:table-cell table:style-name="ce14" office:value-type="string" calcext:value-type="string">
            <text:p>後援者 パトロン</text:p>
          </table:table-cell>
          <table:table-cell table:style-name="ce17" office:value-type="string" calcext:value-type="string">
            <text:p>這個D-Lois表示你正在接受某個組織的援助。</text:p>
            <text:p>你正從某個龐大的組織那裡獲得巨大的支持。這個組織可能是日本政府、美國政府、各國軍隊或情報機構，甚至是UGN等。不管是哪個組織，它們將你派往魔街的目的，無疑是希望藉此獲得某些利益。</text:p>
            <text:p>魔街是一座被封閉的城市，異乎尋常地擁有大量超越者，且其中的居民甚至不隱藏自己是超越者的身份來生活。某種意義上，魔街是世界在認知超越者存在之後，可能會發展成何種情況的模擬。此外，為了在超越者相關的研究上更進一步，許多組織都渴望獲得有關魔街的信息。</text:p>
            <text:p>支持你的組織為你準備了作戰中必要的物資，包括最先進的武器與實驗性藥物等。然而，與援助相應的，你也被期待能夠提供與之匹配的成果。</text:p>
          </table:table-cell>
          <table:table-cell table:style-name="ce17" office:value-type="string" calcext:value-type="string">
            <text:p>此D-Lois只能在「舞臺：魔街」中取得。</text:p>
            <text:p/>
            <text:p>你能依靠組織的援助，隨時調取所需的道具：</text:p>
            <text:p>次要動作使用，選擇一項屬_xffff_你的症候群的獨特道具。在該場景中，你將取得所選擇的道具。</text:p>
            <text:p>如果取得的道具是武器或防具，可以立即裝備；如果是載具，則可以直接進入搭乘狀態。</text:p>
            <text:p>使用此效果時，你的侵蝕率會+5。該效果一劇本可以使用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75</text:p>
          </table:table-cell>
          <table:table-cell table:style-name="ce14" office:value-type="string" calcext:value-type="string">
            <text:p>傳說 ヒーロー</text:p>
          </table:table-cell>
          <table:table-cell table:style-name="ce17" office:value-type="string" calcext:value-type="string">
            <text:p>這個D-Lois表示你是一位在魔街締造傳說的傳奇人物。</text:p>
            <text:p>例如，你曾以一己之力擊潰GPO的大部隊。</text:p>
            <text:p>例如，你曾在不流一滴血的情況下平息了一場非登記市民的大規模暴動。</text:p>
            <text:p>例如，你曾用歌聲使失控暴走的超越者集團冷靜下來。</text:p>
            <text:p>像這樣的英雄事蹟，使你在魔街中廣為人知。對於站在你面前的人，倘若是盟友，他們會向你投以希望或羡慕的眼神；倘若是敵人，則會心生恐懼和絕望。</text:p>
            <text:p>或許這些傳說中有些內容被誇大，亦或只是偶然與幸運塑造出的結果。但是被廣泛相信的傳說，就是傳說。而運氣，亦是實力的一部分。至少，你擁有足以讓運氣和流言成為助力的能力。</text:p>
            <text:p>你的名聲無論你是否期望，都對社會產生了影響。這既可能帶來好處，也可能招致災禍。</text:p>
            <text:p>當有人遇到困難時，他們可能會慕名前來尋求你的協助。然而，也可能會有因過度在意你的傳說，而試圖超越你、向你挑戰的人出現。而由於你的名聲過於顯赫，你可能無法輕易逃避這些人。</text:p>
            <text:p>在你的傳說結束之前，這些後果將無法避免。</text:p>
          </table:table-cell>
          <table:table-cell table:style-name="ce17" office:value-type="string" calcext:value-type="string">
            <text:p>此D-Lois只能在「舞臺：魔街」中取得。</text:p>
            <text:p/>
            <text:p>你是一個讓魔街聞名的傳奇人物。遇到你的人，不論是基於敬仰還是恐懼，通常都會為你提供某些便利。</text:p>
            <text:p>你進行的基於【社會】以及所有屬_xffff_【社會】的技能的判定，判定骰數+3個。</text:p>
            <text:p>但是，你的&lt;知覺&gt;判定骰數-1個。由於你的鼎鼎大名，你成為眾人矚目的焦點，因此難以隱藏自己或偵察環境。</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76</text:p>
          </table:table-cell>
          <table:table-cell table:style-name="ce14" office:value-type="string" calcext:value-type="string">
            <text:p>魔街之王 アークエネミー</text:p>
          </table:table-cell>
          <table:table-cell table:style-name="ce17" office:value-type="string" calcext:value-type="string">
            <text:p>在魔街的地下，潛伏著一個被稱為「地下之王」的生物。據說，它曾引發震夜事件。然而，關於這個生物的外貌，有著各種不同的說法，至今仍無法確定。</text:p>
            <text:p>有些人聲稱，它是一個如同鯨魚般巨大生物；也有些人提到，它是一個擁有血紅冷酷雙眼的男人；更有人表示，它是一位美得令人靈魂彷佛被吸走的絕世美女。儘管這些看似荒誕不經的描述各不相同，但所有的證言卻有一個共同點：「地下之王是擁有強大力量的超越者，並潛伏在魔街的地下」。</text:p>
            <text:p>大多數人將「地下之王」視作無稽的都市傳說不屑一顧。但有一部分人知道事實並非如此。他們深信「地下之王」的存在，且有確切的證據。魔街的地下偶爾會發現一些神秘的細胞碎片。這種細胞能給予超越者強大的力量，卻會腐蝕其精神，令人忌畏……</text:p>
            <text:p>而你也知道，「地下之王」確實存在，因為你身上寄宿著「地下之王」的力量。</text:p>
            <text:p>至於你為什麼會與「地下之王」的細胞融合，其原因可以與GM商量後自由決定。</text:p>
          </table:table-cell>
          <table:table-cell table:style-name="ce17" office:value-type="string" calcext:value-type="string">
            <text:p>此D-Lois只能在「舞臺：魔街」中取得。</text:p>
            <text:p/>
            <text:p>與你的肉體融合的「地下之王」的細胞賦予了你強大的力量，但同時也會侵蝕你的精神，宛如一把雙刃劍。</text:p>
            <text:p>準備階段使用，你可以從非「時機：常駐」的異能中選擇一個。本回合中，所選擇異能的LV+3，此時可以超過等級上限。然而，這個效果不會增加異能的使用次數。</text:p>
            <text:p>使用此效果時，你的侵蝕率會+1D。該效果一劇本可以使用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77</text:p>
          </table:table-cell>
          <table:table-cell table:style-name="ce14" office:value-type="string" calcext:value-type="string">
            <text:p>立於頂點者 カリスマ</text:p>
          </table:table-cell>
          <table:table-cell table:style-name="ce17" office:value-type="string" calcext:value-type="string">
            <text:p>你擁有一種令人無法抗拒的魅力。可以稱之為「風采」，也可以說是「華」。</text:p>
            <text:p>這或許是與生俱來的天賦，或者是作為超越者的能力所帶來的結果。無論如何，僅僅是你站在那裡，就能吸引周圍所有人的目光與注意。你身上擁有一種能夠牽動人心的「某種特質」。</text:p>
            <text:p>自然地，許多人被你吸引並聚集在你的身邊。在與那些對你心懷敬慕之人共同生活的日子裡，你建立自己的團隊無疑是順理成章之事。如今，你作為這個團隊的領袖，已經是魔街內舉足輕重的存在。</text:p>
            <text:p>更重要的是，你的魅力不僅僅只是吸引人。它還能提升他人的精神狀態，引出他們的才能，從而使那個人能夠展現出超越以往的表現。</text:p>
            <text:p>能夠凝聚人群，並完全激發跟隨者潛力的你，是無愧於團隊領袖之位的存在。</text:p>
          </table:table-cell>
          <table:table-cell table:style-name="ce17" office:value-type="string" calcext:value-type="string">
            <text:p>此D-Lois只能在「舞臺：魔街」中取得。</text:p>
            <text:p/>
            <text:p>身為團隊或組織的領袖，你的魅力不僅能吸引眾人，還能幫助追隨者全力發揮他們的力量。</text:p>
            <text:p>在場景中登場的你以外的角色進行判定後使用，該判定達成值+10，該效果一次判定中只能使用一次。這個D-Lois的效果一劇本可使用三次。</text:p>
            <text:p>使用該效果時，你的侵蝕率會+5。</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78</text:p>
          </table:table-cell>
          <table:table-cell table:style-name="ce14" office:value-type="string" calcext:value-type="string">
            <text:p>戰場死神 ジェノサイダー</text:p>
          </table:table-cell>
          <table:table-cell table:style-name="ce17" office:value-type="string" calcext:value-type="string">
            <text:p>有一名被稱為「死神」的傭兵。</text:p>
            <text:p>無論多麼殘酷的戰場，都能從中生還，這是一種「能力」。</text:p>
            <text:p>然而，這種能力並非來自軍人的智慧，亦非鍛煉到極致的肉體，甚至也不是因背教者的覺醒所致。這種難以解釋的高存活率，的確存在著。</text:p>
            <text:p>勇氣？成為英雄的資質？這些都不對。有人說，他們膽小至極。也有人說，他們僅僅是不擇手段。然而，僅靠這些，是無法在戰場上生存的。</text:p>
            <text:p>有人曾渴望死亡，在尋找死亡的歸宿中持續戰鬥，卻只能目睹周圍的戰友接連倒下。</text:p>
            <text:p>無視一切概率，只為生存的異能士兵。活著的傳說。在戰場上帶來無數死亡，唯獨自己生存下來。這，便是「戰場的死神」。</text:p>
            <text:p>而你，正是這個「戰場的死神」。跨越了無數的戰場，持續存活下來。你不被容許死亡，恐怕就算想要自盡，都會被拒絕。死神的命運，讓你只能繼續存活下去。</text:p>
            <text:p>或許，某一天，真正的安息會降臨於你，但那一天究竟會不會到來，仍然是未知數。</text:p>
          </table:table-cell>
          <table:table-cell table:style-name="ce17" office:value-type="string" calcext:value-type="string">
            <text:p>此D-Lois只能在「舞臺：陽炎戰場」中使用。</text:p>
            <text:p/>
            <text:p>你以回應動作進行對決後使用。對決將直接判定為你的勝利，無論對方的達成值為何。如果這次判定需要達成值，請以該次判定的達成值為准。</text:p>
            <text:p>使用該效果的判定結束後，你的侵蝕率會+2D。該效果一劇本可以使用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79</text:p>
          </table:table-cell>
          <table:table-cell table:style-name="ce14" office:value-type="string" calcext:value-type="string">
            <text:p>名將 コマンダー</text:p>
          </table:table-cell>
          <table:table-cell table:style-name="ce17" office:value-type="string" calcext:value-type="string">
            <text:p>在決定戰局走勢的眾多因素中，無論是單個士兵的能力與訓練，還是作為硬件的兵器的性能，這些都至關重要，這點無需爭論。</text:p>
            <text:p>然而，比這些更重要的是，那些作為指揮官的存在。如果無法將這些硬件進行統合、運用，那麼作為「軟件」的軍隊就無法正常運作。越是現代化的戰爭，越是如此。一百匹由一隻羊領導的狼，終究不敵由一隻狼領導的一百隻羊。</text:p>
            <text:p>士兵們知道，唯有卓越的將領，才能帶領他們活著回到家人身邊。因此，無論命令多麼艱苦，或看似多麼無謀，他們都願意相信這名將領，追隨其步伐，即使面對再危險的戰場，也能奮勇向前。</text:p>
          </table:table-cell>
          <table:table-cell table:style-name="ce17" office:value-type="string" calcext:value-type="string">
            <text:p>此D-Lois只能在「舞臺：陽炎戰場」中使用。你免費取得異能【名將的指揮】Lv1，可使用經驗提升等級。</text:p>
            <text:p>名將的指揮</text:p>
            <text:p>最大等級：3 </text:p>
            <text:p>時機：準備階段 </text:p>
            <text:p>技能：- </text:p>
            <text:p>難易度：自動成功 </text:p>
            <text:p>對象：場景(選擇) </text:p>
            <text:p>射程：視界</text:p>
            <text:p>侵蝕值：4 </text:p>
            <text:p>限制：-</text:p>
            <text:p>效果：體現出作為名將的卓越戰術指揮能力的異能。</text:p>
            <text:p>同意的對象立即進行一次戰鬥移動，該回合內，對象的主要動作判定骰數增加LV個。此異能無法以自己為對象。</text:p>
            <text:p>該回合內，你的【行動值】變為1。</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80</text:p>
          </table:table-cell>
          <table:table-cell table:style-name="ce14" office:value-type="string" calcext:value-type="string">
            <text:p>不朽名聲 <text:s/>レピュテーション</text:p>
          </table:table-cell>
          <table:table-cell table:style-name="ce17" office:value-type="string" calcext:value-type="string">
            <text:p>徽章、華麗的時尚，或者為載具塗上的專屬配色——這些東西在人們看來，似乎早已過時。如今，讓人輕易辨識出個人的標誌並沒有任何好處。在戰場上，過於顯眼的行為簡直是瘋狂之舉。</text:p>
            <text:p>然而，這些標誌仍然可能發揮效用的唯一情況，就是佩戴者本身足夠強大。</text:p>
            <text:p>僅僅是看見那徽章或配色，敵方士氣便會從根本上動搖，僅僅是看到你的身影，便能直接摧毀敵人的鬥志。</text:p>
            <text:p>是的，你就是那樣的存在——一位傳說中的傭兵。</text:p>
            <text:p>聽到你的名字，敵人會因恐懼而顫抖。而得知你站在友軍一方，即使友軍面臨多麼劣勢的局面，也會因信心與喜悅而深受鼓舞。</text:p>
          </table:table-cell>
          <table:table-cell table:style-name="ce17" office:value-type="string" calcext:value-type="string">
            <text:p>此D-Lois只能在「舞臺：陽炎戰場」中使用。</text:p>
            <text:p/>
            <text:p>你免費取得異能【勇名的輝耀】Lv1，可使用經驗提升等級。</text:p>
            <text:p>勇名的輝耀</text:p>
            <text:p>最大等級：3 </text:p>
            <text:p>時機：準備階段 </text:p>
            <text:p>技能：- </text:p>
            <text:p>難易度：自動成功 </text:p>
            <text:p>對象：場景(選擇) </text:p>
            <text:p>射程：視界</text:p>
            <text:p>侵蝕值：4 </text:p>
            <text:p>限制：-</text:p>
            <text:p>次數：LV/劇本</text:p>
            <text:p>效果：透過展現你的部隊徽章或稱號，直接打擊對手士氣的異能。</text:p>
            <text:p>該回合內，對象只要受到至少1點HP傷害，便會受到不良狀態【硬直】。</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81</text:p>
          </table:table-cell>
          <table:table-cell table:style-name="ce14" office:value-type="string" calcext:value-type="string">
            <text:p>撃墜王 エースアタッカー</text:p>
          </table:table-cell>
          <table:table-cell table:style-name="ce17" office:value-type="string" calcext:value-type="string">
            <text:p>大多數的尖兵（スペリオル）以自己的身體、作為其延伸的背教者病毒、以及單兵火器進行戰鬥。畢竟沙漠幻影（デザートミラージュ）與其對手九號執行者（ノインテーター）是陸軍雇傭的傭兵，採用這種戰鬥方式也是理所當然的。</text:p>
            <text:p>然而，在這些自備裝備並擁有專屬武器的傭兵中，卻有一些人做出瘋狂之舉——將戰車或戰鬥攻擊機等大型兵器視為「個人擁有的財產」，並投入任務之中。</text:p>
            <text:p>有些人利用背教者的力量創造這些兵器，有些人則憑藉巨額資金取得並運用它們，甚至還有神腦演算症候擁有者聲稱是自己發明了這些兵器。</text:p>
            <text:p>但問題在於——即使是尖兵，運用如此顯眼的大型兵器，其風險也非常巨大。大多數情況下，使用這些兵器的尖兵，往往成為敵人的優先攻擊目標並陣亡。</text:p>
            <text:p>然而，你與他們不同。你是真正的擊墜王，是王牌攻擊手。你和你的愛機，在看不見盡頭的戰鬥中共同面對生死，彼此之間是無法取代的夥伴。</text:p>
          </table:table-cell>
          <table:table-cell table:style-name="ce17" office:value-type="string" calcext:value-type="string">
            <text:p>此D-Lois只能在「舞臺：陽炎戰場」中使用。</text:p>
            <text:p/>
            <text:p>你可以常備化一件「類型：載具」(包含獨特道具)的道具，不需要消耗經驗值，但不能常備化《載具變換》專用的載具。可以在劇本開始前自由更換常備化的道具。</text:p>
            <text:p>你將自動獲得維持該兵器運作所需的資金，不需要考慮該兵器的補給。若你是擁有「煉金化形」症候的角色，可以設定這件兵器是由自己的異能創造出的(不影響數據)。</text:p>
            <text:p>你的侵蝕率基本值+10。</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82</text:p>
          </table:table-cell>
          <table:table-cell table:style-name="ce14" office:value-type="string" calcext:value-type="string">
            <text:p>潛入工作員 アンダーカヴァ</text:p>
          </table:table-cell>
          <table:table-cell table:style-name="ce17" office:value-type="string" calcext:value-type="string">
            <text:p>克羅多瓦之戰是一場發生於擁有相同語言、相同宗教及相同文化的人民之間的內戰。</text:p>
            <text:p>雖然北部與南部在一些習俗與經濟狀況上有所差異，但不變的是，雙方仍屬_xffff_同一個民族。</text:p>
            <text:p>因此，無論是正規軍還是沙漠幻影的內部，都有不少人與對立方的拉澤拉姆共和國有血緣或其他關係。雙方軍隊不迫害這些人的原因，不言而喻——如果將對方視為「完全不同的存在」，戰後的復興將註定成為空談，這點是雙方都心裡有數的共識。</text:p>
            <text:p>然而，正因如此，沙漠幻影內部有拉澤拉姆密探存在的謠言，從未停歇過。</text:p>
            <text:p>而你，正是那個證實這些謠言的存在——拉澤拉姆的密探。你以沙漠幻影成員的身份執行任務，同時等待來自拉澤拉姆的指令。在那一天到來之前，你必須完全扮演好自己的角色，持續完成沙漠幻影交付給你的工作。</text:p>
            <text:p>絕不能讓任何人知曉你是叛徒的事實。</text:p>
          </table:table-cell>
          <table:table-cell table:style-name="ce17" office:value-type="string" calcext:value-type="string">
            <text:p>你在一劇本可以使用此效果一次，完全隱蔽一件事實。</text:p>
            <text:p>例如，你可以隱藏與自己真正身份有關的內容，也可以隱藏某些機密、他人的記錄，甚至某段歷史。</text:p>
            <text:p>在進行隱蔽的過程中，如有必要，你也可以進行改造與偽造。例如，若隱藏某人的履歷，你可以製造新的戶籍或過去記錄。若需要，還能安排虛假的家庭成員來塑造完整的故事。</text:p>
            <text:p>隱蔽後的信息是否能被看破，將由GM判斷。一般來說，隱蔽的信息無法被看破，但如果GM允許，可以使用例如感覺判定、FS判定等方式讓角色有機會接近真相。</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83</text:p>
          </table:table-cell>
          <table:table-cell table:style-name="ce14" office:value-type="string" calcext:value-type="string">
            <text:p>希望之星 ザホープ</text:p>
          </table:table-cell>
          <table:table-cell table:style-name="ce17" office:value-type="string" calcext:value-type="string">
            <text:p>作為一名協助UGN的超越者，你致力於從FH的統治中解放這個世界。</text:p>
            <text:p>至於你為何選擇與UGN合作，可能有以下幾種原因：</text:p>
            <text:p>你曾經是UGN的特工或UGN之子。又或者因為某次與背教者病毒相關的事件，得知了UGN的真相。也可能是對FH構建的超越者至上的社會秩序感到不滿。具體是什麼理由，可以與GM商討後自由決定。</text:p>
            <text:p>與UGN共同行動之後，你從中體會到了一個深刻的道理：無論情況多麼絕望，只要不放棄就還沒有失敗。如今FH已成功掌控世界，UGN逆轉的可能性可以說是零，但UGN並不會因此停下腳步。</text:p>
            <text:p>而作為UGN的盟友，你同樣繼承了這份不屈的意志，這份意志必將成為衝破重重困難的力量。</text:p>
          </table:table-cell>
          <table:table-cell table:style-name="ce17" office:value-type="string" calcext:value-type="string">
            <text:p>此D-Lois只能在「舞臺：終焉世界線」中取得。</text:p>
            <text:p/>
            <text:p>你擁有不屈的意志，即便面對再絕望的情況也絕不放棄。這份意志讓你能夠化不可能為可能，從十死無生的危機中生還。</text:p>
            <text:p>你進行判定並擲骰後使用，將該判定擲骰結果中的一個骰子點數改為10，你也可以在判定過程中使用此效果。使用該效果時，你的侵蝕率會+3。一次判定最多可以使用一次該效果。該效果一劇本可以使用三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84</text:p>
          </table:table-cell>
          <table:table-cell table:style-name="ce14" office:value-type="string" calcext:value-type="string">
            <text:p>惡魔的右臂 デビルハンド</text:p>
          </table:table-cell>
          <table:table-cell table:style-name="ce17" office:value-type="string" calcext:value-type="string">
            <text:p>你是協助統治世界的FH的超越者之一，但並非僅僅是一名普通的協力者。</text:p>
            <text:p>無論是都築京香、春日恭二、日下部仁、還是藥王寺結希，這些名震世界的FH幹部與特工都認可了你的實力，視你為一騎當千的超越者。</text:p>
            <text:p>法外者、特工、UGN之子、FH之子——你以何種身份、懷抱何種想法與FH建立聯繫皆可自由設定。是被某位FH幹部的魅力所吸引？還是為了在FH內部爬上更高的地位，滿足自己的野心？或者因為某人對你的能力加以賞識，你心懷恩情而效忠對方？具體理由可以與GM商討並自由決定。</text:p>
            <text:p>唯一確定的是，你已臣服於某個FH高層，並為對方全身心地奉獻自己的力量。</text:p>
            <text:p>當你為自己的主人戰鬥時，你能超越極限，完全發揮自身的力量。</text:p>
          </table:table-cell>
          <table:table-cell table:style-name="ce17" office:value-type="string" calcext:value-type="string">
            <text:p>此D-Lois只能在「舞臺：終焉世界線」中取得。</text:p>
            <text:p/>
            <text:p>當你取得此D-Lois時，需選擇一名FH角色並與之建立固定露易絲。</text:p>
            <text:p>關係：主人</text:p>
            <text:p>感情：可以自由決定。</text:p>
            <text:p>固定露易絲的對象需從終焉世界線專用的NPC人物中選擇。若GM同意，也可設定為原創NPC或其他PC。注意，此露易絲無法轉化為泰特斯。在劇本結束後，此露易絲必須被保留為固定露易絲。</text:p>
            <text:p>當你執行某個「符合所取得固定露易絲的主人意志」的行動時，進行的判定骰數+3個。判斷該行動是否符合主人意志的最終裁定權在GM手中。</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85</text:p>
          </table:table-cell>
          <table:table-cell table:style-name="ce14" office:value-type="string" calcext:value-type="string">
            <text:p>被造之魔 バイオニックデーモン</text:p>
          </table:table-cell>
          <table:table-cell table:style-name="ce17" office:value-type="string" calcext:value-type="string">
            <text:p>亞當卡德蒙計劃（Project Adam Kadmon）。</text:p>
            <text:p>這個表面上被宣稱為超越者精英教育計劃的項目，實際上是一個巨大的人體實驗場——這一真相你比誰都清楚，因為你就是這個計劃的實驗體之一。</text:p>
            <text:p>那個地方簡直就是地獄。你被迫接受各種各樣的人體實驗和「性能測試」——與其他實驗體互相廝殺。</text:p>
            <text:p>經過無數次的實驗，你最終獲得了強大的力量。然而，這力量的代價也同樣沉重——與其他超越者相比，你受到背教者侵蝕的程度更為嚴重。你的內心始終無法平靜，幾乎不曾獲得片刻安寧。</text:p>
            <text:p>儘管如此，你仍然從那個地獄中生存了下來。也許你是從研究設施中逃脫的，又或者是被當作失敗品遺棄卻頑強活了下來，甚至可能是被反FH組織救出的。</text:p>
            <text:p>你活了下來，而且保有這份力量。至於你將如何運用這股力量......</text:p>
          </table:table-cell>
          <table:table-cell table:style-name="ce17" office:value-type="string" calcext:value-type="string">
            <text:p>此D-Lois只能在「舞臺：終焉世界線」中取得。</text:p>
            <text:p/>
            <text:p>當你取得此D-Lois時，需選擇一個你已擁有的症候中、你已取得的異能。</text:p>
            <text:p>在使用選擇的異能之前宣言，該主要階段間，該異能的LV+4，此時可以超過等級上限。該效果不會增加異能的使用次數。該效果一劇本可以使用一次。</text:p>
            <text:p>取得此D-Lois時，你的侵蝕率基本值+10。</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86</text:p>
          </table:table-cell>
          <table:table-cell table:style-name="ce14" office:value-type="string" calcext:value-type="string">
            <text:p>秘密諜報員 ブラックオペレーター</text:p>
          </table:table-cell>
          <table:table-cell table:style-name="ce17" office:value-type="string" calcext:value-type="string">
            <text:p>你是一名間諜。無論是為站在權力頂點的FH、還是為UGN等反FH組織效力。你的工作都是潛入敵對組織收集情報。至於你為哪個組織工作，你可以自行決定。當然，作為自由人也無妨。</text:p>
            <text:p>在敵對組織的日常生活中，一旦身份暴露就等於直面生命危險。因此，你不斷磨練控制自身存在感的技巧。你既不能太過引人注目——那只會吸引他人的目光，增加身份被識破的風險。但同時也不能完全隱匿存在——若讓人對你毫無印象，這種異常狀態同樣會引起注意。</text:p>
            <text:p>保持「普通」的狀態是最理想的。這雖然很難做到，但你已經掌握了這門技術。甚至，你已經能夠自如地引導周圍人對你的認知。</text:p>
            <text:p>沒有人能識破你的真實身份。</text:p>
            <text:p>作為潛入諜報員，你近乎完美。</text:p>
          </table:table-cell>
          <table:table-cell table:style-name="ce17" office:value-type="string" calcext:value-type="string">
            <text:p>此D-Lois只能在「舞臺：終焉世界線」中取得。</text:p>
            <text:p/>
            <text:p>你能夠通過控制自身的存在感來扭曲他人的認知。即使就站在他人面前，也能讓對方察覺不到你的存在——這簡直就像是魔法一般。你可以從臨時角色的記憶中抹去與你相關的記憶或印象。你可以同時操作多個臨時角色的記憶。但是，無法消除實際發生過的事件的記憶。GM有權否決此效果的使用。該效果一劇本可以使用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87</text:p>
          </table:table-cell>
          <table:table-cell table:style-name="ce14" office:value-type="string" calcext:value-type="string">
            <text:p>知曉真相者 アンディシーブ</text:p>
          </table:table-cell>
          <table:table-cell table:style-name="ce17" office:value-type="string" calcext:value-type="string">
            <text:p>你曾經是FH的一員。</text:p>
            <text:p>然而，當你知曉了FH所隱藏的背教者恐怖真相後，你選擇與他們決裂。你發現了駭人的事實——在越發繁榮的世界背後，蠢動著邪惡的陰謀。</text:p>
            <text:p>FH根本不是什麼引領世界的偉大組織，而是一群依照自身欲望，企圖吞噬整個世界的怪物。</text:p>
            <text:p>然而，由於FH的信息操控，這些真相被巧妙地隱藏起來，大多數人仍蒙在鼓裡。</text:p>
            <text:p>現在，你正致力於向世界傳達真相——可能是通過協助UGN等反FH組織，或者透過網絡傳播信息等各種方式。</text:p>
            <text:p>作為叛徒，或者說危險分子，你正被FH追捕。至於為何甘願冒著生命危險揭露真相——是出於正義感？是對被背叛的憤怒？還是其他原因？這點可以與GM商討後自由決定。</text:p>
          </table:table-cell>
          <table:table-cell table:style-name="ce17" office:value-type="string" calcext:value-type="string">
            <text:p>此D-Lois只能在「舞臺：終焉世界線」中取得。</text:p>
            <text:p/>
            <text:p>你保留了一件在FH時代使用的道具，這件道具已成為你的夥伴，幾乎可說是你身體的一部分。</text:p>
            <text:p>你可以免費常備化一件常備化點數不超過40的FH專用道具。在判定中使用了此D-Lois獲得的FH專用道具時，判定骰數+2個。</text:p>
            <text:p>此道具可以交給他人，但只有你能夠使用它。</text:p>
            <text:p>取得此D-Lois時，你的侵蝕率基本值+2。</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88</text:p>
          </table:table-cell>
          <table:table-cell table:style-name="ce14" office:value-type="string" calcext:value-type="string">
            <text:p>遺物持有者 オーパーツ</text:p>
          </table:table-cell>
          <table:table-cell table:style-name="ce17" office:value-type="string" calcext:value-type="string">
            <text:p>你持有一件超古代文明所遺留下來的「遺物」。</text:p>
            <text:p>關於這件遺物的獲取方式，你可以自由設定——或許是在人跡罕至的遺跡中發現的，或許是從某人手中繼承而來，又或許是你家族世代相傳的寶物。</text:p>
            <text:p>你所擁有的這件遺物，是以現代科學無法解析的超級技術所製造而成。</text:p>
            <text:p>雖然它擁有驚人的力量，但仍有許多不明之處，就連作為持有者的你，也尚未能完全自如地駕馭它。</text:p>
            <text:p>世界各國政府和秘密結社都虎視眈眈地盯著這些蘊含絕大力量的遺物，派遣精英特工在世界各地進行探索任務。</text:p>
            <text:p>若是讓這些遺物落入邪惡之人手中，可能會導致世界性的危機。</text:p>
            <text:p>因此，你持有的遺物絕不能讓它落入他人之手。</text:p>
          </table:table-cell>
          <table:table-cell table:style-name="ce17" office:value-type="string" calcext:value-type="string">
            <text:p>此D-Lois只能在「舞臺：奇妙時代」中取得。</text:p>
            <text:p/>
            <text:p>你可以免費常備化一件常備化點數不超過50的道具，此時可以選擇其他舞臺的道具和FH專用道具，但獨特道具或通過其他D-Lois獲得的道具不能以此方式常備化。此道具被視為超古代文明的遺物。你可以將它交給他人，但你以外的角色不能使用。通過此D-Lois常備化的道具只能在劇本的高潮階段使用。</text:p>
            <text:p>取得此D-Lois時，你的侵蝕率基本值+5。</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89</text:p>
          </table:table-cell>
          <table:table-cell table:style-name="ce14" office:value-type="string" calcext:value-type="string">
            <text:p>反抗者 レジスタンス</text:p>
          </table:table-cell>
          <table:table-cell table:style-name="ce17" office:value-type="string" calcext:value-type="string">
            <text:p>你正在與某種勢力戰鬥。這可能是國家權力機構，也可能是某個人。至於你究竟在與什麼對抗，詳細內容請與GM商討決定。</text:p>
            <text:p>在「奇妙時代」的一般敵人中，企圖征服世界的納粹德國是最具代表性的例子。當然，也可能是在某處實行壓政的暴君、特定的個人，甚至可以是如「命運」或「時代潮流」這般模糊的概念。無論對手是誰，你所要對抗的敵人都擁有極其強大的力量。但即便如此，你仍選擇反抗、抵抗並迎面挑戰。也許是為了復仇，為了大義，或為了自己的欲望......理由並不重要。</text:p>
            <text:p>重要的是，你擁有不屈不撓的精神，是名真正的反抗者。唯有在勝利或迎接死亡之時，你才會停止反抗。</text:p>
          </table:table-cell>
          <table:table-cell table:style-name="ce17" office:value-type="string" calcext:value-type="string">
            <text:p>此D-Lois只能在「舞臺：奇妙時代」中使用。</text:p>
            <text:p/>
            <text:p>在你體內燃燒的反叛之炎比任何人都更加猛烈。正是這份熱切的意志，能在生死邊緣的絕境中為你帶來勝利。</text:p>
            <text:p>你進行判定後使用，該判定的達成值+1D。使用此效果時，你的侵蝕率+3。該效果一次判定可以使用一次。該效果一劇本可以使用三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90</text:p>
          </table:table-cell>
          <table:table-cell table:style-name="ce14" office:value-type="string" calcext:value-type="string">
            <text:p>快男兒 ヒロイズム</text:p>
          </table:table-cell>
          <table:table-cell table:style-name="ce17" office:value-type="string" calcext:value-type="string">
            <text:p>懲惡揚善——你是個「快男兒」(俠義之士)。在這混亂的時代裡，這雖是艱難的生存之道，但你的心中從無悔意，總是能保持開朗豁達的心情。</text:p>
            <text:p>至於為何選擇這種生活方式？或許是因為天生擁有純真的心性，或許是看到弱者被壓迫的景象激起了你的俠義心，又或許是因為你曾被一位堪稱「快男兒」的義士所救。關於你成為快男兒的原因，你可以自由決定。在戰爭腳步日益逼近的世界中，弱小無力的人們正遭受苦難與壓迫。而你所擁有的力量，正是在保護和幫助這些弱者時，才能發揮到最大。</text:p>
            <text:p>只要你心中的信念之火還沒有熄滅，你就是無敵的。</text:p>
          </table:table-cell>
          <table:table-cell table:style-name="ce17" office:value-type="string" calcext:value-type="string">
            <text:p>此D-Lois只能在「舞臺：奇妙時代」中使用。</text:p>
            <text:p/>
            <text:p>颯爽登場，打擊殘害人民的邪惡。無論敵人多麼強大，你都能無所畏懼地戰鬥，反而能從內心湧現出源源不絕的力量。</text:p>
            <text:p>當你為了拯救無辜弱者而行動時，判定骰數+3個。然而，若你採取違背仁義的行動，或是違背「扶助弱者」這一信念而行動時，判定骰數-2個。這些效果是否適用的最終判斷由GM決定。</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91</text:p>
          </table:table-cell>
          <table:table-cell table:style-name="ce14" office:value-type="string" calcext:value-type="string">
            <text:p>秘中之秘 アルカナム</text:p>
          </table:table-cell>
          <table:table-cell table:style-name="ce17" office:value-type="string" calcext:value-type="string">
            <text:p>你掌握了一種源自現有戰鬥技術，並由自己獨立發展而來的特殊技法。</text:p>
            <text:p>雖然其基礎武技源自歷史所承襲，但你衍生出的這門技法卻突破了既有常識，是驚世駭俗的超絕技巧。那種架式，在武術史上任何流派都找不到。那種氣勢，能吞噬對手的意識。那種動作，幾乎不像是人類能辦到的。乍看之下只覺得怪異滑稽的技法，所打出的一擊卻能令敵人當場斃命、粉碎萬物，其威力驚人，堪稱絕技殺招。</text:p>
            <text:p>這門技術究竟是以哪種武術為基礎、運用了什麼樣的技巧構成，可以自由設定。</text:p>
          </table:table-cell>
          <table:table-cell table:style-name="ce17" office:value-type="string" calcext:value-type="string">
            <text:p>此D-Lois只能在「舞臺：奇妙時代」中使用。</text:p>
            <text:p/>
            <text:p>你所修得的武技，是足以擊倒敵人的必殺技。其威力無人能擋。你進行的命中判定前使用，這次攻擊的傷害擲骰+4D。使用該效果的主要階段結束時，失去1D點HP。該效果一劇本可以使用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92</text:p>
          </table:table-cell>
          <table:table-cell table:style-name="ce14" office:value-type="string" calcext:value-type="string">
            <text:p>超絕技術 ハイパーアート</text:p>
          </table:table-cell>
          <table:table-cell table:style-name="ce17" office:value-type="string" calcext:value-type="string">
            <text:p>你發明出了一項在這個時代已無法重現的先進技術。</text:p>
            <text:p>然而，這技術實在太過先進，以至於除了你之外沒人能使用，也因此得不到任何人的認可。像是只需將一顆鐵球對準人體，就能治療傷口，又或者是看起來只是垃圾的機械塊，卻能產生超越常識的電力……你所發明的技術為何種型態，可以自由決定，但有一點是肯定的，這項技術之所以成立正是因為你的異能，因此，你的發明也只能由你來使用。</text:p>
          </table:table-cell>
          <table:table-cell table:style-name="ce17" office:value-type="string" calcext:value-type="string">
            <text:p>此D-Lois只能在「舞臺：奇妙時代」中使用。</text:p>
            <text:p/>
            <text:p>你持有某個構成你發明技術核心的道具。</text:p>
            <text:p>取得道具「象徵機關」。</text:p>
            <text:p>取得此D-Lois時，你的侵蝕率基本值+3。</text:p>
            <text:p/>
            <text:p>象徵機關</text:p>
            <text:p>種類：其他</text:p>
            <text:p>購買／常備化：無法購買／無法</text:p>
            <text:p>解說：雖然看起來只是破銅爛鐵，但只要是你在使用，就會展現不可思議的力量。</text:p>
            <text:p>取得時，選擇一個你所取得的異能。在使用該異能前宣言，該異能的效果+2D。對不以骰子判定效果的異能無效。使用該效果時，侵蝕率+3。該效果一場景可以使用一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93</text:p>
          </table:table-cell>
          <table:table-cell table:style-name="ce14" office:value-type="string" calcext:value-type="string">
            <text:p>守護天使(City Guardian)</text:p>
          </table:table-cell>
          <table:table-cell table:style-name="ce17" office:value-type="string" calcext:value-type="string">
            <text:p>你是有名的萬事屋，不知何時，你的名號悄悄地流傳於大街小巷。</text:p>
          </table:table-cell>
          <table:table-cell table:style-name="ce17" office:value-type="string" calcext:value-type="string">
            <text:p>於你進行判定前宣言使用此效果，該判定骰數+5D，且無視你受到的任何減少骰數的減值。</text:p>
            <text:p>此效果1判定最多使用1次，1劇本最多使用3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94</text:p>
          </table:table-cell>
          <table:table-cell table:style-name="ce14" office:value-type="string" calcext:value-type="string">
            <text:p>破壞者(Disaster)</text:p>
          </table:table-cell>
          <table:table-cell table:style-name="ce17" office:value-type="string" calcext:value-type="string">
            <text:p>表示你是個以破壞、暗殺或誘拐等工作來謀生的人類的D露易絲。</text:p>
          </table:table-cell>
          <table:table-cell table:style-name="ce17" office:value-type="string" calcext:value-type="string">
            <text:p>你的【行動值】+5，且攻擊傷害+1D。</text:p>
            <text:p>你的閃避判定骰數-3顆，且進行格擋的格擋值-5。</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95</text:p>
          </table:table-cell>
          <table:table-cell table:style-name="ce14" office:value-type="string" calcext:value-type="string">
            <text:p>潛伏者(Behind the Mask)</text:p>
          </table:table-cell>
          <table:table-cell table:style-name="ce17" office:value-type="string" calcext:value-type="string">
            <text:p>表示你是進行潛入工作的特務的D露易絲。</text:p>
          </table:table-cell>
          <table:table-cell table:style-name="ce17" office:value-type="string" calcext:value-type="string">
            <text:p>取得此D露易絲時選擇一個技能。</text:p>
            <text:p>於你進行任何判定前使用，該判定的達成值+5，</text:p>
            <text:p>如果該判定使用的是選擇的技能，達成值便改成+10。</text:p>
            <text:p>此效果1場景最多使用1次，1劇本最多使用3次。</text:p>
            <text:p>你可以在團前重選此技能，此時可以變更名字跟身分（但代號不變）。</text:p>
            <text:p>玩家須與GM討論並決定新的「自己」的相關詳細設定。</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96</text:p>
          </table:table-cell>
          <table:table-cell table:style-name="ce14" office:value-type="string" calcext:value-type="string">
            <text:p>怪人(Spooky Kind)（背教者生命體專用）</text:p>
          </table:table-cell>
          <table:table-cell table:style-name="ce17" office:value-type="string" calcext:value-type="string">
            <text:p>表示你是與人類關係密切，使得存在被知道的背教者生命體的D露易絲。</text:p>
          </table:table-cell>
          <table:table-cell table:style-name="ce17" office:value-type="string" calcext:value-type="string">
            <text:p>此D露易絲只有擁有背教者生命體的工作的角色才能取得。</text:p>
            <text:p>你可以竄改所有登場於場景的非超越者角色的記憶，</text:p>
            <text:p>但是不能以此效果改變發生的事情本身，舉例來說，</text:p>
            <text:p>某事件出現死者的時候，可以讓人以為死者在別的事件死亡，但不能讓人以為對方活著，</text:p>
            <text:p>具體能竄改到什麼程度須與GM討論並決定。</text:p>
            <text:p>此效果1劇本最多使用1次。</text:p>
          </table:table-cell>
          <table:table-cell table:style-name="ce17"/>
          <table:table-cell table:style-name="ce17" office:value-type="string" calcext:value-type="string">
            <text:p>RB專用</text:p>
          </table:table-cell>
          <table:table-cell table:style-name="ce3" table:number-columns-repeated="20"/>
          <table:table-cell table:number-columns-repeated="998"/>
        </table:table-row>
        <table:table-row table:style-name="ro1">
          <table:table-cell table:style-name="ce14" office:value-type="string" calcext:value-type="string">
            <text:p>No.97</text:p>
          </table:table-cell>
          <table:table-cell table:style-name="ce14" office:value-type="string" calcext:value-type="string">
            <text:p>先行種(Unlimited EvoLVe)</text:p>
          </table:table-cell>
          <table:table-cell table:style-name="ce17" office:value-type="string" calcext:value-type="string">
            <text:p>表示你是接觸無限代碼，展開「進化」過程的超越者－－先行種的D露易絲。</text:p>
          </table:table-cell>
          <table:table-cell table:style-name="ce17" office:value-type="string" calcext:value-type="string">
            <text:p>于你或存在於視界的任意角色進行傷害擲骰前使用，該傷害+5D，</text:p>
            <text:p>但受到此效果的對象會受到【暴走】狀態。</text:p>
            <text:p>此效果1劇本最多使用1次。</text:p>
          </table:table-cell>
          <table:table-cell table:style-name="ce17" table:number-columns-repeated="2"/>
          <table:table-cell table:style-name="ce3" table:number-columns-repeated="20"/>
          <table:table-cell table:number-columns-repeated="998"/>
        </table:table-row>
        <table:table-row table:style-name="ro1">
          <table:table-cell table:style-name="ce14" office:value-type="string" calcext:value-type="string">
            <text:p>No.98</text:p>
          </table:table-cell>
          <table:table-cell table:style-name="ce14" office:value-type="string" calcext:value-type="string">
            <text:p>遺產繼承者(Legacy)</text:p>
          </table:table-cell>
          <table:table-cell table:style-name="ce17" office:value-type="string" calcext:value-type="string">
            <text:p>表示你與被稱為遺產的，遭到古代背教者感染的物品成立契約的D露易絲。</text:p>
          </table:table-cell>
          <table:table-cell table:style-name="ce17" office:value-type="string" calcext:value-type="string">
            <text:p>取得此D露易絲時，取得一件遺產繼承者專用道具。</text:p>
            <text:p>此D露易絲記述成「遺產繼承者：取得道具」的形式</text:p>
            <text:p>（例：「遺產繼承者：榮光與勝利之槍」），不同道具視為不同D露易絲。</text:p>
            <text:p>此D露易絲取得的道具視為常備化，你以外的人不能使用或裝備此道具，即使持有也不能受到其效果。</text:p>
            <text:p>GM可配合劇本，設計原創的遺產繼承者專用道具。</text:p>
          </table:table-cell>
          <table:table-cell table:style-name="ce17" office:value-type="string" calcext:value-type="string">
            <text:p>LM P109</text:p>
            <text:p>RW P55&amp;HR P91</text:p>
          </table:table-cell>
          <table:table-cell table:style-name="ce17" office:value-type="string" calcext:value-type="string">
            <text:p>不能通過有取得異能效果的遺產來取得敵人專用異能。從RW擴開始包括後續的HR擴，遺產系列道具追加了以遺產效果取得的異能，其最大等級不受血統影響的說明。</text:p>
          </table:table-cell>
          <table:table-cell table:style-name="ce3" table:number-columns-repeated="20"/>
          <table:table-cell table:number-columns-repeated="998"/>
        </table:table-row>
        <table:table-row table:style-name="ro1">
          <table:table-cell table:style-name="ce14" office:value-type="string" calcext:value-type="string">
            <text:p>No.99</text:p>
          </table:table-cell>
          <table:table-cell table:style-name="ce14" office:value-type="string" calcext:value-type="string">
            <text:p>鞘人 (長青魔劍專用) シースマンSheathman</text:p>
          </table:table-cell>
          <table:table-cell table:style-name="ce17" office:value-type="string" calcext:value-type="string">
            <text:p>覺醒長青魔劍症狀同時作為鞘人的你所宿存的元型有其獨特性。那並不是你憑自己的意志所描繪出的形象。而是真實存在於這個世界某處的、早已存在的傳說武器。</text:p>
          </table:table-cell>
          <table:table-cell table:style-name="ce17" office:value-type="string" calcext:value-type="string">
            <text:p>只限症狀為【長青魔劍】的角色可取得。</text:p>
            <text:p>取得此D露易絲時，選擇以下項目中的一個，獲取該項目之道具。不需要花費經驗值。</text:p>
            <text:p>・常備化點數20點以下的武器或防具一個。</text:p>
            <text:p>・經驗值20以下的獨特道具(僅限於武器、防具)。</text:p>
            <text:p>・秘密武器專用道具中，武器或防具一個。</text:p>
            <text:p>・遺產繼承者專用道具中，武器或防具一個。</text:p>
            <text:p>獲得的物品被視為[類別：元型]，當你使用《弒神之刃》時，就會生成上述物品(也就是說你無法獲得《弒神之刃》專屬道具) 。</text:p>
          </table:table-cell>
          <table:table-cell table:style-name="ce17" office:value-type="string" calcext:value-type="string">
            <text:p>UA P25</text:p>
          </table:table-cell>
          <table:table-cell table:style-name="ce17" office:value-type="string" calcext:value-type="string">
            <text:p>長青魔劍專用</text:p>
          </table:table-cell>
          <table:table-cell table:style-name="ce3" table:number-columns-repeated="20"/>
          <table:table-cell table:number-columns-repeated="998"/>
        </table:table-row>
        <table:table-row table:style-name="ro1">
          <table:table-cell table:style-name="ce14" office:value-type="string" calcext:value-type="string">
            <text:p>No.100</text:p>
          </table:table-cell>
          <table:table-cell table:style-name="ce14" office:value-type="string" calcext:value-type="string">
            <text:p>魔劍的衛士 (長青魔劍專用) ワールドディフェンダーWorld Defender</text:p>
          </table:table-cell>
          <table:table-cell table:style-name="ce17" office:value-type="string" calcext:value-type="string">
            <text:p>擁有長青魔劍症狀的超越者中，有一部分人擁有特別強對抗偽神天鎖症狀的能力。據說，這種力量的根源在於他們對日常生活的強烈執著。然而，長青魔劍症狀的超越者們並不將其視為單純的執著，而是視為深深烙印在心中的畫面與信念。正因為他們能強烈地感受到過去的風貌與記憶，才使得他們更有可能抵抗偽神天鎖那試圖破壞世界法則的力量。</text:p>
          </table:table-cell>
          <table:table-cell table:style-name="ce17" office:value-type="string" calcext:value-type="string">
            <text:p>只限症狀為【長青魔劍】的角色可取得。</text:p>
            <text:p>自動獲得異能【天罰】Lv1，可使用經驗提升等級。</text:p>
            <text:p>這異能視為長青魔劍的異能</text:p>
            <text:p>天罰 </text:p>
            <text:p>最大等級：5 </text:p>
            <text:p>時機：主要動作 </text:p>
            <text:p>技能：症侯 </text:p>
            <text:p>難易度：對決 </text:p>
            <text:p>對象：- </text:p>
            <text:p>射程：武器 </text:p>
            <text:p>侵蝕：3 </text:p>
            <text:p>限制：D露易絲 </text:p>
            <text:p>效果：把這個世界的日常形象寄宿在心中，放逐非自然力量的異能。組合的攻擊傷害+[LV×3]。 另外，在對象症狀包含偽神天鎖的情況下，組合的《斷鎖者》適用於所有判定的達成值。</text:p>
          </table:table-cell>
          <table:table-cell table:style-name="ce17" office:value-type="string" calcext:value-type="string">
            <text:p>UA P25</text:p>
          </table:table-cell>
          <table:table-cell table:style-name="ce17" office:value-type="string" calcext:value-type="string">
            <text:p>長青魔劍專用</text:p>
          </table:table-cell>
          <table:table-cell table:style-name="ce3" table:number-columns-repeated="20"/>
          <table:table-cell table:number-columns-repeated="998"/>
        </table:table-row>
        <table:table-row table:style-name="ro1">
          <table:table-cell table:style-name="ce15" office:value-type="string" calcext:value-type="string">
            <text:p>No.C01</text:p>
          </table:table-cell>
          <table:table-cell table:style-name="ce15" office:value-type="string" calcext:value-type="string">
            <text:p>惡靈之主(Old Wraith)</text:p>
          </table:table-cell>
          <table:table-cell table:style-name="ce17" office:value-type="string" calcext:value-type="string">
            <text:p>你被授予了FH中唯一一位最強超越者的稱號「幽魂之主」。而且，這並非科德威爾博士選中的那些孩子們所獲得的證明。</text:p>
            <text:p/>
            <text:p>換句話說，你在某種意義上可以說是最後的「幽魂之主」。如今，你被稱為「惡靈之主」，年輕的特工們將你視為過時的舊世代而輕視你。</text:p>
            <text:p/>
            <text:p>選擇你成為「幽魂之主」的是都築京香。她提出的「幽魂之主」條件有兩個：成為強大的超越者，以及擁有「改變世界」的欲望。</text:p>
            <text:p/>
            <text:p>隨著時間流逝，選擇了你的都築離開了FH。「幽魂之主」的含義被科德威爾博士重新定義。即便如此，你作為「幽魂之主」的事實依然不變。</text:p>
            <text:p/>
            <text:p>日下部仁試圖創造一個自己站在頂點的世界。</text:p>
            <text:p/>
            <text:p>佐久間彰人則試圖創造一個超越者支配人類的世界。</text:p>
            <text:p/>
            <text:p>你同樣也在試圖改變世界。至於那是什麼樣的改變，你可以自由決定。「改變世界」的定義，也可以是你自己的理解。</text:p>
          </table:table-cell>
          <table:table-cell table:style-name="ce18" office:value-type="string" calcext:value-type="string">
            <text:p>這個D-Lois只有職業為FH相關的角色可以取得。</text:p>
            <text:p>你的侵蝕率達到120%以上時，你取得的「時機:常駐」以外異能的等級和等級上限+1，且你進行的所有判定的骰數+4D。但是這個效果不會改變異能的使用次數。</text:p>
            <text:p>取得這個D-Lois時，你的侵蝕率基本值+10。</text:p>
            <text:p>此外，你可以照常消耗常備點來常備化FH專用道具，以該D-Lois取得的道具基本上除你以外均無法使用和裝備，即時持有也無法受到其效果影響。</text:p>
          </table:table-cell>
          <table:table-cell table:style-name="ce17" office:value-type="string" calcext:value-type="string">
            <text:p>RU P56</text:p>
            <text:p>LM P110</text:p>
          </table:table-cell>
          <table:table-cell table:style-name="ce17" office:value-type="string" calcext:value-type="string">
            <text:p>FH專用</text:p>
          </table:table-cell>
          <table:table-cell table:style-name="ce3" table:number-columns-repeated="20"/>
          <table:table-cell table:number-columns-repeated="998"/>
        </table:table-row>
        <table:table-row table:style-name="ro1">
          <table:table-cell table:style-name="ce15" office:value-type="string" calcext:value-type="string">
            <text:p>No.C02</text:p>
          </table:table-cell>
          <table:table-cell table:style-name="ce15" office:value-type="string" calcext:value-type="string">
            <text:p>考德威爾之子(Master Wraith)</text:p>
          </table:table-cell>
          <table:table-cell table:style-name="ce17" office:value-type="string" calcext:value-type="string">
            <text:p>表示你是由阿爾弗雷德·J·科德威爾選為幽魂之主，或幽魂之主候選者的D-Lois。</text:p>
            <text:p/>
            <text:p>在『DX2』之前，擁有幽魂之主稱號的人基本上只有一位。然而，作為指導者回歸的科德威爾博士，召集了數名少年少女，並任命他們為幽魂之主。他的真正意圖尚不明確。</text:p>
            <text:p/>
            <text:p>事實上，科德威爾博士很少對幽魂之主們下達命令。即使在幽魂之主之中，有些人如約翰和蕾莉亞那樣癡迷於科德威爾博士，也有像左京和凱因那樣與科德威爾博士和FH本體保持距離，依照自己的判斷和目的行動的人。</text:p>
            <text:p/>
            <text:p>據某方面的情報指出，科德威爾博士正在通過觀察幽魂之主們來尋找背教者的下一步進化方向。</text:p>
          </table:table-cell>
          <table:table-cell table:style-name="ce18" office:value-type="string" calcext:value-type="string">
            <text:p>這個D-Lois只有職業為FH相關的角色可以取得。</text:p>
            <text:p>取得這個D-Lois時，從屬_xffff_你擁有的症候且你取得了的異能中選擇一個「時機:主要動作」的異能。</text:p>
            <text:p>組合了所選異能的攻擊的攻擊力+10，但此效果所選擇的異能的侵蝕值+4。此外，你的侵蝕率超過100%時，增加的攻擊力變為+15，超過120%時，變更為+20。</text:p>
          </table:table-cell>
          <table:table-cell table:style-name="ce17" office:value-type="string" calcext:value-type="string">
            <text:p>RU P56</text:p>
            <text:p>LM P110</text:p>
          </table:table-cell>
          <table:table-cell table:style-name="ce17" office:value-type="string" calcext:value-type="string">
            <text:p>FH專用</text:p>
          </table:table-cell>
          <table:table-cell table:style-name="ce3" table:number-columns-repeated="20"/>
          <table:table-cell table:number-columns-repeated="998"/>
        </table:table-row>
        <table:table-row table:style-name="ro1">
          <table:table-cell table:style-name="ce14" office:value-type="string" calcext:value-type="string">
            <text:p>No.H01</text:p>
          </table:table-cell>
          <table:table-cell table:style-name="ce14" office:value-type="string" calcext:value-type="string">
            <text:p>無瑕之石(Hurtless Crystal)</text:p>
          </table:table-cell>
          <table:table-cell table:style-name="ce17" office:value-type="string" calcext:value-type="string">
            <text:p>表示你所持有的"賢者之石"，是被稱為“記憶大人”的背教者生命體之一部分的D-Lois。</text:p>
            <text:p/>
            <text:p>大約10年前，由於都築京香的操作，記憶大人的神體從面影神社被盜取並分割。這些碎片尋求適合者，以各種方式安置於世界各地。其中之一，就是你所繼承的賢者之石。而你，正是這個特殊"計劃"所創造的"記憶大人之力"的適合者。</text:p>
            <text:p/>
            <text:p>其最本質的能力被稱為無疵記憶（Hurtless Memory）。</text:p>
            <text:p/>
            <text:p>這種能力能夠喚起深植於他人記憶領域中，或是刻印在世界本身、領域本身的記憶。那可能是美麗的過去景象，或是已逝的摯愛之人。這些人們的記憶和習慣，成為記憶大人所引發的"黃泉歸來"的源泉。記憶大人正是使用這種能力，讓死者復活（被想起）。</text:p>
          </table:table-cell>
          <table:table-cell table:style-name="ce17" office:value-type="string" calcext:value-type="string">
            <text:p>任何時候都可以使用這個效果，將場景中登場了的任意角色持有的一個Titus變更為Lois。對已經被昇華了的Lois，也可以使用這個效果。不管多少人都可以成為這個效果的對象，甚至將你本人包含在內也沒有問題。這個效果一個劇本中只能使用一次。</text:p>
            <text:p>但是，取得這個D-Lois時，你不能從Titus效果中選擇「判定的暴擊值-1」。</text:p>
          </table:table-cell>
          <table:table-cell table:style-name="ce17" office:value-type="string" calcext:value-type="string">
            <text:p>RU P113</text:p>
            <text:p>LM P111</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02</text:p>
          </table:table-cell>
          <table:table-cell table:style-name="ce14" office:value-type="string" calcext:value-type="string">
            <text:p>黃泉歸來(Dead Memory)</text:p>
          </table:table-cell>
          <table:table-cell table:style-name="ce17" office:value-type="string" calcext:value-type="string">
            <text:p>你是一位透過背教者生命體「記憶大人」的能力「黃泉歸來」而復活的死者。更準確地說，你是根據某人的記憶而被重新構築的人類。</text:p>
            <text:p/>
            <text:p>當「面影島事件」使記憶大人陷入沉睡時，你本應該一同消失。</text:p>
            <text:p/>
            <text:p>然而，你現在依然活著。</text:p>
            <text:p/>
            <text:p>為什麼你能繼續存活，原因不明。是命運的捉弄，還是某人的思念喚來了奇跡，或者你已經成為了真正的人類？原因完全不得而知。</text:p>
            <text:p/>
            <text:p>但有一件事你深信不疑。</text:p>
            <text:p/>
            <text:p>那就是你是被某人的思念所賦予生命。想要見你，想要傳達給你。擁有這樣思念的人，正是賦予你生命的存在。</text:p>
            <text:p/>
            <text:p>如何運用這條生命，是由你來決定的。</text:p>
            <text:p/>
            <text:p>但是，如果是為了那思念著你的人，你能發揮比平常更強大的力量。或許，你之所以能夠繼續存活，就是為了用這股力量完成某些事情。</text:p>
            <text:p/>
            <text:p>關於你是否知道讓你復活的人是誰，以及他們是否就在你身邊，請與GM商議後決定。</text:p>
          </table:table-cell>
          <table:table-cell table:style-name="ce17" office:value-type="string" calcext:value-type="string">
            <text:p>場景中登場的角色取得了對你的Lois時，你進行的所有判定的骰數+2D。存在複數取得對你的Lois的角色時，效果會迭加。NPC是否取得了對你的Lois由GM決定。</text:p>
            <text:p>此外，對你的Lois變為Titus時，你的侵蝕率+10。</text:p>
          </table:table-cell>
          <table:table-cell table:style-name="ce17" office:value-type="string" calcext:value-type="string">
            <text:p>RU P113</text:p>
            <text:p>LM P111</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G01</text:p>
          </table:table-cell>
          <table:table-cell table:style-name="ce14" office:value-type="string" calcext:value-type="string">
            <text:p>被選中者(Gainer)</text:p>
          </table:table-cell>
          <table:table-cell table:style-name="ce17" office:value-type="string" calcext:value-type="string">
            <text:p>代表你經歷了苛酷的人體實驗，並獲得了超越常識的力量的D-Lois。</text:p>
            <text:p/>
            <text:p>你為何成為實驗的素體？可能是被綁架並被強迫接受實驗，也可能是自願獻身。無論你成為素體的原因為何，都可以自由決定。同樣，你所接受的實驗內容，以及被開發出的能力類型，也可以自由設定。</text:p>
            <text:p/>
            <text:p>在那些駭人聽聞的實驗盡頭，你獲得了研究者所期望的力量。然而，即使你被讚譽為成功案例，那仍是建立在眾多犧牲之上的被詛咒之力。</text:p>
            <text:p/>
            <text:p>你要如何運用這股獲得的力量，完全取決於你自己。你可以選擇服從賦予你力量的人，協助完成研究；也可以將其視為不祥之物而拒絕，阻止研究的進行。</text:p>
            <text:p/>
            <text:p>作為被命運選中的你，無論哪條路都能夠前行。但不管選擇哪條道路，只要力量仍在，安寧的時刻就不會到來。直到所有因緣得到解決的那一刻，你都將繼續戰鬥下去。</text:p>
          </table:table-cell>
          <table:table-cell table:style-name="ce17" office:value-type="string" calcext:value-type="string">
            <text:p>取得這個D-Lois時，從技能中選擇一項。於以所選技能進行判定前使用，此次判定的暴擊值-1（下限5），使用了這個效果的判定結束時，你的侵蝕率+6。</text:p>
            <text:p>這個效果在一次判定中只能使用一次，一個劇本中總共可以使用三次。</text:p>
          </table:table-cell>
          <table:table-cell table:style-name="ce17" office:value-type="string" calcext:value-type="string">
            <text:p>RU P123</text:p>
            <text:p>LM P112</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G02</text:p>
          </table:table-cell>
          <table:table-cell table:style-name="ce14" office:value-type="string" calcext:value-type="string">
            <text:p>正義實行者(Justice Lawyer)</text:p>
          </table:table-cell>
          <table:table-cell table:style-name="ce17" office:value-type="string" calcext:value-type="string">
            <text:p>表示你是依照自身信念行使正義的組織——正義實行者一員的D-Lois。。</text:p>
            <text:p/>
            <text:p>正義實行者，是一個僅以執行正義為目的的組織。擔任領導者的是以「Justice」為代號的UGN支部長，神月正義。對成員的要求只有一個：遵循自己的信念，行使正義。這是一個相當特殊的集團。</text:p>
            <text:p/>
            <text:p>你為何會加入正義實行者？可能是被神月正義招募，也可能是因為尋求志同道合的同伴而自己前往叩門。詳細情況可以自由決定。</text:p>
            <text:p/>
            <text:p>但有一點是確定的，那就是你的心中懷有正義，並擁有與邪惡戰鬥的堅強意志。</text:p>
            <text:p/>
            <text:p>無論面臨何種困難，深知自己應當何為的你絕不會絕望。</text:p>
            <text:p/>
            <text:p>今天，你依然為你所信仰的正義而戰！</text:p>
          </table:table-cell>
          <table:table-cell table:style-name="ce17" office:value-type="string" calcext:value-type="string">
            <text:p>于你陷入戰鬥不能時使用，解除你的戰鬥不能狀態並將HP回復至最大值。這個效果一個劇本中只能使用一次。</text:p>
          </table:table-cell>
          <table:table-cell table:style-name="ce17" office:value-type="string" calcext:value-type="string">
            <text:p>RU P123</text:p>
            <text:p>LM P112</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G01</text:p>
          </table:table-cell>
          <table:table-cell table:style-name="ce14" office:value-type="string" calcext:value-type="string">
            <text:p>宿命騎士 ナイツオブラウンド</text:p>
          </table:table-cell>
          <table:table-cell table:style-name="ce17" office:value-type="string" calcext:value-type="string">
            <text:p>你的出身充滿了許多謎團。這可能是妖精的作為，也可能是墮落邪惡女巫的手筆。無論如何，某種神秘力量參與了你的出生。</text:p>
            <text:p>你是為了完成特殊目的而被安排誕生的騎士。</text:p>
            <text:p>當然，這不一定是壞事。說不定你是為了解決遙遠未來將要發生的不幸而誕生的希望之子。</text:p>
            <text:p>引導特定未來並非不可能。就像冥府領域症候群的異能能夠誘發特定事象一樣，透過操縱令人暈眩的因果關係來引導未來的儀式是存在的。</text:p>
            <text:p>只是，這並不代表你的未來已經註定。這意味著你擁有足以左右不列顛命運的強大力量。</text:p>
            <text:p>從幼年時期開始，你就透過夢境、預言，或是遺言等方式聽說了未來的片段。一切的關鍵都在卡美洛城。</text:p>
          </table:table-cell>
          <table:table-cell table:style-name="ce17" office:value-type="string" calcext:value-type="string">
            <text:p>這個D-Lois只能在「舞臺：聖杯傳說」中使用。</text:p>
            <text:p/>
            <text:p>你的身體被妖精或女巫施加了操縱因果的祝福（或是詛咒）。雖然這是操縱遙遠未來的力量，但同時也能給予你突破眼前困難的力量。</text:p>
            <text:p>取得此D-Lois時，選擇一項技能。</text:p>
            <text:p>使用選擇的技能進行判定前使用，該判定的暴擊值-2（下限值2）。但使用此效果的主要階段結束時，你會受到【暴走】狀態，且你的侵蝕率+3。該效果一劇本可以使用一次。</text:p>
          </table:table-cell>
          <table:table-cell table:style-name="ce17" office:value-type="string" calcext:value-type="string">
            <text:p>OC P38</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G02</text:p>
          </table:table-cell>
          <table:table-cell table:style-name="ce14" office:value-type="string" calcext:value-type="string">
            <text:p>幻想之劍 ファンタズム</text:p>
          </table:table-cell>
          <table:table-cell table:style-name="ce17" office:value-type="string" calcext:value-type="string">
            <text:p>這個世界上存在著並非人類製作的魔法武具。有妖精直接施加咒術的武器，或是大地矮人親手打造的兵器，以及巨龍珍藏的劍等等。</text:p>
            <text:p>因為某種偶然，你獲得了這樣的裝備。也許那是勇敢冒險的報酬。</text:p>
            <text:p>武器中確實蘊含著如同魔法般的力量。說白了，它們就是EX背教者，魔法力量就是異能。</text:p>
            <text:p>當然，擁有這樣的武器是騎士們的憧憬。但同時，這也是衡量你作為騎士的器量的標準。</text:p>
            <text:p>如果擁有超出自身能力的武器，終有一天武器會對你失去興趣而離去。</text:p>
            <text:p>要成為配得上武器的人物，需要努力、鍛煉，以及正確的行為。武器也會選擇騎士。</text:p>
          </table:table-cell>
          <table:table-cell table:style-name="ce17" office:value-type="string" calcext:value-type="string">
            <text:p>此D-lois只能在「舞臺：聖杯傳說」中取得。</text:p>
            <text:p/>
            <text:p>指定你所持有的一件武器或防具。該道具成為妖精製作的武具。其中蘊含著強大的魔力，也就是異能。</text:p>
            <text:p>從任意症候中選擇一個異能，取得Lv3的該異能（「最大等級：1」的異能以Lv1取得），不需要消耗經驗值。但無法選擇「時機：常駐」或「限制：純血種、極限」的異能，也無法選擇衝動異能和敵人異能。</text:p>
            <text:p>透過此效果取得的異能，只有在裝備指定道具期間才能使用，一劇本可以使用一次，且侵蝕值額外+3。如果取得有使用次數限制的異能，你的侵蝕率基本值+3。另外，你無法使用經驗值來成長此D-lois取得的異能。</text:p>
          </table:table-cell>
          <table:table-cell table:style-name="ce17" office:value-type="string" calcext:value-type="string">
            <text:p>OC P39</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G03</text:p>
          </table:table-cell>
          <table:table-cell table:style-name="ce14" office:value-type="string" calcext:value-type="string">
            <text:p>詛咒刻印 カースブランド</text:p>
          </table:table-cell>
          <table:table-cell table:style-name="ce17" office:value-type="string" calcext:value-type="string">
            <text:p>你被下了詛咒。</text:p>
            <text:p>在不列顛存在著許多操縱折磨人類的詛咒的存在，如懷有惡意的妖精、百騎士、魔術師等。或者，這可能是對犯罪的你降下的神罰。</text:p>
            <text:p>詛咒有各種形式，從身體的一部分變醜、變成動物等身體上的變化，到奪走你話語中的真實（只能說謊）、無法獲得他人信任等等。</text:p>
            <text:p>但是，任何詛咒都必定存在解除的方法。為此需要的可能是魔術儀式，或者是與宿敵的了斷。</text:p>
            <text:p>也可能需要真實的愛，或者需要真正的騎士之舉。</text:p>
            <text:p>無論如何，這都不是一朝一夕就能獲得的東西。但也正因如此，絕對不能放棄。</text:p>
            <text:p>所以你要繼續旅行。</text:p>
            <text:p>解除你身上詛咒的方法可以與GM商量後自由決定。</text:p>
          </table:table-cell>
          <table:table-cell table:style-name="ce17" office:value-type="string" calcext:value-type="string">
            <text:p>此D-lois只能在「舞臺：聖杯傳說」中取得。</text:p>
            <text:p/>
            <text:p>你被詛咒了，但正因為這個詛咒，你能夠發揮強大的背教者力量。</text:p>
            <text:p>你可以選擇任意兩個異能。這些異能必須都是「時機：主要動作」且能夠組合使用的異能。</text:p>
            <text:p>你進行組合選定異能的攻擊時，攻擊力+10。此外，透過此效果選擇的異能的侵蝕值+3。</text:p>
            <text:p>當達成解除詛咒的條件時，可以消除此D-lois。</text:p>
          </table:table-cell>
          <table:table-cell table:style-name="ce17" office:value-type="string" calcext:value-type="string">
            <text:p>OC P39</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G04</text:p>
          </table:table-cell>
          <table:table-cell table:style-name="ce14" office:value-type="string" calcext:value-type="string">
            <text:p>偉業的盡頭 オ—ナ—</text:p>
          </table:table-cell>
          <table:table-cell table:style-name="ce17" office:value-type="string" calcext:value-type="string">
            <text:p>你曾經達成了某個驚人的偉業。可能是國王下達的命令，也可能是長年修練產生的成果。</text:p>
            <text:p>無論如何，你是完成了足以受到眾人尊敬之事的人。</text:p>
            <text:p>在那偉業的盡頭，你獲得的是確實的自信，以及寄宿在身上的神技。</text:p>
            <text:p>透過克服偉業，你身上有了卓越的力量。</text:p>
            <text:p>這可能是克服苦難所帶來的自信造就的技巧。或者，這可能是神明或妖精為了稱讚那個偉業而賜予的祝福。</text:p>
            <text:p>無論如何，那都是你的王牌，也是值得驕傲的證明。</text:p>
            <text:p>但是，身為達成者的你知道。名譽不是在未來閃耀的星星，而是過去踏破的苦難賜予的東西。</text:p>
            <text:p>不能驕傲自滿。那個技巧不是為了依戀過去，而是為了未來而存在的。</text:p>
          </table:table-cell>
          <table:table-cell table:style-name="ce17" office:value-type="string" calcext:value-type="string">
            <text:p>此D-lois只能在「舞臺：聖杯傳說」中取得。</text:p>
            <text:p/>
            <text:p>你從曾經克服的試練中習得了獨一無二的技巧、力量。這個技巧已經成為象徵你的東西。</text:p>
            <text:p>取得此D-lois時，從你已取得的「時機：常駐」以外的異能中選擇一個，其Lv+1、最大等級+2。但是，透過此效果選擇的異能的侵蝕值+1。</text:p>
          </table:table-cell>
          <table:table-cell table:style-name="ce17" office:value-type="string" calcext:value-type="string">
            <text:p>OC P40</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G05</text:p>
          </table:table-cell>
          <table:table-cell table:style-name="ce14" office:value-type="string" calcext:value-type="string">
            <text:p>助手 ビジョンズ</text:p>
          </table:table-cell>
          <table:table-cell table:style-name="ce17" office:value-type="string" calcext:value-type="string">
            <text:p>你是魔術師或吟游詩人，也是決定陪伴騎士的人。</text:p>
            <text:p>你們具備透過魔術或神秘力量預見將來的能力。雖說是預見未來，但那只是模糊的幻視，不是人力所能左右的未來。</text:p>
            <text:p>有時會有人在這樣的幻視中無可奈何地強烈浮現出來。</text:p>
            <text:p>自亞瑟王統治以來，這樣的人更加增多了。</text:p>
            <text:p>就是那些聚集在卡美洛的騎士們。</text:p>
            <text:p>他們每個人都背負著各種宿命。就像在遙遠的未來，那些命運會成為一個故事一樣。而且那些命運形成巨大的紋理，像一塊織物般覆蓋著這個不列顛。</text:p>
            <text:p>怎麼可能置之不理。</text:p>
            <text:p>他們對危險和未來太過無知、毫無戒心。</text:p>
            <text:p>需要像你這樣的人的協助。</text:p>
          </table:table-cell>
          <table:table-cell table:style-name="ce17" office:value-type="string" calcext:value-type="string">
            <text:p>此D-lois只能在「舞臺：聖杯傳說」中取得。</text:p>
            <text:p/>
            <text:p>你擁有稍微預見未來的力量。這個力量對自己無效。</text:p>
            <text:p>只對足以撼動命運的英雄（或被認為會成為英雄的對象）有效。</text:p>
            <text:p>在你持有露易絲的對象進行判定前使用。該判定的暴擊值-1（下限值5）。</text:p>
            <text:p>但是，使用該效果時你的侵蝕率上升5點。</text:p>
            <text:p>該效果無法以你自身為對象。該效果一場景可以使用一次、一劇本可以使用三次。</text:p>
          </table:table-cell>
          <table:table-cell table:style-name="ce17" office:value-type="string" calcext:value-type="string">
            <text:p>OC P40</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G06</text:p>
          </table:table-cell>
          <table:table-cell table:style-name="ce14" office:value-type="string" calcext:value-type="string">
            <text:p>神諭 フェイス</text:p>
          </table:table-cell>
          <table:table-cell table:style-name="ce17" office:value-type="string" calcext:value-type="string">
            <text:p>你是信仰唯一真神的聖職者，或是虔誠信徒的騎士。</text:p>
            <text:p>騎士們中不乏嘲笑這種信仰的人。</text:p>
            <text:p>信仰填不飽肚子，而要相信並貫徹理想，不列顛的暴力實在太氾濫了。</text:p>
            <text:p>如果神在守望這個世界，為什麼世道會如此混亂呢？</text:p>
            <text:p>但是，你們有另一種想法。</text:p>
            <text:p>那不是捨棄理想的藉口。</text:p>
            <text:p>如果有人行不義之事，就必須有人來糾正，必須展現正確的生存方式。</text:p>
            <text:p>即使那就像在暴風前持續建造沙堡一樣的行為，也不應該是徒勞的。</text:p>
            <text:p>因為你們築起的名為理想的沙堡，應該會烙印在看到它的某人心中。</text:p>
            <text:p>一直以來維持的正確，會持續守護騎士們的心。</text:p>
          </table:table-cell>
          <table:table-cell table:style-name="ce17" office:value-type="string" calcext:value-type="string">
            <text:p>此D-lois只能在「舞臺：聖杯傳說」中取得。</text:p>
            <text:p/>
            <text:p>你同時擁有強烈的信仰心、持續守護理想的堅強，以及能夠原諒他人的溫柔。</text:p>
            <text:p>當有同伴快要屈服于邪惡誘惑時，或是你自己快要誤入歧途時，能夠指出並選擇正確的道路。</text:p>
            <text:p>在場景中登場的角色使用異能時使用。將使用該異能時上升的侵蝕值變為0。如果組合使用多個異能，可以將侵蝕值的合計變為0。但是，使用此效果時你的侵蝕率上升5點。</text:p>
            <text:p>此效果無法以你自身為對象，一劇本可以使用一次。</text:p>
          </table:table-cell>
          <table:table-cell table:style-name="ce17" office:value-type="string" calcext:value-type="string">
            <text:p>OC P41</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G07</text:p>
          </table:table-cell>
          <table:table-cell table:style-name="ce14" office:value-type="string" calcext:value-type="string">
            <text:p>流離之人 ストレンジャー</text:p>
          </table:table-cell>
          <table:table-cell table:style-name="ce17" office:value-type="string" calcext:value-type="string">
            <text:p>你出生在不列顛以外的土地。可能是撒克遜人或羅馬人，或者更遠的亞洲出身。</text:p>
            <text:p>你為何離開故鄉並不明確。也許是背負罪名被放逐，也許是出於冒險心踏上旅程。可能是為了尋求幻之秘技或秘寶，也可能是想見識不列顛亞瑟王這個人物而來到這片土地。</text:p>
            <text:p>在不列顛，你是異族。</text:p>
            <text:p>人們用混雜著好奇與恐懼的眼神看著你。你的頭髮或眼睛的顏色，在這裡可能是稀罕的。</text:p>
            <text:p>但是，有比那更稀罕的東西。那就是你的戰鬥方法。</text:p>
            <text:p>不列顛以外的戰鬥技法，會讓這片土地的戰士們驚訝，而那正是你強力的武器。</text:p>
            <text:p>如何運用它，全看你的決定。</text:p>
          </table:table-cell>
          <table:table-cell table:style-name="ce17" office:value-type="string" calcext:value-type="string">
            <text:p>此D-lois只能在「舞臺：聖杯傳說」中取得。</text:p>
            <text:p/>
            <text:p>你的身體裡刻下了異鄉的戰鬥技術。那是只有你才能使用的強力武器。另一方面，那種技術會令周圍的人感到恐懼或隔閡。</text:p>
            <text:p>取得此D-lois時須選擇一個能力值和一個技能。你進行使用了所選擇技能的攻擊時，攻擊力+[指定的能力值]。</text:p>
            <text:p>例如能力值選擇【肉體】、技能選擇〈白兵〉的情況下，組合〈白兵〉的攻擊之攻擊力可以+[你的【肉體】]。</text:p>
            <text:p>取得此D-lois時，你的侵蝕率基本值+7。</text:p>
          </table:table-cell>
          <table:table-cell table:style-name="ce17" office:value-type="string" calcext:value-type="string">
            <text:p>OC P41</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E01</text:p>
          </table:table-cell>
          <table:table-cell table:style-name="ce14" office:value-type="string" calcext:value-type="string">
            <text:p>高貴的血統 ノーブルブラッド</text:p>
          </table:table-cell>
          <table:table-cell table:style-name="ce17" office:value-type="string" calcext:value-type="string">
            <text:p>你出身于以與天皇結成密切姻親關係的藤原氏一族為首，包括源氏、平氏、橘氏等名門貴族中政治力量特別強大的家系。</text:p>
            <text:p>在當今這個時代，僅僅是出身於這一族，其他貴族和官僚們就會用特別的眼光看待你。</text:p>
            <text:p>當然反過來說，僅僅因為是這一族的出身也可能招致怨恨。但是，這種事就當作是名人稅吧。正是因為如此，擁有這一族的血脈才顯得特別。</text:p>
          </table:table-cell>
          <table:table-cell table:style-name="ce17" office:value-type="string" calcext:value-type="string">
            <text:p>此D-lois只能在「舞臺：平安京物怪錄」中取得。</text:p>
            <text:p>你的常備化點數+20。</text:p>
            <text:p>取得此D-lois時，侵蝕率基本值+2。</text:p>
          </table:table-cell>
          <table:table-cell table:style-name="ce17" office:value-type="string" calcext:value-type="string">
            <text:p>OC P84</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E02</text:p>
          </table:table-cell>
          <table:table-cell table:style-name="ce14" office:value-type="string" calcext:value-type="string">
            <text:p>討伐傳說 レジェンドオブモノノフ</text:p>
          </table:table-cell>
          <table:table-cell table:style-name="ce17" office:value-type="string" calcext:value-type="string">
            <text:p>你曾經討伐鬼怪或妖怪等對京都人民為害的非人之物。</text:p>
            <text:p>這不僅在武士和陰陽師之間成為話題，甚至在殿上也成為傳聞，據說還有人要以你為主角寫成故事。</text:p>
            <text:p>市井的人們將此事當作趣談來傳述，但那些傳聞全都是真實的。</text:p>
            <text:p>能夠做到這些的，是你擁有的天賦異稟的戰鬥直覺。</text:p>
            <text:p>即使對手是非人的存在，你的刀也能斬斷其足，你的眼睛也能準確看穿那些妖魔的動作。</text:p>
            <text:p>但是，最厲害的是在和“這種對手”戰鬥時，你會像故事的主角一樣動作變得更加靈活。</text:p>
          </table:table-cell>
          <table:table-cell table:style-name="ce17" office:value-type="string" calcext:value-type="string">
            <text:p>此D-lois只能在「舞臺：平安京物怪錄」中取得。</text:p>
            <text:p/>
            <text:p>你擁有劍或弓等無與倫比的才能。而且，這股力量在面對危險對手時越能發揮。</text:p>
            <text:p>但是，你與太多非人的對手戰鬥過了。你的心正在向他們靠近。</text:p>
            <text:p>取得此D-lois時選擇〈近戰〉或〈射擊〉。你進行所選技能判定的達成值+5。高潮階段期間達成值再+2（合計+7）。</text:p>
            <text:p>取得此D-lois時，你的侵蝕率基本值+3。</text:p>
          </table:table-cell>
          <table:table-cell table:style-name="ce17" office:value-type="string" calcext:value-type="string">
            <text:p>OC P85</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E03</text:p>
          </table:table-cell>
          <table:table-cell table:style-name="ce14" office:value-type="string" calcext:value-type="string">
            <text:p>禁色勅許 フリースピリッツ</text:p>
          </table:table-cell>
          <table:table-cell table:style-name="ce17" office:value-type="string" calcext:value-type="string">
            <text:p>律令制的「衣服令」規定不得穿著超過自身當色以上的顏色，這就是禁色規則，但若獲得天皇對特定顏色的許可，便能使用該顏色，這就是禁色聽許的宣旨。</text:p>
            <text:p>你已從天皇那裡獲得了這個禁色聽許的宣旨，不僅是特定顏色，甚至連不穿衣冠束帶，或是佩刀登殿都被允許。</text:p>
          </table:table-cell>
          <table:table-cell table:style-name="ce17" office:value-type="string" calcext:value-type="string">
            <text:p>此D-lois只能在「舞臺：平安京物怪錄」中取得。</text:p>
            <text:p>你在任何地方、對任何地位的對手都有面子。獲得禁色勅許的你，甚至可以強行通過各種無理要求。</text:p>
            <text:p>你可以讓臨時角色聽從一個命令。也可以同時對多個臨時角色下命令。藉此可以讓他們說出知道的情報，或讓他們從現場退去。但是，不能做出會危及生命的行為。該效果一劇本可以使用一次。</text:p>
          </table:table-cell>
          <table:table-cell table:style-name="ce17" office:value-type="string" calcext:value-type="string">
            <text:p>OC P85</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E04</text:p>
          </table:table-cell>
          <table:table-cell table:style-name="ce14" office:value-type="string" calcext:value-type="string">
            <text:p>半妖 ハーフブラッド</text:p>
          </table:table-cell>
          <table:table-cell table:style-name="ce17" office:value-type="string" calcext:value-type="string">
            <text:p>你的其中一位親人是物怪——超越者。</text:p>
            <text:p>而你從出生時就擁有作為超越者的資質。</text:p>
            <text:p>是從出生就能熟練使用力量，還是覺醒時能輕易控制力量，可以自由決定。</text:p>
            <text:p>只是，你確實比普通的陰陽師或物怪更具有駕馭這種特異力量的天性。</text:p>
          </table:table-cell>
          <table:table-cell table:style-name="ce17" office:value-type="string" calcext:value-type="string">
            <text:p>此D-lois只能在「舞臺：平安京物怪錄」中取得。</text:p>
            <text:p>你免費取得異能【妖解放】Lv1。</text:p>
            <text:p>妖解放</text:p>
            <text:p>最大等級：1 </text:p>
            <text:p>時機：準備階段</text:p>
            <text:p>技能：— </text:p>
            <text:p>難易度：自動成功</text:p>
            <text:p>對象：自身 </text:p>
            <text:p>射程：至近</text:p>
            <text:p>侵蝕值：1D10 </text:p>
            <text:p>限制：D-Lois</text:p>
            <text:p>次數：1/劇本</text:p>
            <text:p>效果：解放繼承的妖之力。</text:p>
            <text:p>該回合間，你進行的主要動作判定的暴擊值-1（下限值5）。但是，你會受到【暴走】狀態。</text:p>
          </table:table-cell>
          <table:table-cell table:style-name="ce17" office:value-type="string" calcext:value-type="string">
            <text:p>OC P86</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E05</text:p>
          </table:table-cell>
          <table:table-cell table:style-name="ce14" office:value-type="string" calcext:value-type="string">
            <text:p>歌聖 マスターボエット</text:p>
          </table:table-cell>
          <table:table-cell table:style-name="ce17" office:value-type="string" calcext:value-type="string">
            <text:p>你在歌詠者中擁有卓越的才能。</text:p>
            <text:p>歌能隱藏人的真心，也能傳達真心，它比口語或表情更加誠實。</text:p>
            <text:p>當然，沒有人能從和歌中察覺一切。</text:p>
            <text:p>但被稱為歌聖的你，能夠用和歌傳達一切，也能從和歌中察覺詠歌者的一切。</text:p>
          </table:table-cell>
          <table:table-cell table:style-name="ce17" office:value-type="string" calcext:value-type="string">
            <text:p>此D-lois只能在「舞臺：平安京物怪錄」中取得。</text:p>
            <text:p/>
            <text:p>你能夠透過和歌傳達隨心所欲的情感，將感動分給人們的心靈。</text:p>
            <text:p>在你進行使用了【精神】或【社會】相關技能的判定之前使用，該判定可以用〈藝術：和歌〉進行判定。而且，該判定的達成值+5。該效果一劇本可以使用三次。</text:p>
          </table:table-cell>
          <table:table-cell table:style-name="ce17" office:value-type="string" calcext:value-type="string">
            <text:p>OC P86</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E06</text:p>
          </table:table-cell>
          <table:table-cell table:style-name="ce14" office:value-type="string" calcext:value-type="string">
            <text:p>異邦人 ヴィジッター</text:p>
          </table:table-cell>
          <table:table-cell table:style-name="ce17" office:value-type="string" calcext:value-type="string">
            <text:p>你不是這個國家出生的。</text:p>
            <text:p>來自越過海洋的西方大國或半島的民族，或是北方的未開之地，甚至南方的島國，總之是日本以外的出身。</text:p>
            <text:p>在故鄉就擁有特殊力量的你，不知何種因緣來到了日本的平安京。</text:p>
            <text:p>這個地方似乎也發生著怪異事件，看來你的力量在這裡也很搶手。</text:p>
            <text:p>特別是在這個都市，被稱為物怪的詭異存在橫行作惡。無論你願意與否，必然會有很多發揮力量的機會。</text:p>
            <text:p>這也意味著，你能夠充分運用過去獲得的知識。</text:p>
            <text:p>你是如何來到這個地方的，抱著什麼目的而來，可以自由決定。</text:p>
          </table:table-cell>
          <table:table-cell table:style-name="ce17" office:value-type="string" calcext:value-type="string">
            <text:p>此D-lois只能在「舞臺：平安京物怪錄」中取得。</text:p>
            <text:p/>
            <text:p>你擁有的異國智慧，在這個國家是最先進的知識，那份博學在各種場面都很有用。</text:p>
            <text:p>在場景中登場的任意角色進行判定之後使用。該判定的達成值+5。該效果也可以對你自己使用。該效果一劇本可以使用三次。</text:p>
          </table:table-cell>
          <table:table-cell table:style-name="ce17" office:value-type="string" calcext:value-type="string">
            <text:p>OC P87</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HE07</text:p>
          </table:table-cell>
          <table:table-cell table:style-name="ce14" office:value-type="string" calcext:value-type="string">
            <text:p>天下的大弓取 アーバレストマスター</text:p>
          </table:table-cell>
          <table:table-cell table:style-name="ce17" office:value-type="string" calcext:value-type="string">
            <text:p>你是名震天下的大弓取，弓術的名人。</text:p>
            <text:p>你射出的箭能射穿遙遠的目標，無論在多麼不利的姿勢下都能射中目標。</text:p>
            <text:p>不論是寺院從這端到那端的距離，還是在搖晃的船上，對你來說都能準確射中。</text:p>
            <text:p>這樣的你要在天下揚名，沒花多少時間。</text:p>
            <text:p>弓術是平安時代武士和貴族的必要素養之一。</text:p>
            <text:p>精通此道的你，無論與什麼地位的人交談，都會受到一定程度的尊敬。</text:p>
          </table:table-cell>
          <table:table-cell table:style-name="ce17" office:value-type="string" calcext:value-type="string">
            <text:p>此D-lois只能在「舞臺：平安京物怪錄」中取得。</text:p>
            <text:p/>
            <text:p>你是天下的大弓取，這個國家第一的弓手。即使是一般人不可能做到的超長距離射擊，你也能成功做到。</text:p>
            <text:p>在你進行〈射擊〉判定之後使用，該判定的達成值+2D。使用此效果的判定結束後，你的侵蝕率+5。該效果一劇本可以使用三次。</text:p>
          </table:table-cell>
          <table:table-cell table:style-name="ce17" office:value-type="string" calcext:value-type="string">
            <text:p>OC P87</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01</text:p>
          </table:table-cell>
          <table:table-cell table:style-name="ce14" office:value-type="string" calcext:value-type="string">
            <text:p>墮落化身 フォールンアヴァタール</text:p>
          </table:table-cell>
          <table:table-cell table:style-name="ce17" office:value-type="string" calcext:value-type="string">
            <text:p>你是背教者生命體——邪神因子顯現體。你可能是自古以來人們代代相傳的〈闇之棲人〉，可能是鬼，可能是服侍舒布·尼古拉絲的薩堤羅斯、寧芙或夢魔般的百鬼夜行，可能是〈外神〉所產生的瘋狂電腦程式，也可能是脫離主人獨立行動的“從者”。或者單純只是擬態成人或獸的神話生物，又或者是修格斯。</text:p>
            <text:p>無論如何，你雖是這樣的顯現體，卻理解了人類的靈魂，並想為人類而戰。那是一條不會得到回報的道路。智人不會相信你。連超越者都會恐懼你。你是猶格·索托斯的眷族、舒布·尼古拉絲的後裔、奈亞拉托提普的下僕。即便如此——即便如此，若有想要守護的東西，背負背叛者的汙名，就走上這條纖細而悲哀的道路吧。</text:p>
          </table:table-cell>
          <table:table-cell table:style-name="ce17" office:value-type="string" calcext:value-type="string">
            <text:p>你在本舞臺中是世上罕見的“站在人類一方的背教者生命體”。在這個人類的心靈毫無價值的冷酷宇宙中，在這個只由瘋狂與邏輯支配、只有〈外神〉哄笑迴響的世界裡，你選擇了人心——這是何等愚蠢的事啊。</text:p>
            <text:p>你的本職是[背教者生命體]。背教者生命體的規則依照“基本規則書2”。</text:p>
            <text:p>此外，你可以在進行判定前宣言使用此D-Lois的效果，使該判定的暴擊值-2（下限值2）。但是，該判定必須組合背教者生命體專用的異能。使用此效果的主要階段結束時，你的侵蝕率上升1D點。該效果一劇本可以使用一次。</text:p>
          </table:table-cell>
          <table:table-cell table:style-name="ce16" office:value-type="string" calcext:value-type="string">
            <text:p>NC P88</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02</text:p>
          </table:table-cell>
          <table:table-cell table:style-name="ce14" office:value-type="string" calcext:value-type="string">
            <text:p>被附身者 ポゼツスド</text:p>
          </table:table-cell>
          <table:table-cell table:style-name="ce17" office:value-type="string" calcext:value-type="string">
            <text:p>背教者生命體的顯現方式，如同〈外神〉一樣多樣，同時充滿了對人類無慈悲且冷徹的惡意。</text:p>
            <text:p>附身於你的背教者生命體也是如此。戈爾貢或摩爾摩的僕從、阿斯摩德或撒旦之類的魔神、巢居於黃泉的惡魔......怎麼稱呼都無所謂。這些全都距離真相太過遙遠。</text:p>
            <text:p>已知的只有一件事。背教者生命體對你的附身是不完全的。</text:p>
            <text:p>不完全的原因可以自由設定。是你的精神力、某種意外、強大的超越者或魔術師拯救了你，還是說附身於你的背教者生命體對你抱有好感......愚蠢。最後一種是不可能的.</text:p>
          </table:table-cell>
          <table:table-cell table:style-name="ce17" office:value-type="string" calcext:value-type="string">
            <text:p>你被“協力型”背教者生命體附身。這個背教者生命體的形狀、名字等設定，可在與GM商討後由你決定。當你成為原菌時，就是你的身體被奪走的時候。</text:p>
            <text:p>你免費取得Lv5的《起源：●●》其中之一。此外，依照通常規則，你可以取得除《人類之鄰》以外的背教者生命體專用異能。因為你的肉體是人類，所以不需要《人類之鄰》。</text:p>
            <text:p>另外，協力型背教者生命體持續侵蝕著你的意識，也不作為獨立角色處理，故不會成為攻擊或效果的對象。基本上只有持有此D-Lois的角色才能看見，但若GM認可，也可以作為臨時角色登場于場景中。</text:p>
          </table:table-cell>
          <table:table-cell table:style-name="ce16" office:value-type="string" calcext:value-type="string">
            <text:p>NC P89</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03</text:p>
          </table:table-cell>
          <table:table-cell table:style-name="ce14" office:value-type="string" calcext:value-type="string">
            <text:p>禁斷的魔導書 フォビドゥン・グリモワール</text:p>
          </table:table-cell>
          <table:table-cell table:style-name="ce17" office:value-type="string" calcext:value-type="string">
            <text:p>你是魔導書中隱藏的“知識”本身開啟異界之門而產生的特異背教者生命體，也就是魔導書本身。</text:p>
            <text:p>你站在人類一方，擁有如人類般“異常”精神的理由可以自由設定。你並非要“正確”地使用隱藏在自身內部的知識來召喚〈舊日支配者〉或〈外神〉，而是要守護人類。或許那記述了《阿爾・阿吉夫》、作為背叛者被神靈永劫詛咒的阿卜杜爾・阿爾哈劄德的遺志在你身上寄宿著。</text:p>
          </table:table-cell>
          <table:table-cell table:style-name="ce17" office:value-type="string" calcext:value-type="string">
            <text:p>你的本職是[背教者生命體]。背教者生命體的規則依照“基本規則書2”。</text:p>
            <text:p>你可以常備化一本常備化點數為〈知識：克蘇魯〉×4以下的魔導書，不消費常備化點數。常備化的魔導書可以在開始遊戲前變更。此外，你的〈知識：克蘇魯〉技能+2。</text:p>
          </table:table-cell>
          <table:table-cell table:style-name="ce16" office:value-type="string" calcext:value-type="string">
            <text:p>NC P89</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04</text:p>
          </table:table-cell>
          <table:table-cell table:style-name="ce14" office:value-type="string" calcext:value-type="string">
            <text:p>無貌之神 マスク・オブ・ニャルラトホテプ</text:p>
          </table:table-cell>
          <table:table-cell table:style-name="ce17" office:value-type="string" calcext:value-type="string">
            <text:p>你是無貌之神，是那可怕的奈亞拉托提普——〈外神〉使者的化身。</text:p>
            <text:p>你是偽裝成人類的神之化身，還是因某種理由與奈亞拉托提普一體化的人類，又或者是自以為如此的可憐傀儡，都可以自由設定。無論如何，你都是人類與神祇雙方的潛在敵人。</text:p>
            <text:p>〈無貌之神〉嘲笑一切存在，向所有事物散佈惡意，對邪神們和"偽神的心臟"也不例外。你是為了愚弄神祇而產生的"人類一方的奈亞拉托提普"。</text:p>
            <text:p>當然，如果你認為自己是世界最後的希望，那就太可笑了。當你墮落為原菌時，你會變成"向月嚎叫之物"（譯注：血舌），為這個世界帶來與京香・T・阿米蒂奇同等或更大的災厄。</text:p>
          </table:table-cell>
          <table:table-cell table:style-name="ce17" office:value-type="string" calcext:value-type="string">
            <text:p>先攻階段使用。你可以顯露〈無貌之神〉的真面目，哪怕只是一瞬間也能行使其權能。</text:p>
            <text:p>因此帶來的是令人不忍開口的災厄。人可能會突然燃燒起來，大地可能會裂開，次元的界線可能會鬆動而讓異形的神祇若隱若現。凡人可能會認為你的力量是萬能的。</text:p>
            <text:p>藉此可以破壞場景中存在的一棟建築物或一輛載具，或者讓登場的類型：集團或[種類：兵器]的M敵人戰鬥不能。你可以指定一個接戰區，其中所有能被此效果導致戰鬥不能的M敵人戰鬥不能。該效果一劇本可以使用一次。</text:p>
            <text:p>該效果無法直接給予特邀演員或PC傷害，關於臨時角色則由GM決定。此外，你可以與GM交涉，發揮其他權能，嘲笑物理法則。</text:p>
          </table:table-cell>
          <table:table-cell table:style-name="ce16" office:value-type="string" calcext:value-type="string">
            <text:p>NC P90</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05</text:p>
          </table:table-cell>
          <table:table-cell table:style-name="ce14" office:value-type="string" calcext:value-type="string">
            <text:p>背教者 ビトレイヤー</text:p>
          </table:table-cell>
          <table:table-cell table:style-name="ce17" office:value-type="string" calcext:value-type="string">
            <text:p>你是因某種理由背叛了"偽神的心臟"的存在。可能是被放逐，可能是在權力鬥爭中敗北。或者是瞥見了神祇的真實姿態而陷入瘋狂——然後逃到了"日常"這個巨大的精神病院。</text:p>
            <text:p>無論如何，"偽神的心臟"以駭人手段開發的技術和訣竅仍然持續寄宿在你身上。如果知道為此死了多少人、進行了何等詛咒的所業，無論多麼溫厚的UGN隊員都絕對不會原諒你。</text:p>
            <text:p>你現在是否隸屬於UGN，還是自由業者，請與GM商討後自由決定。無論如何，"偽神的心臟"絕對不會寬恕背叛者。</text:p>
            <text:p>另外，NPC即使不取得此D-Lois，也可以取得[FH本職]。</text:p>
          </table:table-cell>
          <table:table-cell table:style-name="ce17" office:value-type="string" calcext:value-type="string">
            <text:p>你可以取得《PE》P30記載的[FH本職]。人生經歷也要擲欲望表（《PE》P37）而非邂逅表。如果本職是單元隊長，則變成曾經是單元隊長。</text:p>
            <text:p>此外，你要從[No.53 強化兵][No.54 裝備者][No.55 不死者][No.56 破壞之子][No.57 工作員]中選擇一個。之後，此D-Lois也被視為與指定的D-Lois具有相同效果。對《PE》刊載道具的常備化也同樣處理。</text:p>
            <text:p>另外，無法選擇[No.C01 惡靈之主][No.C02 史考德威爾之子]（《LM》P110）。這是因為在本舞臺中"亡靈"具有的意義與基本舞臺完全不同。總有一天會說明的———。</text:p>
          </table:table-cell>
          <table:table-cell table:style-name="ce16" office:value-type="string" calcext:value-type="string">
            <text:p>NC P90</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06</text:p>
          </table:table-cell>
          <table:table-cell table:style-name="ce14" office:value-type="string" calcext:value-type="string">
            <text:p>恐怖面具 テラーマスク</text:p>
          </table:table-cell>
          <table:table-cell table:style-name="ce17" office:value-type="string" calcext:value-type="string">
            <text:p>你是詛咒之"面具"的持有者，這個面具被認為就是渴望流血的〈舊日支配者〉本身，或是其顯現。</text:p>
            <text:p>創造"面具"的是何者可以自由決定。可能是舒布・尼古拉絲，可能是夏烏戈納爾・法格恩，可能是加塔諾托亞或格拉基，也可能是未知的全新〈舊日支配者〉。</text:p>
            <text:p>無論如何，你絕對不會想要放開"面具"，即使不得不放手時也會盡可能讓它保持在能立刻拿到的地方。而一旦進入戰鬥，你必定會戴上那個"面具"（裝備不需要行動。不知何時它就已經裝在你的臉上了）。</text:p>
          </table:table-cell>
          <table:table-cell table:style-name="ce17" office:value-type="string" calcext:value-type="string">
            <text:p>你裝備的名稱包含"電鋸"的武器【暫時包括：電鋸（IA P24）鏈鋸劍（IA P57）】的"命中"變更為"±0"，傷害擲骰時無視對象的[你目前的侵蝕率÷10]點裝甲值。</text:p>
            <text:p>你的主要動作必須盡可能攻擊你以外的角色。也就是說，如果你停留在只有同伴的接戰區，就必須攻擊同伴（不需要攻擊自己。"面具"不會放開你這樣出色的奴隸）。該場景中沒有敵人的場合，此限制不適用。</text:p>
            <text:p>你脫離有敵對者的接戰區，或從戰鬥中的場景退場時，為了抵抗殺戮衝動，侵蝕率上升2點。</text:p>
            <text:p>取得此D-Lois時，你的侵蝕率基本值+3。</text:p>
          </table:table-cell>
          <table:table-cell table:style-name="ce17" office:value-type="string" calcext:value-type="string">
            <text:p>NC P91</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07</text:p>
          </table:table-cell>
          <table:table-cell table:style-name="ce14" office:value-type="string" calcext:value-type="string">
            <text:p>復活的死者 リアニメーター</text:p>
          </table:table-cell>
          <table:table-cell table:style-name="ce17" office:value-type="string" calcext:value-type="string">
            <text:p>你是被魔術、瘋狂科學，或許是未知的背教者作用從死亡安息中喚醒，再次行走現世的死者。</text:p>
            <text:p>復活的同時，你的時間不再流動，你的肉體既不會腐爛也不會變質——至少現在是這樣。或許，你體內的邪神因子按照你想要保持自我的意識，讓屍體看起來就像活人一樣。你的行動不受任何限制，除非接受相當精密的檢查，否則會被認為是活人。</text:p>
            <text:p>但這也不知道會持續到什麼時候。當你變成原菌時，就是你駭人的腐肉與骨頭集合體本質暴露的時候。</text:p>
          </table:table-cell>
          <table:table-cell table:style-name="ce17" office:value-type="string" calcext:value-type="string">
            <text:p>你是靠著對他人的愛慕、妄念這類東西勉強保持人形的行走死者。你是總有一天會崩壞的夢幻泡影般的存在。</text:p>
            <text:p>場景中登場的你以外的角色取得對你的露易絲時，你進行的所有判定骰數+2個。存在多個對你取得露易絲的角色時，效果會疊加。NPC是否對你取得露易絲由GM決定。</text:p>
            <text:p>另外，對你的露易絲變成泰特斯時，你的侵蝕率立即上升10點。</text:p>
            <text:p>你被視為以《死者蘇生》復活的角色，並被視為[種類：不死者]。面對擅長《送葬》術式的退魔師的時候最好小心點。成為《送葬》對象時，可以消費泰特斯來抵消。不過，不抵消可能會更幸福......</text:p>
          </table:table-cell>
          <table:table-cell table:style-name="ce17" office:value-type="string" calcext:value-type="string">
            <text:p>NC P91</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08</text:p>
          </table:table-cell>
          <table:table-cell table:style-name="ce14" office:value-type="string" calcext:value-type="string">
            <text:p>超能力者 サイオニクス</text:p>
          </table:table-cell>
          <table:table-cell table:style-name="ce17" office:value-type="string" calcext:value-type="string">
            <text:p>你是覺醒了超能力——人類基因"本來"就擁有的超常力量的異能者。你的力量屬_xffff_現代科學無法解釋的超心理學領域，但與背教者毫無關係。你是「感染了背教者病毒的超能力者」，能夠使用背教者的力量以外的超能力。你在超越者中，在一般人中都是孤獨的存在。如何看待這點可以自由設定。</text:p>
            <text:p>據說印度的瑜伽大師、香巴拉的導師們、中國的仙人之中，也有透過後天訓練而覺醒超能力的人。這樣的角色也可以用此D-露易絲來重現。</text:p>
          </table:table-cell>
          <table:table-cell table:style-name="ce17" office:value-type="string" calcext:value-type="string">
            <text:p>你可以從NC P112的超能力中選擇兩個以Lv1免費取得，不需要消耗經驗值。若要額外取得超能力，可如同異能一樣取得。超能力的使用請參照NC P76。</text:p>
            <text:p>你的【HP最大值】-5。這表示你為了控制自身的超能力而經常承受巨大疲勞。</text:p>
          </table:table-cell>
          <table:table-cell table:style-name="ce17" office:value-type="string" calcext:value-type="string">
            <text:p>NC P92</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09</text:p>
          </table:table-cell>
          <table:table-cell table:style-name="ce14" office:value-type="string" calcext:value-type="string">
            <text:p>地球監視者 ウラヌス</text:p>
          </table:table-cell>
          <table:table-cell table:style-name="ce17" office:value-type="string" calcext:value-type="string">
            <text:p>你是〈舊神〉的僕從。你是被製作的類似人類的存在、還是出生於這樣的家系、或是在死亡瞬間突然覺醒，這些可以自由設定。</text:p>
            <text:p>關於諸神，你所知道的與其他超越者相同。你的知識被嚴格封鎖，不擾亂諸神的安寧是至高使命。</text:p>
            <text:p>你的目的是狩獵那些超越人類被容許的範圍、試圖達到神明領域的超越者，也就是原菌，並保護現在的世界，阻止〈舊日支配者〉的覺醒。換句話說，你的目的與UGN一致...至少目前是如此。 其他地球監視者中，有些人可能更直接地想要排除超越者，但你至少更為"溫和"，仍然想要以人類的身分監視超越者，你覺得這樣做比較好。</text:p>
          </table:table-cell>
          <table:table-cell table:style-name="ce17" office:value-type="string" calcext:value-type="string">
            <text:p>你所使用的〈舊神〉之力，在數據上完全與超越者相同處理。 你的【HP最大值】+10。你在回歸判定時，一劇本一次，可以選擇任意數量的骰子重擲，也可以重擲回歸判定時額外增加的骰子。但是，必須採用重擲後的點數。</text:p>
            <text:p>如果你在回歸判定後是死亡狀態或侵蝕率達到100%以上，你的存在本身將從宇宙中消失。與你有關的記錄和記憶都會消失。對你的露易絲立即成為泰特斯。只有持有對你的泰特斯的角色才能像記得消逝在晨光中的夢境碎片一樣，記得你的存在。</text:p>
          </table:table-cell>
          <table:table-cell table:style-name="ce17" office:value-type="string" calcext:value-type="string">
            <text:p>NC P92</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10</text:p>
          </table:table-cell>
          <table:table-cell table:style-name="ce14" office:value-type="string" calcext:value-type="string">
            <text:p>超時間干涉者 シャドウアウト・オブ・タイム</text:p>
          </table:table-cell>
          <table:table-cell table:style-name="ce17" office:value-type="string" calcext:value-type="string">
            <text:p>你是"伊斯之偉大種族"。你奪取了超越者的肉體，為了調查邪神因子而在這條時間線上活動。解開背教者之謎可能會結束你們的時空漂流。</text:p>
            <text:p>對你而言，這個肉體和周圍的社會只是觀察對象，但也不能隨意拋棄。要將意識重新傳送回6億年前需要相當的準備工作。在此之前不能被殺死，而且你也理解為了控制背教者需要維持與周圍的社會性。從這個意義上說，你與其他超越者並無不同。 此外，像西薩裡奧（NC P69）一樣，也存在使用新技術，平時保持本來的人格，只在緊急時才顯現你的人格的個體。若有GM許可，你也可以扮演這樣的個體。</text:p>
            <text:p>值得注意的是，伊斯之偉大種族極度重視保密，即使對同族也是如此。你對於其他個體在這條時間軸上的活動幾乎一無所知。</text:p>
          </table:table-cell>
          <table:table-cell table:style-name="ce17" office:value-type="string" calcext:value-type="string">
            <text:p>一場景一次，你可以通過干預時間線使某些事件變成未曾發生。具體而言，當場景中任意對象進行判定後，宣言使用D-lois，你可以將其達成值變為0。</text:p>
            <text:p>然而，時間干涉會大幅影響你的身心，使你的侵蝕率+[對象的成功值÷10]D，並在該劇本中降低相當於增加侵蝕率數值的【HP最大值】。如果導致【HP最大值】降至0以下，你將被時空扭曲吞噬，前往阿撒托斯的宮廷，永遠無法再參與這個遊戲。</text:p>
          </table:table-cell>
          <table:table-cell table:style-name="ce17" office:value-type="string" calcext:value-type="string">
            <text:p>NC P93</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11</text:p>
          </table:table-cell>
          <table:table-cell table:style-name="ce14" office:value-type="string" calcext:value-type="string">
            <text:p>咒物污染者 ダムドレガシー</text:p>
          </table:table-cell>
          <table:table-cell table:style-name="ce17" office:value-type="string" calcext:value-type="string">
            <text:p>你擁有一件咒物——完全超出現代物理法則的〈舊日支配者〉或〈外神〉遺物。</text:p>
            <text:p>你可能是自願獲得這件咒物，也可能是被它纏身，想方設法要擺脫它。無論哪種情況，結果都一樣。你持有可能毀滅地球的邪神武裝，包括UGN在內的所有組織都將你視為人類的潛在威脅。</text:p>
            <text:p>只有你能使用你的詛咒物。這是因為你的背教者病毒勉強封印了咒物裡可怕的詛咒。這也意味著，若你變成原菌，可能會帶來無法言喻的災厄，不過這也是你得以繼續存活的原因。</text:p>
          </table:table-cell>
          <table:table-cell table:style-name="ce17" office:value-type="string" calcext:value-type="string">
            <text:p>取得該D-Lois時，從咒物之中選擇並取得一件取得。</text:p>
            <text:p>以該D-Lois取得的道具視為常備化。以該D-Lois取得的道具除你以外的角色無法使用也無法裝備，即使持有也無法受到其效果。但當你死亡或變為原菌時，亦有可能會被奪取咒物——交由GM判斷。</text:p>
            <text:p>GM也可以根據劇本設計設計原創咒物。</text:p>
          </table:table-cell>
          <table:table-cell table:style-name="ce17" office:value-type="string" calcext:value-type="string">
            <text:p>NC P93</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12</text:p>
          </table:table-cell>
          <table:table-cell table:style-name="ce14" office:value-type="string" calcext:value-type="string">
            <text:p>異端藝術家　ヘレティック・アーティスト</text:p>
          </table:table-cell>
          <table:table-cell table:style-name="ce17" office:value-type="string" calcext:value-type="string">
            <text:p>你是一名特殊的超越者，能透過音樂或繪畫等藝術表現背教者的力量。雖然也有其他人在展現效果時會進行類似行為，但你將藝術與背教者結合，開啟通往〈外神〉領域的大門，讓人一窺瘋狂的領域。</text:p>
            <text:p>你演奏的音色、你表現的色彩、你雕刻的作品要麼充滿瘋狂，要麼極度褻瀆，要麼異常完美。這會讓凡人憤怒，使超越者畏懼，令諸神嫉妒。</text:p>
          </table:table-cell>
          <table:table-cell table:style-name="ce17" office:value-type="string" calcext:value-type="string">
            <text:p>你進行&lt;RC&gt;判定時可以從你持有的&lt;藝術：&gt;技能中任意選擇一項當作&lt;RC&gt;技能使用。此時還可以同時應用&lt;RC&gt;&lt;藝術：&gt;其中任意技能的修正。所進行的判定為攻擊時，你可以無視對象至多你的&lt;意志&gt;×10點裝甲值來計算傷害。</text:p>
            <text:p>但為了受益於該效果，你必須實際進行&lt;藝術：&gt;所指定的行為、譬如&lt;藝術：繪畫&gt;時需進行繪畫，&lt;藝術：鋼琴&gt;則必須彈奏鋼琴。此類藝術行為視為與動作同時進行，且必須持有常備化點數1以上的藝術道具（詳見道具表）才能進行。GM可以根據情況設定無法進行此類行為，或是會承受某種負面懲罰的情景。</text:p>
          </table:table-cell>
          <table:table-cell table:style-name="ce17" office:value-type="string" calcext:value-type="string">
            <text:p>NC P94</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13</text:p>
          </table:table-cell>
          <table:table-cell table:style-name="ce14" office:value-type="string" calcext:value-type="string">
            <text:p>吸血種 ドラクル</text:p>
          </table:table-cell>
          <table:table-cell table:style-name="ce17" office:value-type="string" calcext:value-type="string">
            <text:p>你是吸血鬼，或者是繼承吸血鬼血脈被稱為半吸血鬼的存在。諷刺的是，感染你的背教者病毒改變了你的腦部結構，維繫著你的理性——至少目前如此。不過，人類的理性剝奪了你作為吸血鬼的大部分萬能力量。你是個無法變成霧氣或創造不死軍團的半吊子（雖然可以用異能模擬）。</text:p>
            <text:p>你原菌化意味著你將變成真正的黑暗怪物，視所有人類為獵物。是的，現在的你才是吸血鬼中的——背叛者。</text:p>
          </table:table-cell>
          <table:table-cell table:style-name="ce17" office:value-type="string" calcext:value-type="string">
            <text:p>你的本職為[恐怖之物]（NC P186）。你的衝動必須設為[吸血]。</text:p>
            <text:p>你不需要擁有鮮血真祖症候。那些患有該症候的人雖然與吸血鬼相似，但終究只是相似的存在。</text:p>
            <text:p>你可以以主要動作從同意的對象吸血，還可以在你的攻擊使對象戰鬥不能時你使用《復蘇》。這個《復蘇》作為特例可以不受你侵蝕率的限制使用。</text:p>
            <text:p>此外，無論你的症候為何，你都取得Lv2的《血霧之盾》。但要使用經驗點提升等級則需要鮮血真祖症候。你在直射陽光下進行的所有判定，若擲骰結果全部為3以下，則視為大失敗。</text:p>
          </table:table-cell>
          <table:table-cell table:style-name="ce17" office:value-type="string" calcext:value-type="string">
            <text:p>NC P94</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14</text:p>
          </table:table-cell>
          <table:table-cell table:style-name="ce14" office:value-type="string" calcext:value-type="string">
            <text:p>自動人偶 オートマータ</text:p>
          </table:table-cell>
          <table:table-cell table:style-name="ce17" office:value-type="string" calcext:value-type="string">
            <text:p>你是自動人偶，是歐洲瘋狂煉金術師創造的模仿人類的機關人偶。或者，你可能有著完全不同的來歷，但同樣是擁有類似功能的某種自動機械，也可能是幻夢境的夢，或來自不同時間的機器人。</text:p>
            <text:p>無論如何，成功利用背教者補充自身功能的你，已經從奪取人體作為驅動力的詛咒命運中解脫。</text:p>
            <text:p>然而，作為結果你被排除在自動人偶的"群體"——機械的群體意識之外。這種孤獨感持續折磨著你，從孤獨感中解放的方法只有一個，就是墮落為原菌——</text:p>
          </table:table-cell>
          <table:table-cell table:style-name="ce17" office:value-type="string" calcext:value-type="string">
            <text:p>你的本職為[恐怖之物]（NC P186）。</text:p>
            <text:p>你的裝甲值+[【肉體】×2]，【行動值】+【精神】，【HP最大值】+5。</text:p>
            <text:p>你可以將在遊戲前常備化的一件武器設定為嵌入你的身體。這類武器除非接受精密檢查或主動裝備，否則無法被發現。</text:p>
          </table:table-cell>
          <table:table-cell table:style-name="ce17" office:value-type="string" calcext:value-type="string">
            <text:p>NC P95</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CRC15</text:p>
          </table:table-cell>
          <table:table-cell table:style-name="ce14" office:value-type="string" calcext:value-type="string">
            <text:p>世界守護者 キャット・インヴェスティゲイター</text:p>
          </table:table-cell>
          <table:table-cell table:style-name="ce17" office:value-type="string" calcext:value-type="string">
            <text:p>貓是洛夫克拉夫特認為最神聖的動物，在克蘇魯神話中也是擁有靈性力量守護世界的偉大存在。貓們在夢中不斷與〈外神〉戰鬥，並瞭解祂們的存在。只是我們太過愚昧，無法與貓對話而已。</text:p>
            <text:p>你是接受貓神巴斯特祝福，決定與人類並肩作戰的貓。你能透過背教者的力量與人類交談，但如果偏好更加恐怖的氛圍，也可以設定為「雖不能說話但能傳達意圖」。無論如何，貓能夠單方面完全理解人類語言和機械的意義。平時看似不理解，只是因為沒必要聽奴隸的話罷了，就像〈舊日支配者〉無視人類的哀求一樣。 變成原菌的貓會遭受貓神巴斯特的憤怒相——塞克麥特的憤怒，變成可怖的怪物並被放逐到冷原。</text:p>
          </table:table-cell>
          <table:table-cell table:style-name="ce17" office:value-type="string" calcext:value-type="string">
            <text:p>你的本職為[貓]（NC P186）。你能像人類一樣裝備任何裝備品，且你的空手的攻擊力變更為「3」。你可以取得『CE』中的A超越者專用道具（不可取得A超越者專用簡易異能）。</text:p>
            <text:p>你進行的回歸判定的骰數+3個。</text:p>
            <text:p>這個D-lois不能與其他D-lois同時取得。取得此D-lois的話，你不能選擇昇華泰特斯效果中的「判定骰數+10個」。</text:p>
          </table:table-cell>
          <table:table-cell table:style-name="ce17" office:value-type="string" calcext:value-type="string">
            <text:p>NC P95</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UA01</text:p>
          </table:table-cell>
          <table:table-cell table:style-name="ce14" office:value-type="string" calcext:value-type="string">
            <text:p>抗改變者 アンチトランス</text:p>
          </table:table-cell>
          <table:table-cell table:style-name="ce19" office:value-type="string" calcext:value-type="string">
            <text:p>你受到了AD背教者的侵蝕，但你抵抗住了侵蝕，獲得了新的力量。</text:p>
            <text:p>AD背教者的特徵之一是被稱作轉化異能的異形的異能。原本只有偽神天鎖症候的RB可以使用這種力量，最近收到報告稱在AD背教者的侵蝕中倖存的超越者中也發現了類似轉化異能的異能。他們被稱作“抗改變者”。</text:p>
            <text:p>他們的精神仍在被ad背教者侵蝕，因此UGN內部也有人認為他們很危險。</text:p>
          </table:table-cell>
          <table:table-cell table:style-name="ce19" office:value-type="string" calcext:value-type="string">
            <text:p>你可以選擇一個符合自己症候的抗改變者專用異能力並取得LV1，不需要消耗經驗。可使用經驗取得新的抗改變者專用異能或提升等級。</text:p>
            <text:p>取得時，你的衝動變更為【改變】，衝動的初始侵蝕率為30。此外，你無法取得衝動異能。</text:p>
          </table:table-cell>
          <table:table-cell table:style-name="ce17" office:value-type="string" calcext:value-type="string">
            <text:p>DF P25</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UA02</text:p>
          </table:table-cell>
          <table:table-cell table:style-name="ce14" office:value-type="string" calcext:value-type="string">
            <text:p>鎖之共生 シンビオティック</text:p>
          </table:table-cell>
          <table:table-cell table:style-name="ce19" office:value-type="string" calcext:value-type="string">
            <text:p>你與偽神天鎖症候的RB共生。在RB之中，有一種個體被稱作協力型，寄生於人類或其他生物上。雖然沒有解明他們的產生機制，但大多數情況下他們都對宿主較為友善，與其形成了共生關係。</text:p>
            <text:p>那麼，存在偽神天鎖的協力型RB嗎？</text:p>
            <text:p>降臨事件以來，在世界各地增加的AD背教者生命之中，漸漸確認到了不遵從湮滅者等人的思考的個體。協力型RB中發現了受到偽神天鎖的改變影響但仍然和宿主形成共生關係的案例，以及在作為RB、獲得自我時已經具有偽神天鎖症候的案例。</text:p>
          </table:table-cell>
          <table:table-cell table:style-name="ce19" office:value-type="string" calcext:value-type="string">
            <text:p>你身上寄生了偽神天鎖症候的協力型RB。靠著它的助力，你可以使用部分偽神天鎖的力量。</text:p>
            <text:p>選擇並取得一個LV1的偽神天鎖異能力，不消耗經驗點，但無法取得[限制：-]以外的異能和敵人異能。</text:p>
            <text:p>你可以消耗經驗另外取得最多兩個偽神天鎖異能力，可以用經驗點對這個D露易絲取得的異能進行成長。</text:p>
            <text:p>當你進行的判定沒有組合偽神天鎖異能時，骰數-[取得的偽神天鎖異能數]個。</text:p>
          </table:table-cell>
          <table:table-cell table:style-name="ce17" office:value-type="string" calcext:value-type="string">
            <text:p>DF P25</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UA03</text:p>
          </table:table-cell>
          <table:table-cell table:style-name="ce14" office:value-type="string" calcext:value-type="string">
            <text:p>封具 ストレンジグッズ</text:p>
          </table:table-cell>
          <table:table-cell table:style-name="ce19" office:value-type="string" calcext:value-type="string">
            <text:p>你持有被稱作RB道具的特殊物品。</text:p>
            <text:p>所謂的RB道具，是成為RB的EX背教者。類似故事中的魔法道具，它在具有特殊功能的同時還有著明確的自我，能夠自發地協助主人。</text:p>
            <text:p>雖然便利，但依賴於RB道具的力量會變得無法放開它，一旦使用方法錯誤還會遭到毀滅的危險。</text:p>
            <text:p>降臨事件以來，這一年裡RB道具相關的事件增加了。根據未確認的情報，這些RB道具很有可能是“贈送者”花裡美羅——都築京香的同位體之一提供的。</text:p>
          </table:table-cell>
          <table:table-cell table:style-name="ce19" office:value-type="string" calcext:value-type="string">
            <text:p>取得這個D露易絲時，選擇一個封具專用RB道具並常備化。</text:p>
            <text:p>所取得的道具無法被你之外的人使用、裝備，其他人持有也不會受到效果。</text:p>
            <text:p>你可以使用RB道具的封具效果。使用封具效果的階段結束後，你無法再裝備、使用這個道具，也無法受到其效果，已經裝備時，使用過效果後會解除裝備狀態。</text:p>
            <text:p>取得這一D露易絲時，你的侵蝕率基本值+10。</text:p>
          </table:table-cell>
          <table:table-cell table:style-name="ce17" office:value-type="string" calcext:value-type="string">
            <text:p>DF P26</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UA04</text:p>
          </table:table-cell>
          <table:table-cell table:style-name="ce14" office:value-type="string" calcext:value-type="string">
            <text:p>罪人 アンフォーギヴン</text:p>
          </table:table-cell>
          <table:table-cell table:style-name="ce19" office:value-type="string" calcext:value-type="string">
            <text:p>你犯下了罪。那是極大的重罪，無論如何償還都無法取回一切，你能夠免於處刑活到現在已經是十分不可思議的事情。這份罪將會銘刻在你的墓碑上（如果有人弔唁你的話），倘若你想要逃過罪責，你的罪行只會更加深重。</text:p>
            <text:p>你活著只是為了贖清這份無法償還的罪。因此，你不被容許死亡，只能選擇活下去、償還罪孽。為那些因你而直接、間接受害的人們獻身，便是你的贖罪。</text:p>
            <text:p>具體是怎樣的罪可以與GM商談，或不進行具體設定而是設定NPC對這份罪的態度。罪的內容也可以由GM決定，在一局開始前提前讓PL得知即可。不會發生D露易絲描述之外的負面效果。</text:p>
          </table:table-cell>
          <table:table-cell table:style-name="ce19" office:value-type="string" calcext:value-type="string">
            <text:p>當你昇華泰特斯，使用“從無法戰鬥狀態中恢復”的效果時，你的HP回復到最大值。</text:p>
            <text:p>當你使用其他昇華泰塔斯效果時，你的侵蝕率上升3。取得此D露易絲時，可以正常使用S露易絲的效果。</text:p>
          </table:table-cell>
          <table:table-cell table:style-name="ce17" office:value-type="string" calcext:value-type="string">
            <text:p>DF P26</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UA05</text:p>
          </table:table-cell>
          <table:table-cell table:style-name="ce14" office:value-type="string" calcext:value-type="string">
            <text:p>魔街的獵犬 フロムヘル</text:p>
          </table:table-cell>
          <table:table-cell table:style-name="ce19" office:value-type="string" calcext:value-type="string">
            <text:p>你是逃離了[舞臺：魔街]的魔街的居民。櫻井翔香是魔街的“正教會”的修女，也是天使之家孤兒院的運營者。她在那裡訓練過有超越者能力的孩子們，其中有一些孩子的結局是不幸的。之後，許多孩子們變成了原菌，她也從魔街消失了。</text:p>
            <text:p>她為什麼會失蹤？為什麼會發生原菌化事件？對她來說，孩子們只是實驗動物嗎？</text:p>
            <text:p>你追尋著櫻井翔香離開了魔街。那是背水一戰的脫逃劇，成功本身便是奇跡。UGN中央評議會下令一旦發現你就立刻殲滅，靠著極少數非官方協助者的庇護，你活了下來。</text:p>
            <text:p>據說現在櫻井翔香正作為傷戮的一員在訓練成員。</text:p>
          </table:table-cell>
          <table:table-cell table:style-name="ce19" office:value-type="string" calcext:value-type="string">
            <text:p>在魔街的生活使你鍛煉出了強韌的肉體。在你受到HP傷害之前使用，你（將要）受到的HP傷害-3d10。</text:p>
            <text:p>取得這個D露易絲時，你無法裝備、使用自由職業外的紋章道具。</text:p>
            <text:p>需要注意取得這個露易絲不等於可以取得[舞臺：魔街]的專用數據。</text:p>
          </table:table-cell>
          <table:table-cell table:style-name="ce17" office:value-type="string" calcext:value-type="string">
            <text:p>DF P27</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UA06</text:p>
          </table:table-cell>
          <table:table-cell table:style-name="ce14" office:value-type="string" calcext:value-type="string">
            <text:p>檢怪異使的末裔 デモンスレイヤー</text:p>
          </table:table-cell>
          <table:table-cell table:style-name="ce19" office:value-type="string" calcext:value-type="string">
            <text:p>你是[舞臺：平安京物怪錄]中與怪異事件戰鬥的檢怪異使的末裔。傳說八百比丘尼是吃下人魚肉的、不老不死的怪僧，她在暗中操控著平安京的怪異事件，又或者為檢怪異使們提供建言，是謎一樣的人物。</text:p>
            <text:p>在後來的故事中她以800歲高齡結束了生命，但真相與故事稍有出入。八百比丘尼改名換姓，在其他地方與各種物怪有所牽扯，與它們引發的事件息息相關。而那些與物怪交鋒的檢怪異使也隱去姓名，代代追查各地發生的物怪事件，在暗中將其解決。</text:p>
            <text:p>到了現代，這份因緣仍在持續。童年時你便不被允許和同齡的孩子一起玩，一直在鍛煉斬鬼的技術。你是現代的檢怪異使，一邊狩獵危害世界的超越者和原菌，一邊追尋八百比丘尼的下落。</text:p>
            <text:p>作為都築京香的同位體，八百比丘尼在降臨事件後受到了湮滅者的改變，作為其部下在世界各地收集RB。</text:p>
          </table:table-cell>
          <table:table-cell table:style-name="ce19" office:value-type="string" calcext:value-type="string">
            <text:p>你繼承了檢怪異使的斬鬼技術。在攻擊前使用，當你的攻擊對象包含超越者時，達成值+10、攻擊力+10。</text:p>
            <text:p>這個效果1劇本最多可以使用3次。</text:p>
            <text:p>需要注意取得這個露易絲不等於可以取得[舞臺：平安京物怪錄]的專用數據。</text:p>
          </table:table-cell>
          <table:table-cell table:style-name="ce17" office:value-type="string" calcext:value-type="string">
            <text:p>DF P27</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UA07</text:p>
          </table:table-cell>
          <table:table-cell table:style-name="ce14" office:value-type="string" calcext:value-type="string">
            <text:p>樂園歸還者 エデンサバイバー</text:p>
          </table:table-cell>
          <table:table-cell table:style-name="ce19" office:value-type="string" calcext:value-type="string">
            <text:p>你是[舞臺：失落的伊甸]中的歸還者，也是通關了MMORPG《雙重十字》的玩家。被困在遊戲世界中的你，與處境相同的同伴們協作對應這一狀況。在隨時會死亡的遊戲中，你們經歷了許多冒險，最終打倒了關底BOSS“黑衣的魔女”。</text:p>
            <text:p>但回到現實後等到你們的是苦難仍未結束的殘酷真相。《雙重十字》是將潛在的感染者覺醒為超越者、進行戰鬥模擬的實驗。在背後操縱《雙重十字》的“黑衣的魔女”目前正作為威脅地球生物的組織的一員活動。</text:p>
            <text:p>現在，你在追查她的下落。</text:p>
          </table:table-cell>
          <table:table-cell table:style-name="ce19" office:value-type="string" calcext:value-type="string">
            <text:p>你抵抗死亡的意志遠超其他超越者。在你受到回復HP的效果時使用，回復的HP+10。組合複數異能力時等使用複數效果回復HP時，在合計值上+10。</text:p>
            <text:p>宣言《復原》時，追加的HP不需要上升侵蝕。</text:p>
            <text:p>每當使用這個效果時，你的侵蝕率+2。</text:p>
            <text:p>需要注意取得這個露易絲不等於可以取得[舞臺：失落的伊甸]的專用數據。</text:p>
          </table:table-cell>
          <table:table-cell table:style-name="ce16" office:value-type="string" calcext:value-type="string">
            <text:p>DF P28</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UA08</text:p>
          </table:table-cell>
          <table:table-cell table:style-name="ce14" office:value-type="string" calcext:value-type="string">
            <text:p>消散的陽炎 スぺリオル</text:p>
          </table:table-cell>
          <table:table-cell table:style-name="ce19" office:value-type="string" calcext:value-type="string">
            <text:p>你曾經是[舞臺：陽炎的戰場]中沙漠幻影部隊的隊員。為了守護克洛德瓦公國，你加入了沙漠幻影傭兵部隊，在兩陣營使用超越者和背教者兵器的、地獄般的戰場上作戰。但原本應當保密的情報遭到洩露，你遭到了奇襲，沙漠幻影受到了毀滅性的打擊。將你們的情報賣給敵方的弗蘭索瓦·魯貝格已經離開了克洛德瓦，在世界各地販賣軍火。在她背後，據說是以滅絕生物為目標的組織——傷戮。</text:p>
            <text:p>不能讓這個世界成為克洛德瓦一樣的地獄。為了犧牲的戰友們，你如此起誓。</text:p>
          </table:table-cell>
          <table:table-cell table:style-name="ce19" office:value-type="string" calcext:value-type="string">
            <text:p>你是在克洛德瓦與諸多機甲兵器交戰、以不顧性命的戰鬥取得了勝利。在你以外的角色進行攻擊前使用，這次攻擊的攻擊力+10，計算傷害時無視裝甲。對象可以拒絕這一效果。這個效果1劇本最多使用3次。</text:p>
            <text:p>使用這個d露易絲時，你的HP失去1d10點。</text:p>
            <text:p>需要注意取得這個露易絲不等於可以取得[舞臺：陽炎的戰場]的專用數據。</text:p>
          </table:table-cell>
          <table:table-cell table:style-name="ce16" office:value-type="string" calcext:value-type="string">
            <text:p>DF P28</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UA09</text:p>
          </table:table-cell>
          <table:table-cell table:style-name="ce14" office:value-type="string" calcext:value-type="string">
            <text:p>同位體 アイソトープ</text:p>
          </table:table-cell>
          <table:table-cell table:style-name="ce19" office:value-type="string" calcext:value-type="string">
            <text:p>你是“計劃者”都築京香的同位體，但沒有受到湮滅者的改變。她有著複數的同位體，互相同步意識，進行著各自的“計劃”。在降臨事件之後，湮滅者陸續接觸了各地的同位體，將其改變並編入傷戮，同時推行著對計劃者的攻擊和對傷戮的增強。</text:p>
            <text:p>你還沒有與湮滅者接觸、或是擊退了她、或是被改變了但沒有加入她們，又或者有其他理由沒有協助傷戮滅絕生命。你的計劃不是這樣。</text:p>
          </table:table-cell>
          <table:table-cell table:style-name="ce19" office:value-type="string" calcext:value-type="string">
            <text:p>取得這個D露易絲時，選擇一個限制真實身份的D露易絲，將其效果視為這個D露易絲的效果。</text:p>
            <text:p>注意只能選擇取得一個D露易絲，例如如果選擇“破壞之子”，無法再取得“不死者”。</text:p>
            <text:p>GM可以限制可選的D露易絲，或指定、禁止特定的D露易絲。</text:p>
            <text:p>取得這個D露易絲時，你的基本侵蝕率+3。</text:p>
          </table:table-cell>
          <table:table-cell table:style-name="ce16" office:value-type="string" calcext:value-type="string">
            <text:p>DF P29</text:p>
          </table:table-cell>
          <table:table-cell table:style-name="ce16" office:value-type="string" calcext:value-type="string">
            <text:p>RB專用</text:p>
          </table:table-cell>
          <table:table-cell table:style-name="ce3" table:number-columns-repeated="20"/>
          <table:table-cell table:number-columns-repeated="998"/>
        </table:table-row>
        <table:table-row table:style-name="ro1">
          <table:table-cell table:style-name="ce14" office:value-type="string" calcext:value-type="string">
            <text:p>No.UA10</text:p>
          </table:table-cell>
          <table:table-cell table:style-name="ce14" office:value-type="string" calcext:value-type="string">
            <text:p>集合體 ユナイテッドワン</text:p>
          </table:table-cell>
          <table:table-cell table:style-name="ce19" office:value-type="string" calcext:value-type="string">
            <text:p>你——準確來說你們是複數個RB集合成的一個集合體。RB有各種形態，其中也存在共享一個肉體、能進行有機的合作的個體。集合的原因多種多樣，例如生存需要、研究需要、個人的同伴意識等。即使是構成同一個集合體的RB，也可能具備各種不同的理由。</text:p>
            <text:p>決策的方式可以是由一個RB支配其他RB，又或者是商談後多數表決、抽籤、猜拳等。</text:p>
            <text:p>你可以自由扮演構成你的RB們的人格，行動由你決定，這些RB視為一個你的PC。</text:p>
          </table:table-cell>
          <table:table-cell table:style-name="ce19" office:value-type="string" calcext:value-type="string">
            <text:p>你可以使用和你共生的RB們的異能力。</text:p>
            <text:p>在使用異能時宣言，選擇一個你所使用的異能力。這個動作間，所選的一個異能力的侵蝕值變為0，但之後在劇本中無法再使用這個異能力。</text:p>
            <text:p>無法選擇“一劇本一次”的異能力。</text:p>
            <text:p>這一效果最多可以宣言[你取得的《起源：●●》個數+2]次。</text:p>
          </table:table-cell>
          <table:table-cell table:style-name="ce16" office:value-type="string" calcext:value-type="string">
            <text:p>DF P29</text:p>
          </table:table-cell>
          <table:table-cell table:style-name="ce16" office:value-type="string" calcext:value-type="string">
            <text:p>RB專用</text:p>
          </table:table-cell>
          <table:table-cell table:style-name="ce3" table:number-columns-repeated="20"/>
          <table:table-cell table:number-columns-repeated="998"/>
        </table:table-row>
        <table:table-row table:style-name="ro1">
          <table:table-cell table:style-name="ce14" office:value-type="string" calcext:value-type="string">
            <text:p>No.UA11</text:p>
          </table:table-cell>
          <table:table-cell table:style-name="ce14" office:value-type="string" calcext:value-type="string">
            <text:p>本質的根源 エッセンシャル</text:p>
          </table:table-cell>
          <table:table-cell table:style-name="ce19" office:value-type="string" calcext:value-type="string">
            <text:p>在RB之中，你誕生時作為根源的存在的特徵尤其明顯，被稱作“本質根源”。你身上有著其他RB身上無法發現的特異性的力量。由於你保持著更加高程度的起源性質，才能使用這些力量。</text:p>
            <text:p>你可以自由決定是否對此有自覺，總之你是有著更加本質的力量的RB。</text:p>
          </table:table-cell>
          <table:table-cell table:style-name="ce19" office:value-type="string" calcext:value-type="string">
            <text:p>只有取得一個《起源：●●》的角色可以取得這個D露易絲。</text:p>
            <text:p>你取得的《起源：●●》的最大等級+1，並可以選擇並不消耗經驗點取得一個本質的根源專用異能力，且必須取得滿足解說中的起源限制。</text:p>
            <text:p>可以消耗經驗點成長所選的異能或取得沒有起源限制的新異能。</text:p>
            <text:p>本質的根源的力量與你的起源息息相關。當你沒有受到自己取得的《起源：●●》時，你的所有判定的骰子-2個。</text:p>
          </table:table-cell>
          <table:table-cell table:style-name="ce16" office:value-type="string" calcext:value-type="string">
            <text:p>DF P30</text:p>
          </table:table-cell>
          <table:table-cell table:style-name="ce16" office:value-type="string" calcext:value-type="string">
            <text:p>RB專用</text:p>
          </table:table-cell>
          <table:table-cell table:style-name="ce3" table:number-columns-repeated="20"/>
          <table:table-cell table:number-columns-repeated="998"/>
        </table:table-row>
        <table:table-row table:style-name="ro1">
          <table:table-cell table:style-name="ce14" office:value-type="string" calcext:value-type="string">
            <text:p>No.UA12</text:p>
          </table:table-cell>
          <table:table-cell table:style-name="ce14" office:value-type="string" calcext:value-type="string">
            <text:p>幻影使 ミラージュメイカー</text:p>
          </table:table-cell>
          <table:table-cell table:style-name="ce19" office:value-type="string" calcext:value-type="string">
            <text:p>你是擅長操縱幻影的天使光環症候者。</text:p>
            <text:p>你眼中的世界隨時都可以被改寫成你想要的景色。光、暗都只是裝點世界這個校園的畫具。</text:p>
            <text:p>你生成的光學幻影十分精緻，無論怎麼仔細看都不遜色於實物。即使像實物一樣動起來，也不會讓人感到違和，識破不了幻象。</text:p>
            <text:p>迷失在實物與幻象的夾縫間的獵物，將會永遠被囚禁在其中。</text:p>
          </table:table-cell>
          <table:table-cell table:style-name="ce19" office:value-type="string" calcext:value-type="string">
            <text:p>只限症狀為【天使光環】的角色可取得。</text:p>
            <text:p>自動獲得異能【幻影擬餌】Lv1，視為天使光環異能力，可使用經驗提升等級。</text:p>
            <text:p>幻影擬餌</text:p>
            <text:p>最大等級：5</text:p>
            <text:p>時機：回應動作</text:p>
            <text:p>技能：症候</text:p>
            <text:p>難易度：對決</text:p>
            <text:p>對象：自身</text:p>
            <text:p>射程：至近</text:p>
            <text:p>侵蝕：4</text:p>
            <text:p>限制：D露易絲</text:p>
            <text:p>效果：組合的判定閃避成功時，對進行攻擊的角色造成[LV+2]點的HP傷害。</text:p>
          </table:table-cell>
          <table:table-cell table:style-name="ce16" office:value-type="string" calcext:value-type="string">
            <text:p>DF P30</text:p>
          </table:table-cell>
          <table:table-cell table:style-name="ce17" office:value-type="string" calcext:value-type="string">
            <text:p>天使光環專用</text:p>
          </table:table-cell>
          <table:table-cell table:style-name="ce3" table:number-columns-repeated="20"/>
          <table:table-cell table:number-columns-repeated="998"/>
        </table:table-row>
        <table:table-row table:style-name="ro1">
          <table:table-cell table:style-name="ce14" office:value-type="string" calcext:value-type="string">
            <text:p>No.UA13</text:p>
          </table:table-cell>
          <table:table-cell table:style-name="ce14" office:value-type="string" calcext:value-type="string">
            <text:p>星碎 コラブサー</text:p>
          </table:table-cell>
          <table:table-cell table:style-name="ce19" office:value-type="string" calcext:value-type="string">
            <text:p>你有著極為強力的力量，能夠壓縮物質、增幅質量。</text:p>
            <text:p>被壓縮到高密度的物體會因為無法承受自身的重力而崩潰，變為簡易的黑洞。這個能力使得你被稱作操縱毀滅的魔眼——“碎星”。</text:p>
            <text:p>“碎星”是有著究極的廣範圍破壞能力的超越者，是非常危險的存在。</text:p>
            <text:p>你自身也無法控制這個微型黑洞。當你的力量暴走時，可能地球會崩潰。</text:p>
            <text:p>某種意義上，你自己就是會行走的小型黑洞。</text:p>
            <text:p>當然，你也會被各種組織監視，無論敵我。</text:p>
            <text:p>作為超越者的強大性自不必說，如果你暴走，可能會變成廣範圍的破壞兵器。某種意義上，你是比戰術核心還要危險的兵器。</text:p>
          </table:table-cell>
          <table:table-cell table:style-name="ce19" office:value-type="string" calcext:value-type="string">
            <text:p>只限症狀為【重力魔眼】的角色可取得。</text:p>
            <text:p>在你進行攻擊時，每在主要動作的判定裡組合一個魔眼異能，攻擊力加3。使用的空手以外的武器，每個攻擊力+3。</text:p>
            <text:p>攻擊結束後，每組合一個異能或使用一個武器，失去1點HP。空手以外的武器會在主要階段結束時破壞。</text:p>
          </table:table-cell>
          <table:table-cell table:style-name="ce16" office:value-type="string" calcext:value-type="string">
            <text:p>DF P31</text:p>
          </table:table-cell>
          <table:table-cell table:style-name="ce17" office:value-type="string" calcext:value-type="string">
            <text:p>重力魔眼專用</text:p>
          </table:table-cell>
          <table:table-cell table:style-name="ce3" table:number-columns-repeated="20"/>
          <table:table-cell table:number-columns-repeated="998"/>
        </table:table-row>
        <table:table-row table:style-name="ro1">
          <table:table-cell table:style-name="ce14" office:value-type="string" calcext:value-type="string">
            <text:p>No.UA14</text:p>
          </table:table-cell>
          <table:table-cell table:style-name="ce14" office:value-type="string" calcext:value-type="string">
            <text:p>電子的魔犬 エレクトロハウンド</text:p>
          </table:table-cell>
          <table:table-cell table:style-name="ce19" office:value-type="string" calcext:value-type="string">
            <text:p>你是特化操作互聯網或電腦之間的網絡的雷擊黑犬症候持有者。</text:p>
            <text:p>你與電子空間的親和性非常之高，將自身的生物電流注入電腦，就能感受到如同將五感直接投影進電子空間一般的沉浸感。對你來說，需要物理連接的黑客相當於沒有開化的動物。</text:p>
            <text:p>你將自己的意識投影到電子空間，可以去到這個世界的任何地方。如果將意識接入人造衛星，可以監視世界的任何地方。此外，你可以訪問想要的任何知識。現在基本沒有不接入網絡的數據庫，幾乎不可能有情報絕對與外部隔離。</text:p>
          </table:table-cell>
          <table:table-cell table:style-name="ce19" office:value-type="string" calcext:value-type="string">
            <text:p>只限症狀為【雷擊黑犬】的角色可取得。</text:p>
            <text:p>你可以監視一切，即使在現實中行動也可以將部分意識接入網絡，如同千里眼一般觀測世界。</text:p>
            <text:p>你所有的判定骰子+4個。你可以使用主要動作問GM問題，GM可以拒絕回答。這個效果1劇本最多可以使用3次，拒絕時不計入次數。</text:p>
            <text:p>你也可以用主要動作讓一個機械或無人機無法戰鬥，這一行動會被記入使用次數。GM可以在無法聯網的情況下限制這一D露易絲的效果。</text:p>
          </table:table-cell>
          <table:table-cell table:style-name="ce16" office:value-type="string" calcext:value-type="string">
            <text:p>DF P31</text:p>
          </table:table-cell>
          <table:table-cell table:style-name="ce16" office:value-type="string" calcext:value-type="string">
            <text:p>雷擊黑犬專用</text:p>
          </table:table-cell>
          <table:table-cell table:style-name="ce3" table:number-columns-repeated="20"/>
          <table:table-cell table:number-columns-repeated="998"/>
        </table:table-row>
        <table:table-row table:style-name="ro1">
          <table:table-cell table:style-name="ce14" office:value-type="string" calcext:value-type="string">
            <text:p>No.UA15</text:p>
          </table:table-cell>
          <table:table-cell table:style-name="ce14" office:value-type="string" calcext:value-type="string">
            <text:p>赤之十字架 レッドシンククロス</text:p>
          </table:table-cell>
          <table:table-cell table:style-name="ce19" office:value-type="string" calcext:value-type="string">
            <text:p>你能操縱自己或擊倒的敵人的血、將其變為武器，如同鮮血的支配者。</text:p>
            <text:p>在你的背上，你擊倒的敵人的血會顯現成十字架的形狀。那既是為所有犧牲者立起的墓碑，也是揭露你罪行的斷罪之證。</text:p>
            <text:p>你是生來的掠奪者。不僅觸碰，只是接近其他人，你就會干涉到他們的血流。這相當於你的手中一直掌握著對他人的生殺予奪權。</text:p>
            <text:p>這十字架會不容分說地不斷質詢你的罪。你將會用這力量做什麼？</text:p>
          </table:table-cell>
          <table:table-cell table:style-name="ce19" office:value-type="string" calcext:value-type="string">
            <text:p>只限症狀為【鮮血真祖】的角色可取得。</text:p>
            <text:p>自動獲得異能【赤之十字架】Lv1，視為鮮血真祖異能力，可使用經驗提升等級。</text:p>
            <text:p>赤之十字架（red sin cross）</text:p>
            <text:p>最大等級：3</text:p>
            <text:p>時機：次要動作</text:p>
            <text:p>技能：-</text:p>
            <text:p>難易度：自動</text:p>
            <text:p>對象：自身</text:p>
            <text:p>射程：至近</text:p>
            <text:p>侵蝕：3</text:p>
            <text:p>限制：D露易絲</text:p>
            <text:p>次數：LV/劇本</text:p>
            <text:p>效果：在用鮮血真祖症候製作武器或改變空手數據時使用。這一場景中，使用製作武器進行的攻擊的暴擊-1（下限6）。</text:p>
          </table:table-cell>
          <table:table-cell table:style-name="ce16" office:value-type="string" calcext:value-type="string">
            <text:p>DF P32</text:p>
          </table:table-cell>
          <table:table-cell table:style-name="ce16" office:value-type="string" calcext:value-type="string">
            <text:p>鮮血真祖專用</text:p>
          </table:table-cell>
          <table:table-cell table:style-name="ce3" table:number-columns-repeated="20"/>
          <table:table-cell table:number-columns-repeated="998"/>
        </table:table-row>
        <table:table-row table:style-name="ro1">
          <table:table-cell table:style-name="ce14" office:value-type="string" calcext:value-type="string">
            <text:p>No.UA16</text:p>
          </table:table-cell>
          <table:table-cell table:style-name="ce14" office:value-type="string" calcext:value-type="string">
            <text:p>幻獸 ファントムビースト</text:p>
          </table:table-cell>
          <table:table-cell table:style-name="ce19" office:value-type="string" calcext:value-type="string">
            <text:p>變異魔獸能強化、變異自己的肉體。通過將肉體置換為熊、虎這樣強大的動物，有變異魔獸能力的人可以強化自己的力量。</text:p>
            <text:p>這時會出現一個單純的問題：他們的力量上限會是地球上存在的什麼生物？曾被稱作頂級掠食者的恐龍、支配古代海洋的巨鯊。它們的確是強大的生物，但超越者這種怪物的上限能夠被已知的動物定義嗎？</text:p>
            <text:p>答案是，被稱作幻獸的變異魔獸。</text:p>
            <text:p>他們的肉體可以變成假想的怪物，無論是否存在。在變異魔獸描繪能想像到的最強生物時，那怪物便會出現。</text:p>
          </table:table-cell>
          <table:table-cell table:style-name="ce19" office:value-type="string" calcext:value-type="string">
            <text:p>只限症狀為【變異魔獸】的角色可取得。</text:p>
            <text:p>自動獲得異能【幻想的魔獸】Lv1，視為變異魔獸異能力，可使用經驗提升等級。</text:p>
            <text:p>幻想的魔獸</text:p>
            <text:p>最大等級：3</text:p>
            <text:p>時機：次要動作</text:p>
            <text:p>技能：-</text:p>
            <text:p>難易度：自動</text:p>
            <text:p>對象：自身</text:p>
            <text:p>射程：至近</text:p>
            <text:p>侵蝕：3</text:p>
            <text:p>限制：D露易絲</text:p>
            <text:p>次數：3/劇本</text:p>
            <text:p>效果：使用時選擇一個【肉體】以外的能力值，在這一場景中，你可以用【肉體】代替所選的能力值進行判定。效果中，進行的判定的骰子+[LV+2]個。</text:p>
          </table:table-cell>
          <table:table-cell table:style-name="ce16" office:value-type="string" calcext:value-type="string">
            <text:p>DF P32</text:p>
          </table:table-cell>
          <table:table-cell table:style-name="ce16" office:value-type="string" calcext:value-type="string">
            <text:p>變異魔獸專用</text:p>
          </table:table-cell>
          <table:table-cell table:style-name="ce3" table:number-columns-repeated="20"/>
          <table:table-cell table:number-columns-repeated="998"/>
        </table:table-row>
        <table:table-row table:style-name="ro1">
          <table:table-cell table:style-name="ce14" office:value-type="string" calcext:value-type="string">
            <text:p>No.UA17</text:p>
          </table:table-cell>
          <table:table-cell table:style-name="ce14" office:value-type="string" calcext:value-type="string">
            <text:p>小世界 ミクロワールド</text:p>
          </table:table-cell>
          <table:table-cell table:style-name="ce19" office:value-type="string" calcext:value-type="string">
            <text:p>你能夠自由地改變自己的身體大小，善於控制肉體的尺寸。</text:p>
            <text:p>尤其是你可以把自己變得很小，進入只有幾釐米大的世界中。</text:p>
            <text:p>無論變得多小，你的力量都不會減弱。被壓縮的肌肉力量反倒會被增強，能跳到相當於身高數倍的高度、打飛體重相當於幾百個自己的目標。變小的時候，你的身體就像是有自我意識的子彈。</text:p>
            <text:p>而且巨大化有過於顯眼的劣勢。這個世界上大多數超越者都對外隱瞞自己的存在，過於顯眼會讓人無法忽視你。</text:p>
            <text:p>變小之後你的威脅程度反倒更高了。利用這種隱秘性，你可以活躍在諜報、暗殺之類的場合。</text:p>
            <text:p>變小，居然是件好事。</text:p>
          </table:table-cell>
          <table:table-cell table:style-name="ce19" office:value-type="string" calcext:value-type="string">
            <text:p>只限症狀為【流亡畸體】的角色可取得。</text:p>
            <text:p>你可以把自己的身體自由縮小、擴大。使用自動動作宣言後，可以在這一場景中將自己的肉體自由變小或變大，具體程度由GM決定。</text:p>
            <text:p>你熟知如何利用變化身體大小獲得好處的方法。變化大小期間你的判定骰子+5個，期間進行的攻擊無視對象的裝甲值。</text:p>
            <text:p>每次變化體型時你的侵蝕率+5（變回去不用消耗）。變化期間，你無法裝備防具。</text:p>
          </table:table-cell>
          <table:table-cell table:style-name="ce16" office:value-type="string" calcext:value-type="string">
            <text:p>DF P33</text:p>
          </table:table-cell>
          <table:table-cell table:style-name="ce16" office:value-type="string" calcext:value-type="string">
            <text:p>流亡畸體專用</text:p>
          </table:table-cell>
          <table:table-cell table:style-name="ce3" table:number-columns-repeated="20"/>
          <table:table-cell table:number-columns-repeated="998"/>
        </table:table-row>
        <table:table-row table:style-name="ro1">
          <table:table-cell table:style-name="ce14" office:value-type="string" calcext:value-type="string">
            <text:p>No.UA18</text:p>
          </table:table-cell>
          <table:table-cell table:style-name="ce14" office:value-type="string" calcext:value-type="string">
            <text:p>凪之領域 レルムオブサイレンス</text:p>
          </table:table-cell>
          <table:table-cell table:style-name="ce19" office:value-type="string" calcext:value-type="string">
            <text:p>你的世界充滿靜寂。沒有粗野的破壞或暴力，存在的只有靜寂。安靜的世界在此鋪開。那就是你的能力。</text:p>
            <text:p>被稱作“凪之領域”的能力的原理是聲音相消。發出與振動能互相抵消的振動，便能創造靜寂。</text:p>
            <text:p>你的能力可以抵消一切行動、攻擊、異能力。</text:p>
            <text:p>無論什麼人都無法在你支配的“凪之領域”中喧嘩。是的，沒有人能。</text:p>
          </table:table-cell>
          <table:table-cell table:style-name="ce19" office:value-type="string" calcext:value-type="string">
            <text:p>只限症狀為【疾速靈猿】的角色可取得。</text:p>
            <text:p>自動獲得異能【消音器】Lv1，視為疾速靈猿異能力，可使用經驗提升等級。</text:p>
            <text:p>消音器（noise canceler）</text:p>
            <text:p>最大等級：3</text:p>
            <text:p>時機：回應動作</text:p>
            <text:p>技能：RC</text:p>
            <text:p>難易度：對決</text:p>
            <text:p>對象：單體</text:p>
            <text:p>射程：視野</text:p>
            <text:p>侵蝕：4</text:p>
            <text:p>限制：D露易絲</text:p>
            <text:p>次數：LV/劇本</text:p>
            <text:p>效果：在對象進行主要動作的判定時，作為回應動作使用。對決勝利時對象的行動失敗。只有未行動時可以使用，使用後視為已行動。</text:p>
          </table:table-cell>
          <table:table-cell table:style-name="ce16" office:value-type="string" calcext:value-type="string">
            <text:p>DF P33</text:p>
          </table:table-cell>
          <table:table-cell table:style-name="ce16" office:value-type="string" calcext:value-type="string">
            <text:p>疾速靈猿專用</text:p>
          </table:table-cell>
          <table:table-cell table:style-name="ce3" table:number-columns-repeated="20"/>
          <table:table-cell table:number-columns-repeated="998"/>
        </table:table-row>
        <table:table-row table:style-name="ro1">
          <table:table-cell table:style-name="ce14" office:value-type="string" calcext:value-type="string">
            <text:p>No.UA19</text:p>
          </table:table-cell>
          <table:table-cell table:style-name="ce14" office:value-type="string" calcext:value-type="string">
            <text:p>城壁使 ウォールクラフター</text:p>
          </table:table-cell>
          <table:table-cell table:style-name="ce19" office:value-type="string" calcext:value-type="string">
            <text:p>你擅長在大範圍內創造出巨大的建築。</text:p>
            <text:p>自古以來，為了抵禦外敵入侵，人們花費悠久的歲月和大量的人力建造了許多城壁。所謂城壁，是劃定領域之物。區分敵我、阻礙敵人、保護我方。</text:p>
            <text:p>但仍然不夠。為了保護重要的東西，必須瞬間建造出固若金湯的防壁。</text:p>
            <text:p>許下這樣的願望之後，你得到了這一能力。移動的城塞、守護弱者的最後的希望。那就是你的城壁。</text:p>
          </table:table-cell>
          <table:table-cell table:style-name="ce19" office:value-type="string" calcext:value-type="string">
            <text:p>只限症狀為【煉金化形】的角色可取得。</text:p>
            <text:p>自動獲得異能【城壁使】Lv1，視為煉金化形異能力，可使用經驗提升等級。</text:p>
            <text:p>城壁使（wall crafter）</text:p>
            <text:p>最大等級：3</text:p>
            <text:p>時機：自動動作</text:p>
            <text:p>技能：-</text:p>
            <text:p>難易度：自動</text:p>
            <text:p>對象：自身</text:p>
            <text:p>射程：至近</text:p>
            <text:p>侵蝕：5</text:p>
            <text:p>限制：D露易絲</text:p>
            <text:p>次數：LV/劇本</text:p>
            <text:p>效果：格擋時使用。可以將你的格擋值沿用於與你接戰的任意角色身上，對象自身可以進行回應動作。格擋時由對象選擇使用哪一方的格擋值。</text:p>
          </table:table-cell>
          <table:table-cell table:style-name="ce16" office:value-type="string" calcext:value-type="string">
            <text:p>DF P34</text:p>
          </table:table-cell>
          <table:table-cell table:style-name="ce16" office:value-type="string" calcext:value-type="string">
            <text:p>煉金化形專用</text:p>
          </table:table-cell>
          <table:table-cell table:style-name="ce3" table:number-columns-repeated="20"/>
          <table:table-cell table:number-columns-repeated="998"/>
        </table:table-row>
        <table:table-row table:style-name="ro1">
          <table:table-cell table:style-name="ce14" office:value-type="string" calcext:value-type="string">
            <text:p>No.UA20</text:p>
          </table:table-cell>
          <table:table-cell table:style-name="ce14" office:value-type="string" calcext:value-type="string">
            <text:p>軍神 ストラテジスト</text:p>
          </table:table-cell>
          <table:table-cell table:style-name="ce19" office:value-type="string" calcext:value-type="string">
            <text:p>你是戰爭的天才。</text:p>
            <text:p>神腦演算被認為是有著所有才能的症候，但在其中沒有人的軍略比你更強。戰場是混沌的。參戰的人越多，越不可能預判到之後的發展。</text:p>
            <text:p>但你不同。</text:p>
            <text:p>你讀懂了古往今來全世界所有戰爭的記錄。你能夠感覺到所有將領與士兵的呼吸。不管怎樣的戰爭都不是偶然，一切都是戰術上的必然。</text:p>
            <text:p>你在尋找著。尋找需要你的軍才的地方。尋找渴求你的戰場。</text:p>
          </table:table-cell>
          <table:table-cell table:style-name="ce19" office:value-type="string" calcext:value-type="string">
            <text:p>只限症狀為【神腦演算】的角色可取得。</text:p>
            <text:p>自動獲得異能【勝利的軍才】Lv1，視為神腦演算異能力，可使用經驗提升等級。</text:p>
            <text:p>勝利的軍才</text:p>
            <text:p>最大等級：3</text:p>
            <text:p>時機：準備階段</text:p>
            <text:p>技能：-</text:p>
            <text:p>難易度：自動</text:p>
            <text:p>對象：場景（選擇）</text:p>
            <text:p>射程：視界</text:p>
            <text:p>侵蝕：8</text:p>
            <text:p>限制：D露易絲</text:p>
            <text:p>效果：對象的下一個主要動作的傷害骰子+（LV）D。不能以自己為對象。</text:p>
          </table:table-cell>
          <table:table-cell table:style-name="ce16" office:value-type="string" calcext:value-type="string">
            <text:p>DF P34</text:p>
          </table:table-cell>
          <table:table-cell table:style-name="ce16" office:value-type="string" calcext:value-type="string">
            <text:p>神腦演算專用</text:p>
          </table:table-cell>
          <table:table-cell table:style-name="ce3" table:number-columns-repeated="20"/>
          <table:table-cell table:number-columns-repeated="998"/>
        </table:table-row>
        <table:table-row table:style-name="ro1">
          <table:table-cell table:style-name="ce14" office:value-type="string" calcext:value-type="string">
            <text:p>No.UA21</text:p>
          </table:table-cell>
          <table:table-cell table:style-name="ce14" office:value-type="string" calcext:value-type="string">
            <text:p>編織命運之人 フェイトウィーバー</text:p>
          </table:table-cell>
          <table:table-cell table:style-name="ce19" office:value-type="string" calcext:value-type="string">
            <text:p>冥府領域能力者能夠將被稱作“因子”的物質依附在自身領域內的物質上，隨意操縱。</text:p>
            <text:p>在子彈上附加因子，扭曲彈道、讓自己不被擊中。由於這種能力，冥府領域可以說是操縱著幸運。</text:p>
            <text:p>但你的能力不是那種程度的小把戲。你的領域非常大，幾乎覆蓋全球。但相對地，你只能稍微操作事物。</text:p>
            <text:p>這已經足夠了。所有事物都互相聯繫著。一隻蝴蝶在海的對面振翅，便會引發龍捲風。</text:p>
            <text:p>你編織著操縱一切的命運之線。</text:p>
          </table:table-cell>
          <table:table-cell table:style-name="ce19" office:value-type="string" calcext:value-type="string">
            <text:p>只限症狀為【冥府領域】的角色可取得。</text:p>
            <text:p>自動獲得異能【宿命之線】Lv1，視為冥府領域異能力，可使用經驗提升等級。</text:p>
            <text:p>宿命之線</text:p>
            <text:p>最大等級：5</text:p>
            <text:p>時機：自動動作</text:p>
            <text:p>技能：-</text:p>
            <text:p>難易度：自動</text:p>
            <text:p>對象：單體</text:p>
            <text:p>射程：視界</text:p>
            <text:p>侵蝕：5</text:p>
            <text:p>限制：D露易絲</text:p>
            <text:p>次數：3/劇本</text:p>
            <text:p>效果：對象計算完達成值之後使用，達成值±（LV）D。不能以自己為對象。</text:p>
          </table:table-cell>
          <table:table-cell table:style-name="ce16" office:value-type="string" calcext:value-type="string">
            <text:p>DF P35</text:p>
          </table:table-cell>
          <table:table-cell table:style-name="ce16" office:value-type="string" calcext:value-type="string">
            <text:p>冥府領域專用</text:p>
          </table:table-cell>
          <table:table-cell table:style-name="ce3" table:number-columns-repeated="20"/>
          <table:table-cell table:number-columns-repeated="998"/>
        </table:table-row>
        <table:table-row table:style-name="ro1">
          <table:table-cell table:style-name="ce14" office:value-type="string" calcext:value-type="string">
            <text:p>No.UA22</text:p>
          </table:table-cell>
          <table:table-cell table:style-name="ce14" office:value-type="string" calcext:value-type="string">
            <text:p>地獄的霸者 ヘルウォーカー</text:p>
          </table:table-cell>
          <table:table-cell table:style-name="ce19" office:value-type="string" calcext:value-type="string">
            <text:p>你是能夠操縱遠超他人的熱量的冰炎奇蜥。</text:p>
            <text:p>你的異能力能夠將溫度調整到自然界不可能存在的數值。</text:p>
            <text:p>雖然絕對零度是熱力學溫度的下限，但那與你無關。背教者是能夠超越物理法則、扭曲現實的東西。</text:p>
            <text:p>科學家們對你的溫度操控能力表現出極大的興趣，但他們都如同泡沫一般破滅了。</text:p>
            <text:p>你所引發的現象超越了現實，你的火焰或寒冰如同神話和童話裡描繪的地獄那般。</text:p>
            <text:p>這超越現實的景象幾乎會讓人放棄科學的思考，人們將其看作是彼岸的世界。</text:p>
            <text:p>你正是地獄的霸者。</text:p>
            <text:p>超越一切溫度的極限，最強的冰炎奇蜥。</text:p>
          </table:table-cell>
          <table:table-cell table:style-name="ce19" office:value-type="string" calcext:value-type="string">
            <text:p>只限症狀為【冰炎奇蜥】的角色可取得。</text:p>
            <text:p>你可以使用比其他冰炎奇蜥能力者更大火力的異能力。</text:p>
            <text:p>你可以在開始前選擇最多3個冰炎奇蜥的異能力，所選擇的異能LV+2，可以超過上限。所選的異能的侵蝕各自+1。</text:p>
          </table:table-cell>
          <table:table-cell table:style-name="ce16" office:value-type="string" calcext:value-type="string">
            <text:p>DF P35</text:p>
          </table:table-cell>
          <table:table-cell table:style-name="ce16" office:value-type="string" calcext:value-type="string">
            <text:p>冰炎奇蜥專用</text:p>
          </table:table-cell>
          <table:table-cell table:style-name="ce3" table:number-columns-repeated="20"/>
          <table:table-cell table:number-columns-repeated="998"/>
        </table:table-row>
        <table:table-row table:style-name="ro1">
          <table:table-cell table:style-name="ce14" office:value-type="string" calcext:value-type="string">
            <text:p>No.UA23</text:p>
          </table:table-cell>
          <table:table-cell table:style-name="ce14" office:value-type="string" calcext:value-type="string">
            <text:p>幻惑之花 ヒュプノシスト</text:p>
          </table:table-cell>
          <table:table-cell table:style-name="ce19" office:value-type="string" calcext:value-type="string">
            <text:p>你善於精煉強力的幻覺物質。</text:p>
            <text:p>幻覺能力的泛用性極高。</text:p>
            <text:p>通過幻覺可以容易地擾亂他人的認知，因此你成為了優秀的潛入工作要員。</text:p>
            <text:p>此外還可以用這種能力來說服他人，因此你也是優秀的談判者。你可以在無意識中誘惑、魅惑他人，讓他人對你敞開心扉。</text:p>
            <text:p>這幻覺能力也能如同利刃一般作為切碎他人精神的武器。無論是怎樣強韌的鎧甲，在你的言語之刃面前都沒有意義。</text:p>
            <text:p>你的能力與其他症候的異能力不同，他人無法認知到其使用，這一點也是強大的武器。只要你想，你可以在日常中魅惑他人、讓他們做出有利於你的行動。</text:p>
            <text:p>只是稍微讓別人喜歡你一點，這個世界就一定會變得更容易活下去。</text:p>
            <text:p>所以你必須時刻注意。當濫用異能、隨意操縱他人時，你會被稱作怪物。</text:p>
          </table:table-cell>
          <table:table-cell table:style-name="ce19" office:value-type="string" calcext:value-type="string">
            <text:p>只限症狀為【幻象惑星】的角色可取得。</text:p>
            <text:p>選擇一個幻星異能，組合的判定達成+5。如果是攻擊，攻擊力+10。所選擇的異能侵蝕+2。</text:p>
          </table:table-cell>
          <table:table-cell table:style-name="ce16" office:value-type="string" calcext:value-type="string">
            <text:p>DF P36</text:p>
          </table:table-cell>
          <table:table-cell table:style-name="ce16" office:value-type="string" calcext:value-type="string">
            <text:p>幻象惑星專用</text:p>
          </table:table-cell>
          <table:table-cell table:style-name="ce3" table:number-columns-repeated="20"/>
          <table:table-cell table:number-columns-repeated="998"/>
        </table:table-row>
        <table:table-row table:style-name="ro1">
          <table:table-cell table:style-name="ce14" office:value-type="string" calcext:value-type="string">
            <text:p>No.UA24</text:p>
          </table:table-cell>
          <table:table-cell table:style-name="ce14" office:value-type="string" calcext:value-type="string">
            <text:p>特異變質體 アンノウンネクサス</text:p>
          </table:table-cell>
          <table:table-cell table:style-name="ce19" office:value-type="string" calcext:value-type="string">
            <text:p>你是更容易受到吸收的背教者影響的噬身影蛇超越者。</text:p>
            <text:p>眾所周知，噬身影蛇能夠吸收他人的背教者並獲得成長。一部分人將這一反應稱作進化。但進化原本必須要經過世代更替才能完成。</text:p>
            <text:p>但你不同。你吸收背教者病毒後的變化過於巨大，會變得和過去的自己不是同一存在。連你自己都會懷疑自身的連續性。</text:p>
            <text:p>所以你放棄了懷疑自己。如果背教者病毒希望進化，那麼你只要不斷給予食糧就好。</text:p>
            <text:p>昨天的你還是被稱作怪物的存在，明天或許就是被稱作神的存在。如同銜尾蛇一般，你的進化永不結束。</text:p>
          </table:table-cell>
          <table:table-cell table:style-name="ce19" office:value-type="string" calcext:value-type="string">
            <text:p>只限症狀為【噬身影蛇】的角色可取得。</text:p>
            <text:p>對超越者造成至少1點HP傷害時，這一場景中你的判定骰子+3個。在效果期間，如果又對超越者造成至少1點HP傷害，這一場景中你的判定暴擊值-1（下限5）。如果上述兩個效果期間又對超越者造成至少1點HP傷害，這一場景中你的所有異能LV+1，可以超過上限。</text:p>
            <text:p>但你不能使用“對超越者造成至少1點HP傷害”時使用的影蛇異能。</text:p>
          </table:table-cell>
          <table:table-cell table:style-name="ce16" office:value-type="string" calcext:value-type="string">
            <text:p>DF P36</text:p>
          </table:table-cell>
          <table:table-cell table:style-name="ce16" office:value-type="string" calcext:value-type="string">
            <text:p>噬身影蛇專用</text:p>
          </table:table-cell>
          <table:table-cell table:style-name="ce3" table:number-columns-repeated="20"/>
          <table:table-cell table:number-columns-repeated="998"/>
        </table:table-row>
        <table:table-row table:style-name="ro1">
          <table:table-cell table:style-name="ce14" office:value-type="string" calcext:value-type="string">
            <text:p>No.UA25</text:p>
          </table:table-cell>
          <table:table-cell table:style-name="ce14" office:value-type="string" calcext:value-type="string">
            <text:p>最初的魔劍 ファーストバッド</text:p>
          </table:table-cell>
          <table:table-cell table:style-name="ce19" office:value-type="string" calcext:value-type="string">
            <text:p>你是降臨事件中產生的最初的長青魔劍超越者。</text:p>
            <text:p>事件當晚，之後被稱作“湮滅者”的少女攻擊了你，你陷入了瀕死狀態。“計劃者”都築京香將你帶出了死亡的深淵，這時你覺醒了新的力量。</text:p>
            <text:p>你體內的背教者發生了不可逆轉的變化，成為了偽神天鎖的天敵——長青魔劍的超越者。那便是你背負上作為傷戮——謀劃大量滅絕人類的ad背教者——的對抗者，不斷戰鬥的宿命的瞬間。</text:p>
            <text:p>與傷戮的戰鬥比起之前要更加激烈，過於強大的魔劍之力也會對你的肉體造成負擔。即使這樣，你也會手握魔劍。為了守護世界、守護日常。</text:p>
            <text:p/>
          </table:table-cell>
          <table:table-cell table:style-name="ce19" office:value-type="string" calcext:value-type="string">
            <text:p>只限症狀為【長青魔劍】的角色可取得。</text:p>
            <text:p>裝備[類別：元型]的道具時，你進行的攻擊傷害+1d10。如果對象是天鎖，傷害再+10。如果自己的範圍攻擊對象包含天鎖，只對天鎖有效。</text:p>
            <text:p>裝備元型時，你每次進行攻擊都會失去5點HP。</text:p>
          </table:table-cell>
          <table:table-cell table:style-name="ce16" office:value-type="string" calcext:value-type="string">
            <text:p>DF P37</text:p>
          </table:table-cell>
          <table:table-cell table:style-name="ce16" office:value-type="string" calcext:value-type="string">
            <text:p>長青魔劍專用</text:p>
          </table:table-cell>
          <table:table-cell table:style-name="ce3" table:number-columns-repeated="20"/>
          <table:table-cell table:number-columns-repeated="998"/>
        </table:table-row>
        <table:table-row table:style-name="ro1">
          <table:table-cell table:style-name="ce14" office:value-type="string" calcext:value-type="string">
            <text:p>No.UA26</text:p>
          </table:table-cell>
          <table:table-cell table:style-name="ce14" office:value-type="string" calcext:value-type="string">
            <text:p>異形之劍 バスター ド</text:p>
          </table:table-cell>
          <table:table-cell table:style-name="ce19" office:value-type="string" calcext:value-type="string">
            <text:p>你持有的長青魔劍的力量能夠與你其他的症候的力量融合。</text:p>
            <text:p>如果是冰炎奇蜥，你的元型會纏繞著冷氣或者火焰；如果是變異魔獸，會有著角與鉤爪；如果是疾速靈猿，能夠將音波作為子彈射出。這種特殊的武器可以作為元型使用。</text:p>
          </table:table-cell>
          <table:table-cell table:style-name="ce19" office:value-type="string" calcext:value-type="string">
            <text:p>只限症狀為【長青魔劍】的角色可取得。</text:p>
            <text:p>取得該D-lois時，選擇一個《弑神之刃》以外，你能夠取得的「製作異能道具」異能，你免費取得1級所選異能。但是，無法選擇「時機：常駐」的異能。取得的異能可以照常消費經驗值成長。如果選擇了使用異能時才選擇異能道具的異能，僅能指定其中一個道具。</text:p>
            <text:p>使用所選異能做成的武器視為《弑神之刃》的元型，LV為（異能LV+弑神之刃LV）。</text:p>
            <text:p>所選的異能可以與“只能與《弑神之刃》組合”的異能組合，其他效果同樣可以適用。如果《弑神之刃》侵蝕+n，視為所選異能的侵蝕+n。</text:p>
            <text:p>你可以取得《弑神之刃》，但無法使用，也只能用所選的異能製作、裝備類別為元型的道具。</text:p>
          </table:table-cell>
          <table:table-cell table:style-name="ce16" office:value-type="string" calcext:value-type="string">
            <text:p>DF P37</text:p>
          </table:table-cell>
          <table:table-cell table:style-name="ce16" office:value-type="string" calcext:value-type="string">
            <text:p>長青魔劍專用</text:p>
          </table:table-cell>
          <table:table-cell table:style-name="ce3" table:number-columns-repeated="20"/>
          <table:table-cell table:number-columns-repeated="998"/>
        </table:table-row>
        <table:table-row table:style-name="ro1">
          <table:table-cell table:style-name="ce14" office:value-type="string" calcext:value-type="string">
            <text:p>No.RW01</text:p>
          </table:table-cell>
          <table:table-cell table:style-name="ce14" office:value-type="string" calcext:value-type="string">
            <text:p>英雄殿堂 レジェンド</text:p>
          </table:table-cell>
          <table:table-cell table:style-name="ce17" office:value-type="string" calcext:value-type="string">
            <text:p>你曾經獲得過那個傳說中數年才會誕生一次的英雄等級：LG。</text:p>
            <text:p/>
            <text:p>LG等級是一個充滿謎團的等級。</text:p>
            <text:p/>
            <text:p>所謂數年才誕生一次，似乎只是因為審查標準極為嚴格；據說過去也曾出現過同時存在多名LG的情況。而且它似乎也不是單純頒給排行榜最上位者的稱號。</text:p>
            <text:p/>
            <text:p>無論如何，你被選為那個傳說的象徵。街上的人們會將你視為希望的化身而讚頌。</text:p>
          </table:table-cell>
          <table:table-cell table:style-name="ce17" office:value-type="string" calcext:value-type="string">
            <text:p>此D-lois只能在「舞臺：背教者戰爭」中取得。</text:p>
            <text:p/>
            <text:p>你獲得一項獨特道具，分類：LG。資料如下。你無法再取得其他「分類：～」的獨特道具。</text:p>
            <text:p>分類：LG</text:p>
            <text:p>種類：其他</text:p>
            <text:p>必要經驗值：不可</text:p>
            <text:p>解說：象徵你曾在英雄排行榜中獲得榮耀殿堂——LG等級。</text:p>
            <text:p>取得時，選擇你已取得的一個異能。該異能的侵蝕值可變更為10。</text:p>
            <text:p>若該異能可多次使用，則將其侵蝕值變更為10的效果在1個劇本中僅能使用1次。</text:p>
          </table:table-cell>
          <table:table-cell table:style-name="ce16" office:value-type="string" calcext:value-type="string">
            <text:p>CE P46</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RW02</text:p>
          </table:table-cell>
          <table:table-cell table:style-name="ce14" office:value-type="string" calcext:value-type="string">
            <text:p>監察官 ウォッチャー</text:p>
          </table:table-cell>
          <table:table-cell table:style-name="ce17" office:value-type="string" calcext:value-type="string">
            <text:p>你是從UGN被派遣而來的監察官，負責監督政府登記在案的英雄。</text:p>
            <text:p/>
            <text:p>你的工作是監視英雄們的實力、活躍情況，以及任務中的言行舉止。</text:p>
            <text:p/>
            <text:p>若英雄行為惡劣，甚至可能取消其認證資格。</text:p>
            <text:p/>
            <text:p>有些英雄對監察官抱持著明顯的負面情緒。正因如此，監察官必須具備足以與那些個性古怪、各有毛病的英雄正面衝突，並在過程中建立信賴關係的能力。</text:p>
          </table:table-cell>
          <table:table-cell table:style-name="ce17" office:value-type="string" calcext:value-type="string">
            <text:p>此D-lois只能在「舞臺：背教者戰爭」中取得。</text:p>
            <text:p/>
            <text:p>你比任何人都更深入掌握英雄們的實力。基於立場，你有時也會負責協調多名英雄之間的合作。</text:p>
            <text:p>於先攻階段中使用。選擇場景中任意角色（可複數），其下一次進行的主要動作判定的暴擊值-1（下限值5）。此效果不適用於你自身。</text:p>
            <text:p>每個劇本限使用1次。</text:p>
          </table:table-cell>
          <table:table-cell table:style-name="ce16" office:value-type="string" calcext:value-type="string">
            <text:p>CE P47</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RW03</text:p>
          </table:table-cell>
          <table:table-cell table:style-name="ce14" office:value-type="string" calcext:value-type="string">
            <text:p>鋼鐵競技者 アイアンリーガー</text:p>
          </table:table-cell>
          <table:table-cell table:style-name="ce17" office:value-type="string" calcext:value-type="string">
            <text:p>超越者英雄的工作不僅僅是討伐惡人。由這些鋼鐵競技者組成的職業運動聯盟，正在全世界展開。</text:p>
            <text:p/>
            <text:p>字面意義上突破人類極限的運動員們，其活躍讓全世界無論普通人還是超越者都為之沸騰。</text:p>
            <text:p/>
            <text:p>你是那個職業聯盟中的一名選手。對你而言，背教者之力不僅屬於英雄，更屬於神聖的運動競技。</text:p>
            <text:p/>
            <text:p>你曾在某項運動中締造傳說級的偉業。許多人都記得你的名字。</text:p>
          </table:table-cell>
          <table:table-cell table:style-name="ce17" office:value-type="string" calcext:value-type="string">
            <text:p>此D-lois只能在「舞臺：背教者戰爭」中取得。</text:p>
            <text:p/>
            <text:p>你擁有卓越的身體或精神能力。那份潛力在所有超越者之中亦屬佼佼者。</text:p>
            <text:p>取得此D-lois時，指定一項能力值。在使用該能力值進行判定（可包含技能判定）後立即使用。該判定的達成值+1D。</text:p>
            <text:p>此效果每個劇本可使用3次。同一次判定可多次使用，效果可累積。</text:p>
          </table:table-cell>
          <table:table-cell table:style-name="ce16" office:value-type="string" calcext:value-type="string">
            <text:p>CE P47</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RW04</text:p>
          </table:table-cell>
          <table:table-cell table:style-name="ce14" office:value-type="string" calcext:value-type="string">
            <text:p>不列序號 ブラックアウト</text:p>
          </table:table-cell>
          <table:table-cell table:style-name="ce17" office:value-type="string" calcext:value-type="string">
            <text:p>你的力量充滿謎團。因此，政府決定不將你列為正式登記的英雄。未知之處太多，可能會引發一般市民的不安。</text:p>
            <text:p/>
            <text:p>因此，你的代號不會被記錄在排行榜上。不過，你的英雄活動仍然勉強獲得承認。</text:p>
            <text:p/>
            <text:p>雖然沒有知名度與名聲，但你的實力並不遜於一流英雄，甚至有人認為足以匹敵頂尖英雄。</text:p>
            <text:p/>
            <text:p>無論如何，就算沒有名聲，身為英雄該做的事也不會改變——對吧？</text:p>
          </table:table-cell>
          <table:table-cell table:style-name="ce17" office:value-type="string" calcext:value-type="string">
            <text:p>此D-lois只能在「舞臺：背教者戰爭」中取得。</text:p>
            <text:p/>
            <text:p>你獲得一項獨特道具，分類：黑幕。資料如下。你不能再取得其他「分類：～」的獨特道具。</text:p>
            <text:p>分類：黑幕</text:p>
            <text:p>種類：其他</text:p>
            <text:p>必要經驗值：不可</text:p>
            <text:p>解說：你的存在並未對一般大眾公開。</text:p>
            <text:p>於主要動作判定前使用。將該判定中組合的一個異能LV+3後計算效果，且可突破原本上限。但此效果不會改變使用次數。</text:p>
            <text:p>此外，在該主要動作結束後，直到該回合結束為止，你的所有判定骰數-5。</text:p>
            <text:p>此效果每個劇本限使用1次。</text:p>
          </table:table-cell>
          <table:table-cell table:style-name="ce16" office:value-type="string" calcext:value-type="string">
            <text:p>CE P48</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RW05</text:p>
          </table:table-cell>
          <table:table-cell table:style-name="ce14" office:value-type="string" calcext:value-type="string">
            <text:p>銀河的歌聲 アイドルヒーロー</text:p>
          </table:table-cell>
          <table:table-cell table:style-name="ce17" office:value-type="string" calcext:value-type="string">
            <text:p>英雄是一門人氣事業。本來英雄是守護人們的存在，但隨著排行榜這種娛樂性要素的加入，來自粉絲的人氣變得極為重要。</text:p>
            <text:p/>
            <text:p>於是，被稱為「偶像英雄」的超越者誕生了。</text:p>
            <text:p/>
            <text:p>他們一邊從事英雄活動，一邊進行藝能活動，迅速躍升至排行榜上位。他們的存在甚至可說是一種文化。</text:p>
            <text:p/>
            <text:p>人們從偶像們的活動中獲得生活的動力。你也是以光芒照耀世界的一人。</text:p>
          </table:table-cell>
          <table:table-cell table:style-name="ce17" office:value-type="string" calcext:value-type="string">
            <text:p>此D-lois只能在「舞臺：背教者戰爭」中取得。</text:p>
            <text:p/>
            <text:p>在場景中，除你以外的任意角色擲判定骰後立即使用。</text:p>
            <text:p>將該判定的一顆骰值改為10。</text:p>
            <text:p>此效果每次判定限使用1次，每個劇本限使用2次。</text:p>
            <text:p>不過，基於你的立場，你不能在眾人面前對需要英雄的人視而不見。若你捨棄了需要英雄的人，你的侵蝕值+3。若是去呼叫支援、取必要道具等情況則可不增加。詳細由GM判定。</text:p>
          </table:table-cell>
          <table:table-cell table:style-name="ce16" office:value-type="string" calcext:value-type="string">
            <text:p>CE P48</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RW06</text:p>
          </table:table-cell>
          <table:table-cell table:style-name="ce14" office:value-type="string" calcext:value-type="string">
            <text:p>背叛的正義 エクズィラン</text:p>
          </table:table-cell>
          <table:table-cell table:style-name="ce17" office:value-type="string" calcext:value-type="string">
            <text:p>你曾經是反派。也許有無可奈何的理由，也可能只是沉醉於暴力。</text:p>
            <text:p/>
            <text:p>但如今不同了。現在的你是獵殺反派的一方。或許你已悔改成為英雄，或許只是為了復仇與憎恨而行動。從反派改過自新者，被稱為「前反派（Ex-Villain）」。</text:p>
            <text:p/>
            <text:p>多數情況下，前反派會成為反派們鄙視與制裁的對象，被視為無法貫徹反派之道的懦弱者。</text:p>
            <text:p/>
            <text:p>因此，UGN積極保護前反派。有時是為了他們掌握的情報，但更多時候，是基於「英雄不該討伐試圖贖罪之惡」的理念。</text:p>
          </table:table-cell>
          <table:table-cell table:style-name="ce17" office:value-type="string" calcext:value-type="string">
            <text:p>此D-lois只能在「舞臺：背教者戰爭」中取得。</text:p>
            <text:p/>
            <text:p>你可以從「前反派專用道具」中選擇1項，不需消耗經驗點即可常備化。透過此D-lois取得的道具，原則上只有你能使用或裝備，他人無法使用或受其效果。此外，你也可以支付經驗點常備其他前反派專用道具。</text:p>
            <text:p>取得此D-lois時，你的侵蝕率基本值+5。</text:p>
          </table:table-cell>
          <table:table-cell table:style-name="ce16" office:value-type="string" calcext:value-type="string">
            <text:p>CE P49</text:p>
          </table:table-cell>
          <table:table-cell table:style-name="ce16"/>
          <table:table-cell table:style-name="ce3" table:number-columns-repeated="20"/>
          <table:table-cell table:number-columns-repeated="998"/>
        </table:table-row>
        <table:table-row table:style-name="ro1">
          <table:table-cell table:style-name="ce14" office:value-type="string" calcext:value-type="string">
            <text:p>No.RW07</text:p>
          </table:table-cell>
          <table:table-cell table:style-name="ce14" office:value-type="string" calcext:value-type="string">
            <text:p>繼承種 ヒーローズエア</text:p>
          </table:table-cell>
          <table:table-cell table:style-name="ce17" office:value-type="string" calcext:value-type="string">
            <text:p>那種背教者病毒擁有神秘的特性。</text:p>
            <text:p/>
            <text:p>它能在人與人之間轉移。從原本的超越者傳承到下一任宿主，幾乎所有力量都會被繼承。</text:p>
            <text:p/>
            <text:p>因此被稱為「繼承種」。</text:p>
            <text:p/>
            <text:p>但被傳承的不只是力量。歷代宿主都會選擇合適的繼承者，將力量交給擁有正確之心的人。</text:p>
            <text:p/>
            <text:p>交給能守護世界、守護他人的人。</text:p>
          </table:table-cell>
          <table:table-cell table:style-name="ce17" office:value-type="string" calcext:value-type="string">
            <text:p>此D-lois只能在「舞臺：背教者戰爭」中取得。</text:p>
            <text:p/>
            <text:p>你以1級取得【Might for Someone】。不需消耗經驗點，且不受血統影響。</text:p>
            <text:p>Might for Someone</text:p>
            <text:p>最大等級：1 </text:p>
            <text:p>時機：先攻階段</text:p>
            <text:p>技能：－ </text:p>
            <text:p>難度：自動成功</text:p>
            <text:p>對象：自身 </text:p>
            <text:p>射程：至近</text:p>
            <text:p>侵蝕值：1D10 </text:p>
            <text:p>限制：D-lois</text:p>
            <text:p>次數：1/劇本</text:p>
            <text:p>效果：思念某人的心，讓身體再次動起來。</text:p>
            <text:p>不可與其他異能組合。你立即進行一次主要動作。即使已行動過也可使用，且若未行動過，使用後仍不視為已行動。</text:p>
          </table:table-cell>
          <table:table-cell table:style-name="ce16" office:value-type="string" calcext:value-type="string">
            <text:p>CE P49</text:p>
          </table:table-cell>
          <table:table-cell table:style-name="ce16"/>
          <table:table-cell table:style-name="ce3" table:number-columns-repeated="20"/>
          <table:table-cell table:number-columns-repeated="998"/>
        </table:table-row>
        <table:table-row table:style-name="ro2" table:number-rows-repeated="867">
          <table:table-cell table:style-name="ce16" table:number-columns-repeated="6"/>
          <table:table-cell table:style-name="ce3" table:number-columns-repeated="20"/>
          <table:table-cell table:number-columns-repeated="998"/>
        </table:table-row>
        <table:table-row table:style-name="ro4" table:number-rows-repeated="1047539">
          <table:table-cell table:number-columns-repeated="1024"/>
        </table:table-row>
        <table:table-row table:style-name="ro4">
          <table:table-cell table:number-columns-repeated="1024"/>
        </table:table-row>
      </table:table>
      <table:table table:name="HR追加D-Lois" table:style-name="ta3">
        <table:table-column table:style-name="co11" table:default-cell-style-name="Default"/>
        <table:table-column table:style-name="co3" table:default-cell-style-name="Default"/>
        <table:table-column table:style-name="co12" table:default-cell-style-name="Default"/>
        <table:table-column table:style-name="co13" table:default-cell-style-name="Default"/>
        <table:table-column table:style-name="co3" table:number-columns-repeated="4" table:default-cell-style-name="Default"/>
        <table:table-column table:style-name="co12" table:default-cell-style-name="Default"/>
        <table:table-column table:style-name="co3" table:number-columns-repeated="3" table:default-cell-style-name="Default"/>
        <table:table-column table:style-name="co14" table:default-cell-style-name="Default"/>
        <table:table-column table:style-name="co3" table:number-columns-repeated="13" table:default-cell-style-name="Default"/>
        <table:table-column table:style-name="co4" table:number-columns-repeated="998" table:default-cell-style-name="Default"/>
        <table:table-row table:style-name="ro5">
          <table:table-cell table:style-name="ce21" table:number-columns-repeated="26"/>
          <table:table-cell table:number-columns-repeated="998"/>
        </table:table-row>
        <table:table-row table:style-name="ro6">
          <table:table-cell table:style-name="ce21"/>
          <table:table-cell table:style-name="ce22" office:value-type="string" calcext:value-type="string">
            <text:p>編號</text:p>
          </table:table-cell>
          <table:table-cell table:style-name="ce26" office:value-type="string" calcext:value-type="string">
            <text:p>名稱</text:p>
          </table:table-cell>
          <table:table-cell table:style-name="ce22" office:value-type="string" calcext:value-type="string">
            <text:p>效果</text:p>
          </table:table-cell>
          <table:table-cell table:style-name="ce35" office:value-type="string" calcext:value-type="string" table:number-columns-spanned="5" table:number-rows-spanned="1">
            <text:p>通常效果</text:p>
          </table:table-cell>
          <table:covered-table-cell table:number-columns-repeated="3" table:style-name="ce40"/>
          <table:covered-table-cell table:style-name="ce44"/>
          <table:table-cell table:style-name="ce45" office:value-type="string" calcext:value-type="string" table:number-columns-spanned="4" table:number-rows-spanned="1">
            <text:p>強化效果</text:p>
          </table:table-cell>
          <table:covered-table-cell table:number-columns-repeated="2" table:style-name="ce40"/>
          <table:covered-table-cell table:style-name="ce48"/>
          <table:table-cell table:style-name="ce21" table:number-columns-repeated="13"/>
          <table:table-cell table:number-columns-repeated="998"/>
        </table:table-row>
        <table:table-row table:style-name="ro1">
          <table:table-cell table:style-name="ce21"/>
          <table:table-cell table:style-name="ce23" office:value-type="string" calcext:value-type="string">
            <text:p>No.HR01</text:p>
          </table:table-cell>
          <table:table-cell table:style-name="ce27" office:value-type="string" calcext:value-type="string">
            <text:p>左右手</text:p>
          </table:table-cell>
          <table:table-cell table:style-name="ce31" office:value-type="string" calcext:value-type="string">
            <text:p>REC：霧穀雄吾</text:p>
          </table:table-cell>
          <table:table-cell table:style-name="ce36" office:value-type="string" calcext:value-type="string" table:number-columns-spanned="5" table:number-rows-spanned="1">
            <text:p>於你進行任意判定前使用。此次判定以所使用的【能力值】為10，【技能】等級為5替代你自身的能力值和技能等級進行判定，此次判定的暴擊值為9。但是，你不能在這次判定中使用異能。</text:p>
            <text:p>該個能力實質是由UGN作為組織提供的後援，你仍會因為侵蝕率而增加骰子數，也可以將露易絲泰特斯化來增加骰子數與達成值，或者是減少暴擊值。</text:p>
            <text:p>這個效果一個劇本中只能使用一次</text:p>
          </table:table-cell>
          <table:covered-table-cell table:number-columns-repeated="4" table:style-name="ce41"/>
          <table:table-cell table:style-name="ce46" office:value-type="string" calcext:value-type="string" table:number-columns-spanned="4" table:number-rows-spanned="1">
            <text:p>將「通常效果」的使用次數限制變更為「1個劇本中可以使用3次」。</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02</text:p>
          </table:table-cell>
          <table:table-cell table:style-name="ce28" office:value-type="string" calcext:value-type="string">
            <text:p>深淵的王牌</text:p>
          </table:table-cell>
          <table:table-cell table:style-name="ce32" office:value-type="string" calcext:value-type="string">
            <text:p>REC：霧穀雄吾</text:p>
          </table:table-cell>
          <table:table-cell table:style-name="ce37" office:value-type="string" calcext:value-type="string" table:number-columns-spanned="5" table:number-rows-spanned="1">
            <text:p>你作為UGN日本支部的，不，是霧穀雄吾個人的王牌，擁有極其優秀的能力。</text:p>
            <text:p>於你進行判定擲骰之後使用。將本次判定中一個骰子的結果變更為10。這個效果在你進行判定的途中也可以使用。使用了該效果的判定結束時，你的侵蝕率將會上升3點。該效果每次判定中只能使用一次，一個劇本中可以使用一次。</text:p>
          </table:table-cell>
          <table:covered-table-cell table:number-columns-repeated="4" table:style-name="ce42"/>
          <table:table-cell table:style-name="ce46" office:value-type="string" calcext:value-type="string" table:number-columns-spanned="4" table:number-rows-spanned="1">
            <text:p>將「通常效果」的使用次數限制變更為「1個劇本中可以使用3次」。</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03</text:p>
          </table:table-cell>
          <table:table-cell table:style-name="ce28" office:value-type="string" calcext:value-type="string">
            <text:p>遺產之器</text:p>
          </table:table-cell>
          <table:table-cell table:style-name="ce32" office:value-type="string" calcext:value-type="string">
            <text:p>REC：強羅瑠璃</text:p>
          </table:table-cell>
          <table:table-cell table:style-name="ce37" office:value-type="string" calcext:value-type="string" table:number-columns-spanned="5" table:number-rows-spanned="1">
            <text:p>取得該D-Lois時，你從遺產繼承者專用道具中選擇一個道具取得。</text:p>
            <text:p>該D-Lois將如同「遺產繼承者：榮光與勝利之槍」一般記述，將不同的遺產道具作為不同的D-Lois來分別處理。以該D-Lois取得的道具將視為常備化處理。</text:p>
            <text:p>以該D-Lois取得的道具，除了你以外不能使用或是裝備，即使持有也無法享受來自道具的效果。</text:p>
            <text:p>取得這個D-Lois時，你的侵蝕率基本值+5。GM也可以配合劇本設計原創的遺產繼承者專用道具</text:p>
          </table:table-cell>
          <table:covered-table-cell table:number-columns-repeated="4" table:style-name="ce42"/>
          <table:table-cell table:style-name="ce46" office:value-type="string" calcext:value-type="string" table:number-columns-spanned="4" table:number-rows-spanned="1">
            <text:p>持有你以「通常效果」所取得的遺產期間，你進行的所有判定骰數+1D。</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04</text:p>
          </table:table-cell>
          <table:table-cell table:style-name="ce28" office:value-type="string" calcext:value-type="string">
            <text:p>封印者</text:p>
          </table:table-cell>
          <table:table-cell table:style-name="ce32" office:value-type="string" calcext:value-type="string">
            <text:p>REC：強羅瑠璃</text:p>
          </table:table-cell>
          <table:table-cell table:style-name="ce37" office:value-type="string" calcext:value-type="string" table:number-columns-spanned="5" table:number-rows-spanned="1">
            <text:p>你進行的攻擊的傷害增加1D10。若是攻擊的對象持有"遺產"，則額外再增加1D10的傷害（合計為2D10）。</text:p>
            <text:p>所謂遺產，是指「D-Lois：遺產繼承者」專用的道具，以及GM承認為遺產的物品等。</text:p>
            <text:p>但是，每當你進行攻擊時，你的侵蝕率都會上升2點。</text:p>
          </table:table-cell>
          <table:covered-table-cell table:number-columns-repeated="4" table:style-name="ce42"/>
          <table:table-cell table:style-name="ce46" office:value-type="string" calcext:value-type="string" table:number-columns-spanned="4" table:number-rows-spanned="1">
            <text:p>你所攻擊攻擊的對象持有"遺產"的情況下，增加的傷害在「通常效果」的基礎上額外再增加1D10（合計3D10）。</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05</text:p>
          </table:table-cell>
          <table:table-cell table:style-name="ce28" office:value-type="string" calcext:value-type="string">
            <text:p>代行人</text:p>
          </table:table-cell>
          <table:table-cell table:style-name="ce32" office:value-type="string" calcext:value-type="string">
            <text:p>REC：德蕾絲·布魯姆</text:p>
          </table:table-cell>
          <table:table-cell table:style-name="ce37" office:value-type="string" calcext:value-type="string" table:number-columns-spanned="5" table:number-rows-spanned="1">
            <text:p>可於先攻階段使用。以場景中登場的任意角色為對象，該對象於主要動作進行的判定骰數+3D。但是，你不能以自己作為對象。</text:p>
            <text:p>該個效果持續到回合結束。這個效果一個劇本中可以使用一次。</text:p>
            <text:p>另外，根據從德蕾絲·布魯姆那邊得到的許可權，你可以透過你的發言對UGN產生影響，具體能造成多大的影響由GM決定。</text:p>
          </table:table-cell>
          <table:covered-table-cell table:number-columns-repeated="4" table:style-name="ce42"/>
          <table:table-cell table:style-name="ce46" office:value-type="string" calcext:value-type="string" table:number-columns-spanned="4" table:number-rows-spanned="1">
            <text:p>「通常效果」的對象在主要動作進行的判定骰數額外增加2D（合計增加5D）</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06</text:p>
          </table:table-cell>
          <table:table-cell table:style-name="ce28" office:value-type="string" calcext:value-type="string">
            <text:p>罪之子</text:p>
          </table:table-cell>
          <table:table-cell table:style-name="ce32" office:value-type="string" calcext:value-type="string">
            <text:p>REC：德蕾絲·布魯姆</text:p>
          </table:table-cell>
          <table:table-cell table:style-name="ce37" office:value-type="string" calcext:value-type="string" table:number-columns-spanned="5" table:number-rows-spanned="1">
            <text:p>於你進行組合了異能的判定之前使用，此次判定所組合的所有異能等級+1，但是，這個效果不會增加異能的使用次數。</text:p>
            <text:p>使用了該效果的主要階段結束時，你的侵蝕率上升1D10</text:p>
            <text:p>這個效果一個劇本中可以使用一次。</text:p>
          </table:table-cell>
          <table:covered-table-cell table:number-columns-repeated="4" table:style-name="ce42"/>
          <table:table-cell table:style-name="ce46" office:value-type="string" calcext:value-type="string" table:number-columns-spanned="4" table:number-rows-spanned="1">
            <text:p>因「通常效果」而上升的侵蝕率從1D10變更為3點。</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07</text:p>
          </table:table-cell>
          <table:table-cell table:style-name="ce28" office:value-type="string" calcext:value-type="string">
            <text:p>戰友</text:p>
          </table:table-cell>
          <table:table-cell table:style-name="ce32" office:value-type="string" calcext:value-type="string">
            <text:p>REC：玉野樁</text:p>
          </table:table-cell>
          <table:table-cell table:style-name="ce37" office:value-type="string" calcext:value-type="string" table:number-columns-spanned="5" table:number-rows-spanned="1">
            <text:p>你進行的回歸檢定骰數+2D。也就是說，你會在回歸檢定時投擲「普通的Lois的個數+2」個骰子。</text:p>
            <text:p>但是請注意，這個D-Lois本身不能被視為「普通的Lois」。</text:p>
          </table:table-cell>
          <table:covered-table-cell table:number-columns-repeated="4" table:style-name="ce42"/>
          <table:table-cell table:style-name="ce46" office:value-type="string" calcext:value-type="string" table:number-columns-spanned="4" table:number-rows-spanned="1">
            <text:p>「通常效果」給予你的進行回歸檢定的骰數額外增加2D（合計+4D）</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08</text:p>
          </table:table-cell>
          <table:table-cell table:style-name="ce28" office:value-type="string" calcext:value-type="string">
            <text:p>蜘蛛之巢</text:p>
          </table:table-cell>
          <table:table-cell table:style-name="ce32" office:value-type="string" calcext:value-type="string">
            <text:p>REC：玉野樁</text:p>
          </table:table-cell>
          <table:table-cell table:style-name="ce37" office:value-type="string" calcext:value-type="string" table:number-columns-spanned="5" table:number-rows-spanned="1">
            <text:p>取得該D-Lois時，指定一項技能。該技能的等級+4。</text:p>
            <text:p>將因D-lois而提升前後的數值按照像是5(9)這樣的格式作分別記錄，使用技能判定時採用提升後的後者，但是成長技能所需的經驗則由提升前的前者決定。</text:p>
            <text:p>取得這個D-Lois的話，你的侵蝕率基本值+2。</text:p>
          </table:table-cell>
          <table:covered-table-cell table:number-columns-repeated="4" table:style-name="ce42"/>
          <table:table-cell table:style-name="ce46" office:value-type="string" calcext:value-type="string" table:number-columns-spanned="4" table:number-rows-spanned="1">
            <text:p>於使用「通常效果」所指定的技能進行的判定前使用。此次判定的達成值+4。這個效果一個劇本可以使用一次。</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09</text:p>
          </table:table-cell>
          <table:table-cell table:style-name="ce28" office:value-type="string" calcext:value-type="string">
            <text:p>惡運</text:p>
          </table:table-cell>
          <table:table-cell table:style-name="ce32" office:value-type="string" calcext:value-type="string">
            <text:p>REC：藥王寺結希</text:p>
          </table:table-cell>
          <table:table-cell table:style-name="ce37" office:value-type="string" calcext:value-type="string" table:number-columns-spanned="5" table:number-rows-spanned="1">
            <text:p>于你即將受到傷害時使用，你（預定）受到的傷害-5D10，這個效果一個劇本中可以使用三次</text:p>
          </table:table-cell>
          <table:covered-table-cell table:number-columns-repeated="4" table:style-name="ce42"/>
          <table:table-cell table:style-name="ce46" office:value-type="string" calcext:value-type="string" table:number-columns-spanned="4" table:number-rows-spanned="1">
            <text:p>「通常效果」可以在一次傷害結算中多次使用，此時，效果將會被迭加。</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10</text:p>
          </table:table-cell>
          <table:table-cell table:style-name="ce28" office:value-type="string" calcext:value-type="string">
            <text:p>同一存在</text:p>
          </table:table-cell>
          <table:table-cell table:style-name="ce32" office:value-type="string" calcext:value-type="string">
            <text:p>REC：藥王寺結希</text:p>
          </table:table-cell>
          <table:table-cell table:style-name="ce37" office:value-type="string" calcext:value-type="string" table:number-columns-spanned="5" table:number-rows-spanned="1">
            <text:p>從你取得的症候以外的症候之中選擇一個異能，以Lv1的狀態取得，取得這個異能不需要經驗點。但是，無法通過這個D-Lois來取得「限制：—」以外的異能以及敵人異能。</text:p>
            <text:p>以該效果取得的「時機：常駐」以外的異能，其侵蝕值+2；若是取得「時機：常駐」的異能，則你的侵蝕率基本值+3。你可以使用經驗來成長以該D-Lois取得的異能。</text:p>
            <text:p>此外，以該D-Lois取得的異能，其等級上限為「異能的最大等級-1」（至少為1），這個等級上限不會受到你的血統影響</text:p>
          </table:table-cell>
          <table:covered-table-cell table:number-columns-repeated="4" table:style-name="ce42"/>
          <table:table-cell table:style-name="ce46" office:value-type="string" calcext:value-type="string" table:number-columns-spanned="4" table:number-rows-spanned="1">
            <text:p>以「通常效果」取得的「時機：常駐」以外的異能的所增加的侵蝕值-1。</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11</text:p>
          </table:table-cell>
          <table:table-cell table:style-name="ce28" office:value-type="string" calcext:value-type="string">
            <text:p>懷刀</text:p>
          </table:table-cell>
          <table:table-cell table:style-name="ce32" office:value-type="string" calcext:value-type="string">
            <text:p>REC：亞修‧雷多利克</text:p>
          </table:table-cell>
          <table:table-cell table:style-name="ce37" office:value-type="string" calcext:value-type="string" table:number-columns-spanned="5" table:number-rows-spanned="1">
            <text:p>取得該D-Lois時，你的能力值上升三點，於遊戲開始前進行自由分配，可以全部分配給單個能力值，也可以分配給多個能力值</text:p>
            <text:p>分配前後的數值應以【肉體】5 (8)這樣的方式分別記錄，進行判定時，採用分配後的後者，而成長所需的經驗則參考分配前的前者。</text:p>
            <text:p>取得該D-Lois時，你的侵蝕率基本值+3</text:p>
          </table:table-cell>
          <table:covered-table-cell table:number-columns-repeated="4" table:style-name="ce42"/>
          <table:table-cell table:style-name="ce46" office:value-type="string" calcext:value-type="string" table:number-columns-spanned="4" table:number-rows-spanned="1">
            <text:p>以「通常效果」分配的能力值進行的判定，其骰數+2D</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12</text:p>
          </table:table-cell>
          <table:table-cell table:style-name="ce28" office:value-type="string" calcext:value-type="string">
            <text:p>諜報員</text:p>
          </table:table-cell>
          <table:table-cell table:style-name="ce32" office:value-type="string" calcext:value-type="string">
            <text:p>REC：亞修‧雷多利克</text:p>
          </table:table-cell>
          <table:table-cell table:style-name="ce37" office:value-type="string" calcext:value-type="string" table:number-columns-spanned="5" table:number-rows-spanned="1">
            <text:p>你的常備點+15。</text:p>
          </table:table-cell>
          <table:covered-table-cell table:number-columns-repeated="4" table:style-name="ce42"/>
          <table:table-cell table:style-name="ce46" office:value-type="string" calcext:value-type="string" table:number-columns-spanned="4" table:number-rows-spanned="1">
            <text:p>任何時候均可使用。你可以隱藏或是憑空捏造一個指定的資訊。效果對象不論是什麼資訊都可以。可以消除犯罪記錄，捏造某人的記憶，也可以是改變恐怖計畫的一部分。隱蔽資訊的具體結果或是影響由GM來決定。</text:p>
            <text:p>但首先你必須先通過目標值為20的【社會】判定以獲取你欲掩蓋/捏造之情報的真相，此時你每使用一點財產點都會使目標值+1.這個效果一個劇本中只能使用一次</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13</text:p>
          </table:table-cell>
          <table:table-cell table:style-name="ce29" office:value-type="string" calcext:value-type="string">
            <text:p>受喜愛者</text:p>
          </table:table-cell>
          <table:table-cell table:style-name="ce33" office:value-type="string" calcext:value-type="string">
            <text:p>REC：阿爾弗雷德·J·科多維爾</text:p>
          </table:table-cell>
          <table:table-cell table:style-name="ce37" office:value-type="string" calcext:value-type="string" table:number-columns-spanned="5" table:number-rows-spanned="1">
            <text:p>以你自己或是視野記憶體在的任意角色為對象。於對象進行傷害擲骰前使用，使此次傷害+3D10。</text:p>
            <text:p>這個效果一個劇本可以使用一次。</text:p>
          </table:table-cell>
          <table:covered-table-cell table:number-columns-repeated="4" table:style-name="ce42"/>
          <table:table-cell table:style-name="ce46" office:value-type="string" calcext:value-type="string" table:number-columns-spanned="4" table:number-rows-spanned="1">
            <text:p>使用「通常效果」所增加的傷害額外再增加2D10（合計+5D10）。</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14</text:p>
          </table:table-cell>
          <table:table-cell table:style-name="ce28" office:value-type="string" calcext:value-type="string">
            <text:p>原初之子</text:p>
          </table:table-cell>
          <table:table-cell table:style-name="ce33" office:value-type="string" calcext:value-type="string">
            <text:p>REC：阿爾弗雷德·J·科多維爾</text:p>
          </table:table-cell>
          <table:table-cell table:style-name="ce37" office:value-type="string" calcext:value-type="string" table:number-columns-spanned="5" table:number-rows-spanned="1">
            <text:p>從你取得的一般異能以外的異能中選擇兩個。組合了全部所選異能的判定骰數+2D，組合的攻擊的攻擊力+4</text:p>
            <text:p>若是只有一個異能在組合之中，則以上的增益都不會產生效果。另外，這個增益只會生效一次而非對應兩個異能分別生效</text:p>
          </table:table-cell>
          <table:covered-table-cell table:number-columns-repeated="4" table:style-name="ce42"/>
          <table:table-cell table:style-name="ce46" office:value-type="string" calcext:value-type="string" table:number-columns-spanned="4" table:number-rows-spanned="1">
            <text:p>「通常效果」中所選的異能的侵蝕值各-1（最低1）。</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15</text:p>
          </table:table-cell>
          <table:table-cell table:style-name="ce28" office:value-type="string" calcext:value-type="string">
            <text:p>噩夢</text:p>
          </table:table-cell>
          <table:table-cell table:style-name="ce32" office:value-type="string" calcext:value-type="string">
            <text:p>REC：約翰·C·科多維爾</text:p>
          </table:table-cell>
          <table:table-cell table:style-name="ce37" office:value-type="string" calcext:value-type="string" table:number-columns-spanned="5" table:number-rows-spanned="1">
            <text:p>回歸階段時，只要侵蝕率小於119%以下，就不會變成原菌，也能獲得侵蝕率大於100%的獎勵經驗值。</text:p>
            <text:p>但是取得了該D-Lois的場合，你無法受到Titus昇華效果中的「解除異常狀態」和「恢復戰鬥不能」這兩者以外的效果。S-Lois的效果則可以照常使用。</text:p>
            <text:p>該D-Lois不能與其他D-Lois同時取得（當然，也不能取得多個D-Lois：噩夢）</text:p>
          </table:table-cell>
          <table:covered-table-cell table:number-columns-repeated="4" table:style-name="ce42"/>
          <table:table-cell table:style-name="ce46" office:value-type="string" calcext:value-type="string" table:number-columns-spanned="4" table:number-rows-spanned="1">
            <text:p>你進行的組合了異能的攻擊的攻擊力+3</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16</text:p>
          </table:table-cell>
          <table:table-cell table:style-name="ce28" office:value-type="string" calcext:value-type="string">
            <text:p>死亡與再生</text:p>
          </table:table-cell>
          <table:table-cell table:style-name="ce32" office:value-type="string" calcext:value-type="string">
            <text:p>REC：約翰·C·科多維爾</text:p>
          </table:table-cell>
          <table:table-cell table:style-name="ce37" office:value-type="string" calcext:value-type="string" table:number-columns-spanned="5" table:number-rows-spanned="1">
            <text:p>於你從戰鬥不能中恢復時使用。你進行的攻擊的傷害+1D10。使用該效果時，你的侵蝕率會上升1D10點。這個效果持續至場景結束。</text:p>
          </table:table-cell>
          <table:covered-table-cell table:number-columns-repeated="4" table:style-name="ce42"/>
          <table:table-cell table:style-name="ce46" office:value-type="string" calcext:value-type="string" table:number-columns-spanned="4" table:number-rows-spanned="1">
            <text:p>「通常效果」生效期間，攻擊的傷害額外再增加1D10（合計+2D10）。</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17</text:p>
          </table:table-cell>
          <table:table-cell table:style-name="ce28" office:value-type="string" calcext:value-type="string">
            <text:p>狩獵惡魔之人</text:p>
          </table:table-cell>
          <table:table-cell table:style-name="ce32" office:value-type="string" calcext:value-type="string">
            <text:p>REC：春日恭二</text:p>
          </table:table-cell>
          <table:table-cell table:style-name="ce37" office:value-type="string" calcext:value-type="string" table:number-columns-spanned="5" table:number-rows-spanned="1">
            <text:p>於傷害擲骰前使用。將一個Lois昇華為Titus，使得此次傷害增加5D10。這個效果一個劇本之中最多可以使用一次。</text:p>
          </table:table-cell>
          <table:covered-table-cell table:number-columns-repeated="4" table:style-name="ce42"/>
          <table:table-cell table:style-name="ce46" office:value-type="string" calcext:value-type="string" table:number-columns-spanned="4" table:number-rows-spanned="1">
            <text:p>以「通常效果」Titus化的Lois為[Lois:春日恭二]時，所增加的傷害值額外再增加5D10（合計10D10）。即使因此而導致REC被Titus化，這個效果也能作為特例生效</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18</text:p>
          </table:table-cell>
          <table:table-cell table:style-name="ce28" office:value-type="string" calcext:value-type="string">
            <text:p>惡魔之子</text:p>
          </table:table-cell>
          <table:table-cell table:style-name="ce32" office:value-type="string" calcext:value-type="string">
            <text:p>REC：春日恭二</text:p>
          </table:table-cell>
          <table:table-cell table:style-name="ce37" office:value-type="string" calcext:value-type="string" table:number-columns-spanned="5" table:number-rows-spanned="1">
            <text:p>當你的侵蝕率超過99%（達到100%以上）時，你進行的所有判定的骰數+3D。</text:p>
          </table:table-cell>
          <table:covered-table-cell table:number-columns-repeated="4" table:style-name="ce42"/>
          <table:table-cell table:style-name="ce46" office:value-type="string" calcext:value-type="string" table:number-columns-spanned="4" table:number-rows-spanned="1">
            <text:p>當你的侵蝕率超過119%（達到120%以上）時，你所進行攻擊的攻擊力+2D10。</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19</text:p>
          </table:table-cell>
          <table:table-cell table:style-name="ce28" office:value-type="string" calcext:value-type="string">
            <text:p>掘墓人</text:p>
          </table:table-cell>
          <table:table-cell table:style-name="ce32" office:value-type="string" calcext:value-type="string">
            <text:p>REC：墓守清正</text:p>
          </table:table-cell>
          <table:table-cell table:style-name="ce37" office:value-type="string" calcext:value-type="string" table:number-columns-spanned="5" table:number-rows-spanned="1">
            <text:p>在墓守的協助下排除障礙。</text:p>
            <text:p>於先攻階段使用，可以破壞存在於場景之中的一棟建築物或者載具，亦或是使一個登場中的集團戰鬥不能，這個效果一個劇本中可以使用一次。</text:p>
          </table:table-cell>
          <table:covered-table-cell table:number-columns-repeated="4" table:style-name="ce42"/>
          <table:table-cell table:style-name="ce46" office:value-type="string" calcext:value-type="string" table:number-columns-spanned="4" table:number-rows-spanned="1">
            <text:p>在「通常效果」中追加「對一名角色造成5D10點HP傷害」的選項。也就是說，通常效果的可選項增加了！</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20</text:p>
          </table:table-cell>
          <table:table-cell table:style-name="ce28" office:value-type="string" calcext:value-type="string">
            <text:p>槍之刻印</text:p>
          </table:table-cell>
          <table:table-cell table:style-name="ce32" office:value-type="string" calcext:value-type="string">
            <text:p>REC：墓守清正</text:p>
          </table:table-cell>
          <table:table-cell table:style-name="ce37" office:value-type="string" calcext:value-type="string" table:number-columns-spanned="5" table:number-rows-spanned="1">
            <text:p>於攻擊前使用，此次攻擊的傷害+[你的【肉體】]。使用這個效果時，你的侵蝕率會上升3點。這個效果一個劇本中可以使用一次。</text:p>
          </table:table-cell>
          <table:covered-table-cell table:number-columns-repeated="4" table:style-name="ce42"/>
          <table:table-cell table:style-name="ce46" office:value-type="string" calcext:value-type="string" table:number-columns-spanned="4" table:number-rows-spanned="1">
            <text:p>將「通常效果」的使用次數限制變更為「1個劇本中可以使用3次」。</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21</text:p>
          </table:table-cell>
          <table:table-cell table:style-name="ce28" office:value-type="string" calcext:value-type="string">
            <office:annotation draw:style-name="gr1" draw:text-style-name="P2" svg:width="272.47pt" svg:height="40.51pt" svg:x="146.78pt" svg:y="337.49pt" draw:caption-point-x="-11.54pt" draw:caption-point-y="-22.22pt">
              <dc:date>2026-04-24T00:00:00</dc:date>
              <text:p text:style-name="P1">FH專用</text:p>
              <text:p text:style-name="P1">======</text:p>
            </office:annotation>
            <text:p>遺失之子</text:p>
          </table:table-cell>
          <table:table-cell table:style-name="ce32" office:value-type="string" calcext:value-type="string">
            <text:p>REC：黑須左京</text:p>
          </table:table-cell>
          <table:table-cell table:style-name="ce37" office:value-type="string" calcext:value-type="string" table:number-columns-spanned="5" table:number-rows-spanned="1">
            <text:p>取得該D-Lois時，從你取得的「時機：常駐」以外的異能中選擇一個。所選異能的「等級」和「最大等級」+1。</text:p>
            <text:p>此外，你還可以消費常備點數來常備化FH專用道具。</text:p>
            <text:p>由此取得的道具基本上只能由你來使用或裝備，其他人即使持有也無法享受其效果</text:p>
          </table:table-cell>
          <table:covered-table-cell table:number-columns-repeated="4" table:style-name="ce42"/>
          <table:table-cell table:style-name="ce46" office:value-type="string" calcext:value-type="string" table:number-columns-spanned="4" table:number-rows-spanned="1">
            <text:p>於使用「通常效果」中選擇的異能時宣言。所選異能「等級」和「最大等級」再+1（合計+2）。但無法因此增加異能的使用次數。這個效果持續至主要階段結束。這個效果一個劇本中可以使用一次。</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22</text:p>
          </table:table-cell>
          <table:table-cell table:style-name="ce28" office:value-type="string" calcext:value-type="string">
            <text:p>仿徨者</text:p>
          </table:table-cell>
          <table:table-cell table:style-name="ce32" office:value-type="string" calcext:value-type="string">
            <text:p>REC：黑須左京</text:p>
          </table:table-cell>
          <table:table-cell table:style-name="ce37" office:value-type="string" calcext:value-type="string" table:number-columns-spanned="5" table:number-rows-spanned="1">
            <text:p>於場景中登場的角色進行攻擊判定前使用。將那個攻擊的對象變更為你一人，並重新進行回應動作後。使用該效果後，任何異能、道具、D-Lois等效果都不能將攻擊對象從你身上轉移，也無法因任何效果使得其他角色承受該攻擊所產生的傷害。使用這個效果時，你的侵蝕率會上升1D10點。這個效果一個劇本中可以使用一次。</text:p>
          </table:table-cell>
          <table:covered-table-cell table:number-columns-repeated="4" table:style-name="ce42"/>
          <table:table-cell table:style-name="ce46" office:value-type="string" calcext:value-type="string" table:number-columns-spanned="4" table:number-rows-spanned="1">
            <text:p>你從使用「通常效果」影響的攻擊中承受的傷害-10。但是，將「Lois：黑須左京」昇華為Titus時，你的侵蝕率會上升2D10點。</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23</text:p>
          </table:table-cell>
          <table:table-cell table:style-name="ce28" office:value-type="string" calcext:value-type="string">
            <text:p>前世記憶</text:p>
          </table:table-cell>
          <table:table-cell table:style-name="ce32" office:value-type="string" calcext:value-type="string">
            <text:p>REC：都築京香</text:p>
          </table:table-cell>
          <table:table-cell table:style-name="ce37" office:value-type="string" calcext:value-type="string" table:number-columns-spanned="5" table:number-rows-spanned="1">
            <text:p>使用沉睡在你體內的背教者病毒中的異能。</text:p>
            <text:p>從自己取得的症狀以外的症狀中，選擇並免費獲得一個異能，其等級為[最大等級-3](最低Lv1)。取得的能力不能用經驗點升級</text:p>
            <text:p>但不能選擇有限制的異能，敵人專屬異能，【時機：常駐】的異能。</text:p>
            <text:p>取得的異能被視為【限制：100%】的異能，且侵蝕值+5</text:p>
          </table:table-cell>
          <table:covered-table-cell table:number-columns-repeated="4" table:style-name="ce42"/>
          <table:table-cell table:style-name="ce46" office:value-type="string" calcext:value-type="string" table:number-columns-spanned="4" table:number-rows-spanned="1">
            <text:p>於使用「通常效果」所取得的異能時宣言，使該異能的等級和最大等級+1。</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24</text:p>
          </table:table-cell>
          <table:table-cell table:style-name="ce28" office:value-type="string" calcext:value-type="string">
            <text:p>人造者</text:p>
          </table:table-cell>
          <table:table-cell table:style-name="ce32" office:value-type="string" calcext:value-type="string">
            <text:p>REC：都築京香</text:p>
          </table:table-cell>
          <table:table-cell table:style-name="ce37" office:value-type="string" calcext:value-type="string" table:number-columns-spanned="5" table:number-rows-spanned="1">
            <text:p>與生俱來便是超越者的你，早已將高效使用異能的方法銘刻於的身體之中</text:p>
            <text:p>你進行的組合了異能的判定骰數+2D。此外，組合了異能的攻擊的攻擊力+3。取得這個D-Lois時，你的侵蝕率基本值+3。</text:p>
          </table:table-cell>
          <table:covered-table-cell table:number-columns-repeated="4" table:style-name="ce42"/>
          <table:table-cell table:style-name="ce46" office:value-type="string" calcext:value-type="string" table:number-columns-spanned="4" table:number-rows-spanned="1">
            <text:p>你進行的組合了異能的判定骰數額外再+2D（合計+4D）。</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25</text:p>
          </table:table-cell>
          <table:table-cell table:style-name="ce28" office:value-type="string" calcext:value-type="string">
            <office:annotation draw:style-name="gr2" draw:text-style-name="P2" svg:width="272.47pt" svg:height="40.48pt" svg:x="146.78pt" svg:y="397.5pt" draw:caption-point-x="-11.54pt" draw:caption-point-y="-22.22pt">
              <dc:date>2026-04-24T00:00:00</dc:date>
              <text:p text:style-name="P1">背教者生命體專用</text:p>
              <text:p text:style-name="P1">======</text:p>
            </office:annotation>
            <text:p>人工精靈</text:p>
          </table:table-cell>
          <table:table-cell table:style-name="ce32" office:value-type="string" calcext:value-type="string">
            <text:p>REC：青峰深雪</text:p>
          </table:table-cell>
          <table:table-cell table:style-name="ce38" office:value-type="string" calcext:value-type="string" table:number-columns-spanned="5" table:number-rows-spanned="1">
            <text:p>你被製作成和特定的異能相匹配的背教者生命體</text:p>
            <text:p>取得時從「起源：●●」以外的異能中選擇一個。在「起源：●●」的效果中，你已取得的該所選異能的侵蝕值-2（最低為1）。</text:p>
          </table:table-cell>
          <table:covered-table-cell table:number-columns-repeated="4" table:style-name="ce42"/>
          <table:table-cell table:style-name="ce46" office:value-type="string" calcext:value-type="string" table:number-columns-spanned="4" table:number-rows-spanned="1">
            <text:p>組合了「通常效果」中所選擇異能的判定的骰數+2D。</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26</text:p>
          </table:table-cell>
          <table:table-cell table:style-name="ce28" office:value-type="string" calcext:value-type="string">
            <office:annotation draw:style-name="gr1" draw:text-style-name="P2" svg:width="272.47pt" svg:height="40.51pt" svg:x="146.78pt" svg:y="412.5pt" draw:caption-point-x="-11.54pt" draw:caption-point-y="-22.22pt">
              <dc:date>2026-04-24T00:00:00</dc:date>
              <text:p text:style-name="P1">背教者生命體專用</text:p>
              <text:p text:style-name="P1">======</text:p>
            </office:annotation>
            <text:p>異邦人</text:p>
          </table:table-cell>
          <table:table-cell table:style-name="ce32" office:value-type="string" calcext:value-type="string">
            <text:p>REC：青峰深雪</text:p>
          </table:table-cell>
          <table:table-cell table:style-name="ce38" office:value-type="string" calcext:value-type="string" table:number-columns-spanned="5" table:number-rows-spanned="1">
            <text:p>在「起源：●●」的效果中，你進行的所有判定的骰子+2D。但是，你所取得的「起源：●●」的侵蝕值全部+1。</text:p>
          </table:table-cell>
          <table:covered-table-cell table:number-columns-repeated="4" table:style-name="ce42"/>
          <table:table-cell table:style-name="ce46" office:value-type="string" calcext:value-type="string" table:number-columns-spanned="4" table:number-rows-spanned="1">
            <text:p>你的回歸判定骰子數+1D。也就是說，你會在回歸階段投擲「一般Lois的個數+1」的骰子。</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27</text:p>
          </table:table-cell>
          <table:table-cell table:style-name="ce28" office:value-type="string" calcext:value-type="string">
            <text:p>財閥援助</text:p>
          </table:table-cell>
          <table:table-cell table:style-name="ce32" office:value-type="string" calcext:value-type="string">
            <text:p>REC：鷺乃宮香</text:p>
          </table:table-cell>
          <table:table-cell table:style-name="ce38" office:value-type="string" calcext:value-type="string" table:number-columns-spanned="5" table:number-rows-spanned="1">
            <text:p>於次要動作使用，選擇一個特殊道具。該場景間，你取得所選擇的道具。此時，你也可以選擇自己所屬症候的專用特殊道具。取得的道具為武器或防具時可以立即裝備，為載具時也可以立即進入搭乘狀態。</text:p>
            <text:p>使用了該效果的次要動作結束時，你的侵蝕率上升7點，這個效果一個劇本中可以使用一次。</text:p>
          </table:table-cell>
          <table:covered-table-cell table:number-columns-repeated="4" table:style-name="ce42"/>
          <table:table-cell table:style-name="ce46" office:value-type="string" calcext:value-type="string" table:number-columns-spanned="4" table:number-rows-spanned="1">
            <text:p>因「通常效果」而上升的侵蝕率變更為3點。</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28</text:p>
          </table:table-cell>
          <table:table-cell table:style-name="ce28" office:value-type="string" calcext:value-type="string">
            <text:p>出資者</text:p>
          </table:table-cell>
          <table:table-cell table:style-name="ce32" office:value-type="string" calcext:value-type="string">
            <text:p>REC：鷺乃宮香</text:p>
          </table:table-cell>
          <table:table-cell table:style-name="ce38" office:value-type="string" calcext:value-type="string" table:number-columns-spanned="5" table:number-rows-spanned="1">
            <text:p>於可以使用財產點的判定之前使用，此次判定的達成值+10。這個效果一個劇本中可以使用一次。</text:p>
          </table:table-cell>
          <table:covered-table-cell table:number-columns-repeated="4" table:style-name="ce42"/>
          <table:table-cell table:style-name="ce46" office:value-type="string" calcext:value-type="string" table:number-columns-spanned="4" table:number-rows-spanned="1">
            <text:p>將「通常效果」的使用次數限制變更為「1個劇本中可以使用3次」。</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29</text:p>
          </table:table-cell>
          <table:table-cell table:style-name="ce28" office:value-type="string" calcext:value-type="string">
            <text:p>永命者</text:p>
          </table:table-cell>
          <table:table-cell table:style-name="ce32" office:value-type="string" calcext:value-type="string">
            <text:p>REC：芬·布思羅伊德</text:p>
          </table:table-cell>
          <table:table-cell table:style-name="ce38" office:value-type="string" calcext:value-type="string" table:number-columns-spanned="5" table:number-rows-spanned="1">
            <text:p>你花費了長久的歲月去鑽研與吸血鬼、惡魔等怪物戰鬥的方法。那些方法對超越者亦頗為有效。</text:p>
            <text:p>取得此D-Lois時選擇一個技能，使用所選技能進行的攻擊判定的骰數+3D。</text:p>
            <text:p>但是，這個攻擊的對象必須是超越者。</text:p>
          </table:table-cell>
          <table:covered-table-cell table:number-columns-repeated="4" table:style-name="ce42"/>
          <table:table-cell table:style-name="ce46" office:value-type="string" calcext:value-type="string" table:number-columns-spanned="4" table:number-rows-spanned="1">
            <text:p>于以超越者為對象的攻擊傷害擲骰之前使用，此次攻擊的傷害+2D10。</text:p>
            <text:p>這個效果一個場景可以使用一次</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30</text:p>
          </table:table-cell>
          <table:table-cell table:style-name="ce28" office:value-type="string" calcext:value-type="string">
            <text:p>發明品</text:p>
          </table:table-cell>
          <table:table-cell table:style-name="ce32" office:value-type="string" calcext:value-type="string">
            <text:p>REC：芬·布思羅伊德</text:p>
          </table:table-cell>
          <table:table-cell table:style-name="ce38" office:value-type="string" calcext:value-type="string" table:number-columns-spanned="5" table:number-rows-spanned="1">
            <text:p>你可以在不消耗常備點的情況下將一件需要的常備化點在50以下的道具常備化。此時，你也可以選擇取得FH專用道具。但是無法常備化特殊道具和通過D-Lois取得的道具。</text:p>
            <text:p>雖然這個D-Lois所取得的道具可以交給別人，但除你以外的角色不能使用或裝備，即使持有也不能享受其效果。</text:p>
            <text:p>取得這個D-Lois的話，你的侵蝕率基本值+5。</text:p>
          </table:table-cell>
          <table:covered-table-cell table:number-columns-repeated="4" table:style-name="ce42"/>
          <table:table-cell table:style-name="ce46" office:value-type="string" calcext:value-type="string" table:number-columns-spanned="4" table:number-rows-spanned="1">
            <text:p>在你持有、裝備以通常效果取得的道具期間可以使用。於你進行判定前使用，取消該判定所承受的一切骰數懲罰。該效果一個劇本中只能使用一次。</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31</text:p>
          </table:table-cell>
          <table:table-cell table:style-name="ce28" office:value-type="string" calcext:value-type="string">
            <text:p>同伴</text:p>
          </table:table-cell>
          <table:table-cell table:style-name="ce32" office:value-type="string" calcext:value-type="string">
            <text:p>REC：取得時選擇</text:p>
          </table:table-cell>
          <table:table-cell table:style-name="ce38" office:value-type="string" calcext:value-type="string" table:number-columns-spanned="5" table:number-rows-spanned="1">
            <text:p>取得時選擇一個角色，持有所選擇的角色的Lois時生效，你進行的判定骰數+2D。</text:p>
            <text:p>但是，當所選擇的角色從Lois變為Titus時，你的侵蝕率會上升2D10點。</text:p>
          </table:table-cell>
          <table:covered-table-cell table:number-columns-repeated="4" table:style-name="ce42"/>
          <table:table-cell table:style-name="ce46" office:value-type="string" calcext:value-type="string" table:number-columns-spanned="4" table:number-rows-spanned="1">
            <text:p>於判定前使用，此次判定的骰數+2D。這個效果一個劇本中可以使用一次。</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32</text:p>
          </table:table-cell>
          <table:table-cell table:style-name="ce28" office:value-type="string" calcext:value-type="string">
            <text:p>盾之人</text:p>
          </table:table-cell>
          <table:table-cell table:style-name="ce32" office:value-type="string" calcext:value-type="string">
            <text:p>REC：取得時選擇</text:p>
          </table:table-cell>
          <table:table-cell table:style-name="ce38" office:value-type="string" calcext:value-type="string" table:number-columns-spanned="5" table:number-rows-spanned="1">
            <text:p>于你進行掩護時使用，此次掩護可以對和你不處於同一接戰區域中的角色使用，但是，這個效果只能在你取得了欲掩護的角色的Lois時才能生效，這個效果一個劇本中可以使用一次。</text:p>
          </table:table-cell>
          <table:covered-table-cell table:number-columns-repeated="4" table:style-name="ce42"/>
          <table:table-cell table:style-name="ce46" office:value-type="string" calcext:value-type="string" table:number-columns-spanned="4" table:number-rows-spanned="1">
            <text:p>將「通常效果」的使用次數限制變更為「1個劇本中可以使用3次」。</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33</text:p>
          </table:table-cell>
          <table:table-cell table:style-name="ce28" office:value-type="string" calcext:value-type="string">
            <text:p>齊心協力</text:p>
          </table:table-cell>
          <table:table-cell table:style-name="ce32" office:value-type="string" calcext:value-type="string">
            <text:p>REC：取得時選擇</text:p>
          </table:table-cell>
          <table:table-cell table:style-name="ce38" office:value-type="string" calcext:value-type="string" table:number-columns-spanned="5" table:number-rows-spanned="1">
            <text:p>你進行的所有判定的骰數+[在該場景中登場，並且你取得了其Lois的角色數量]D。但是，當你締結了Lois的角色陷入戰鬥不能或是死亡時，該角色的Lois將會立即Titus化，且你的侵蝕率會上升3點。</text:p>
          </table:table-cell>
          <table:covered-table-cell table:number-columns-repeated="4" table:style-name="ce42"/>
          <table:table-cell table:style-name="ce46" office:value-type="string" calcext:value-type="string" table:number-columns-spanned="4" table:number-rows-spanned="1">
            <text:p>選擇為「REC」的角色登場的情況下，「通常效果」所增加的判定骰數在原本的基礎上再+1D。</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34</text:p>
          </table:table-cell>
          <table:table-cell table:style-name="ce28" office:value-type="string" calcext:value-type="string">
            <text:p>強敵</text:p>
          </table:table-cell>
          <table:table-cell table:style-name="ce32" office:value-type="string" calcext:value-type="string">
            <text:p>REC：取得時選擇</text:p>
          </table:table-cell>
          <table:table-cell table:style-name="ce37" office:value-type="string" calcext:value-type="string" table:number-columns-spanned="5" table:number-rows-spanned="1">
            <text:p>於你對取得了其Lois的對象進行攻擊時生效，使該攻擊的傷害+1D10</text:p>
          </table:table-cell>
          <table:covered-table-cell table:number-columns-repeated="4" table:style-name="ce42"/>
          <table:table-cell table:style-name="ce46" office:value-type="string" calcext:value-type="string" table:number-columns-spanned="4" table:number-rows-spanned="1">
            <text:p><text:s text:c="2"/>攻擊的對象為選作「REC」的角色時，「通常效果」所增加的傷害額外再+1D10（合計+2D10）。</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35</text:p>
          </table:table-cell>
          <table:table-cell table:style-name="ce28" office:value-type="string" calcext:value-type="string">
            <text:p>同僚</text:p>
          </table:table-cell>
          <table:table-cell table:style-name="ce32" office:value-type="string" calcext:value-type="string">
            <text:p>REC：取得時選擇</text:p>
          </table:table-cell>
          <table:table-cell table:style-name="ce38" office:value-type="string" calcext:value-type="string" table:number-columns-spanned="5" table:number-rows-spanned="1">
            <text:p>選擇一個取得了與你同一組織紋章的角色為對象（組織不包括自由職業者）。</text:p>
            <text:p>於對象進行判定前使用，此次判定的暴擊值-1（下限值5），且判定的骰數+5D。</text:p>
            <text:p>這個效果一個劇本中可以使用一次。</text:p>
          </table:table-cell>
          <table:covered-table-cell table:number-columns-repeated="4" table:style-name="ce42"/>
          <table:table-cell table:style-name="ce46" office:value-type="string" calcext:value-type="string" table:number-columns-spanned="4" table:number-rows-spanned="1">
            <text:p>將「通常效果」應用在選擇作為「REC」的角色身上時，此次判定的骰數額外+5D（合計+10D）。</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36</text:p>
          </table:table-cell>
          <table:table-cell table:style-name="ce28" office:value-type="string" calcext:value-type="string">
            <text:p>不同組織</text:p>
          </table:table-cell>
          <table:table-cell table:style-name="ce32" office:value-type="string" calcext:value-type="string">
            <text:p>REC：取得時選擇</text:p>
          </table:table-cell>
          <table:table-cell table:style-name="ce38" office:value-type="string" calcext:value-type="string" table:number-columns-spanned="5" table:number-rows-spanned="1">
            <text:p>選擇一個取得了與你不同組織紋章的角色為對象（組織不包括自由職業者）。</text:p>
            <text:p>於對象進行攻擊的命中判定前使用，此次攻擊的命中判定的暴擊值-1（下限值5），傷害+1D10。</text:p>
            <text:p>這個效果一個劇本中可以使用一次。</text:p>
          </table:table-cell>
          <table:covered-table-cell table:number-columns-repeated="4" table:style-name="ce42"/>
          <table:table-cell table:style-name="ce46" office:value-type="string" calcext:value-type="string" table:number-columns-spanned="4" table:number-rows-spanned="1">
            <text:p>將「通常效果」應用在選擇作為「REC」的角色身上時，所增加的傷害額外再+1D10（合計+2D10）</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4" office:value-type="string" calcext:value-type="string">
            <text:p>No.HR37</text:p>
          </table:table-cell>
          <table:table-cell table:style-name="ce28" office:value-type="string" calcext:value-type="string">
            <text:p>友情</text:p>
          </table:table-cell>
          <table:table-cell table:style-name="ce32" office:value-type="string" calcext:value-type="string">
            <text:p>REC：取得時選擇</text:p>
          </table:table-cell>
          <table:table-cell table:style-name="ce38" office:value-type="string" calcext:value-type="string" table:number-columns-spanned="5" table:number-rows-spanned="1">
            <text:p>以你取得了其Lois的角色為對象。當對象因異能、道具、D-Lois的效果導致侵蝕率上升時使用。你代替其上升等量的侵蝕率。</text:p>
            <text:p>這個效果一個劇本中可以使用一次。</text:p>
          </table:table-cell>
          <table:covered-table-cell table:number-columns-repeated="4" table:style-name="ce42"/>
          <table:table-cell table:style-name="ce46" office:value-type="string" calcext:value-type="string" table:number-columns-spanned="4" table:number-rows-spanned="1">
            <text:p>將「通常效果」的使用次數限制變更為「1個劇本中可以使用3次」，但是，你只能將此效果應用到選擇為「REC」的角色之上。</text:p>
          </table:table-cell>
          <table:covered-table-cell table:number-columns-repeated="2" table:style-name="ce42"/>
          <table:covered-table-cell table:style-name="ce49"/>
          <table:table-cell table:style-name="ce21" table:number-columns-repeated="13"/>
          <table:table-cell table:number-columns-repeated="998"/>
        </table:table-row>
        <table:table-row table:style-name="ro1">
          <table:table-cell table:style-name="ce21"/>
          <table:table-cell table:style-name="ce25" office:value-type="string" calcext:value-type="string">
            <text:p>No.HR38</text:p>
          </table:table-cell>
          <table:table-cell table:style-name="ce30" office:value-type="string" calcext:value-type="string">
            <text:p>純愛</text:p>
          </table:table-cell>
          <table:table-cell table:style-name="ce34" office:value-type="string" calcext:value-type="string">
            <text:p>REC：取得時選擇</text:p>
          </table:table-cell>
          <table:table-cell table:style-name="ce39" office:value-type="string" calcext:value-type="string" table:number-columns-spanned="5" table:number-rows-spanned="1">
            <text:p>於場景中登場的一個角色受到的HP傷害結算完成時使用，使該HP傷害降低10D10點。使用這個效果時，你的侵蝕率會上升2D10點。這個效果一個劇本中可以使用一次。</text:p>
          </table:table-cell>
          <table:covered-table-cell table:number-columns-repeated="4" table:style-name="ce43"/>
          <table:table-cell table:style-name="ce47" office:value-type="string" calcext:value-type="string" table:number-columns-spanned="4" table:number-rows-spanned="1">
            <text:p>將「通常效果」應用于選擇作為「REC」的角色身上時，將「使該HP傷害降低10D10點」變更為「使該HP傷害降低至0點」。</text:p>
          </table:table-cell>
          <table:covered-table-cell table:number-columns-repeated="2" table:style-name="ce43"/>
          <table:covered-table-cell table:style-name="ce50"/>
          <table:table-cell table:style-name="ce21" table:number-columns-repeated="13"/>
          <table:table-cell table:number-columns-repeated="998"/>
        </table:table-row>
        <table:table-row table:style-name="ro6">
          <table:table-cell table:style-name="ce21" table:number-columns-repeated="26"/>
          <table:table-cell table:number-columns-repeated="998"/>
        </table:table-row>
        <table:table-row table:style-name="ro4" table:number-rows-repeated="1048534">
          <table:table-cell table:number-columns-repeated="1024"/>
        </table:table-row>
        <table:table-row table:style-name="ro4">
          <table:table-cell table:number-columns-repeated="1024"/>
        </table:table-row>
      </table:table>
      <table:table table:name="D-lois No.3 變異種異能力" table:style-name="ta4">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number-columns-repeated="3" table:default-cell-style-name="Default"/>
        <table:table-column table:style-name="co19" table:default-cell-style-name="Default"/>
        <table:table-column table:style-name="co21" table:default-cell-style-name="Default"/>
        <table:table-column table:style-name="co17" table:default-cell-style-name="Default"/>
        <table:table-column table:style-name="co22" table:number-columns-repeated="14" table:default-cell-style-name="Default"/>
        <table:table-column table:style-name="co4" table:number-columns-repeated="998" table:default-cell-style-name="Default"/>
        <table:table-row table:style-name="ro1">
          <table:table-cell table:style-name="ce51" office:value-type="string" calcext:value-type="string">
            <text:p>名稱</text:p>
          </table:table-cell>
          <table:table-cell table:style-name="ce71" office:value-type="string" calcext:value-type="string">
            <text:p>最大等級</text:p>
          </table:table-cell>
          <table:table-cell table:style-name="ce71" office:value-type="string" calcext:value-type="string">
            <text:p>時機</text:p>
          </table:table-cell>
          <table:table-cell table:style-name="ce71" office:value-type="string" calcext:value-type="string">
            <text:p>技能</text:p>
          </table:table-cell>
          <table:table-cell table:style-name="ce71" office:value-type="string" calcext:value-type="string">
            <text:p>難易度</text:p>
          </table:table-cell>
          <table:table-cell table:style-name="ce71" office:value-type="string" calcext:value-type="string">
            <text:p>對象</text:p>
          </table:table-cell>
          <table:table-cell table:style-name="ce71" office:value-type="string" calcext:value-type="string">
            <text:p>射程</text:p>
          </table:table-cell>
          <table:table-cell table:style-name="ce71" office:value-type="string" calcext:value-type="string">
            <text:p>侵蝕值</text:p>
          </table:table-cell>
          <table:table-cell table:style-name="ce71" office:value-type="string" calcext:value-type="string">
            <text:p>限制</text:p>
          </table:table-cell>
          <table:table-cell table:style-name="ce71" office:value-type="string" calcext:value-type="string">
            <text:p>次數</text:p>
          </table:table-cell>
          <table:table-cell table:style-name="ce51" office:value-type="string" calcext:value-type="string">
            <text:p>效果</text:p>
          </table:table-cell>
          <table:table-cell table:style-name="ce71" office:value-type="string" calcext:value-type="string">
            <text:p>備註</text:p>
          </table:table-cell>
          <table:table-cell table:style-name="ce71" office:value-type="string" calcext:value-type="string">
            <text:p>參照</text:p>
          </table:table-cell>
          <table:table-cell table:style-name="ce3" table:number-columns-repeated="13"/>
          <table:table-cell table:number-columns-repeated="998"/>
        </table:table-row>
        <table:table-row table:style-name="ro1">
          <table:table-cell table:style-name="ce52" office:value-type="string" calcext:value-type="string">
            <text:p>破邪之瞳</text:p>
          </table:table-cell>
          <table:table-cell table:style-name="ce72" office:value-type="float" office:value="3" calcext:value-type="float">
            <text:p>3</text:p>
          </table:table-cell>
          <table:table-cell table:style-name="ce72" office:value-type="string" calcext:value-type="string">
            <text:p>回應動作</text:p>
          </table:table-cell>
          <table:table-cell table:style-name="ce72" office:value-type="string" calcext:value-type="string">
            <text:p>參照效果</text:p>
          </table:table-cell>
          <table:table-cell table:style-name="ce72" office:value-type="string" calcext:value-type="string">
            <text:p>對決</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5" calcext:value-type="float">
            <text:p>5</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提升知覺異能，看破對方動作的異能。</text:p>
            <text:p>能夠與任何回應動作判定進行組合，組合了該異能的判定暴擊值-1（下限6）</text:p>
          </table:table-cell>
          <table:table-cell table:style-name="ce72" office:value-type="string" calcext:value-type="string">
            <text:p>變異種+天使光環專用</text:p>
          </table:table-cell>
          <table:table-cell table:style-name="ce72" office:value-type="string" calcext:value-type="string">
            <text:p>LMP113</text:p>
          </table:table-cell>
          <table:table-cell table:style-name="ce3" table:number-columns-repeated="13"/>
          <table:table-cell table:number-columns-repeated="998"/>
        </table:table-row>
        <table:table-row table:style-name="ro1">
          <table:table-cell table:style-name="ce53" office:value-type="string" calcext:value-type="string">
            <text:p>快進</text:p>
            <text:p>(ファストフォワード)</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lt;RC&gt;</text:p>
          </table:table-cell>
          <table:table-cell table:style-name="ce72" office:value-type="string" calcext:value-type="string">
            <text:p>對決</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float" office:value="5" calcext:value-type="float">
            <text:p>5</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加速時間流動的異能。</text:p>
            <text:p>進行射擊攻擊，命中時，將對象身上正在持續中（例:《完全獸化》）的異能效果全部解除。組合了該異能的攻擊無法造成HP傷害。</text:p>
          </table:table-cell>
          <table:table-cell table:style-name="ce72" office:value-type="string" calcext:value-type="string">
            <text:p>變異種+重力魔眼專用</text:p>
          </table:table-cell>
          <table:table-cell table:style-name="ce72" office:value-type="string" calcext:value-type="string">
            <text:p>LMP113</text:p>
          </table:table-cell>
          <table:table-cell table:style-name="ce3" table:number-columns-repeated="13"/>
          <table:table-cell table:number-columns-repeated="998"/>
        </table:table-row>
        <table:table-row table:style-name="ro1">
          <table:table-cell table:style-name="ce54" office:value-type="string" calcext:value-type="string">
            <text:p>降魔之雷</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lt;RC&gt;</text:p>
          </table:table-cell>
          <table:table-cell table:style-name="ce72" office:value-type="string" calcext:value-type="string">
            <text:p>對決</text:p>
          </table:table-cell>
          <table:table-cell table:style-name="ce72" office:value-type="string" calcext:value-type="string">
            <text:p>-</text:p>
          </table:table-cell>
          <table:table-cell table:style-name="ce72" office:value-type="string" calcext:value-type="string">
            <text:p>視界</text:p>
          </table:table-cell>
          <table:table-cell table:style-name="ce72" office:value-type="float" office:value="4" calcext:value-type="float">
            <text:p>4</text:p>
          </table:table-cell>
          <table:table-cell table:style-name="ce72" office:value-type="string" calcext:value-type="string">
            <text:p>D-Lois</text:p>
          </table:table-cell>
          <table:table-cell table:style-name="ce72" office:value-type="string" calcext:value-type="string">
            <text:p>3/劇本</text:p>
          </table:table-cell>
          <table:table-cell table:style-name="ce76" office:value-type="string" calcext:value-type="string">
            <text:p>將體內的電流提升到極限，化作雷電攻擊對方的異能。</text:p>
            <text:p>進行「攻擊力:+[LV×4]」的射擊攻擊，針對此攻擊進行的閃避判定骰數-2D。</text:p>
          </table:table-cell>
          <table:table-cell table:style-name="ce72" office:value-type="string" calcext:value-type="string">
            <text:p>變異種+雷擊黑犬專用</text:p>
          </table:table-cell>
          <table:table-cell table:style-name="ce72" office:value-type="string" calcext:value-type="string">
            <text:p>LMP113</text:p>
          </table:table-cell>
          <table:table-cell table:style-name="ce3" table:number-columns-repeated="13"/>
          <table:table-cell table:number-columns-repeated="998"/>
        </table:table-row>
        <table:table-row table:style-name="ro1">
          <table:table-cell table:style-name="ce55" office:value-type="string" calcext:value-type="string">
            <text:p>皇族之血</text:p>
            <text:p>(ロイヤルブラッド)</text:p>
          </table:table-cell>
          <table:table-cell table:style-name="ce72" office:value-type="float" office:value="3" calcext:value-type="float">
            <text:p>3</text:p>
          </table:table-cell>
          <table:table-cell table:style-name="ce72" office:value-type="string" calcext:value-type="string">
            <text:p>主要動作/回應動作</text:p>
          </table:table-cell>
          <table:table-cell table:style-name="ce72" office:value-type="string" calcext:value-type="string">
            <text:p>症候</text:p>
          </table:table-cell>
          <table:table-cell table:number-columns-repeated="3" table:style-name="ce72" office:value-type="string" calcext:value-type="string">
            <text:p>-</text:p>
          </table:table-cell>
          <table:table-cell table:style-name="ce72" office:value-type="float" office:value="3" calcext:value-type="float">
            <text:p>3</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表示你的血液與鮮血真祖異能的相性絕佳的異能。</text:p>
            <text:p>組合了該異能的判定，骰數+5D</text:p>
          </table:table-cell>
          <table:table-cell table:style-name="ce72" office:value-type="string" calcext:value-type="string">
            <text:p>變異種+鮮血真祖專用</text:p>
          </table:table-cell>
          <table:table-cell table:style-name="ce72" office:value-type="string" calcext:value-type="string">
            <text:p>LMP113</text:p>
          </table:table-cell>
          <table:table-cell table:style-name="ce3" table:number-columns-repeated="13"/>
          <table:table-cell table:number-columns-repeated="998"/>
        </table:table-row>
        <table:table-row table:style-name="ro1">
          <table:table-cell table:style-name="ce51" office:value-type="string" calcext:value-type="string">
            <text:p>獸魔之巢</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lt;近戰&gt;</text:p>
          </table:table-cell>
          <table:table-cell table:style-name="ce72" office:value-type="string" calcext:value-type="string">
            <text:p>對決</text:p>
          </table:table-cell>
          <table:table-cell table:style-name="ce72" office:value-type="string" calcext:value-type="string">
            <text:p>-</text:p>
          </table:table-cell>
          <table:table-cell table:style-name="ce72" office:value-type="string" calcext:value-type="string">
            <text:p>武器</text:p>
          </table:table-cell>
          <table:table-cell table:style-name="ce72" office:value-type="float" office:value="4" calcext:value-type="float">
            <text:p>4</text:p>
          </table:table-cell>
          <table:table-cell table:style-name="ce72" office:value-type="string" calcext:value-type="string">
            <text:p>D-Lois</text:p>
          </table:table-cell>
          <table:table-cell table:style-name="ce72" office:value-type="string" calcext:value-type="string">
            <text:p>3/劇本</text:p>
          </table:table-cell>
          <table:table-cell table:style-name="ce76" office:value-type="string" calcext:value-type="string">
            <text:p>可以自由從身體裡自由具現出野獸的（一部分）身體來進行攻擊的異能。</text:p>
            <text:p>組合了該異能的近戰攻擊攻擊力[LV×2]，針對此攻擊進行的閃避判定暴擊值+1。</text:p>
          </table:table-cell>
          <table:table-cell table:style-name="ce72" office:value-type="string" calcext:value-type="string">
            <text:p>變異種+變異魔獸專用</text:p>
          </table:table-cell>
          <table:table-cell table:style-name="ce72" office:value-type="string" calcext:value-type="string">
            <text:p>LMP113</text:p>
          </table:table-cell>
          <table:table-cell table:style-name="ce3" table:number-columns-repeated="13"/>
          <table:table-cell table:number-columns-repeated="998"/>
        </table:table-row>
        <table:table-row table:style-name="ro1">
          <table:table-cell table:style-name="ce56" office:value-type="string" calcext:value-type="string">
            <text:p>生命之海</text:p>
          </table:table-cell>
          <table:table-cell table:style-name="ce72" office:value-type="float" office:value="3" calcext:value-type="float">
            <text:p>3</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5" calcext:value-type="float">
            <text:p>5</text:p>
          </table:table-cell>
          <table:table-cell table:style-name="ce72" office:value-type="string" calcext:value-type="string">
            <text:p>D-Lois</text:p>
          </table:table-cell>
          <table:table-cell table:style-name="ce72" office:value-type="string" calcext:value-type="string">
            <text:p>1/劇本</text:p>
          </table:table-cell>
          <table:table-cell table:style-name="ce76" office:value-type="string" calcext:value-type="string">
            <text:p>暫時重組細胞，以獲得非比尋常的耐久力的異能。</text:p>
            <text:p>你的HP+[LV+2]D，此時可超過最大HP。所增加的HP會持續到因受到傷害而失去或是場景結束為止</text:p>
          </table:table-cell>
          <table:table-cell table:style-name="ce72" office:value-type="string" calcext:value-type="string">
            <text:p>變異種+流亡畸體專用</text:p>
          </table:table-cell>
          <table:table-cell table:style-name="ce72" office:value-type="string" calcext:value-type="string">
            <text:p>LMP113</text:p>
          </table:table-cell>
          <table:table-cell table:style-name="ce3" table:number-columns-repeated="13"/>
          <table:table-cell table:number-columns-repeated="998"/>
        </table:table-row>
        <table:table-row table:style-name="ro1">
          <table:table-cell table:style-name="ce57" office:value-type="string" calcext:value-type="string">
            <text:p>超頻</text:p>
            <text:p>(クロックアップ)</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症候</text:p>
          </table:table-cell>
          <table:table-cell table:style-name="ce72" office:value-type="string" calcext:value-type="string">
            <text:p>對決</text:p>
          </table:table-cell>
          <table:table-cell table:number-columns-repeated="2" table:style-name="ce72" office:value-type="string" calcext:value-type="string">
            <text:p>-</text:p>
          </table:table-cell>
          <table:table-cell table:style-name="ce72" office:value-type="float" office:value="4" calcext:value-type="float">
            <text:p>4</text:p>
          </table:table-cell>
          <table:table-cell table:style-name="ce72" office:value-type="string" calcext:value-type="string">
            <text:p>D-Lois</text:p>
          </table:table-cell>
          <table:table-cell table:style-name="ce72" office:value-type="string" calcext:value-type="string">
            <text:p>LV+1/劇本</text:p>
          </table:table-cell>
          <table:table-cell table:style-name="ce76" office:value-type="string" calcext:value-type="string">
            <text:p>獲得究極速度的異能。</text:p>
            <text:p>組合了該異能的攻擊命中判定骰+3D，攻擊力+5</text:p>
          </table:table-cell>
          <table:table-cell table:style-name="ce72" office:value-type="string" calcext:value-type="string">
            <text:p>變異種+疾速靈猿專用</text:p>
          </table:table-cell>
          <table:table-cell table:style-name="ce72" office:value-type="string" calcext:value-type="string">
            <text:p>LMP113</text:p>
          </table:table-cell>
          <table:table-cell table:style-name="ce3" table:number-columns-repeated="13"/>
          <table:table-cell table:number-columns-repeated="998"/>
        </table:table-row>
        <table:table-row table:style-name="ro1">
          <table:table-cell table:style-name="ce58" office:value-type="string" calcext:value-type="string">
            <text:p>二重身</text:p>
            <text:p>(ドッペルゲンガー)</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症候</text:p>
          </table:table-cell>
          <table:table-cell table:style-name="ce72" office:value-type="string" calcext:value-type="string">
            <text:p>對決</text:p>
          </table:table-cell>
          <table:table-cell table:number-columns-repeated="2" table:style-name="ce72" office:value-type="string" calcext:value-type="string">
            <text:p>-</text:p>
          </table:table-cell>
          <table:table-cell table:style-name="ce72" office:value-type="float" office:value="5" calcext:value-type="float">
            <text:p>5</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製作出分身，同時進行攻擊的異能。</text:p>
            <text:p>組合了該異能的攻擊，攻擊力+5，且對象無法對此攻擊進行格擋，進行掩護時，視為沒有格擋直接計算傷害</text:p>
          </table:table-cell>
          <table:table-cell table:style-name="ce72" office:value-type="string" calcext:value-type="string">
            <text:p>變異種+煉金化形專用</text:p>
          </table:table-cell>
          <table:table-cell table:style-name="ce72" office:value-type="string" calcext:value-type="string">
            <text:p>LMP113</text:p>
          </table:table-cell>
          <table:table-cell table:style-name="ce3" table:number-columns-repeated="13"/>
          <table:table-cell table:number-columns-repeated="998"/>
        </table:table-row>
        <table:table-row table:style-name="ro1">
          <table:table-cell table:style-name="ce59" office:value-type="string" calcext:value-type="string">
            <text:p>預測</text:p>
            <text:p>(プレディクション)</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參照效果</text:p>
          </table:table-cell>
          <table:table-cell table:style-name="ce72" office:value-type="string" calcext:value-type="string">
            <text:p>對決</text:p>
          </table:table-cell>
          <table:table-cell table:number-columns-repeated="2" table:style-name="ce72" office:value-type="string" calcext:value-type="string">
            <text:p>-</text:p>
          </table:table-cell>
          <table:table-cell table:style-name="ce72" office:value-type="float" office:value="4" calcext:value-type="float">
            <text:p>4</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預判對方的思考跟動作來進行攻擊的異能。</text:p>
            <text:p>該異能可以與任意攻擊組合，對象無法對組合了該異能的攻擊進行閃避</text:p>
          </table:table-cell>
          <table:table-cell table:style-name="ce72" office:value-type="string" calcext:value-type="string">
            <text:p>變異種+神腦演算專用</text:p>
          </table:table-cell>
          <table:table-cell table:style-name="ce72" office:value-type="string" calcext:value-type="string">
            <text:p>LMP114</text:p>
          </table:table-cell>
          <table:table-cell table:style-name="ce3" table:number-columns-repeated="13"/>
          <table:table-cell table:number-columns-repeated="998"/>
        </table:table-row>
        <table:table-row table:style-name="ro1">
          <table:table-cell table:style-name="ce60" office:value-type="string" calcext:value-type="string">
            <text:p>萬色之檻</text:p>
          </table:table-cell>
          <table:table-cell table:style-name="ce72" office:value-type="float" office:value="3" calcext:value-type="float">
            <text:p>3</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5" calcext:value-type="float">
            <text:p>5</text:p>
          </table:table-cell>
          <table:table-cell table:style-name="ce72" office:value-type="string" calcext:value-type="string">
            <text:p>D-Lois</text:p>
          </table:table-cell>
          <table:table-cell table:style-name="ce72" office:value-type="string" calcext:value-type="string">
            <text:p>3/劇本</text:p>
          </table:table-cell>
          <table:table-cell table:style-name="ce76" office:value-type="string" calcext:value-type="string">
            <text:p>展開增幅自我異能的領域的異能。</text:p>
            <text:p>該回合間，你進行的任何判定骰數+[LV×2]D</text:p>
          </table:table-cell>
          <table:table-cell table:style-name="ce72" office:value-type="string" calcext:value-type="string">
            <text:p>變異種+冥府領域專用</text:p>
          </table:table-cell>
          <table:table-cell table:style-name="ce72" office:value-type="string" calcext:value-type="string">
            <text:p>LMP114</text:p>
          </table:table-cell>
          <table:table-cell table:style-name="ce3" table:number-columns-repeated="13"/>
          <table:table-cell table:number-columns-repeated="998"/>
        </table:table-row>
        <table:table-row table:style-name="ro1">
          <table:table-cell table:style-name="ce61" office:value-type="string" calcext:value-type="string">
            <text:p>哀歎之川</text:p>
            <text:p>(コキュートス)</text:p>
          </table:table-cell>
          <table:table-cell table:style-name="ce73"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lt;RC&gt;</text:p>
          </table:table-cell>
          <table:table-cell table:style-name="ce72" office:value-type="string" calcext:value-type="string">
            <text:p>對決</text:p>
          </table:table-cell>
          <table:table-cell table:style-name="ce72" office:value-type="string" calcext:value-type="string">
            <text:p>場景(選擇)</text:p>
          </table:table-cell>
          <table:table-cell table:style-name="ce72" office:value-type="string" calcext:value-type="string">
            <text:p>視界</text:p>
          </table:table-cell>
          <table:table-cell table:style-name="ce72" office:value-type="float" office:value="4" calcext:value-type="float">
            <text:p>4</text:p>
          </table:table-cell>
          <table:table-cell table:style-name="ce72" office:value-type="string" calcext:value-type="string">
            <text:p>D-Lois</text:p>
          </table:table-cell>
          <table:table-cell table:style-name="ce72" office:value-type="string" calcext:value-type="string">
            <text:p>3/劇本</text:p>
          </table:table-cell>
          <table:table-cell table:style-name="ce77" office:value-type="string" calcext:value-type="string">
            <text:p>於大範圍空間之中一瞬間奪走熱能，以蒸發的熱能將其中任意物體冰結的異能。</text:p>
            <text:p>進行「攻擊力:+[LV×3]」的射擊攻擊，組合了該異能的判定骰數-2D</text:p>
          </table:table-cell>
          <table:table-cell table:style-name="ce72" office:value-type="string" calcext:value-type="string">
            <text:p>變異種+冰炎奇蜥專用</text:p>
          </table:table-cell>
          <table:table-cell table:style-name="ce72" office:value-type="string" calcext:value-type="string">
            <text:p>LMP114</text:p>
          </table:table-cell>
          <table:table-cell table:style-name="ce3" table:number-columns-repeated="13"/>
          <table:table-cell table:number-columns-repeated="998"/>
        </table:table-row>
        <table:table-row table:style-name="ro1">
          <table:table-cell table:style-name="ce62" office:value-type="string" calcext:value-type="string">
            <text:p>爆發激漲</text:p>
            <text:p>(バーストアップ)</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lt;RC&gt;</text:p>
          </table:table-cell>
          <table:table-cell table:style-name="ce72" office:value-type="string" calcext:value-type="string">
            <text:p>自動成功</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float" office:value="6" calcext:value-type="float">
            <text:p>6</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使病毒活性化的異能。</text:p>
            <text:p>對象下一次主要動作中使用的異能全部LV+1，此時可超過最大等級，但不能因此增加異能的使用次數。該異能的對象固定為單體，無法被變更</text:p>
          </table:table-cell>
          <table:table-cell table:style-name="ce72" office:value-type="string" calcext:value-type="string">
            <text:p>變異種+幻象惑星專用</text:p>
          </table:table-cell>
          <table:table-cell table:style-name="ce72" office:value-type="string" calcext:value-type="string">
            <text:p>LMP114</text:p>
          </table:table-cell>
          <table:table-cell table:style-name="ce3" table:number-columns-repeated="13"/>
          <table:table-cell table:number-columns-repeated="998"/>
        </table:table-row>
        <table:table-row table:style-name="ro1">
          <table:table-cell table:style-name="ce63" office:value-type="string" calcext:value-type="string">
            <text:p>完美模仿</text:p>
            <text:p>(パーフェクトイミテイト)</text:p>
          </table:table-cell>
          <table:table-cell table:style-name="ce72" office:value-type="float" office:value="3" calcext:value-type="float">
            <text:p>3</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3" calcext:value-type="float">
            <text:p>3</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以更甚於原版的精度來操縱複製的異能。</text:p>
            <text:p>于你使用《原初之🔴》系列異能前使用，該異能LV+2。此時可超過最大等級，但不能因此增加異能的使用次數。</text:p>
          </table:table-cell>
          <table:table-cell table:style-name="ce72" office:value-type="string" calcext:value-type="string">
            <text:p>變異種+噬身影蛇專用</text:p>
          </table:table-cell>
          <table:table-cell table:style-name="ce72" office:value-type="string" calcext:value-type="string">
            <text:p>LMP114</text:p>
          </table:table-cell>
          <table:table-cell table:style-name="ce3" table:number-columns-repeated="13"/>
          <table:table-cell table:number-columns-repeated="998"/>
        </table:table-row>
        <table:table-row table:style-name="ro1">
          <table:table-cell table:style-name="ce64" office:value-type="string" calcext:value-type="string">
            <text:p>黃金鎮魂曲</text:p>
            <text:p>(黃金の鎮魂歌)</text:p>
          </table:table-cell>
          <table:table-cell table:style-name="ce72" office:value-type="float" office:value="1" calcext:value-type="float">
            <text:p>1</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4" calcext:value-type="float">
            <text:p>4</text:p>
          </table:table-cell>
          <table:table-cell table:style-name="ce72" office:value-type="string" calcext:value-type="string">
            <text:p>D-Lois</text:p>
          </table:table-cell>
          <table:table-cell table:style-name="ce72" office:value-type="string" calcext:value-type="string">
            <office:annotation draw:style-name="gr1" draw:text-style-name="P2" svg:width="861.31pt" svg:height="40.51pt" svg:x="924.58pt" svg:y="232.5pt" draw:caption-point-x="-11.54pt" draw:caption-point-y="-22.22pt">
              <dc:date>2026-04-24T00:00:00</dc:date>
              <text:p text:style-name="P1">當前次數無限制，但鑒於存在最大LV，應該會是LV/劇本或是LV/場景，坐等勘誤吧</text:p>
              <text:p text:style-name="P1">======</text:p>
            </office:annotation>
            <text:p>-</text:p>
          </table:table-cell>
          <table:table-cell table:style-name="ce76" office:value-type="string" calcext:value-type="string">
            <text:p>破壞名為死亡的安息這一“結果”，將導致死亡的“過程”不斷重複，以此向對象灌注絕望與瘋狂的異能。</text:p>
            <text:p>於你進行傷害擲骰前宣言，為此次傷害擲骰中所有結果為10的骰子再次進行用於決定傷害的追加擲骰，追加擲骰種存在結果為10的骰子時，同樣再次進行追加。</text:p>
          </table:table-cell>
          <table:table-cell table:style-name="ce79" office:value-type="string" calcext:value-type="string">
            <text:p>變異種+混沌原核專用</text:p>
          </table:table-cell>
          <table:table-cell table:style-name="ce79" office:value-type="string" calcext:value-type="string">
            <text:p>NC P98</text:p>
          </table:table-cell>
          <table:table-cell table:style-name="ce3" table:number-columns-repeated="13"/>
          <table:table-cell table:number-columns-repeated="998"/>
        </table:table-row>
        <table:table-row table:style-name="ro1">
          <table:table-cell table:style-name="ce65" office:value-type="string" calcext:value-type="string">
            <text:p>海市蜃樓</text:p>
            <text:p>(アラウンドミラージュ)</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lt;近戰&gt;&lt;射擊&gt;</text:p>
          </table:table-cell>
          <table:table-cell table:style-name="ce72" office:value-type="string" calcext:value-type="string">
            <text:p>對決</text:p>
          </table:table-cell>
          <table:table-cell table:style-name="ce72" office:value-type="string" calcext:value-type="string">
            <text:p>單體</text:p>
          </table:table-cell>
          <table:table-cell table:style-name="ce72" office:value-type="string" calcext:value-type="string">
            <text:p>武器</text:p>
          </table:table-cell>
          <table:table-cell table:style-name="ce72" office:value-type="float" office:value="4" calcext:value-type="float">
            <text:p>4</text:p>
          </table:table-cell>
          <table:table-cell table:style-name="ce72" office:value-type="string" calcext:value-type="string">
            <text:p>D-Lois</text:p>
          </table:table-cell>
          <table:table-cell table:style-name="ce72" office:value-type="string" calcext:value-type="string">
            <text:p>3/劇本</text:p>
          </table:table-cell>
          <table:table-cell table:style-name="ce76" office:value-type="string" calcext:value-type="string">
            <text:p>創造出多重元型並透過來自各個方向的攻擊來封鎖敵人逃跑路線的異能。</text:p>
            <text:p>組合了該異能的攻擊力+[LV×3]。對象無法對組合了該異能的攻擊進行閃避。</text:p>
          </table:table-cell>
          <table:table-cell table:style-name="ce72" office:value-type="string" calcext:value-type="string">
            <text:p>變異種+長青魔劍專用</text:p>
          </table:table-cell>
          <table:table-cell table:style-name="ce72" office:value-type="string" calcext:value-type="string">
            <text:p>UAP21</text:p>
          </table:table-cell>
          <table:table-cell table:style-name="ce3" table:number-columns-repeated="13"/>
          <table:table-cell table:number-columns-repeated="998"/>
        </table:table-row>
        <table:table-row table:style-name="ro1">
          <table:table-cell table:style-name="ce66" office:value-type="string" calcext:value-type="string">
            <text:p>混沌鎖鏈</text:p>
            <text:p>(カオティックチェイン)</text:p>
          </table:table-cell>
          <table:table-cell table:style-name="ce72" office:value-type="float" office:value="3" calcext:value-type="float">
            <text:p>3</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float" office:value="4" calcext:value-type="float">
            <text:p>4</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使對象發生變異並失去控制的異能。</text:p>
            <text:p>於對象進行判定前使用，該判定暴擊值+2。此效果每回合可以使用1次。</text:p>
          </table:table-cell>
          <table:table-cell table:style-name="ce72" office:value-type="string" calcext:value-type="string">
            <text:p>變異種+偽神天鎖專用</text:p>
          </table:table-cell>
          <table:table-cell table:style-name="ce72" office:value-type="string" calcext:value-type="string">
            <text:p>UAP82</text:p>
          </table:table-cell>
          <table:table-cell table:style-name="ce3" table:number-columns-repeated="13"/>
          <table:table-cell table:number-columns-repeated="998"/>
        </table:table-row>
        <table:table-row table:style-name="ro1">
          <table:table-cell table:style-name="ce67" office:value-type="string" calcext:value-type="string">
            <text:p>活性化</text:p>
            <text:p>(アクティベイト)</text:p>
          </table:table-cell>
          <table:table-cell table:style-name="ce72" office:value-type="float" office:value="3" calcext:value-type="float">
            <text:p>3</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4" calcext:value-type="float">
            <text:p>4</text:p>
          </table:table-cell>
          <table:table-cell table:style-name="ce72" office:value-type="string" calcext:value-type="string">
            <text:p>D-Lois</text:p>
          </table:table-cell>
          <table:table-cell table:style-name="ce72" office:value-type="string" calcext:value-type="string">
            <text:p>－</text:p>
          </table:table-cell>
          <table:table-cell table:style-name="ce76" office:value-type="string" calcext:value-type="string">
            <text:p>使體內的Ｒ病毒活性化，使行動的成功率上升的異能。但是非常消耗體力。</text:p>
            <text:p>消耗[LV×3]以下任意點HP，該主要階段間，你進行的所有判定的達成值+[消耗的HP]。</text:p>
          </table:table-cell>
          <table:table-cell table:style-name="ce72" office:value-type="string" calcext:value-type="string">
            <text:p>變異種/特殊</text:p>
          </table:table-cell>
          <table:table-cell table:style-name="ce72" office:value-type="string" calcext:value-type="string">
            <text:p>LMP114</text:p>
          </table:table-cell>
          <table:table-cell table:style-name="ce3" table:number-columns-repeated="13"/>
          <table:table-cell table:number-columns-repeated="998"/>
        </table:table-row>
        <table:table-row table:style-name="ro1">
          <table:table-cell table:style-name="ce68" office:value-type="string" calcext:value-type="string">
            <text:p>混亂</text:p>
            <text:p>(コンフュージョン)</text:p>
          </table:table-cell>
          <table:table-cell table:style-name="ce72" office:value-type="float" office:value="3" calcext:value-type="float">
            <text:p>3</text:p>
          </table:table-cell>
          <table:table-cell table:style-name="ce72" office:value-type="string" calcext:value-type="string">
            <text:p>回應動作</text:p>
          </table:table-cell>
          <table:table-cell table:style-name="ce72" office:value-type="string" calcext:value-type="string">
            <text:p>參照效果</text:p>
          </table:table-cell>
          <table:table-cell table:style-name="ce72" office:value-type="string" calcext:value-type="string">
            <text:p>對決</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2" calcext:value-type="float">
            <text:p>2</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散佈Ｒ病毒，使敵人感官混亂的異能。</text:p>
            <text:p>可與任何閃避判定的組合，消除組合了此異能的判定所受到的所有減骰效果。</text:p>
          </table:table-cell>
          <table:table-cell table:style-name="ce72" office:value-type="string" calcext:value-type="string">
            <text:p>變異種/特殊</text:p>
          </table:table-cell>
          <table:table-cell table:style-name="ce72" office:value-type="string" calcext:value-type="string">
            <text:p>LMP114</text:p>
          </table:table-cell>
          <table:table-cell table:style-name="ce3" table:number-columns-repeated="13"/>
          <table:table-cell table:number-columns-repeated="998"/>
        </table:table-row>
        <table:table-row table:style-name="ro1">
          <table:table-cell table:style-name="ce69" office:value-type="string" calcext:value-type="string">
            <text:p>強運</text:p>
            <text:p>(ハードラック)</text:p>
          </table:table-cell>
          <table:table-cell table:style-name="ce72" office:value-type="float" office:value="5" calcext:value-type="float">
            <text:p>5</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3" calcext:value-type="float">
            <text:p>3</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使Ｒ病毒活性化，獲得能夠逆轉失敗的可能性的異能。</text:p>
            <text:p>於你投擲了判定骰之後使用。可從中選擇一個骰子進行重骰，處於判定的途中時也可以使用。一次的判定中只能使用一次。</text:p>
          </table:table-cell>
          <table:table-cell table:style-name="ce72" office:value-type="string" calcext:value-type="string">
            <text:p>變異種/特殊</text:p>
          </table:table-cell>
          <table:table-cell table:style-name="ce72" office:value-type="string" calcext:value-type="string">
            <text:p>LMP114</text:p>
          </table:table-cell>
          <table:table-cell table:style-name="ce3" table:number-columns-repeated="13"/>
          <table:table-cell table:number-columns-repeated="998"/>
        </table:table-row>
        <table:table-row table:style-name="ro1">
          <table:table-cell table:style-name="ce55" office:value-type="string" calcext:value-type="string">
            <text:p>穿刺</text:p>
            <text:p>(ピアシング)</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參照效果</text:p>
          </table:table-cell>
          <table:table-cell table:style-name="ce72" office:value-type="string" calcext:value-type="string">
            <text:p>對決</text:p>
          </table:table-cell>
          <table:table-cell table:style-name="ce72" office:value-type="string" calcext:value-type="string">
            <text:p>單體</text:p>
          </table:table-cell>
          <table:table-cell table:style-name="ce72" office:value-type="string" calcext:value-type="string">
            <text:p>-</text:p>
          </table:table-cell>
          <table:table-cell table:style-name="ce72" office:value-type="float" office:value="3" calcext:value-type="float">
            <text:p>3</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使攻擊尖銳化，貫穿敵人的異能。</text:p>
            <text:p>可與任何攻擊組合，組合了該異能的攻擊無視對方的裝甲值計算傷害，但攻擊力-5。</text:p>
          </table:table-cell>
          <table:table-cell table:style-name="ce72" office:value-type="string" calcext:value-type="string">
            <text:p>變異種/特殊</text:p>
          </table:table-cell>
          <table:table-cell table:style-name="ce72" office:value-type="string" calcext:value-type="string">
            <text:p>LMP114</text:p>
          </table:table-cell>
          <table:table-cell table:style-name="ce3" table:number-columns-repeated="13"/>
          <table:table-cell table:number-columns-repeated="998"/>
        </table:table-row>
        <table:table-row table:style-name="ro1">
          <table:table-cell table:style-name="ce55" office:value-type="string" calcext:value-type="string">
            <text:p>多重轉換</text:p>
            <text:p>(マイティトランス)</text:p>
          </table:table-cell>
          <table:table-cell table:style-name="ce72" office:value-type="float" office:value="1" calcext:value-type="float">
            <text:p>1</text:p>
          </table:table-cell>
          <table:table-cell table:style-name="ce72" office:value-type="string" calcext:value-type="string">
            <text:p>主要動作</text:p>
          </table:table-cell>
          <table:table-cell table:style-name="ce72" office:value-type="string" calcext:value-type="string">
            <text:p>參照效果</text:p>
          </table:table-cell>
          <table:table-cell table:style-name="ce72" office:value-type="string" calcext:value-type="string">
            <text:p>對決</text:p>
          </table:table-cell>
          <table:table-cell table:number-columns-repeated="2" table:style-name="ce72" office:value-type="string" calcext:value-type="string">
            <text:p>-</text:p>
          </table:table-cell>
          <table:table-cell table:style-name="ce72" office:value-type="float" office:value="6" calcext:value-type="float">
            <text:p>6</text:p>
          </table:table-cell>
          <table:table-cell table:style-name="ce75" office:value-type="string" calcext:value-type="string">
            <text:p>D-Lois</text:p>
            <text:p>80%</text:p>
          </table:table-cell>
          <table:table-cell table:style-name="ce72" office:value-type="string" calcext:value-type="string">
            <text:p>1/劇本</text:p>
          </table:table-cell>
          <table:table-cell table:style-name="ce76" office:value-type="string" calcext:value-type="string">
            <text:p>利用未知的變異，排除對攻擊的妨礙。</text:p>
            <text:p>可與任何攻擊組合，組合了該異能的攻擊的對象和射程無法被你以外的角色以異能效果改變(可以進行掩護)。</text:p>
          </table:table-cell>
          <table:table-cell table:style-name="ce72" office:value-type="string" calcext:value-type="string">
            <text:p>變異種/特殊</text:p>
          </table:table-cell>
          <table:table-cell table:style-name="ce72" office:value-type="string" calcext:value-type="string">
            <text:p>LMP115</text:p>
          </table:table-cell>
          <table:table-cell table:style-name="ce3" table:number-columns-repeated="13"/>
          <table:table-cell table:number-columns-repeated="998"/>
        </table:table-row>
        <table:table-row table:style-name="ro1">
          <table:table-cell table:style-name="ce55" office:value-type="string" calcext:value-type="string">
            <text:p>不規則變異</text:p>
            <text:p>(イレギュラーシフト)</text:p>
          </table:table-cell>
          <table:table-cell table:style-name="ce72" office:value-type="float" office:value="1" calcext:value-type="float">
            <text:p>1</text:p>
          </table:table-cell>
          <table:table-cell table:style-name="ce72" office:value-type="string" calcext:value-type="string">
            <text:p>主要動作</text:p>
          </table:table-cell>
          <table:table-cell table:style-name="ce72" office:value-type="string" calcext:value-type="string">
            <text:p>參照效果</text:p>
          </table:table-cell>
          <table:table-cell table:style-name="ce72" office:value-type="string" calcext:value-type="string">
            <text:p>對決</text:p>
          </table:table-cell>
          <table:table-cell table:number-columns-repeated="2" table:style-name="ce72" office:value-type="string" calcext:value-type="string">
            <text:p>-</text:p>
          </table:table-cell>
          <table:table-cell table:style-name="ce72" office:value-type="float" office:value="4" calcext:value-type="float">
            <text:p>4</text:p>
          </table:table-cell>
          <table:table-cell table:style-name="ce75" office:value-type="string" calcext:value-type="string">
            <text:p>D-Lois</text:p>
            <text:p>100%</text:p>
          </table:table-cell>
          <table:table-cell table:style-name="ce72" office:value-type="string" calcext:value-type="string">
            <text:p>3/劇本</text:p>
          </table:table-cell>
          <table:table-cell table:style-name="ce76" office:value-type="string" calcext:value-type="string">
            <text:p>使攻擊高速變異的異能</text:p>
            <text:p>可以與任何組合了其他變異種專用異能的攻擊進行組合，此攻擊的判定骰+5D。</text:p>
          </table:table-cell>
          <table:table-cell table:style-name="ce72" office:value-type="string" calcext:value-type="string">
            <text:p>變異種/特殊</text:p>
          </table:table-cell>
          <table:table-cell table:style-name="ce72" office:value-type="string" calcext:value-type="string">
            <text:p>LMP115</text:p>
          </table:table-cell>
          <table:table-cell table:style-name="ce3" table:number-columns-repeated="13"/>
          <table:table-cell table:number-columns-repeated="998"/>
        </table:table-row>
        <table:table-row table:style-name="ro1">
          <table:table-cell table:style-name="ce55" office:value-type="string" calcext:value-type="string">
            <text:p>全能</text:p>
            <text:p>(オールマイティ)</text:p>
          </table:table-cell>
          <table:table-cell table:style-name="ce72" office:value-type="float" office:value="1" calcext:value-type="float">
            <text:p>1</text:p>
          </table:table-cell>
          <table:table-cell table:style-name="ce72" office:value-type="string" calcext:value-type="string">
            <text:p>主要動作/回應動作</text:p>
          </table:table-cell>
          <table:table-cell table:style-name="ce72" office:value-type="string" calcext:value-type="string">
            <text:p>參照效果</text:p>
          </table:table-cell>
          <table:table-cell table:number-columns-repeated="3" table:style-name="ce72" office:value-type="string" calcext:value-type="string">
            <text:p>-</text:p>
          </table:table-cell>
          <table:table-cell table:style-name="ce72" office:value-type="string" calcext:value-type="string">
            <text:p>4D10</text:p>
          </table:table-cell>
          <table:table-cell table:style-name="ce75" office:value-type="string" calcext:value-type="string">
            <text:p>D-Lois</text:p>
            <text:p>120%</text:p>
          </table:table-cell>
          <table:table-cell table:style-name="ce72" office:value-type="string" calcext:value-type="string">
            <text:p>1/劇本</text:p>
          </table:table-cell>
          <table:table-cell table:style-name="ce76" office:value-type="string" calcext:value-type="string">
            <text:p>排除萬難的異能。</text:p>
            <text:p>可與任意判定組合。該判定無法因為其他異能的效果而失敗。（例:《時之棺》）</text:p>
            <text:p>此外，組合了該異能的攻擊造成的實際傷害無法因為其他異能的效果而減輕（例:《波紋的方陣》）</text:p>
          </table:table-cell>
          <table:table-cell table:style-name="ce72" office:value-type="string" calcext:value-type="string">
            <text:p>變異種/特殊</text:p>
          </table:table-cell>
          <table:table-cell table:style-name="ce72" office:value-type="string" calcext:value-type="string">
            <text:p>LMP115</text:p>
          </table:table-cell>
          <table:table-cell table:style-name="ce3" table:number-columns-repeated="13"/>
          <table:table-cell table:number-columns-repeated="998"/>
        </table:table-row>
        <table:table-row table:style-name="ro7">
          <table:table-cell table:style-name="ce70"/>
          <table:table-cell table:style-name="ce74" table:number-columns-repeated="9"/>
          <table:table-cell table:style-name="ce78"/>
          <table:table-cell table:style-name="ce74"/>
          <table:table-cell table:style-name="ce3" table:number-columns-repeated="14"/>
          <table:table-cell table:number-columns-repeated="998"/>
        </table:table-row>
        <table:table-row table:style-name="ro4" table:number-rows-repeated="1048550">
          <table:table-cell table:number-columns-repeated="1024"/>
        </table:table-row>
        <table:table-row table:style-name="ro4">
          <table:table-cell table:number-columns-repeated="1024"/>
        </table:table-row>
      </table:table>
      <table:table table:name="D-lois No.12 古代種異能" table:style-name="ta5">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number-columns-repeated="3" table:default-cell-style-name="Default"/>
        <table:table-column table:style-name="co19" table:default-cell-style-name="Default"/>
        <table:table-column table:style-name="co21" table:default-cell-style-name="Default"/>
        <table:table-column table:style-name="co23" table:default-cell-style-name="Default"/>
        <table:table-column table:style-name="co22" table:number-columns-repeated="14" table:default-cell-style-name="Default"/>
        <table:table-column table:style-name="co4" table:number-columns-repeated="998" table:default-cell-style-name="Default"/>
        <table:table-row table:style-name="ro2">
          <table:table-cell table:style-name="ce51" office:value-type="string" calcext:value-type="string">
            <text:p>名稱</text:p>
          </table:table-cell>
          <table:table-cell table:style-name="ce71" office:value-type="string" calcext:value-type="string">
            <text:p>最大等級</text:p>
          </table:table-cell>
          <table:table-cell table:style-name="ce71" office:value-type="string" calcext:value-type="string">
            <text:p>時機</text:p>
          </table:table-cell>
          <table:table-cell table:style-name="ce71" office:value-type="string" calcext:value-type="string">
            <text:p><text:span text:style-name="T8">技能</text:span></text:p>
          </table:table-cell>
          <table:table-cell table:style-name="ce71" office:value-type="string" calcext:value-type="string">
            <text:p>難易度</text:p>
          </table:table-cell>
          <table:table-cell table:style-name="ce71" office:value-type="string" calcext:value-type="string">
            <text:p>對象</text:p>
          </table:table-cell>
          <table:table-cell table:style-name="ce71" office:value-type="string" calcext:value-type="string">
            <text:p><text:span text:style-name="T8">射程</text:span></text:p>
          </table:table-cell>
          <table:table-cell table:style-name="ce71" office:value-type="string" calcext:value-type="string">
            <text:p>侵蝕值</text:p>
          </table:table-cell>
          <table:table-cell table:style-name="ce71" office:value-type="string" calcext:value-type="string">
            <text:p><text:span text:style-name="T8">限制</text:span></text:p>
          </table:table-cell>
          <table:table-cell table:style-name="ce71" office:value-type="string" calcext:value-type="string">
            <text:p>次數</text:p>
          </table:table-cell>
          <table:table-cell table:style-name="ce51" office:value-type="string" calcext:value-type="string">
            <text:p><text:span text:style-name="T8">效果</text:span></text:p>
          </table:table-cell>
          <table:table-cell table:style-name="ce71" office:value-type="string" calcext:value-type="string">
            <text:p>備註</text:p>
          </table:table-cell>
          <table:table-cell table:style-name="ce71" office:value-type="string" calcext:value-type="string">
            <text:p>參照</text:p>
          </table:table-cell>
          <table:table-cell table:style-name="ce3" table:number-columns-repeated="13"/>
          <table:table-cell table:number-columns-repeated="998"/>
        </table:table-row>
        <table:table-row table:style-name="ro1">
          <table:table-cell table:style-name="ce80" office:value-type="string" calcext:value-type="string">
            <text:p>儲備品</text:p>
            <text:p>(アーティクルリザーブ)</text:p>
          </table:table-cell>
          <table:table-cell table:style-name="ce72" office:value-type="float" office:value="5" calcext:value-type="float">
            <text:p>5</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text:span text:style-name="T10">自身</text:span></text:p>
          </table:table-cell>
          <table:table-cell table:style-name="ce72" office:value-type="string" calcext:value-type="string">
            <text:p><text:span text:style-name="T10">至近</text:span></text:p>
          </table:table-cell>
          <table:table-cell table:style-name="ce72" office:value-type="float" office:value="4" calcext:value-type="float">
            <text:p>4</text:p>
          </table:table-cell>
          <table:table-cell table:style-name="ce72" office:value-type="string" calcext:value-type="string">
            <text:p>D-Lois</text:p>
          </table:table-cell>
          <table:table-cell table:style-name="ce72" office:value-type="string" calcext:value-type="string">
            <text:p>1/劇本</text:p>
          </table:table-cell>
          <table:table-cell table:style-name="ce76" office:value-type="string" calcext:value-type="string">
            <text:p>利用權力獲得道具的異能。</text:p>
            <text:p>選擇一個常備點數為[LV×5]以下的道具，該場景間，你取得該道具</text:p>
            <text:p>取得的武器跟防具的時候可以立即裝備，取得載具時可直接進入搭乘狀態</text:p>
          </table:table-cell>
          <table:table-cell table:style-name="ce72" office:value-type="string" calcext:value-type="string">
            <text:p>D-Lois 古代種</text:p>
          </table:table-cell>
          <table:table-cell table:style-name="ce72" office:value-type="string" calcext:value-type="string">
            <text:p>LMP115</text:p>
          </table:table-cell>
          <table:table-cell table:style-name="ce3" table:number-columns-repeated="13"/>
          <table:table-cell table:number-columns-repeated="998"/>
        </table:table-row>
        <table:table-row table:style-name="ro1">
          <table:table-cell table:style-name="ce69" office:value-type="string" calcext:value-type="string">
            <text:p><text:span text:style-name="T1">不死之身</text:span></text:p>
            <text:p><text:span text:style-name="T2">(イモータルライフ)</text:span></text:p>
          </table:table-cell>
          <table:table-cell table:style-name="ce72" office:value-type="float" office:value="1" calcext:value-type="float">
            <text:p>1</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text:span text:style-name="T10">自身</text:span></text:p>
          </table:table-cell>
          <table:table-cell table:style-name="ce72" office:value-type="string" calcext:value-type="string">
            <text:p><text:span text:style-name="T10">至近</text:span></text:p>
          </table:table-cell>
          <table:table-cell table:style-name="ce72" office:value-type="string" calcext:value-type="string">
            <text:p>參照</text:p>
          </table:table-cell>
          <table:table-cell table:style-name="ce72" office:value-type="string" calcext:value-type="string">
            <text:p>D-Lois</text:p>
          </table:table-cell>
          <table:table-cell table:style-name="ce72" office:value-type="string" calcext:value-type="string">
            <text:p>1/劇本</text:p>
          </table:table-cell>
          <table:table-cell table:style-name="ce76" office:value-type="string" calcext:value-type="string">
            <text:p>藉由背教者病毒的力量，從死亡深淵復活的異能。</text:p>
            <text:p>於你變為“戰鬥不能”時使用，解除“戰鬥不能”並恢復2D10點HP。侵蝕率上升與恢復的HP同樣的數值。</text:p>
          </table:table-cell>
          <table:table-cell table:style-name="ce72" office:value-type="string" calcext:value-type="string">
            <text:p>D-Lois 古代種</text:p>
          </table:table-cell>
          <table:table-cell table:style-name="ce72" office:value-type="string" calcext:value-type="string">
            <text:p>LMP115</text:p>
          </table:table-cell>
          <table:table-cell table:style-name="ce3" table:number-columns-repeated="13"/>
          <table:table-cell table:number-columns-repeated="998"/>
        </table:table-row>
        <table:table-row table:style-name="ro1">
          <table:table-cell table:style-name="ce69" office:value-type="string" calcext:value-type="string">
            <text:p>至尊守衛</text:p>
            <text:p>(インペリアルガード)</text:p>
          </table:table-cell>
          <table:table-cell table:style-name="ce72" office:value-type="float" office:value="3" calcext:value-type="float">
            <text:p>3</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text:span text:style-name="T10">自身</text:span></text:p>
          </table:table-cell>
          <table:table-cell table:style-name="ce72" office:value-type="string" calcext:value-type="string">
            <text:p><text:span text:style-name="T10">至近</text:span></text:p>
          </table:table-cell>
          <table:table-cell table:style-name="ce72" office:value-type="float" office:value="3" calcext:value-type="float">
            <text:p>3</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呼喚出沉迷於你的人物，集團，動物，從危險中守護你的異能，他們在關鍵時刻瀟灑出現，完事後又瀟灑地離開。</text:p>
            <text:p>於你即將受到HP傷害時使用，你預定受到的傷害-2D10。</text:p>
          </table:table-cell>
          <table:table-cell table:style-name="ce72" office:value-type="string" calcext:value-type="string">
            <text:p>D-Lois 古代種</text:p>
          </table:table-cell>
          <table:table-cell table:style-name="ce72" office:value-type="string" calcext:value-type="string">
            <text:p>LMP115</text:p>
          </table:table-cell>
          <table:table-cell table:style-name="ce3" table:number-columns-repeated="13"/>
          <table:table-cell table:number-columns-repeated="998"/>
        </table:table-row>
        <table:table-row table:style-name="ro1">
          <table:table-cell table:style-name="ce81" office:value-type="string" calcext:value-type="string">
            <text:p>淨化</text:p>
            <text:p>(クレンジング)</text:p>
          </table:table-cell>
          <table:table-cell table:style-name="ce72" office:value-type="float" office:value="1" calcext:value-type="float">
            <text:p>1</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text:span text:style-name="T10">自身</text:span></text:p>
          </table:table-cell>
          <table:table-cell table:style-name="ce72" office:value-type="string" calcext:value-type="string">
            <text:p><text:span text:style-name="T10">至近</text:span></text:p>
          </table:table-cell>
          <table:table-cell table:style-name="ce72" office:value-type="float" office:value="2" calcext:value-type="float">
            <text:p>2</text:p>
          </table:table-cell>
          <table:table-cell table:style-name="ce72" office:value-type="string" calcext:value-type="string">
            <text:p>D-Lois</text:p>
          </table:table-cell>
          <table:table-cell table:style-name="ce72" office:value-type="string" calcext:value-type="string">
            <text:p>1/場景</text:p>
          </table:table-cell>
          <table:table-cell table:style-name="ce76" office:value-type="string" calcext:value-type="string">
            <text:p>將體內引起異常的因子排除的異能。</text:p>
            <text:p>將你受到的任意異能效果全部解除，解除哪個異能由你決定，但是不能使用這個效果來解除異常狀態</text:p>
          </table:table-cell>
          <table:table-cell table:style-name="ce72" office:value-type="string" calcext:value-type="string">
            <text:p>D-Lois 古代種</text:p>
          </table:table-cell>
          <table:table-cell table:style-name="ce72" office:value-type="string" calcext:value-type="string">
            <text:p>LMP115</text:p>
          </table:table-cell>
          <table:table-cell table:style-name="ce3" table:number-columns-repeated="13"/>
          <table:table-cell table:number-columns-repeated="998"/>
        </table:table-row>
        <table:table-row table:style-name="ro1">
          <table:table-cell table:style-name="ce55" office:value-type="string" calcext:value-type="string">
            <text:p><text:span text:style-name="T3">命令</text:span></text:p>
            <text:p><text:span text:style-name="T4">(コマンド)</text:span></text:p>
          </table:table-cell>
          <table:table-cell table:style-name="ce72" office:value-type="float" office:value="1" calcext:value-type="float">
            <text:p>1</text:p>
          </table:table-cell>
          <table:table-cell table:style-name="ce72" office:value-type="string" calcext:value-type="string">
            <text:p>主要動作</text:p>
          </table:table-cell>
          <table:table-cell table:style-name="ce72" office:value-type="string" calcext:value-type="string">
            <text:p><text:span text:style-name="T9">&lt;交涉&gt;</text:span></text:p>
          </table:table-cell>
          <table:table-cell table:style-name="ce72" office:value-type="string" calcext:value-type="string">
            <text:p>對決</text:p>
          </table:table-cell>
          <table:table-cell table:style-name="ce72" office:value-type="string" calcext:value-type="string">
            <text:p>範圍(選擇)</text:p>
          </table:table-cell>
          <table:table-cell table:style-name="ce72" office:value-type="string" calcext:value-type="string">
            <text:p>視界</text:p>
          </table:table-cell>
          <table:table-cell table:style-name="ce72" office:value-type="float" office:value="3" calcext:value-type="float">
            <text:p>3</text:p>
          </table:table-cell>
          <table:table-cell table:style-name="ce72" office:value-type="string" calcext:value-type="string">
            <text:p>D-Lois</text:p>
          </table:table-cell>
          <table:table-cell table:style-name="ce72" office:value-type="string" calcext:value-type="string">
            <text:p>-</text:p>
          </table:table-cell>
          <table:table-cell table:style-name="ce76" office:value-type="string" calcext:value-type="string">
            <text:p>向他人施以威壓，使弱者退卻的異能。</text:p>
            <text:p>只能以集團為對象。進行射擊攻擊，命中的話，對象變成無法戰鬥。組合此異能的攻擊不能給對象造成HP傷害。</text:p>
          </table:table-cell>
          <table:table-cell table:style-name="ce72" office:value-type="string" calcext:value-type="string">
            <text:p>D-Lois 古代種</text:p>
          </table:table-cell>
          <table:table-cell table:style-name="ce72" office:value-type="string" calcext:value-type="string">
            <text:p>LMP115</text:p>
          </table:table-cell>
          <table:table-cell table:style-name="ce3" table:number-columns-repeated="13"/>
          <table:table-cell table:number-columns-repeated="998"/>
        </table:table-row>
        <table:table-row table:style-name="ro1">
          <table:table-cell table:style-name="ce55" office:value-type="string" calcext:value-type="string">
            <text:p>既視感</text:p>
            <text:p>(デジャヴュ)</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text:span text:style-name="T10">自身</text:span></text:p>
          </table:table-cell>
          <table:table-cell table:style-name="ce72" office:value-type="string" calcext:value-type="string">
            <text:p><text:span text:style-name="T10">至近</text:span></text:p>
          </table:table-cell>
          <table:table-cell table:style-name="ce72" office:value-type="float" office:value="2" calcext:value-type="float">
            <text:p>2</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將過去的體驗與現在的狀況互相對照，解決疑問的異能。</text:p>
            <text:p>可直接向ＧＭ進行質問。ＧＭ可以拒絕回答，此時不消耗該異能的使用次數。該異能無法與其他異能進行組合</text:p>
          </table:table-cell>
          <table:table-cell table:style-name="ce72" office:value-type="string" calcext:value-type="string">
            <text:p>D-Lois 古代種</text:p>
          </table:table-cell>
          <table:table-cell table:style-name="ce72" office:value-type="string" calcext:value-type="string">
            <text:p>LMP116</text:p>
          </table:table-cell>
          <table:table-cell table:style-name="ce3" table:number-columns-repeated="13"/>
          <table:table-cell table:number-columns-repeated="998"/>
        </table:table-row>
        <table:table-row table:style-name="ro1">
          <table:table-cell table:style-name="ce82" office:value-type="string" calcext:value-type="string">
            <text:p>指揮</text:p>
            <text:p>(コンダクト)</text:p>
          </table:table-cell>
          <table:table-cell table:style-name="ce72" office:value-type="float" office:value="1" calcext:value-type="float">
            <text:p>1</text:p>
          </table:table-cell>
          <table:table-cell table:style-name="ce72" office:value-type="string" calcext:value-type="string">
            <text:p>先攻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單體</text:p>
          </table:table-cell>
          <table:table-cell table:style-name="ce72" office:value-type="string" calcext:value-type="string">
            <text:p><text:span text:style-name="T10">至近</text:span></text:p>
          </table:table-cell>
          <table:table-cell table:style-name="ce72" office:value-type="float" office:value="10" calcext:value-type="float">
            <text:p>10</text:p>
          </table:table-cell>
          <table:table-cell table:style-name="ce72" office:value-type="string" calcext:value-type="string">
            <text:p>D-Lois</text:p>
          </table:table-cell>
          <table:table-cell table:style-name="ce72" office:value-type="string" calcext:value-type="string">
            <text:p>1/劇本</text:p>
          </table:table-cell>
          <table:table-cell table:style-name="ce76" office:value-type="string" calcext:value-type="string">
            <text:p>使他人的Ｒ病毒活性化並使其行動的異能。</text:p>
            <text:p>對象可以在先攻階段時執行主要階段。無法以自己和不是“未行動”的角色為對象。該異能無法與其他異能進行組合。</text:p>
          </table:table-cell>
          <table:table-cell table:style-name="ce72" office:value-type="string" calcext:value-type="string">
            <text:p>D-Lois 古代種</text:p>
          </table:table-cell>
          <table:table-cell table:style-name="ce72" office:value-type="string" calcext:value-type="string">
            <text:p>LMP116</text:p>
          </table:table-cell>
          <table:table-cell table:style-name="ce3" table:number-columns-repeated="13"/>
          <table:table-cell table:number-columns-repeated="998"/>
        </table:table-row>
        <table:table-row table:style-name="ro1">
          <table:table-cell table:style-name="ce68" office:value-type="string" calcext:value-type="string">
            <text:p>光雲</text:p>
            <text:p>(ニンバス)</text:p>
          </table:table-cell>
          <table:table-cell table:style-name="ce72" office:value-type="float" office:value="3" calcext:value-type="float">
            <text:p>3</text:p>
          </table:table-cell>
          <table:table-cell table:style-name="ce72" office:value-type="string" calcext:value-type="string">
            <text:p>回應動作</text:p>
          </table:table-cell>
          <table:table-cell table:style-name="ce72" office:value-type="string" calcext:value-type="string">
            <text:p>參照效果</text:p>
          </table:table-cell>
          <table:table-cell table:style-name="ce72" office:value-type="string" calcext:value-type="string">
            <text:p>對決</text:p>
          </table:table-cell>
          <table:table-cell table:style-name="ce72" office:value-type="string" calcext:value-type="string">
            <text:p><text:span text:style-name="T10">自身</text:span></text:p>
          </table:table-cell>
          <table:table-cell table:style-name="ce72" office:value-type="string" calcext:value-type="string">
            <text:p><text:span text:style-name="T10">至近</text:span></text:p>
          </table:table-cell>
          <table:table-cell table:style-name="ce72" office:value-type="float" office:value="2" calcext:value-type="float">
            <text:p>2</text:p>
          </table:table-cell>
          <table:table-cell table:style-name="ce72" office:value-type="string" calcext:value-type="string">
            <text:p>D-Lois</text:p>
          </table:table-cell>
          <table:table-cell table:style-name="ce72" office:value-type="string" calcext:value-type="string">
            <text:p>-</text:p>
          </table:table-cell>
          <table:table-cell table:style-name="ce76" office:value-type="string" calcext:value-type="string">
            <text:p>藉由古代種特有的Ｒ病毒，減少他人敵意的異能。</text:p>
            <text:p>可與任何回應動作判定組合，組合了該異能的判定骰數+[LV]D</text:p>
          </table:table-cell>
          <table:table-cell table:style-name="ce72" office:value-type="string" calcext:value-type="string">
            <text:p>D-Lois 古代種</text:p>
          </table:table-cell>
          <table:table-cell table:style-name="ce72" office:value-type="string" calcext:value-type="string">
            <text:p>LMP116</text:p>
          </table:table-cell>
          <table:table-cell table:style-name="ce3" table:number-columns-repeated="13"/>
          <table:table-cell table:number-columns-repeated="998"/>
        </table:table-row>
        <table:table-row table:style-name="ro1">
          <table:table-cell table:style-name="ce55" office:value-type="string" calcext:value-type="string">
            <text:p><text:span text:style-name="T3">神力</text:span></text:p>
            <text:p><text:span text:style-name="T4">(フォース)</text:span></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參照效果</text:p>
          </table:table-cell>
          <table:table-cell table:number-columns-repeated="3" table:style-name="ce72" office:value-type="string" calcext:value-type="string">
            <text:p>-</text:p>
          </table:table-cell>
          <table:table-cell table:style-name="ce72" office:value-type="float" office:value="3" calcext:value-type="float">
            <text:p>3</text:p>
          </table:table-cell>
          <table:table-cell table:style-name="ce72" office:value-type="string" calcext:value-type="string">
            <text:p>D-Lois</text:p>
          </table:table-cell>
          <table:table-cell table:style-name="ce72" office:value-type="string" calcext:value-type="string">
            <text:p>-</text:p>
          </table:table-cell>
          <table:table-cell table:style-name="ce76" office:value-type="string" calcext:value-type="string">
            <text:p>活化自己的Ｒ病毒，使力量強化的異能。</text:p>
            <text:p>可與任何主要動作判定組合，組合了該異能的判定骰數+[LV]D</text:p>
          </table:table-cell>
          <table:table-cell table:style-name="ce72" office:value-type="string" calcext:value-type="string">
            <text:p>D-Lois 古代種</text:p>
          </table:table-cell>
          <table:table-cell table:style-name="ce72" office:value-type="string" calcext:value-type="string">
            <text:p>LMP116</text:p>
          </table:table-cell>
          <table:table-cell table:style-name="ce3" table:number-columns-repeated="13"/>
          <table:table-cell table:number-columns-repeated="998"/>
        </table:table-row>
        <table:table-row table:style-name="ro1">
          <table:table-cell table:style-name="ce55" office:value-type="string" calcext:value-type="string">
            <text:p><text:span text:style-name="T3">平移</text:span></text:p>
            <text:p><text:span text:style-name="T4">(フラットシフト)</text:span></text:p>
          </table:table-cell>
          <table:table-cell table:style-name="ce72" office:value-type="float" office:value="1" calcext:value-type="float">
            <text:p>1</text:p>
          </table:table-cell>
          <table:table-cell table:style-name="ce72" office:value-type="string" calcext:value-type="string">
            <text:p>主要動作/回應動作</text:p>
          </table:table-cell>
          <table:table-cell table:style-name="ce72" office:value-type="string" calcext:value-type="string">
            <text:p>參照效果</text:p>
          </table:table-cell>
          <table:table-cell table:number-columns-repeated="3" table:style-name="ce72" office:value-type="string" calcext:value-type="string">
            <text:p>-</text:p>
          </table:table-cell>
          <table:table-cell table:style-name="ce72" office:value-type="float" office:value="0" calcext:value-type="float">
            <text:p>0</text:p>
          </table:table-cell>
          <table:table-cell table:style-name="ce72" office:value-type="string" calcext:value-type="string">
            <text:p>D-Lois</text:p>
          </table:table-cell>
          <table:table-cell table:style-name="ce72" office:value-type="string" calcext:value-type="string">
            <text:p>1/劇本</text:p>
          </table:table-cell>
          <table:table-cell table:style-name="ce76" office:value-type="string" calcext:value-type="string">
            <text:p>吸收周遭的Ｒ病毒來使用異能的異能。</text:p>
            <text:p>可與任何主要動作或是回應動作的判定組合。組合了該異能的判定所上升的侵蝕率合計值變為０。</text:p>
          </table:table-cell>
          <table:table-cell table:style-name="ce72" office:value-type="string" calcext:value-type="string">
            <text:p>D-Lois 古代種</text:p>
          </table:table-cell>
          <table:table-cell table:style-name="ce72" office:value-type="string" calcext:value-type="string">
            <text:p>LMP116</text:p>
          </table:table-cell>
          <table:table-cell table:style-name="ce3" table:number-columns-repeated="13"/>
          <table:table-cell table:number-columns-repeated="998"/>
        </table:table-row>
        <table:table-row table:style-name="ro1">
          <table:table-cell table:style-name="ce69" office:value-type="string" calcext:value-type="string">
            <text:p><text:span text:style-name="T5">重整</text:span></text:p>
            <text:p><text:span text:style-name="T2">(リセット)</text:span></text:p>
          </table:table-cell>
          <table:table-cell table:style-name="ce72" office:value-type="float" office:value="1" calcext:value-type="float">
            <text:p>1</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text:span text:style-name="T10">自身</text:span></text:p>
          </table:table-cell>
          <table:table-cell table:style-name="ce72" office:value-type="string" calcext:value-type="string">
            <text:p><text:span text:style-name="T10">至近</text:span></text:p>
          </table:table-cell>
          <table:table-cell table:style-name="ce72" office:value-type="float" office:value="3" calcext:value-type="float">
            <text:p>3</text:p>
          </table:table-cell>
          <table:table-cell table:style-name="ce72" office:value-type="string" calcext:value-type="string">
            <text:p>D-Lois</text:p>
          </table:table-cell>
          <table:table-cell table:style-name="ce72" office:value-type="string" calcext:value-type="string">
            <text:p>1/場景</text:p>
          </table:table-cell>
          <table:table-cell table:style-name="ce76" office:value-type="string" calcext:value-type="string">
            <text:p>制禦Ｒ病毒，重整狀態的異能。</text:p>
            <text:p>即使處於“重壓”狀態時也可以使用，任何時候都可以進行宣言，解除你受到的所有異常狀態</text:p>
          </table:table-cell>
          <table:table-cell table:style-name="ce72" office:value-type="string" calcext:value-type="string">
            <text:p>D-Lois 古代種</text:p>
          </table:table-cell>
          <table:table-cell table:style-name="ce72" office:value-type="string" calcext:value-type="string">
            <text:p>LMP116</text:p>
          </table:table-cell>
          <table:table-cell table:style-name="ce3" table:number-columns-repeated="13"/>
          <table:table-cell table:number-columns-repeated="998"/>
        </table:table-row>
        <table:table-row table:style-name="ro1">
          <table:table-cell table:style-name="ce82" office:value-type="string" calcext:value-type="string">
            <text:p>復活</text:p>
            <text:p>(リザレクション)</text:p>
          </table:table-cell>
          <table:table-cell table:style-name="ce73" office:value-type="float" office:value="1" calcext:value-type="float">
            <text:p>1</text:p>
          </table:table-cell>
          <table:table-cell table:style-name="ce72" office:value-type="string" calcext:value-type="string">
            <text:p>先攻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string" calcext:value-type="string">
            <text:p>參照</text:p>
          </table:table-cell>
          <table:table-cell table:style-name="ce72" office:value-type="string" calcext:value-type="string">
            <text:p>D-Lois</text:p>
          </table:table-cell>
          <table:table-cell table:style-name="ce72" office:value-type="string" calcext:value-type="string">
            <text:p>1/劇本</text:p>
          </table:table-cell>
          <table:table-cell table:style-name="ce76" office:value-type="string" calcext:value-type="string">
            <text:p>把自身的不滅性分予他人的異能。</text:p>
            <text:p>不能與其他異能組合，解除對象的戰鬥不能狀態並恢復其2D10點HP。你的侵蝕率上升與恢復的HP同樣的數值。</text:p>
          </table:table-cell>
          <table:table-cell table:style-name="ce72" office:value-type="string" calcext:value-type="string">
            <text:p>D-Lois 古代種</text:p>
          </table:table-cell>
          <table:table-cell table:style-name="ce72" office:value-type="string" calcext:value-type="string">
            <text:p>LMP116</text:p>
          </table:table-cell>
          <table:table-cell table:style-name="ce3" table:number-columns-repeated="13"/>
          <table:table-cell table:number-columns-repeated="998"/>
        </table:table-row>
        <table:table-row table:style-name="ro1">
          <table:table-cell table:style-name="ce55" office:value-type="string" calcext:value-type="string">
            <text:p><text:span text:style-name="T3">抑止力</text:span></text:p>
            <text:p><text:span text:style-name="T4">(リプレッション)</text:span></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單體</text:p>
          </table:table-cell>
          <table:table-cell table:style-name="ce72" office:value-type="string" calcext:value-type="string">
            <text:p><text:span text:style-name="T10">至近</text:span></text:p>
          </table:table-cell>
          <table:table-cell table:style-name="ce72" office:value-type="string" calcext:value-type="string">
            <text:p>1D10</text:p>
          </table:table-cell>
          <table:table-cell table:style-name="ce72" office:value-type="string" calcext:value-type="string">
            <text:p>D-Lois</text:p>
          </table:table-cell>
          <table:table-cell table:style-name="ce72" office:value-type="string" calcext:value-type="string">
            <text:p>1/劇本</text:p>
          </table:table-cell>
          <table:table-cell table:style-name="ce76" office:value-type="string" calcext:value-type="string">
            <text:p>使Ｒ病毒沉靜，抑止精神的侵蝕的異能。</text:p>
            <text:p>對象的侵蝕率下降[LV×5]以下任意點，之後你的侵蝕率上升同樣的數值。只能使用於同意該效果的對象之上。</text:p>
          </table:table-cell>
          <table:table-cell table:style-name="ce72" office:value-type="string" calcext:value-type="string">
            <text:p>D-Lois 古代種</text:p>
          </table:table-cell>
          <table:table-cell table:style-name="ce72" office:value-type="string" calcext:value-type="string">
            <text:p>LMP116</text:p>
          </table:table-cell>
          <table:table-cell table:style-name="ce3" table:number-columns-repeated="13"/>
          <table:table-cell table:number-columns-repeated="998"/>
        </table:table-row>
        <table:table-row table:style-name="ro1">
          <table:table-cell table:style-name="ce80" office:value-type="string" calcext:value-type="string">
            <text:p><text:span text:style-name="T6">支配者</text:span></text:p>
            <text:p><text:span text:style-name="T7">(ルーラー)</text:span></text:p>
          </table:table-cell>
          <table:table-cell table:style-name="ce72" office:value-type="float" office:value="5" calcext:value-type="float">
            <text:p>5</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場景(選擇)</text:p>
          </table:table-cell>
          <table:table-cell table:style-name="ce72" office:value-type="string" calcext:value-type="string">
            <text:p>視界</text:p>
          </table:table-cell>
          <table:table-cell table:style-name="ce72" office:value-type="float" office:value="6" calcext:value-type="float">
            <text:p>6</text:p>
          </table:table-cell>
          <table:table-cell table:style-name="ce72" office:value-type="string" calcext:value-type="string">
            <text:p>D-Lois</text:p>
          </table:table-cell>
          <table:table-cell table:style-name="ce72" office:value-type="string" calcext:value-type="string">
            <text:p>3/劇本</text:p>
          </table:table-cell>
          <table:table-cell table:style-name="ce76" office:value-type="string" calcext:value-type="string">
            <text:p>支配周遭的Ｒ病毒，限制他人行動的異能。</text:p>
            <text:p>該回合間，對象進行的所有判定骰數-[LV]D。</text:p>
          </table:table-cell>
          <table:table-cell table:style-name="ce72" office:value-type="string" calcext:value-type="string">
            <text:p>D-Lois 古代種</text:p>
          </table:table-cell>
          <table:table-cell table:style-name="ce72" office:value-type="string" calcext:value-type="string">
            <text:p>LMP116</text:p>
          </table:table-cell>
          <table:table-cell table:style-name="ce3" table:number-columns-repeated="13"/>
          <table:table-cell table:number-columns-repeated="998"/>
        </table:table-row>
        <table:table-row table:style-name="ro2">
          <table:table-cell table:style-name="ce70"/>
          <table:table-cell table:style-name="ce74" table:number-columns-repeated="9"/>
          <table:table-cell table:style-name="ce78"/>
          <table:table-cell table:style-name="ce74" table:number-columns-repeated="2"/>
          <table:table-cell table:style-name="ce3" table:number-columns-repeated="13"/>
          <table:table-cell table:number-columns-repeated="998"/>
        </table:table-row>
        <table:table-row table:style-name="ro4" table:number-rows-repeated="1048559">
          <table:table-cell table:number-columns-repeated="1024"/>
        </table:table-row>
        <table:table-row table:style-name="ro4">
          <table:table-cell table:number-columns-repeated="1024"/>
        </table:table-row>
      </table:table>
      <table:table table:name="D-lois No.23 天造者異能" table:style-name="ta6">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number-columns-repeated="3" table:default-cell-style-name="Default"/>
        <table:table-column table:style-name="co19" table:default-cell-style-name="Default"/>
        <table:table-column table:style-name="co21" table:default-cell-style-name="Default"/>
        <table:table-column table:style-name="co24" table:default-cell-style-name="Default"/>
        <table:table-column table:style-name="co22" table:number-columns-repeated="14" table:default-cell-style-name="Default"/>
        <table:table-column table:style-name="co4" table:number-columns-repeated="998" table:default-cell-style-name="Default"/>
        <table:table-row table:style-name="ro1">
          <table:table-cell table:style-name="ce51" office:value-type="string" calcext:value-type="string">
            <text:p>名稱</text:p>
          </table:table-cell>
          <table:table-cell table:style-name="ce71" office:value-type="string" calcext:value-type="string">
            <text:p>最大等級</text:p>
          </table:table-cell>
          <table:table-cell table:style-name="ce71" office:value-type="string" calcext:value-type="string">
            <text:p>時機</text:p>
          </table:table-cell>
          <table:table-cell table:style-name="ce71" office:value-type="string" calcext:value-type="string">
            <text:p>技能</text:p>
          </table:table-cell>
          <table:table-cell table:style-name="ce71" office:value-type="string" calcext:value-type="string">
            <text:p>難易度</text:p>
          </table:table-cell>
          <table:table-cell table:style-name="ce71" office:value-type="string" calcext:value-type="string">
            <text:p>對象</text:p>
          </table:table-cell>
          <table:table-cell table:style-name="ce71" office:value-type="string" calcext:value-type="string">
            <text:p>射程</text:p>
          </table:table-cell>
          <table:table-cell table:style-name="ce71" office:value-type="string" calcext:value-type="string">
            <text:p>侵蝕值</text:p>
          </table:table-cell>
          <table:table-cell table:style-name="ce71" office:value-type="string" calcext:value-type="string">
            <text:p>限制</text:p>
          </table:table-cell>
          <table:table-cell table:style-name="ce71" office:value-type="string" calcext:value-type="string">
            <text:p>次數</text:p>
          </table:table-cell>
          <table:table-cell table:style-name="ce51" office:value-type="string" calcext:value-type="string">
            <text:p>效果</text:p>
          </table:table-cell>
          <table:table-cell table:style-name="ce71" office:value-type="string" calcext:value-type="string">
            <text:p>備註</text:p>
          </table:table-cell>
          <table:table-cell table:style-name="ce71" office:value-type="string" calcext:value-type="string">
            <text:p>參照</text:p>
          </table:table-cell>
          <table:table-cell table:style-name="ce83"/>
          <table:table-cell table:style-name="ce3" table:number-columns-repeated="12"/>
          <table:table-cell table:number-columns-repeated="998"/>
        </table:table-row>
        <table:table-row table:style-name="ro1">
          <table:table-cell table:style-name="ce55" office:value-type="string" calcext:value-type="string">
            <text:p>精准度</text:p>
            <text:p>(アキュラシー)</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參照效果</text:p>
          </table:table-cell>
          <table:table-cell table:style-name="ce72" office:value-type="string" calcext:value-type="string">
            <text:p>對決</text:p>
          </table:table-cell>
          <table:table-cell table:number-columns-repeated="2" table:style-name="ce72" office:value-type="string" calcext:value-type="string">
            <text:p>-</text:p>
          </table:table-cell>
          <table:table-cell table:style-name="ce72" office:value-type="float" office:value="2" calcext:value-type="float">
            <text:p>2</text:p>
          </table:table-cell>
          <table:table-cell table:style-name="ce72" office:value-type="string" calcext:value-type="string">
            <text:p>D-Lois</text:p>
          </table:table-cell>
          <table:table-cell table:style-name="ce72" office:value-type="string" calcext:value-type="string">
            <text:p>-</text:p>
          </table:table-cell>
          <table:table-cell table:style-name="ce76" office:value-type="string" calcext:value-type="string">
            <text:p>更加精確地操縱病毒的異能。</text:p>
            <text:p>可以與任何攻擊進行組合，組合了此異能的攻擊達成值+[LV×2]</text:p>
          </table:table-cell>
          <table:table-cell table:style-name="ce72" office:value-type="string" calcext:value-type="string">
            <text:p>D-Lois 天造者</text:p>
          </table:table-cell>
          <table:table-cell table:style-name="ce72" office:value-type="string" calcext:value-type="string">
            <text:p>LMP117</text:p>
          </table:table-cell>
          <table:table-cell table:style-name="ce83"/>
          <table:table-cell table:style-name="ce3" table:number-columns-repeated="12"/>
          <table:table-cell table:number-columns-repeated="998"/>
        </table:table-row>
        <table:table-row table:style-name="ro1">
          <table:table-cell table:style-name="ce55" office:value-type="string" calcext:value-type="string">
            <text:p>增幅</text:p>
            <text:p>(アンプリフィケイション)</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參照效果</text:p>
          </table:table-cell>
          <table:table-cell table:number-columns-repeated="3" table:style-name="ce72" office:value-type="string" calcext:value-type="string">
            <text:p>-</text:p>
          </table:table-cell>
          <table:table-cell table:style-name="ce72" office:value-type="float" office:value="5" calcext:value-type="float">
            <text:p>5</text:p>
          </table:table-cell>
          <table:table-cell table:style-name="ce72" office:value-type="string" calcext:value-type="string">
            <text:p>D-Lois</text:p>
          </table:table-cell>
          <table:table-cell table:style-name="ce72" office:value-type="string" calcext:value-type="string">
            <text:p>3/劇本</text:p>
          </table:table-cell>
          <table:table-cell table:style-name="ce76" office:value-type="string" calcext:value-type="string">
            <text:p>增強攻擊力的異能。</text:p>
            <text:p>可與任何使用了異能的判定組合，組合了此異能的攻擊攻擊力+[LV×5]。</text:p>
          </table:table-cell>
          <table:table-cell table:style-name="ce72" office:value-type="string" calcext:value-type="string">
            <text:p>D-Lois 天造者</text:p>
          </table:table-cell>
          <table:table-cell table:style-name="ce72" office:value-type="string" calcext:value-type="string">
            <text:p>LMP117</text:p>
          </table:table-cell>
          <table:table-cell table:style-name="ce83"/>
          <table:table-cell table:style-name="ce3" table:number-columns-repeated="12"/>
          <table:table-cell table:number-columns-repeated="998"/>
        </table:table-row>
        <table:table-row table:style-name="ro1">
          <table:table-cell table:style-name="ce82" office:value-type="string" calcext:value-type="string">
            <text:p>介入</text:p>
            <text:p>(インターセプト)</text:p>
          </table:table-cell>
          <table:table-cell table:style-name="ce72" office:value-type="float" office:value="1" calcext:value-type="float">
            <text:p>1</text:p>
          </table:table-cell>
          <table:table-cell table:style-name="ce72" office:value-type="string" calcext:value-type="string">
            <text:p>先攻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6" calcext:value-type="float">
            <text:p>6</text:p>
          </table:table-cell>
          <table:table-cell table:style-name="ce72" office:value-type="string" calcext:value-type="string">
            <text:p>D-Lois</text:p>
          </table:table-cell>
          <table:table-cell table:style-name="ce72" office:value-type="string" calcext:value-type="string">
            <text:p>1/劇本</text:p>
          </table:table-cell>
          <table:table-cell table:style-name="ce76" office:value-type="string" calcext:value-type="string">
            <text:p>率先做好準備並介入他人行動的異能。</text:p>
            <text:p>你可以在先攻階段進行主要階段，不是未行動就不能使用此異能。不能與其他異能進行組合。</text:p>
          </table:table-cell>
          <table:table-cell table:style-name="ce72" office:value-type="string" calcext:value-type="string">
            <text:p>D-Lois 天造者</text:p>
          </table:table-cell>
          <table:table-cell table:style-name="ce72" office:value-type="string" calcext:value-type="string">
            <text:p>LMP117</text:p>
          </table:table-cell>
          <table:table-cell table:style-name="ce83"/>
          <table:table-cell table:style-name="ce3" table:number-columns-repeated="12"/>
          <table:table-cell table:number-columns-repeated="998"/>
        </table:table-row>
        <table:table-row table:style-name="ro1">
          <table:table-cell table:style-name="ce69" office:value-type="string" calcext:value-type="string">
            <text:p>能量轉換</text:p>
            <text:p>(エナジーシフト)</text:p>
          </table:table-cell>
          <table:table-cell table:style-name="ce72" office:value-type="float" office:value="3" calcext:value-type="float">
            <text:p>3</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10" calcext:value-type="float">
            <text:p>10</text:p>
          </table:table-cell>
          <table:table-cell table:style-name="ce72" office:value-type="string" calcext:value-type="string">
            <text:p>D-Lois</text:p>
          </table:table-cell>
          <table:table-cell table:style-name="ce72" office:value-type="string" calcext:value-type="string">
            <text:p>1/劇本</text:p>
          </table:table-cell>
          <table:table-cell table:style-name="ce76" office:value-type="string" calcext:value-type="string">
            <text:p>打消所受到的傷害，並進一步治癒傷勢的異能。</text:p>
            <text:p>於你即將受到HP傷害時使用，使該HP傷害變為0，且你的HP回復[LV×3]點</text:p>
          </table:table-cell>
          <table:table-cell table:style-name="ce72" office:value-type="string" calcext:value-type="string">
            <text:p>D-Lois 天造者</text:p>
          </table:table-cell>
          <table:table-cell table:style-name="ce72" office:value-type="string" calcext:value-type="string">
            <text:p>LMP117</text:p>
          </table:table-cell>
          <table:table-cell table:style-name="ce83"/>
          <table:table-cell table:style-name="ce3" table:number-columns-repeated="12"/>
          <table:table-cell table:number-columns-repeated="998"/>
        </table:table-row>
        <table:table-row table:style-name="ro1">
          <table:table-cell table:style-name="ce69" office:value-type="string" calcext:value-type="string">
            <text:p>鞏固</text:p>
            <text:p>(ストレングスン)</text:p>
          </table:table-cell>
          <table:table-cell table:style-name="ce72" office:value-type="float" office:value="5" calcext:value-type="float">
            <text:p>5</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3" calcext:value-type="float">
            <text:p>3</text:p>
          </table:table-cell>
          <table:table-cell table:style-name="ce72" office:value-type="string" calcext:value-type="string">
            <text:p>D-Lois</text:p>
          </table:table-cell>
          <table:table-cell table:style-name="ce72" office:value-type="string" calcext:value-type="string">
            <text:p>1/回合</text:p>
          </table:table-cell>
          <table:table-cell table:style-name="ce76" office:value-type="string" calcext:value-type="string">
            <text:p>增強其他異能效果的異能。</text:p>
            <text:p>與其他「時機：自動動作」並使用骰子決定效果的異能同時使用，使該異能的效果+[LVx2]點。</text:p>
          </table:table-cell>
          <table:table-cell table:style-name="ce72" office:value-type="string" calcext:value-type="string">
            <text:p>D-Lois 天造者</text:p>
          </table:table-cell>
          <table:table-cell table:style-name="ce72" office:value-type="string" calcext:value-type="string">
            <text:p>LMP117</text:p>
          </table:table-cell>
          <table:table-cell table:style-name="ce83"/>
          <table:table-cell table:style-name="ce3" table:number-columns-repeated="12"/>
          <table:table-cell table:number-columns-repeated="998"/>
        </table:table-row>
        <table:table-row table:style-name="ro1">
          <table:table-cell table:style-name="ce55" office:value-type="string" calcext:value-type="string">
            <text:p>急速</text:p>
            <text:p>(セレリティ)</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5" calcext:value-type="float">
            <text:p>5</text:p>
          </table:table-cell>
          <table:table-cell table:style-name="ce72" office:value-type="string" calcext:value-type="string">
            <text:p>D-Lois</text:p>
          </table:table-cell>
          <table:table-cell table:style-name="ce72" office:value-type="string" calcext:value-type="string">
            <text:p>1/劇本</text:p>
          </table:table-cell>
          <table:table-cell table:style-name="ce76" office:value-type="string" calcext:value-type="string">
            <text:p>解放症狀的力量，進行連續行動的異能。</text:p>
            <text:p>你立即進行兩次主要行動，但於使用了該異能的主要階段結束時，你失去[10-LV]點HP</text:p>
            <text:p>（額外補充說明：使用原理為首先於主要動作使用該異能，然後才立即進行兩次主要動作，因此可以與技能為-的主要動作異能組合）</text:p>
          </table:table-cell>
          <table:table-cell table:style-name="ce72" office:value-type="string" calcext:value-type="string">
            <text:p>D-Lois 天造者</text:p>
          </table:table-cell>
          <table:table-cell table:style-name="ce72" office:value-type="string" calcext:value-type="string">
            <text:p>LMP117</text:p>
          </table:table-cell>
          <table:table-cell table:style-name="ce83" office:value-type="string" calcext:value-type="string">
            <text:p>？</text:p>
          </table:table-cell>
          <table:table-cell table:style-name="ce3" table:number-columns-repeated="12"/>
          <table:table-cell table:number-columns-repeated="998"/>
        </table:table-row>
        <table:table-row table:style-name="ro1">
          <table:table-cell table:style-name="ce69" office:value-type="string" calcext:value-type="string">
            <text:p>竭盡全力</text:p>
            <text:p>(ランナウト)</text:p>
          </table:table-cell>
          <table:table-cell table:style-name="ce72" office:value-type="float" office:value="3" calcext:value-type="float">
            <text:p>3</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6" calcext:value-type="float">
            <text:p>6</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使異能的效果突飛猛進的異能。</text:p>
            <text:p>於你使用異能之前使用，選擇其中一個異能將其LV+2，此時可超過其最大等級，但不能增加其使用次數。</text:p>
          </table:table-cell>
          <table:table-cell table:style-name="ce72" office:value-type="string" calcext:value-type="string">
            <text:p>D-Lois 天造者</text:p>
          </table:table-cell>
          <table:table-cell table:style-name="ce72" office:value-type="string" calcext:value-type="string">
            <text:p>LMP117</text:p>
          </table:table-cell>
          <table:table-cell table:style-name="ce83"/>
          <table:table-cell table:style-name="ce3" table:number-columns-repeated="12"/>
          <table:table-cell table:number-columns-repeated="998"/>
        </table:table-row>
        <table:table-row table:style-name="ro1">
          <table:table-cell table:style-name="ce55" office:value-type="string" calcext:value-type="string">
            <text:p>限制突破</text:p>
            <text:p>(リミットブレイク)</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參照效果</text:p>
          </table:table-cell>
          <table:table-cell table:number-columns-repeated="3" table:style-name="ce72" office:value-type="string" calcext:value-type="string">
            <text:p>-</text:p>
          </table:table-cell>
          <table:table-cell table:style-name="ce72" office:value-type="float" office:value="4" calcext:value-type="float">
            <text:p>4</text:p>
          </table:table-cell>
          <table:table-cell table:style-name="ce72" office:value-type="string" calcext:value-type="string">
            <text:p>D-Lois</text:p>
          </table:table-cell>
          <table:table-cell table:style-name="ce72" office:value-type="string" calcext:value-type="string">
            <text:p>LV/劇本</text:p>
          </table:table-cell>
          <table:table-cell table:style-name="ce76" office:value-type="string" calcext:value-type="string">
            <text:p>解除限制的異能。</text:p>
            <text:p>可以與任何使用異能進行的判定組合。即使其中包含「限制：n%」的異能，也能在侵蝕率n%以下的時候使用。</text:p>
          </table:table-cell>
          <table:table-cell table:style-name="ce72" office:value-type="string" calcext:value-type="string">
            <text:p>D-Lois 天造者</text:p>
          </table:table-cell>
          <table:table-cell table:style-name="ce72" office:value-type="string" calcext:value-type="string">
            <text:p>LMP117</text:p>
          </table:table-cell>
          <table:table-cell table:style-name="ce83"/>
          <table:table-cell table:style-name="ce3" table:number-columns-repeated="12"/>
          <table:table-cell table:number-columns-repeated="998"/>
        </table:table-row>
        <table:table-row table:style-name="ro8">
          <table:table-cell table:style-name="ce70"/>
          <table:table-cell table:style-name="ce74" table:number-columns-repeated="9"/>
          <table:table-cell table:style-name="ce78"/>
          <table:table-cell table:style-name="ce74" table:number-columns-repeated="2"/>
          <table:table-cell table:style-name="ce3" table:number-columns-repeated="13"/>
          <table:table-cell table:number-columns-repeated="998"/>
        </table:table-row>
        <table:table-row table:style-name="ro4" table:number-rows-repeated="1048565">
          <table:table-cell table:number-columns-repeated="1024"/>
        </table:table-row>
        <table:table-row table:style-name="ro4">
          <table:table-cell table:number-columns-repeated="1024"/>
        </table:table-row>
      </table:table>
      <table:table table:name="D-lois NO.17 RB異能" table:style-name="ta7">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number-columns-repeated="3" table:default-cell-style-name="Default"/>
        <table:table-column table:style-name="co19" table:default-cell-style-name="Default"/>
        <table:table-column table:style-name="co21" table:default-cell-style-name="Default"/>
        <table:table-column table:style-name="co25" table:default-cell-style-name="Default"/>
        <table:table-column table:style-name="co22" table:number-columns-repeated="14" table:default-cell-style-name="Default"/>
        <table:table-column table:style-name="co4" table:number-columns-repeated="998" table:default-cell-style-name="Default"/>
        <table:table-row table:style-name="ro1">
          <table:table-cell table:style-name="ce84" office:value-type="string" calcext:value-type="string">
            <text:p>名稱</text:p>
          </table:table-cell>
          <table:table-cell table:style-name="ce84" office:value-type="string" calcext:value-type="string">
            <text:p>最大等級</text:p>
          </table:table-cell>
          <table:table-cell table:style-name="ce84" office:value-type="string" calcext:value-type="string">
            <text:p>時機</text:p>
          </table:table-cell>
          <table:table-cell table:style-name="ce84" office:value-type="string" calcext:value-type="string">
            <text:p>技能</text:p>
          </table:table-cell>
          <table:table-cell table:style-name="ce84" office:value-type="string" calcext:value-type="string">
            <text:p>難易度</text:p>
          </table:table-cell>
          <table:table-cell table:style-name="ce84" office:value-type="string" calcext:value-type="string">
            <text:p>對象</text:p>
          </table:table-cell>
          <table:table-cell table:style-name="ce84" office:value-type="string" calcext:value-type="string">
            <text:p>射程</text:p>
          </table:table-cell>
          <table:table-cell table:style-name="ce84" office:value-type="string" calcext:value-type="string">
            <text:p>侵蝕值</text:p>
          </table:table-cell>
          <table:table-cell table:style-name="ce84" office:value-type="string" calcext:value-type="string">
            <text:p>限制</text:p>
          </table:table-cell>
          <table:table-cell table:style-name="ce84" office:value-type="string" calcext:value-type="string">
            <text:p>次數</text:p>
          </table:table-cell>
          <table:table-cell table:style-name="ce84" office:value-type="string" calcext:value-type="string">
            <text:p>效果</text:p>
          </table:table-cell>
          <table:table-cell table:style-name="ce84" office:value-type="string" calcext:value-type="string">
            <text:p>參照</text:p>
          </table:table-cell>
          <table:table-cell table:style-name="ce91" table:number-columns-repeated="14"/>
          <table:table-cell table:number-columns-repeated="998"/>
        </table:table-row>
        <table:table-row table:style-name="ro1">
          <table:table-cell table:style-name="ce85" office:value-type="string" calcext:value-type="string">
            <text:p>人類之鄰</text:p>
            <text:p>(ヒューマンズネイバー)</text:p>
          </table:table-cell>
          <table:table-cell table:style-name="ce72" office:value-type="float" office:value="5" calcext:value-type="float">
            <text:p>5</text:p>
          </table:table-cell>
          <table:table-cell table:style-name="ce72" office:value-type="string" calcext:value-type="string">
            <text:p>常駐</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string" calcext:value-type="string">
            <text:p>－</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表示你是背教者生命體的異能。你可以完美地偽裝成人類。</text:p>
            <text:p>你的衝動判定骰數+LV顆。</text:p>
            <text:p>此異能的等級不受侵蝕率影響。取得此異能的話，侵蝕率基本值+5。</text:p>
          </table:table-cell>
          <table:table-cell table:style-name="ce76" office:value-type="string" calcext:value-type="string">
            <text:p>規則2P178</text:p>
            <text:p>EAP134</text:p>
          </table:table-cell>
          <table:table-cell table:style-name="ce91" table:number-columns-repeated="14"/>
          <table:table-cell table:number-columns-repeated="998"/>
        </table:table-row>
        <table:table-row table:style-name="ro1">
          <table:table-cell table:style-name="ce86" office:value-type="string" calcext:value-type="string">
            <text:p>起源：動物</text:p>
            <text:p>(オリジン：アニマル)</text:p>
          </table:table-cell>
          <table:table-cell table:style-name="ce72" office:value-type="float" office:value="5" calcext:value-type="float">
            <text:p>5</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3" calcext:value-type="float">
            <text:p>3</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表示你是起源於動物，或者是動物型、幻獸型的背教者生命體。</text:p>
            <text:p>該場景中，你的空手的攻擊力+[LV×2]，但在此異能持續發揮效果的期間，</text:p>
            <text:p>不能裝備、使用空手以外的所有道具。</text:p>
          </table:table-cell>
          <table:table-cell table:style-name="ce76" office:value-type="string" calcext:value-type="string">
            <text:p>規則2P178</text:p>
            <text:p>EAP134</text:p>
          </table:table-cell>
          <table:table-cell table:style-name="ce91" table:number-columns-repeated="14"/>
          <table:table-cell table:number-columns-repeated="998"/>
        </table:table-row>
        <table:table-row table:style-name="ro1">
          <table:table-cell table:style-name="ce86" office:value-type="string" calcext:value-type="string">
            <text:p>起源：群集</text:p>
            <text:p>(オリジン：コロニー)</text:p>
          </table:table-cell>
          <table:table-cell table:style-name="ce72" office:value-type="float" office:value="5" calcext:value-type="float">
            <text:p>5</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3" calcext:value-type="float">
            <text:p>3</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表示你是由珊瑚礁、黏菌或森林之類的群體變成的背教者生命體。</text:p>
            <text:p>使用此異能後，一受到暴走以外的異常狀態就會立刻回復，直到回復LV個異常狀態或場景結束為止。</text:p>
          </table:table-cell>
          <table:table-cell table:style-name="ce92" office:value-type="string" calcext:value-type="string">
            <text:p>EAP134</text:p>
          </table:table-cell>
          <table:table-cell table:style-name="ce91" table:number-columns-repeated="14"/>
          <table:table-cell table:number-columns-repeated="998"/>
        </table:table-row>
        <table:table-row table:style-name="ro1">
          <table:table-cell table:style-name="ce86" office:value-type="string" calcext:value-type="string">
            <text:p>起源：網路</text:p>
            <text:p>(オリジン：サイバー)</text:p>
          </table:table-cell>
          <table:table-cell table:style-name="ce72" office:value-type="float" office:value="5" calcext:value-type="float">
            <text:p>5</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2" calcext:value-type="float">
            <text:p>2</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表示你是由網路程式或機械變成的背教者生命體。</text:p>
            <text:p>該場景中，你使用【社會】的判定達成值+[LV×2]。</text:p>
          </table:table-cell>
          <table:table-cell table:style-name="ce76" office:value-type="string" calcext:value-type="string">
            <text:p>規則2P179</text:p>
            <text:p>EAP134</text:p>
          </table:table-cell>
          <table:table-cell table:style-name="ce91" table:number-columns-repeated="14"/>
          <table:table-cell table:number-columns-repeated="998"/>
        </table:table-row>
        <table:table-row table:style-name="ro1">
          <table:table-cell table:style-name="ce86" office:value-type="string" calcext:value-type="string">
            <text:p>起源：人類</text:p>
            <text:p>(オリジン：ヒューマン)</text:p>
          </table:table-cell>
          <table:table-cell table:style-name="ce72" office:value-type="float" office:value="5" calcext:value-type="float">
            <text:p>5</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2" calcext:value-type="float">
            <text:p>2</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表示你是模仿人類，或者起源的機能與人類沒什麼差異的背教者生命體。</text:p>
            <text:p>擁有意識的從者、擬態成人類的背教者、覺醒了自我的複製體等都屬_xffff_此類。</text:p>
            <text:p>該場景中，任何你使用異能的判定達成值+LV。</text:p>
          </table:table-cell>
          <table:table-cell table:style-name="ce76" office:value-type="string" calcext:value-type="string">
            <text:p>規則2P179</text:p>
            <text:p>EAP134</text:p>
          </table:table-cell>
          <table:table-cell table:style-name="ce91" table:number-columns-repeated="14"/>
          <table:table-cell table:number-columns-repeated="998"/>
        </table:table-row>
        <table:table-row table:style-name="ro1">
          <table:table-cell table:style-name="ce86" office:value-type="string" calcext:value-type="string">
            <text:p>起源：植物</text:p>
            <text:p>(オリジン：プラント)</text:p>
          </table:table-cell>
          <table:table-cell table:style-name="ce72" office:value-type="float" office:value="5" calcext:value-type="float">
            <text:p>5</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2" calcext:value-type="float">
            <text:p>2</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表示你是樹木或草原，或者擬態成它們的背教者生命體。</text:p>
            <text:p>該場景中，你使用【感覺】的判定達成值+[LV×2]。</text:p>
          </table:table-cell>
          <table:table-cell table:style-name="ce76" office:value-type="string" calcext:value-type="string">
            <text:p>規則2P179</text:p>
            <text:p>EAP134</text:p>
          </table:table-cell>
          <table:table-cell table:style-name="ce91" table:number-columns-repeated="14"/>
          <table:table-cell table:number-columns-repeated="998"/>
        </table:table-row>
        <table:table-row table:style-name="ro1">
          <table:table-cell table:style-name="ce86" office:value-type="string" calcext:value-type="string">
            <text:p>起源：礦物</text:p>
            <text:p>(オリジン：ミネラル)</text:p>
          </table:table-cell>
          <table:table-cell table:style-name="ce72" office:value-type="float" office:value="5" calcext:value-type="float">
            <text:p>5</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2" calcext:value-type="float">
            <text:p>2</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表示你是岩石、元素或結晶體之類的無機物型背教者生命體。</text:p>
            <text:p>該場景中，你的裝甲值+[LV×2]。</text:p>
          </table:table-cell>
          <table:table-cell table:style-name="ce76" office:value-type="string" calcext:value-type="string">
            <text:p>規則2P179</text:p>
            <text:p>EAP135</text:p>
          </table:table-cell>
          <table:table-cell table:style-name="ce91" table:number-columns-repeated="14"/>
          <table:table-cell table:number-columns-repeated="998"/>
        </table:table-row>
        <table:table-row table:style-name="ro1">
          <table:table-cell table:style-name="ce86" office:value-type="string" calcext:value-type="string">
            <text:p>起源：傳說</text:p>
            <text:p>(オリジン：レジェンド)</text:p>
          </table:table-cell>
          <table:table-cell table:style-name="ce72" office:value-type="float" office:value="5" calcext:value-type="float">
            <text:p>5</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2" calcext:value-type="float">
            <text:p>2</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表示你是由謠言、都市傳說或者集合意識等變成的背教者生命體。</text:p>
            <text:p>該場景中，你使用【精神】的判定達成值+[LV×2]。</text:p>
          </table:table-cell>
          <table:table-cell table:style-name="ce76" office:value-type="string" calcext:value-type="string">
            <text:p>規則2P180</text:p>
            <text:p>EAP135</text:p>
          </table:table-cell>
          <table:table-cell table:style-name="ce91" table:number-columns-repeated="14"/>
          <table:table-cell table:number-columns-repeated="998"/>
        </table:table-row>
        <table:table-row table:style-name="ro1">
          <table:table-cell table:style-name="ce87" office:value-type="string" calcext:value-type="string">
            <text:p>化身型態</text:p>
            <text:p>(アバターフォーム)</text:p>
          </table:table-cell>
          <table:table-cell table:style-name="ce72" office:value-type="float" office:value="3" calcext:value-type="float">
            <text:p>3</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2" calcext:value-type="float">
            <text:p>2</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變身成象徵你的其他化身姿態的異能。</text:p>
            <text:p>取得此異能時選擇任意一個技能。該場景中，你選擇的技能的判定達成值+[LV×2]。</text:p>
            <text:p>但是，你在受到《起源：🔴🔴》效果的期間，無法適用此效果。</text:p>
          </table:table-cell>
          <table:table-cell table:style-name="ce92" office:value-type="string" calcext:value-type="string">
            <text:p>HRP85</text:p>
          </table:table-cell>
          <table:table-cell table:style-name="ce91" table:number-columns-repeated="14"/>
          <table:table-cell table:number-columns-repeated="998"/>
        </table:table-row>
        <table:table-row table:style-name="ro1">
          <table:table-cell table:style-name="ce55" office:value-type="string" calcext:value-type="string">
            <text:p>背教者重擊</text:p>
            <text:p>(レネゲイドスマイト)</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參照效果</text:p>
          </table:table-cell>
          <table:table-cell table:number-columns-repeated="3" table:style-name="ce72" office:value-type="string" calcext:value-type="string">
            <text:p>－</text:p>
          </table:table-cell>
          <table:table-cell table:style-name="ce72" office:value-type="float" office:value="3" calcext:value-type="float">
            <text:p>3</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凝聚周圍的背教者進行攻擊的異能。遍佈世界各地的背教者將擊碎對方。</text:p>
            <text:p>只能在《起源：🔴🔴》發揮效果的期間使用，可與任何攻擊組合。攻擊力+[LV×2]。</text:p>
          </table:table-cell>
          <table:table-cell table:style-name="ce76" office:value-type="string" calcext:value-type="string">
            <text:p>規則2P181</text:p>
            <text:p>EAP135</text:p>
          </table:table-cell>
          <table:table-cell table:style-name="ce91" table:number-columns-repeated="14"/>
          <table:table-cell table:number-columns-repeated="998"/>
        </table:table-row>
        <table:table-row table:style-name="ro1">
          <table:table-cell table:style-name="ce55" office:value-type="string" calcext:value-type="string">
            <text:p>災厄粉碎</text:p>
            <text:p>(カラミティスマッシュ)</text:p>
          </table:table-cell>
          <table:table-cell table:style-name="ce72" office:value-type="float" office:value="1" calcext:value-type="float">
            <text:p>1</text:p>
          </table:table-cell>
          <table:table-cell table:style-name="ce72" office:value-type="string" calcext:value-type="string">
            <text:p>主要動作</text:p>
          </table:table-cell>
          <table:table-cell table:style-name="ce72" office:value-type="string" calcext:value-type="string">
            <text:p>參照效果</text:p>
          </table:table-cell>
          <table:table-cell table:style-name="ce72" office:value-type="string" calcext:value-type="string">
            <text:p>對決</text:p>
          </table:table-cell>
          <table:table-cell table:number-columns-repeated="2" table:style-name="ce72" office:value-type="string" calcext:value-type="string">
            <text:p>－</text:p>
          </table:table-cell>
          <table:table-cell table:style-name="ce72" office:value-type="float" office:value="3" calcext:value-type="float">
            <text:p>3</text:p>
          </table:table-cell>
          <table:table-cell table:style-name="ce72" office:value-type="string" calcext:value-type="string">
            <text:p>RB</text:p>
          </table:table-cell>
          <table:table-cell table:style-name="ce72" office:value-type="string" calcext:value-type="string">
            <text:p>1/場景</text:p>
          </table:table-cell>
          <table:table-cell table:style-name="ce76" office:value-type="string" calcext:value-type="string">
            <text:p>不斷重複人類辦不到的絕望攻擊的異能。</text:p>
            <text:p>只能在《起源：🔴🔴》發揮效果的期間使用，可與任何攻擊組合。</text:p>
            <text:p>組合此異能的攻擊會使對象的響應動作暴擊值+1。</text:p>
          </table:table-cell>
          <table:table-cell table:style-name="ce76" office:value-type="string" calcext:value-type="string">
            <text:p>規則2P180</text:p>
            <text:p>EAP135</text:p>
          </table:table-cell>
          <table:table-cell table:style-name="ce91" table:number-columns-repeated="14"/>
          <table:table-cell table:number-columns-repeated="998"/>
        </table:table-row>
        <table:table-row table:style-name="ro1">
          <table:table-cell table:style-name="ce55" office:value-type="string" calcext:value-type="string">
            <text:p>私語者</text:p>
            <text:p>(アンシーントーカー)</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lt;情報：&gt;</text:p>
          </table:table-cell>
          <table:table-cell table:style-name="ce72" office:value-type="string" calcext:value-type="string">
            <text:p>－</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1" calcext:value-type="float">
            <text:p>1</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與沉睡在社會上各種場所的背教者搭話，獲得情報的異能。他們一直都在人類的身邊。</text:p>
            <text:p>組合此異能的判定骰數+LV顆。</text:p>
          </table:table-cell>
          <table:table-cell table:style-name="ce76" office:value-type="string" calcext:value-type="string">
            <text:p>規則2P180</text:p>
            <text:p>EAP135</text:p>
          </table:table-cell>
          <table:table-cell table:style-name="ce91" table:number-columns-repeated="14"/>
          <table:table-cell table:number-columns-repeated="998"/>
        </table:table-row>
        <table:table-row table:style-name="ro1">
          <table:table-cell table:style-name="ce88" office:value-type="string" calcext:value-type="string">
            <text:p>傷口癒合</text:p>
            <text:p>(クローズウーンズ)</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lt;RC&gt;</text:p>
          </table:table-cell>
          <table:table-cell table:style-name="ce72" office:value-type="string" calcext:value-type="string">
            <text:p>自動成功</text:p>
          </table:table-cell>
          <table:table-cell table:style-name="ce72" office:value-type="string" calcext:value-type="string">
            <text:p>單體</text:p>
          </table:table-cell>
          <table:table-cell table:style-name="ce72" office:value-type="string" calcext:value-type="string">
            <text:p>至近</text:p>
          </table:table-cell>
          <table:table-cell table:style-name="ce72" office:value-type="float" office:value="1" calcext:value-type="float">
            <text:p>1</text:p>
          </table:table-cell>
          <table:table-cell table:style-name="ce72" office:value-type="string" calcext:value-type="string">
            <text:p>RB</text:p>
          </table:table-cell>
          <table:table-cell table:style-name="ce72" office:value-type="string" calcext:value-type="string">
            <text:p>1/場景</text:p>
          </table:table-cell>
          <table:table-cell table:style-name="ce76" office:value-type="string" calcext:value-type="string">
            <text:p>使背教者活性化，提高再生力的異能。</text:p>
            <text:p>回復對象[LV+1]D點HP，但對象的侵蝕率上升2點。對非超越者的角色無效。</text:p>
          </table:table-cell>
          <table:table-cell table:style-name="ce92" office:value-type="string" calcext:value-type="string">
            <text:p>HRP85</text:p>
          </table:table-cell>
          <table:table-cell table:style-name="ce91" table:number-columns-repeated="14"/>
          <table:table-cell table:number-columns-repeated="998"/>
        </table:table-row>
        <table:table-row table:style-name="ro1">
          <table:table-cell table:style-name="ce55" office:value-type="string" calcext:value-type="string">
            <text:p>危機呼喚</text:p>
            <text:p>(ハザードコール)</text:p>
          </table:table-cell>
          <table:table-cell table:style-name="ce72" office:value-type="float" office:value="10" calcext:value-type="float">
            <text:p>10</text:p>
          </table:table-cell>
          <table:table-cell table:style-name="ce72" office:value-type="string" calcext:value-type="string">
            <text:p>主要動作</text:p>
          </table:table-cell>
          <table:table-cell table:style-name="ce72" office:value-type="string" calcext:value-type="string">
            <text:p>&lt;RC&gt;</text:p>
          </table:table-cell>
          <table:table-cell table:style-name="ce72" office:value-type="string" calcext:value-type="string">
            <text:p>對決</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float" office:value="6" calcext:value-type="float">
            <text:p>6</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使對象的背教者劇烈活性化的異能。</text:p>
            <text:p>只能在《起源：🔴🔴》發揮效果的期間使用。進行射擊攻擊。命中的話，對象的侵蝕率+LV。</text:p>
            <text:p>組合此異能的攻擊不能造成對象HP傷害。</text:p>
          </table:table-cell>
          <table:table-cell table:style-name="ce76" office:value-type="string" calcext:value-type="string">
            <text:p>規則2P181</text:p>
            <text:p>EAP135</text:p>
          </table:table-cell>
          <table:table-cell table:style-name="ce91" table:number-columns-repeated="14"/>
          <table:table-cell table:number-columns-repeated="998"/>
        </table:table-row>
        <table:table-row table:style-name="ro1">
          <table:table-cell table:style-name="ce55" office:value-type="string" calcext:value-type="string">
            <text:p>無生氣的回憶</text:p>
            <text:p>(ハートレスメモリー)</text:p>
          </table:table-cell>
          <table:table-cell table:style-name="ce72" office:value-type="float" office:value="1" calcext:value-type="float">
            <text:p>1</text:p>
          </table:table-cell>
          <table:table-cell table:style-name="ce72" office:value-type="string" calcext:value-type="string">
            <text:p>主要動作</text:p>
          </table:table-cell>
          <table:table-cell table:style-name="ce72" office:value-type="string" calcext:value-type="string">
            <text:p>&lt;RC&gt;</text:p>
          </table:table-cell>
          <table:table-cell table:style-name="ce72" office:value-type="string" calcext:value-type="string">
            <text:p>參照效果</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float" office:value="4" calcext:value-type="float">
            <text:p>4</text:p>
          </table:table-cell>
          <table:table-cell table:style-name="ce72" office:value-type="string" calcext:value-type="string">
            <text:p>RB</text:p>
          </table:table-cell>
          <table:table-cell table:style-name="ce72" office:value-type="string" calcext:value-type="string">
            <text:p>1/場景</text:p>
          </table:table-cell>
          <table:table-cell table:style-name="ce76" office:value-type="string" calcext:value-type="string">
            <text:p>從人們的記憶呼喚出死者的人格，並與其對話的異能。</text:p>
            <text:p>死者的記憶經常曖昧不明。需要遺物或遺體的一部分。</text:p>
            <text:p>呼喚出的難易度依死亡時間而定，一周內為8，一個月以內為15，在此之上為30。</text:p>
            <text:p>GM可視狀況讓死者無法被呼喚。</text:p>
          </table:table-cell>
          <table:table-cell table:style-name="ce76" office:value-type="string" calcext:value-type="string">
            <text:p>規則2P181</text:p>
            <text:p>EAP135</text:p>
          </table:table-cell>
          <table:table-cell table:style-name="ce91" table:number-columns-repeated="14"/>
          <table:table-cell table:number-columns-repeated="998"/>
        </table:table-row>
        <table:table-row table:style-name="ro1">
          <table:table-cell table:style-name="ce55" office:value-type="string" calcext:value-type="string">
            <text:p>寂靜</text:p>
            <text:p>(スティルネス)</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lt;RC&gt;</text:p>
          </table:table-cell>
          <table:table-cell table:style-name="ce72" office:value-type="float" office:value="15" calcext:value-type="float">
            <text:p>15</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string" calcext:value-type="string">
            <text:p>－</text:p>
          </table:table-cell>
          <table:table-cell table:style-name="ce72" office:value-type="string" calcext:value-type="string">
            <text:p>RB</text:p>
          </table:table-cell>
          <table:table-cell table:style-name="ce72" office:value-type="string" calcext:value-type="string">
            <text:p>1/劇本</text:p>
          </table:table-cell>
          <table:table-cell table:style-name="ce76" office:value-type="string" calcext:value-type="string">
            <text:p>調整對象內部的背教者的平衡的異能。</text:p>
            <text:p>對象的侵蝕率-[LV+2]，但你的侵蝕率+[此異能減少的侵蝕率×2]。</text:p>
            <text:p>此異能可以降低等級來使用(最低1)。對象可拒絕此效果。</text:p>
          </table:table-cell>
          <table:table-cell table:style-name="ce76" office:value-type="string" calcext:value-type="string">
            <text:p>規則2P180</text:p>
            <text:p>EAP135</text:p>
          </table:table-cell>
          <table:table-cell table:style-name="ce91" table:number-columns-repeated="14"/>
          <table:table-cell table:number-columns-repeated="998"/>
        </table:table-row>
        <table:table-row table:style-name="ro1">
          <table:table-cell table:style-name="ce89" office:value-type="string" calcext:value-type="string">
            <text:p>遠程接觸</text:p>
            <text:p>(ファーコンタクト)</text:p>
          </table:table-cell>
          <table:table-cell table:style-name="ce72" office:value-type="float" office:value="1" calcext:value-type="float">
            <text:p>1</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1" calcext:value-type="float">
            <text:p>1</text:p>
          </table:table-cell>
          <table:table-cell table:style-name="ce72" office:value-type="string" calcext:value-type="string">
            <text:p>RB</text:p>
          </table:table-cell>
          <table:table-cell table:style-name="ce72" office:value-type="string" calcext:value-type="string">
            <text:p>－</text:p>
          </table:table-cell>
          <table:table-cell table:style-name="ce76" office:value-type="string" calcext:value-type="string">
            <text:p>操縱遠處的背教者製造自己的分身，或者投射幻影於場景中登場的異能。</text:p>
            <text:p>于場景登場時使用，使你的分身代替你登場。此分身為臨時角色，無法參加戰鬥，受到攻擊時便會退場。</text:p>
          </table:table-cell>
          <table:table-cell table:style-name="ce92" office:value-type="string" calcext:value-type="string">
            <text:p>HRP85</text:p>
          </table:table-cell>
          <table:table-cell table:style-name="ce91" table:number-columns-repeated="14"/>
          <table:table-cell table:number-columns-repeated="998"/>
        </table:table-row>
        <table:table-row table:style-name="ro1">
          <table:table-cell table:style-name="ce69" office:value-type="string" calcext:value-type="string">
            <text:p>接管</text:p>
            <text:p>(テイクオーバー)</text:p>
          </table:table-cell>
          <table:table-cell table:style-name="ce72" office:value-type="float" office:value="3" calcext:value-type="float">
            <text:p>3</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2" calcext:value-type="float">
            <text:p>2</text:p>
          </table:table-cell>
          <table:table-cell table:style-name="ce72" office:value-type="string" calcext:value-type="string">
            <text:p>RB</text:p>
          </table:table-cell>
          <table:table-cell table:style-name="ce72" office:value-type="string" calcext:value-type="string">
            <text:p>LV/劇本</text:p>
          </table:table-cell>
          <table:table-cell table:style-name="ce76" office:value-type="string" calcext:value-type="string">
            <text:p>代替他人承受侵蝕的異能。</text:p>
            <text:p>只能在《起源：🔴🔴》發揮效果的期間使用。</text:p>
            <text:p>於對象使用異能前使用，你代替對象上升侵蝕率，對象組合異能的話，上升合計的侵蝕率。</text:p>
          </table:table-cell>
          <table:table-cell table:style-name="ce76" office:value-type="string" calcext:value-type="string">
            <text:p>規則2P181</text:p>
            <text:p>EAP135</text:p>
          </table:table-cell>
          <table:table-cell table:style-name="ce91" table:number-columns-repeated="14"/>
          <table:table-cell table:number-columns-repeated="998"/>
        </table:table-row>
        <table:table-row table:style-name="ro1">
          <table:table-cell table:style-name="ce89" office:value-type="string" calcext:value-type="string">
            <text:p>君王領土</text:p>
            <text:p>(ドミニオンレルム)</text:p>
          </table:table-cell>
          <table:table-cell table:style-name="ce72" office:value-type="float" office:value="3" calcext:value-type="float">
            <text:p>3</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float" office:value="3" calcext:value-type="float">
            <text:p>3</text:p>
          </table:table-cell>
          <table:table-cell table:style-name="ce72" office:value-type="string" calcext:value-type="string">
            <text:p>RB</text:p>
          </table:table-cell>
          <table:table-cell table:style-name="ce72" office:value-type="string" calcext:value-type="string">
            <text:p>1/劇本</text:p>
          </table:table-cell>
          <table:table-cell table:style-name="ce76" office:value-type="string" calcext:value-type="string">
            <text:p>於空間或整座建築滲透自己的背教者，如同自身肉體操縱它們的異能。</text:p>
            <text:p>於對象進行判定前使用，該判定達成值+[LV×3]。</text:p>
          </table:table-cell>
          <table:table-cell table:style-name="ce92" office:value-type="string" calcext:value-type="string">
            <text:p>HRP85</text:p>
          </table:table-cell>
          <table:table-cell table:style-name="ce91" table:number-columns-repeated="14"/>
          <table:table-cell table:number-columns-repeated="998"/>
        </table:table-row>
        <table:table-row table:style-name="ro1">
          <table:table-cell table:style-name="ce90" office:value-type="string" calcext:value-type="string">
            <text:p>空中行者</text:p>
            <text:p>(エアウォーカー)</text:p>
          </table:table-cell>
          <table:table-cell table:style-name="ce72" office:value-type="float" office:value="5" calcext:value-type="float">
            <text:p>5</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1" calcext:value-type="float">
            <text:p>1</text:p>
          </table:table-cell>
          <table:table-cell table:style-name="ce72" office:value-type="string" calcext:value-type="string">
            <text:p>RB</text:p>
          </table:table-cell>
          <table:table-cell table:style-name="ce72" office:value-type="string" calcext:value-type="string">
            <text:p>1/場景</text:p>
          </table:table-cell>
          <table:table-cell table:style-name="ce76" office:value-type="string" calcext:value-type="string">
            <text:p>干涉周圍的物質，使自己飄浮的異能。</text:p>
            <text:p>該回合間，你變成飛行狀態，且戰鬥移動的移動距離+[LV×2]m。</text:p>
          </table:table-cell>
          <table:table-cell table:style-name="ce92" office:value-type="string" calcext:value-type="string">
            <text:p>HRP85</text:p>
          </table:table-cell>
          <table:table-cell table:style-name="ce91" table:number-columns-repeated="14"/>
          <table:table-cell table:number-columns-repeated="998"/>
        </table:table-row>
        <table:table-row table:style-name="ro2">
          <table:table-cell table:style-name="ce91" table:number-columns-repeated="26"/>
          <table:table-cell table:number-columns-repeated="998"/>
        </table:table-row>
        <table:table-row table:style-name="ro4" table:number-rows-repeated="1048553">
          <table:table-cell table:number-columns-repeated="1024"/>
        </table:table-row>
        <table:table-row table:style-name="ro4">
          <table:table-cell table:number-columns-repeated="1024"/>
        </table:table-row>
      </table:table>
      <table:table table:name="D-lois No.11 秘密武器專用道具" table:style-name="ta8">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7" table:default-cell-style-name="Default"/>
        <table:table-column table:style-name="co30" table:default-cell-style-name="Default"/>
        <table:table-column table:style-name="co14" table:default-cell-style-name="Default"/>
        <table:table-column table:style-name="co20" table:default-cell-style-name="Default"/>
        <table:table-column table:style-name="co14" table:default-cell-style-name="Default"/>
        <table:table-column table:style-name="co31" table:default-cell-style-name="Default"/>
        <table:table-column table:style-name="co32" table:default-cell-style-name="Default"/>
        <table:table-column table:style-name="co33" table:default-cell-style-name="Default"/>
        <table:table-column table:style-name="co32" table:number-columns-repeated="14" table:default-cell-style-name="Default"/>
        <table:table-column table:style-name="co4" table:number-columns-repeated="998" table:default-cell-style-name="Default"/>
        <table:table-row table:style-name="ro1">
          <table:table-cell table:style-name="ce93" office:value-type="string" calcext:value-type="string" table:number-columns-spanned="12" table:number-rows-spanned="1">
            <text:p>武器</text:p>
          </table:table-cell>
          <table:covered-table-cell table:number-columns-repeated="11"/>
          <table:table-cell table:style-name="ce112" table:number-columns-repeated="14"/>
          <table:table-cell table:number-columns-repeated="998"/>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94" office:value-type="string" calcext:value-type="string">
            <text:p>命中</text:p>
          </table:table-cell>
          <table:table-cell table:style-name="ce94" office:value-type="string" calcext:value-type="string">
            <text:p>攻擊力</text:p>
          </table:table-cell>
          <table:table-cell table:style-name="ce94" office:value-type="string" calcext:value-type="string">
            <text:p>格擋值</text:p>
          </table:table-cell>
          <table:table-cell table:style-name="ce94" office:value-type="string" calcext:value-type="string">
            <text:p>射程</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ext:p>解說</text:p>
          </table:table-cell>
          <table:table-cell table:style-name="ce94" office:value-type="string" calcext:value-type="string">
            <text:p>參照</text:p>
          </table:table-cell>
          <table:table-cell table:style-name="ce94" office:value-type="string" calcext:value-type="string">
            <text:p>備註</text:p>
          </table:table-cell>
          <table:table-cell table:style-name="ce8" table:number-columns-repeated="14"/>
          <table:table-cell table:number-columns-repeated="998"/>
        </table:table-row>
        <table:table-row table:style-name="ro1">
          <table:table-cell table:style-name="ce95" office:value-type="string" calcext:value-type="string">
            <text:p>刃彈</text:p>
          </table:table-cell>
          <table:table-cell table:style-name="ce95" office:value-type="string" calcext:value-type="string">
            <text:p>近戰／射擊</text:p>
          </table:table-cell>
          <table:table-cell table:style-name="ce95" office:value-type="string" calcext:value-type="string">
            <text:p>&lt;近戰&gt;&lt;射擊&gt;</text:p>
          </table:table-cell>
          <table:table-cell table:style-name="ce95" office:value-type="float" office:value="0" calcext:value-type="float">
            <text:p>0</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string" calcext:value-type="string">
            <text:p>至近/10m</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感染了EXR病毒的投擲用小刀。刀身上有著特殊的刻印，于投擲時將會加速刀身的飛行，並造成足以造成奪去對方意識的猛烈衝擊。</text:p>
            <text:p>使用該武器進行的射擊攻擊造成至少1點HP傷害時，給對象造成“恍惚”狀態，作為射擊武器使用時，使用右邊的資料。</text:p>
          </table:table-cell>
          <table:table-cell table:style-name="ce95" office:value-type="string" calcext:value-type="string">
            <text:p>LM P118</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墮天之刃</text:p>
          </table:table-cell>
          <table:table-cell table:style-name="ce95" office:value-type="string" calcext:value-type="string">
            <text:p>近戰</text:p>
          </table:table-cell>
          <table:table-cell table:style-name="ce95" office:value-type="string" calcext:value-type="string">
            <text:p>&lt;近戰&gt;</text:p>
          </table:table-cell>
          <table:table-cell table:style-name="ce95" office:value-type="float" office:value="0" calcext:value-type="float">
            <text:p>0</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string" calcext:value-type="string">
            <text:p>至近</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受EXR病毒感染的刀劍，會根據使用者的意志而強化鋒利度。</text:p>
            <text:p>於使用該武器的進行的近戰攻擊的命中判定前宣言，暴擊值-1（下限5），但使用了此效果的主要階段結束後，該武器將被破壞。</text:p>
          </table:table-cell>
          <table:table-cell table:style-name="ce95" office:value-type="string" calcext:value-type="string">
            <text:p>LM P118</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狂暴之刃</text:p>
          </table:table-cell>
          <table:table-cell table:style-name="ce95" office:value-type="string" calcext:value-type="string">
            <text:p>近戰</text:p>
          </table:table-cell>
          <table:table-cell table:style-name="ce95" office:value-type="string" calcext:value-type="string">
            <text:p>&lt;近戰&gt;</text:p>
          </table:table-cell>
          <table:table-cell table:style-name="ce95" office:value-type="float" office:value="-3" calcext:value-type="float">
            <text:p>-3</text:p>
          </table:table-cell>
          <table:table-cell table:style-name="ce95" office:value-type="float" office:value="12" calcext:value-type="float">
            <text:p>12</text:p>
          </table:table-cell>
          <table:table-cell table:style-name="ce95" office:value-type="float" office:value="6" calcext:value-type="float">
            <text:p>6</text:p>
          </table:table-cell>
          <table:table-cell table:style-name="ce95" office:value-type="string" calcext:value-type="string">
            <text:p>至近</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受EXR病毒感染的巨大刀劍，會根據使用者的意志而強化威力。</text:p>
            <text:p>於使用該武器的近戰攻擊前使用，此攻擊的傷害+2D，這個效果一個場景最多可以使用一次。</text:p>
            <text:p>裝備該武器時不能裝備其他武器，且你的【行動值】-4。</text:p>
          </table:table-cell>
          <table:table-cell table:style-name="ce95" office:value-type="string" calcext:value-type="string">
            <text:p>LM P118</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墮天之盾</text:p>
          </table:table-cell>
          <table:table-cell table:style-name="ce95" office:value-type="string" calcext:value-type="string">
            <text:p>近戰</text:p>
          </table:table-cell>
          <table:table-cell table:style-name="ce95" office:value-type="string" calcext:value-type="string">
            <text:p>&lt;近戰&gt;</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8" calcext:value-type="float">
            <text:p>8</text:p>
          </table:table-cell>
          <table:table-cell table:style-name="ce95" office:value-type="string" calcext:value-type="string">
            <text:p>至近</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受EXR病毒所感染，變得能夠自由改變硬度的盾牌。</text:p>
            <text:p>于你進行格擋時宣言，此次格擋期間該武器的格擋值+5，每當使用這個效果時，你的侵蝕率+1。</text:p>
          </table:table-cell>
          <table:table-cell table:style-name="ce95" office:value-type="string" calcext:value-type="string">
            <text:p>LM P118</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墮天手槍</text:p>
          </table:table-cell>
          <table:table-cell table:style-name="ce95" office:value-type="string" calcext:value-type="string">
            <text:p>射擊</text:p>
          </table:table-cell>
          <table:table-cell table:style-name="ce95" office:value-type="string" calcext:value-type="string">
            <text:p>&lt;射擊&gt;</text:p>
          </table:table-cell>
          <table:table-cell table:style-name="ce95" office:value-type="float" office:value="0" calcext:value-type="float">
            <text:p>0</text:p>
          </table:table-cell>
          <table:table-cell table:style-name="ce95" office:value-type="float" office:value="8" calcext:value-type="float">
            <text:p>8</text:p>
          </table:table-cell>
          <table:table-cell table:style-name="ce95" office:value-type="string" calcext:value-type="string">
            <text:p>——</text:p>
          </table:table-cell>
          <table:table-cell table:style-name="ce95" office:value-type="string" calcext:value-type="string">
            <text:p>20m</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受EXR病毒感染的手槍，可隨使用者的意志自由改變彈道。</text:p>
            <text:p>使用該武器進行的射擊攻擊的命中判定之前宣言，針對此攻擊進行的回應動作暴擊值＋1，這個效果一個劇本中最多可以使用三次。</text:p>
          </table:table-cell>
          <table:table-cell table:style-name="ce95" office:value-type="string" calcext:value-type="string">
            <text:p>LM P118</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墮天步槍</text:p>
          </table:table-cell>
          <table:table-cell table:style-name="ce95" office:value-type="string" calcext:value-type="string">
            <text:p>射擊</text:p>
          </table:table-cell>
          <table:table-cell table:style-name="ce95" office:value-type="string" calcext:value-type="string">
            <text:p>&lt;射擊&gt;</text:p>
          </table:table-cell>
          <table:table-cell table:style-name="ce95" office:value-type="float" office:value="0" calcext:value-type="float">
            <text:p>0</text:p>
          </table:table-cell>
          <table:table-cell table:style-name="ce95" office:value-type="float" office:value="10" calcext:value-type="float">
            <text:p>10</text:p>
          </table:table-cell>
          <table:table-cell table:style-name="ce95" office:value-type="string" calcext:value-type="string">
            <text:p>——</text:p>
          </table:table-cell>
          <table:table-cell table:style-name="ce95" office:value-type="string" calcext:value-type="string">
            <text:p>200m</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受EXR病毒感染的步槍，能射出對背教者病毒有鎮靜效果的子彈。</text:p>
            <text:p>使用該武器進行的射擊攻擊，對超越者（或原菌）造成至少1點HP傷害時，該回合間，對象進行的所有判定骰數-3D。</text:p>
            <text:p>不能選擇與你處於同一接戰區域的角色作為使用該武器的射擊攻擊對象。</text:p>
          </table:table-cell>
          <table:table-cell table:style-name="ce95" office:value-type="string" calcext:value-type="string">
            <text:p>LM P118</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墮天之斧</text:p>
            <text:p>（フォールンアックス）</text:p>
          </table:table-cell>
          <table:table-cell table:style-name="ce95" office:value-type="string" calcext:value-type="string">
            <text:p>近戰</text:p>
          </table:table-cell>
          <table:table-cell table:style-name="ce95" office:value-type="string" calcext:value-type="string">
            <text:p>&lt;近戰&gt;</text:p>
          </table:table-cell>
          <table:table-cell table:style-name="ce95" office:value-type="float" office:value="-1" calcext:value-type="float">
            <text:p>-1</text:p>
          </table:table-cell>
          <table:table-cell table:style-name="ce95" office:value-type="float" office:value="10" calcext:value-type="float">
            <text:p>10</text:p>
          </table:table-cell>
          <table:table-cell table:style-name="ce95" office:value-type="float" office:value="2" calcext:value-type="float">
            <text:p>2</text:p>
          </table:table-cell>
          <table:table-cell table:style-name="ce95" office:value-type="string" calcext:value-type="string">
            <text:p>至近</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受EXR病毒所感染的大斧。能夠自動的使改變重量平衡以輕鬆斬出強力的一擊</text:p>
            <text:p>於投擲了使用該武器進行的近戰攻擊造成的傷害骰之後立即使用，從傷害骰中選擇最多三個骰子重新投擲，必須採用重骰後的結果。</text:p>
            <text:p>發動了這個效果的主要階段結束時，你的侵蝕率+2。</text:p>
          </table:table-cell>
          <table:table-cell table:style-name="ce95" office:value-type="string" calcext:value-type="string">
            <text:p>HR P90</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墮天之槍</text:p>
            <text:p>（フォールンランス）</text:p>
          </table:table-cell>
          <table:table-cell table:style-name="ce95" office:value-type="string" calcext:value-type="string">
            <text:p>近戰</text:p>
          </table:table-cell>
          <table:table-cell table:style-name="ce95" office:value-type="string" calcext:value-type="string">
            <text:p>&lt;近戰&gt;</text:p>
          </table:table-cell>
          <table:table-cell table:style-name="ce95" office:value-type="float" office:value="-1" calcext:value-type="float">
            <text:p>-1</text:p>
          </table:table-cell>
          <table:table-cell table:style-name="ce95" office:value-type="float" office:value="11" calcext:value-type="float">
            <text:p>11</text:p>
          </table:table-cell>
          <table:table-cell table:style-name="ce95" office:value-type="float" office:value="3" calcext:value-type="float">
            <text:p>3</text:p>
          </table:table-cell>
          <table:table-cell table:style-name="ce95" office:value-type="string" calcext:value-type="string">
            <text:p>至近</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受EXR病毒所感染的長槍，其前端部分呈圓錐形螺旋狀，啟動後便能以高速旋轉來貫穿防禦。</text:p>
            <text:p>于次要動作時使用，使用該武器進行的近戰攻擊對宣言格擋的角色造成的傷害+3D10，持續到回合結束為止。這個效果一個場景中可以使用3次。</text:p>
          </table:table-cell>
          <table:table-cell table:style-name="ce95" office:value-type="string" calcext:value-type="string">
            <text:p>HR P90</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墮天加特林</text:p>
            <text:p>（フォールンガトリング）</text:p>
          </table:table-cell>
          <table:table-cell table:style-name="ce95" office:value-type="string" calcext:value-type="string">
            <text:p>射擊</text:p>
          </table:table-cell>
          <table:table-cell table:style-name="ce95" office:value-type="string" calcext:value-type="string">
            <text:p>&lt;射擊&gt;</text:p>
          </table:table-cell>
          <table:table-cell table:style-name="ce95" office:value-type="float" office:value="-2" calcext:value-type="float">
            <text:p>-2</text:p>
          </table:table-cell>
          <table:table-cell table:style-name="ce95" office:value-type="float" office:value="13" calcext:value-type="float">
            <text:p>13</text:p>
          </table:table-cell>
          <table:table-cell table:style-name="ce95" office:value-type="string" calcext:value-type="string">
            <text:p>——</text:p>
          </table:table-cell>
          <table:table-cell table:style-name="ce95" office:value-type="string" calcext:value-type="string">
            <text:p>150m</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受EXR病毒所感染的加特林機炮，其不需要任何動力源，重量也輕量化到了人類可以攜帶的程度。</text:p>
            <text:p>使用該武器進行的，對象不為單體的射擊攻擊攻擊力+4。</text:p>
            <text:p>裝備該武器期間不能裝備其他武器，不能選擇與你同在一個接戰區域的角色作為攻擊對象。</text:p>
          </table:table-cell>
          <table:table-cell table:style-name="ce95" office:value-type="string" calcext:value-type="string">
            <text:p>HR P90</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狂怒射手</text:p>
            <text:p>（レイジングシューター）</text:p>
          </table:table-cell>
          <table:table-cell table:style-name="ce95" office:value-type="string" calcext:value-type="string">
            <text:p>射擊</text:p>
          </table:table-cell>
          <table:table-cell table:style-name="ce95" office:value-type="string" calcext:value-type="string">
            <text:p>&lt;射擊&gt;</text:p>
          </table:table-cell>
          <table:table-cell table:style-name="ce95" office:value-type="float" office:value="-2" calcext:value-type="float">
            <text:p>-2</text:p>
          </table:table-cell>
          <table:table-cell table:style-name="ce99" office:value-type="string" calcext:value-type="string">
            <text:p>10/15</text:p>
          </table:table-cell>
          <table:table-cell table:style-name="ce95" office:value-type="string" calcext:value-type="string">
            <text:p>——</text:p>
          </table:table-cell>
          <table:table-cell table:style-name="ce95" office:value-type="string" calcext:value-type="string">
            <text:p>100m/500m</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受EXR病毒所感染的反坦克炮，可以在攜帶和炮擊兩種形態之間切換。</text:p>
            <text:p>消費次要動作，將攻擊力和射程變更為右側的資料，但是進行了攻擊或是場景結束時，資料都將恢復原狀。</text:p>
            <text:p>裝備該武器期間不能裝備其他武器，不能選擇與你同在一個接戰區域的角色作為攻擊對象。</text:p>
          </table:table-cell>
          <table:table-cell table:style-name="ce95" office:value-type="string" calcext:value-type="string">
            <text:p>HR P90</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回旋盾</text:p>
            <text:p>（ブーメランアスピス）</text:p>
          </table:table-cell>
          <table:table-cell table:style-name="ce95" office:value-type="string" calcext:value-type="string">
            <text:p>近戰／射擊</text:p>
          </table:table-cell>
          <table:table-cell table:style-name="ce95" office:value-type="string" calcext:value-type="string">
            <text:p>&lt;近戰&gt;&lt;射擊&gt;</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8" calcext:value-type="float">
            <text:p>8</text:p>
          </table:table-cell>
          <table:table-cell table:style-name="ce95" office:value-type="string" calcext:value-type="string">
            <text:p>至近/20m</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用特殊合金鑄成的盾。寄宿著秘密開發的EXR病毒，即使投擲出去也能回到手上，還有提高持有者力量的作用。</text:p>
            <text:p>於裝備著該武器並進行判定之前使用，此次判定的達成值+4。每當你使用這個效果時，你的侵蝕率+1。進行射擊攻擊時，使用右邊的資料。</text:p>
          </table:table-cell>
          <table:table-cell table:style-name="ce95" office:value-type="string" calcext:value-type="string">
            <text:p>RW P55</text:p>
          </table:table-cell>
          <table:table-cell table:style-name="ce111"/>
          <table:table-cell table:style-name="ce112" table:number-columns-repeated="14"/>
          <table:table-cell table:number-columns-repeated="998"/>
        </table:table-row>
        <table:table-row table:style-name="ro1">
          <table:table-cell table:style-name="ce95" table:number-columns-repeated="5"/>
          <table:table-cell table:style-name="ce101"/>
          <table:table-cell table:style-name="ce95"/>
          <table:table-cell table:style-name="ce99"/>
          <table:table-cell table:style-name="ce95"/>
          <table:table-cell table:style-name="ce110"/>
          <table:table-cell table:style-name="ce95"/>
          <table:table-cell table:style-name="ce111"/>
          <table:table-cell table:style-name="ce112" table:number-columns-repeated="14"/>
          <table:table-cell table:number-columns-repeated="998"/>
        </table:table-row>
        <table:table-row table:style-name="ro1">
          <table:table-cell table:style-name="ce93" office:value-type="string" calcext:value-type="string" table:number-columns-spanned="12" table:number-rows-spanned="1">
            <text:p>防具</text:p>
          </table:table-cell>
          <table:covered-table-cell table:number-columns-repeated="11"/>
          <table:table-cell table:style-name="ce112" table:number-columns-repeated="14"/>
          <table:table-cell table:number-columns-repeated="998"/>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回避</text:p>
          </table:table-cell>
          <table:table-cell table:style-name="ce94" office:value-type="string" calcext:value-type="string">
            <text:p>行動值</text:p>
          </table:table-cell>
          <table:table-cell table:style-name="ce94" office:value-type="string" calcext:value-type="string">
            <text:p>裝甲值</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able:number-columns-spanned="3" table:number-rows-spanned="1">
            <text:p>解說</text:p>
          </table:table-cell>
          <table:covered-table-cell table:number-columns-repeated="2" table:style-name="ce106"/>
          <table:table-cell table:style-name="ce94" office:value-type="string" calcext:value-type="string">
            <text:p>參照</text:p>
          </table:table-cell>
          <table:table-cell table:style-name="ce94" office:value-type="string" calcext:value-type="string">
            <text:p>備註</text:p>
          </table:table-cell>
          <table:table-cell table:style-name="ce8" table:number-columns-repeated="14"/>
          <table:table-cell table:number-columns-repeated="998"/>
        </table:table-row>
        <table:table-row table:style-name="ro1">
          <table:table-cell table:style-name="ce95" office:value-type="string" calcext:value-type="string">
            <text:p>促力裝甲</text:p>
          </table:table-cell>
          <table:table-cell table:style-name="ce95" office:value-type="string" calcext:value-type="string">
            <text:p>防具</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15" calcext:value-type="float">
            <text:p>15</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08" office:value-type="string" calcext:value-type="string" table:number-columns-spanned="3" table:number-rows-spanned="1">
            <text:p>刺激裝備者的R病毒，使能力上升的防彈衣。裝備這個防具的角色的【肉體】【感覺】【精神】的判定骰＋2D。但裝備期間，每次主要階段結束時，侵蝕率＋2。</text:p>
          </table:table-cell>
          <table:covered-table-cell table:number-columns-repeated="2" table:style-name="ce107"/>
          <table:table-cell table:style-name="ce95" office:value-type="string" calcext:value-type="string">
            <text:p>LM P118</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活外套</text:p>
          </table:table-cell>
          <table:table-cell table:style-name="ce95" office:value-type="string" calcext:value-type="string">
            <text:p>防具※</text:p>
          </table:table-cell>
          <table:table-cell table:number-columns-repeated="2" table:style-name="ce95" office:value-type="float" office:value="0" calcext:value-type="float">
            <text:p>0</text:p>
          </table:table-cell>
          <table:table-cell table:style-name="ce95" office:value-type="float" office:value="7" calcext:value-type="float">
            <text:p>7</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05" office:value-type="string" calcext:value-type="string" table:number-columns-spanned="3" table:number-rows-spanned="1">
            <text:p>受EXR病毒感染的外套。</text:p>
            <text:p>於受到傷害之前使用，裝備此防具的角色預定受到的HP傷害-4D，但於你正式受到傷害之後，這件防具將會被破壞。</text:p>
          </table:table-cell>
          <table:covered-table-cell table:number-columns-repeated="2"/>
          <table:table-cell table:style-name="ce95" office:value-type="string" calcext:value-type="string">
            <text:p>LM P118</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EX探路者</text:p>
            <text:p>（EXパスファインダー）</text:p>
          </table:table-cell>
          <table:table-cell table:style-name="ce95" office:value-type="string" calcext:value-type="string">
            <text:p>防具</text:p>
          </table:table-cell>
          <table:table-cell table:number-columns-repeated="2" table:style-name="ce95" office:value-type="float" office:value="0" calcext:value-type="float">
            <text:p>0</text:p>
          </table:table-cell>
          <table:table-cell table:style-name="ce95" office:value-type="float" office:value="12" calcext:value-type="float">
            <text:p>12</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05" office:value-type="string" calcext:value-type="string" table:number-columns-spanned="3" table:number-rows-spanned="1">
            <text:p>感染了EXR病毒的防彈衣。可以讓著裝者的反應速度暫時加快。</text:p>
            <text:p>于準備階段時使用，該回合間，你的【行動值】+7，效果發動之後，你的侵蝕率+3</text:p>
            <text:p>這個效果一個場景中最多可以使用一次。</text:p>
          </table:table-cell>
          <table:covered-table-cell table:number-columns-repeated="2"/>
          <table:table-cell table:style-name="ce95" office:value-type="string" calcext:value-type="string">
            <text:p>HR P90</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武裝腰帶</text:p>
            <text:p>（アーマメントベルト）</text:p>
          </table:table-cell>
          <table:table-cell table:style-name="ce95" office:value-type="string" calcext:value-type="string">
            <text:p>防具</text:p>
          </table:table-cell>
          <table:table-cell table:number-columns-repeated="2" table:style-name="ce95" office:value-type="float" office:value="0" calcext:value-type="float">
            <text:p>0</text:p>
          </table:table-cell>
          <table:table-cell table:style-name="ce95" office:value-type="float" office:value="12" calcext:value-type="float">
            <text:p>12</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05" office:value-type="string" calcext:value-type="string" table:number-columns-spanned="3" table:number-rows-spanned="1">
            <text:p>平時收納成腰帶形狀的戰鬥服，通過使用特定道具或是進行語音辨識便能使其展開變成原本的姿態。</text:p>
            <text:p>通過在準備階段使用該防具，可以在該場景間獲得其效果。此外，在獲得防具效果的期間內，你的空手變更為「攻擊力：+8」。</text:p>
          </table:table-cell>
          <table:covered-table-cell table:number-columns-repeated="2"/>
          <table:table-cell table:style-name="ce95" office:value-type="string" calcext:value-type="string">
            <text:p>RW P55</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金屬制服</text:p>
            <text:p>（メタルス一ツ）</text:p>
          </table:table-cell>
          <table:table-cell table:style-name="ce95" office:value-type="string" calcext:value-type="string">
            <text:p>防具</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6" calcext:value-type="float">
            <text:p>16</text:p>
          </table:table-cell>
          <table:table-cell table:style-name="ce99" office:value-type="string" calcext:value-type="string">
            <text:p>購買不可/不可</text:p>
          </table:table-cell>
          <table:table-cell table:style-name="ce95" office:value-type="string" calcext:value-type="string">
            <text:p>20點</text:p>
          </table:table-cell>
          <table:table-cell table:style-name="ce105" office:value-type="string" calcext:value-type="string" table:number-columns-spanned="3" table:number-rows-spanned="1">
            <text:p>可以通過遠端操作自動裝備的強化服。可以搭載各種各樣的武器。</text:p>
            <text:p>裝備該防具期間，你視為裝備了3個資料如下的射擊武器。每個武器一個劇本中最多可以使用一次。</text:p>
            <text:p>技能：&lt;射擊&gt;　命中：-2　攻擊力：12　格擋值：－　射程：視界</text:p>
          </table:table-cell>
          <table:covered-table-cell table:number-columns-repeated="2"/>
          <table:table-cell table:style-name="ce95" office:value-type="string" calcext:value-type="string">
            <text:p>RW P55</text:p>
          </table:table-cell>
          <table:table-cell table:style-name="ce111"/>
          <table:table-cell table:style-name="ce112" table:number-columns-repeated="14"/>
          <table:table-cell table:number-columns-repeated="998"/>
        </table:table-row>
        <table:table-row table:style-name="ro1">
          <table:table-cell table:style-name="ce95" table:number-columns-repeated="7"/>
          <table:table-cell table:style-name="ce109" table:number-columns-spanned="3" table:number-rows-spanned="1"/>
          <table:covered-table-cell table:number-columns-repeated="2"/>
          <table:table-cell table:style-name="ce95"/>
          <table:table-cell table:style-name="ce111"/>
          <table:table-cell table:style-name="ce112" table:number-columns-repeated="14"/>
          <table:table-cell table:number-columns-repeated="998"/>
        </table:table-row>
        <table:table-row table:style-name="ro1">
          <table:table-cell table:style-name="ce96" office:value-type="string" calcext:value-type="string" table:number-columns-spanned="12" table:number-rows-spanned="1">
            <text:p>載具</text:p>
          </table:table-cell>
          <table:covered-table-cell table:number-columns-repeated="11"/>
          <table:table-cell table:style-name="ce112" table:number-columns-repeated="14"/>
          <table:table-cell table:number-columns-repeated="998"/>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94" office:value-type="string" calcext:value-type="string">
            <text:p>攻擊力</text:p>
          </table:table-cell>
          <table:table-cell table:style-name="ce94" office:value-type="string" calcext:value-type="string">
            <text:p>行動值</text:p>
          </table:table-cell>
          <table:table-cell table:style-name="ce94" office:value-type="string" calcext:value-type="string">
            <text:p>裝甲值</text:p>
          </table:table-cell>
          <table:table-cell table:style-name="ce94" office:value-type="string" calcext:value-type="string">
            <text:p>全力移動</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ext:p>解說</text:p>
          </table:table-cell>
          <table:table-cell table:style-name="ce94" office:value-type="string" calcext:value-type="string">
            <text:p>參照</text:p>
          </table:table-cell>
          <table:table-cell table:style-name="ce94" office:value-type="string" calcext:value-type="string">
            <text:p>備註</text:p>
          </table:table-cell>
          <table:table-cell table:style-name="ce112" table:number-columns-repeated="14"/>
          <table:table-cell table:number-columns-repeated="998"/>
        </table:table-row>
        <table:table-row table:style-name="ro1">
          <table:table-cell table:style-name="ce95" office:value-type="string" calcext:value-type="string">
            <text:p>墮天載具</text:p>
          </table:table-cell>
          <table:table-cell table:style-name="ce95" office:value-type="string" calcext:value-type="string">
            <text:p>載具</text:p>
          </table:table-cell>
          <table:table-cell table:style-name="ce95" office:value-type="string" calcext:value-type="string">
            <text:p>＜駕駛：＞</text:p>
          </table:table-cell>
          <table:table-cell table:style-name="ce95" office:value-type="float" office:value="13" calcext:value-type="float">
            <text:p>13</text:p>
          </table:table-cell>
          <table:table-cell table:style-name="ce95" office:value-type="float" office:value="-3" calcext:value-type="float">
            <text:p>-3</text:p>
          </table:table-cell>
          <table:table-cell table:style-name="ce95" office:value-type="float" office:value="13" calcext:value-type="float">
            <text:p>13</text:p>
          </table:table-cell>
          <table:table-cell table:style-name="ce95" office:value-type="string" calcext:value-type="string">
            <text:p>300m</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8" office:value-type="string" calcext:value-type="string">
            <text:p>受EXR病毒感染的載具。</text:p>
            <text:p>＜駕駛：＞的類別於取得該道具時決定，搭乘期間，你進行的所有判定骰數+1D。</text:p>
          </table:table-cell>
          <table:table-cell table:style-name="ce95" office:value-type="string" calcext:value-type="string">
            <text:p>LM P119</text:p>
          </table:table-cell>
          <table:table-cell table:style-name="ce8"/>
          <table:table-cell table:style-name="ce112" table:number-columns-repeated="14"/>
          <table:table-cell table:number-columns-repeated="998"/>
        </table:table-row>
        <table:table-row table:style-name="ro1">
          <table:table-cell table:style-name="ce95" office:value-type="string" calcext:value-type="string">
            <text:p>墮天機械</text:p>
            <text:p>（フオールンマシン）</text:p>
          </table:table-cell>
          <table:table-cell table:style-name="ce95" office:value-type="string" calcext:value-type="string">
            <text:p>載具</text:p>
          </table:table-cell>
          <table:table-cell table:style-name="ce95" office:value-type="string" calcext:value-type="string">
            <text:p>&lt;駕駛：多腳戰車&gt;</text:p>
          </table:table-cell>
          <table:table-cell table:style-name="ce95" office:value-type="float" office:value="17" calcext:value-type="float">
            <text:p>17</text:p>
          </table:table-cell>
          <table:table-cell table:style-name="ce95" office:value-type="float" office:value="-3" calcext:value-type="float">
            <text:p>-3</text:p>
          </table:table-cell>
          <table:table-cell table:style-name="ce95" office:value-type="float" office:value="15" calcext:value-type="float">
            <text:p>15</text:p>
          </table:table-cell>
          <table:table-cell table:style-name="ce95" office:value-type="string" calcext:value-type="string">
            <text:p>150m</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三米高的人形機械。利用EXR病毒完成的獨一無二的機體。</text:p>
            <text:p>在搭乘期間，具有「裝備該武器期間，不能裝備其他武器」性質的武器最多可以裝備4個。</text:p>
          </table:table-cell>
          <table:table-cell table:style-name="ce95" office:value-type="string" calcext:value-type="string">
            <text:p>HR P90</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打擊者</text:p>
            <text:p>（ストライクモービル）</text:p>
          </table:table-cell>
          <table:table-cell table:style-name="ce95" office:value-type="string" calcext:value-type="string">
            <text:p>載具</text:p>
          </table:table-cell>
          <table:table-cell table:style-name="ce95" office:value-type="string" calcext:value-type="string">
            <text:p>&lt;駕駛：&gt;</text:p>
          </table:table-cell>
          <table:table-cell table:style-name="ce95" office:value-type="float" office:value="10" calcext:value-type="float">
            <text:p>10</text:p>
          </table:table-cell>
          <table:table-cell table:style-name="ce95" office:value-type="float" office:value="-1" calcext:value-type="float">
            <text:p>-1</text:p>
          </table:table-cell>
          <table:table-cell table:style-name="ce95" office:value-type="float" office:value="13" calcext:value-type="float">
            <text:p>13</text:p>
          </table:table-cell>
          <table:table-cell table:style-name="ce95" office:value-type="string" calcext:value-type="string">
            <text:p>350m</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10" office:value-type="string" calcext:value-type="string">
            <text:p>適合戰鬥用的載具機器。</text:p>
            <text:p>＜駕駛：＞的類別於取得此道具時決定。搭乘期間，你所進行攻擊判定的骰數+4D。</text:p>
          </table:table-cell>
          <table:table-cell table:style-name="ce95" office:value-type="string" calcext:value-type="string">
            <text:p>RW P55</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戰鬥卡車</text:p>
            <text:p>（バトルトレーラー）</text:p>
          </table:table-cell>
          <table:table-cell table:style-name="ce95" office:value-type="string" calcext:value-type="string">
            <text:p>載具</text:p>
          </table:table-cell>
          <table:table-cell table:style-name="ce95" office:value-type="string" calcext:value-type="string">
            <text:p>&lt;駕駛：四輪&gt;&lt;駕駛：多腳戰車&gt;</text:p>
          </table:table-cell>
          <table:table-cell table:style-name="ce99" office:value-type="string" calcext:value-type="string">
            <text:p>12/20</text:p>
          </table:table-cell>
          <table:table-cell table:style-name="ce99" office:value-type="string" calcext:value-type="string">
            <text:p>-4</text:p>
          </table:table-cell>
          <table:table-cell table:style-name="ce99" office:value-type="string" calcext:value-type="string">
            <text:p>14/20</text:p>
          </table:table-cell>
          <table:table-cell table:style-name="ce99" office:value-type="string" calcext:value-type="string">
            <text:p>100m</text:p>
          </table:table-cell>
          <table:table-cell table:style-name="ce95" office:value-type="string" calcext:value-type="string">
            <text:p>購買不可/不可</text:p>
          </table:table-cell>
          <table:table-cell table:style-name="ce95" office:value-type="string" calcext:value-type="string">
            <text:p>100點</text:p>
          </table:table-cell>
          <table:table-cell table:style-name="ce110" office:value-type="string" calcext:value-type="string">
            <text:p>平常只是巨大的載具，但實際上可以通過命令使其變形為人型機器人的EX背教者。</text:p>
            <text:p>通過消耗次要動作使用，該場景間，使其攻擊力和裝甲值變為斜杠右側的數據。同時，在此期間，該載具的攻擊力可以通過&lt;近戰&gt;使用。</text:p>
            <text:p>此道具只能通過支付經驗點來取得。</text:p>
          </table:table-cell>
          <table:table-cell table:style-name="ce95" office:value-type="string" calcext:value-type="string">
            <text:p>RW P55</text:p>
          </table:table-cell>
          <table:table-cell table:style-name="ce111"/>
          <table:table-cell table:style-name="ce112" table:number-columns-repeated="14"/>
          <table:table-cell table:number-columns-repeated="998"/>
        </table:table-row>
        <table:table-row table:style-name="ro1">
          <table:table-cell table:style-name="ce95" table:number-columns-repeated="7"/>
          <table:table-cell table:style-name="ce99"/>
          <table:table-cell table:style-name="ce95"/>
          <table:table-cell table:style-name="ce110"/>
          <table:table-cell table:style-name="ce95"/>
          <table:table-cell table:style-name="ce111"/>
          <table:table-cell table:style-name="ce112" table:number-columns-repeated="14"/>
          <table:table-cell table:number-columns-repeated="998"/>
        </table:table-row>
        <table:table-row table:style-name="ro1">
          <table:table-cell table:style-name="ce96" office:value-type="string" calcext:value-type="string" table:number-columns-spanned="12" table:number-rows-spanned="1">
            <text:p>其他</text:p>
          </table:table-cell>
          <table:covered-table-cell table:number-columns-repeated="11"/>
          <table:table-cell table:style-name="ce112" table:number-columns-repeated="14"/>
          <table:table-cell table:number-columns-repeated="998"/>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able:number-columns-spanned="5" table:number-rows-spanned="1">
            <text:p>解說</text:p>
          </table:table-cell>
          <table:covered-table-cell table:number-columns-repeated="4" table:style-name="ce106"/>
          <table:table-cell table:style-name="ce94" office:value-type="string" calcext:value-type="string">
            <text:p>參照</text:p>
          </table:table-cell>
          <table:table-cell table:style-name="ce94" office:value-type="string" calcext:value-type="string">
            <text:p>備註</text:p>
          </table:table-cell>
          <table:table-cell table:style-name="ce112" table:number-columns-repeated="14"/>
          <table:table-cell table:number-columns-repeated="998"/>
        </table:table-row>
        <table:table-row table:style-name="ro1">
          <table:table-cell table:style-name="ce97" office:value-type="string" calcext:value-type="string">
            <text:p>關聯：大師級領域</text:p>
          </table:table-cell>
          <table:table-cell table:style-name="ce95" office:value-type="string" calcext:value-type="string">
            <text:p>關聯</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03" office:value-type="string" calcext:value-type="string" table:number-columns-spanned="5" table:number-rows-spanned="1">
            <text:p>由特定領域的專家們進行互相幫扶的組織。參加該組織的成員，可以獲得來自其他成員的協助。</text:p>
            <text:p>於任意判定前使用，該判定直接成功。不能用於對決判定。GM可以選擇拒絕使用，但此時不消耗使用次數。</text:p>
            <text:p>這個效果一個劇本中只能使用一次。</text:p>
          </table:table-cell>
          <table:covered-table-cell table:number-columns-repeated="4" table:style-name="ce107"/>
          <table:table-cell table:style-name="ce95" office:value-type="string" calcext:value-type="string">
            <text:p>LM P119</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R控制器</text:p>
          </table:table-cell>
          <table:table-cell table:style-name="ce95" office:value-type="string" calcext:value-type="string">
            <text:p>其他</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04" office:value-type="string" calcext:value-type="string" table:number-columns-spanned="5" table:number-rows-spanned="1">
            <text:p>裝備於手腕上的背教者病毒增幅器，效果強大但是使用次數有限。</text:p>
            <text:p>於&lt;RC&gt;判定前使用，此次判定的骰數+5D。該效果一個劇本中最多可以使用三次。</text:p>
          </table:table-cell>
          <table:covered-table-cell table:number-columns-repeated="4"/>
          <table:table-cell table:style-name="ce95" office:value-type="string" calcext:value-type="string">
            <text:p>LM P119</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真實之視</text:p>
          </table:table-cell>
          <table:table-cell table:style-name="ce95" office:value-type="string" calcext:value-type="string">
            <text:p>其他</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04" office:value-type="string" calcext:value-type="string" table:number-columns-spanned="5" table:number-rows-spanned="1">
            <text:p>受EXR病毒感染的多功能護目鏡，為了應對各種狀況而搭載著各種各樣的功能。</text:p>
            <text:p>於任意判定前使用，此次判定的骰數+3D。該效果一個劇本中最多可以使用三次。</text:p>
          </table:table-cell>
          <table:covered-table-cell table:number-columns-repeated="4"/>
          <table:table-cell table:style-name="ce95" office:value-type="string" calcext:value-type="string">
            <text:p>LM P119</text:p>
          </table:table-cell>
          <table:table-cell table:style-name="ce111"/>
          <table:table-cell table:style-name="ce112" table:number-columns-repeated="14"/>
          <table:table-cell table:number-columns-repeated="998"/>
        </table:table-row>
        <table:table-row table:style-name="ro1">
          <table:table-cell table:style-name="ce98" office:value-type="string" calcext:value-type="string">
            <text:p>特殊裝甲義肢</text:p>
          </table:table-cell>
          <table:table-cell table:style-name="ce95" office:value-type="string" calcext:value-type="string">
            <text:p>其他</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04" office:value-type="string" calcext:value-type="string" table:number-columns-spanned="5" table:number-rows-spanned="1">
            <office:annotation draw:style-name="gr3" draw:text-style-name="P2" svg:width="467.04pt" svg:height="177pt" svg:x="522.34pt" svg:y="532.49pt" draw:caption-point-x="455.5pt" draw:caption-point-y="-22.22pt">
              <dc:date>2026-04-24T00:00:00</dc:date>
              <text:p text:style-name="P1">機械臂</text:p>
              <text:p text:style-name="P1">最大等級：10</text:p>
              <text:p text:style-name="P1">時機：常駐</text:p>
              <text:p text:style-name="P1">技能：－ 難易度：自動成功</text:p>
              <text:p text:style-name="P1">對象：自身 射程：至近</text:p>
              <text:p text:style-name="P1">侵蝕值：－ 限制：－</text:p>
              <text:p text:style-name="P1">效果：將手臂機械化的異能。</text:p>
              <text:p text:style-name="P1">將空手變更成以下數據。此異能的等級不受侵蝕率影響。取得此異能的話，侵蝕率基本值+3。</text:p>
              <text:p text:style-name="P1">種類：近戰　技能：&lt;近戰&gt;　命中：0</text:p>
              <text:p text:style-name="P1">攻擊力：+[LV+3]　格擋值：5　射程：至近</text:p>
              <text:p text:style-name="P1">======</text:p>
            </office:annotation>
            <text:p>最新型的義肢，使用了軍用裝甲跟強化肌肉。</text:p>
            <text:p>只有症狀為雷擊黑犬的角色才能取得。空手的攻擊力+6，格擋值+3，並且你所進行的&lt;近戰&gt;判定的骰數＋1D。</text:p>
            <text:p>這個效果可與《機械臂》的效果迭加，受到《破壞之爪》一類的空手資料變更效果時也能適用。</text:p>
            <text:p>本道具的效果即使取得多個也不會迭加。</text:p>
          </table:table-cell>
          <table:covered-table-cell table:number-columns-repeated="4"/>
          <table:table-cell table:style-name="ce95" office:value-type="string" calcext:value-type="string">
            <text:p>LM P119</text:p>
          </table:table-cell>
          <table:table-cell table:style-name="ce8" office:value-type="string" calcext:value-type="string">
            <text:p>雷擊黑犬專用</text:p>
          </table:table-cell>
          <table:table-cell table:style-name="ce112" table:number-columns-repeated="14"/>
          <table:table-cell table:number-columns-repeated="998"/>
        </table:table-row>
        <table:table-row table:style-name="ro1">
          <table:table-cell table:style-name="ce95" office:value-type="string" calcext:value-type="string">
            <text:p>破壞者</text:p>
          </table:table-cell>
          <table:table-cell table:style-name="ce95" office:value-type="string" calcext:value-type="string">
            <text:p>其他</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04" office:value-type="string" calcext:value-type="string" table:number-columns-spanned="5" table:number-rows-spanned="1">
            <text:p>干涉背教者病毒使其從內部造成破壞的髮夾型裝置。</text:p>
            <text:p>於場景中登場的角色進行攻擊前使用，該攻擊無視對方裝甲值進行傷害計算。</text:p>
            <text:p>此效果一個場景中只能使用一次。</text:p>
          </table:table-cell>
          <table:covered-table-cell table:number-columns-repeated="4"/>
          <table:table-cell table:style-name="ce95" office:value-type="string" calcext:value-type="string">
            <text:p>LM P119</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傳說的鎧甲</text:p>
          </table:table-cell>
          <table:table-cell table:style-name="ce95" office:value-type="string" calcext:value-type="string">
            <text:p>其他</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04" office:value-type="string" calcext:value-type="string" table:number-columns-spanned="5" table:number-rows-spanned="1">
            <text:p>你所持有的防具是傳說中的逸品，與其他防具相比有著天差地別的性能。</text:p>
            <text:p>取得時選擇一件你常備化的防具。該防具的裝甲值+5，回避和行動值的資料+2（最大0）。</text:p>
            <text:p>取得多個此道具時，無法選擇同一防具進行效果迭加。</text:p>
          </table:table-cell>
          <table:covered-table-cell table:number-columns-repeated="4"/>
          <table:table-cell table:style-name="ce95" office:value-type="string" calcext:value-type="string">
            <text:p>LM P119</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傳說的載具</text:p>
          </table:table-cell>
          <table:table-cell table:style-name="ce95" office:value-type="string" calcext:value-type="string">
            <text:p>其他</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04" office:value-type="string" calcext:value-type="string" table:number-columns-spanned="5" table:number-rows-spanned="1">
            <text:p>你所持有的載具是傳說中的逸品，與其他載具相比有著天差地別的性能。</text:p>
            <text:p>取得時選擇一輛你常備化的載具。該載具的攻擊力+5，全力移動+50m。</text:p>
            <text:p>取得多個此道具時，無法選擇同一載具進行效果迭加。</text:p>
          </table:table-cell>
          <table:covered-table-cell table:number-columns-repeated="4"/>
          <table:table-cell table:style-name="ce95" office:value-type="string" calcext:value-type="string">
            <text:p>LM P119</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傳說的武器</text:p>
          </table:table-cell>
          <table:table-cell table:style-name="ce95" office:value-type="string" calcext:value-type="string">
            <text:p>其他</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04" office:value-type="string" calcext:value-type="string" table:number-columns-spanned="5" table:number-rows-spanned="1">
            <text:p>你所持有的武器是傳說中的逸品，與其他武器相比有著天差地別的性能。</text:p>
            <text:p>取得時選擇一把你常備化的武器。該武器的攻擊力+5，選擇的武器為「種類：近戰」時，其格擋值+2，為「種類：射擊」時，其射程+10m</text:p>
            <text:p>取得多個此道具時，無法選擇同一武器進行效果迭加。</text:p>
          </table:table-cell>
          <table:covered-table-cell table:number-columns-repeated="4"/>
          <table:table-cell table:style-name="ce95" office:value-type="string" calcext:value-type="string">
            <text:p>LM P119</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墮天火蜥蜴</text:p>
            <text:p>（フォールンサラマンダー）</text:p>
          </table:table-cell>
          <table:table-cell table:style-name="ce95" office:value-type="string" calcext:value-type="string">
            <text:p>其他</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05" office:value-type="string" calcext:value-type="string" table:number-columns-spanned="5" table:number-rows-spanned="1">
            <text:p>被EXR病毒感染的小型無人機。可以通過簡易炮臺和異能進行火力支援。</text:p>
            <text:p>於場景中登場的任意角色投擲傷害骰前使用，使其傷害+2D。一回合可以使用一次，一個劇本之中最多可以使用三次。</text:p>
          </table:table-cell>
          <table:covered-table-cell table:number-columns-repeated="4"/>
          <table:table-cell table:style-name="ce95" office:value-type="string" calcext:value-type="string">
            <text:p>HR P90</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墮天小精靈</text:p>
            <text:p>（フォールンスプライト）</text:p>
          </table:table-cell>
          <table:table-cell table:style-name="ce95" office:value-type="string" calcext:value-type="string">
            <text:p>其他</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95" office:value-type="string" calcext:value-type="string">
            <text:p>20點</text:p>
          </table:table-cell>
          <table:table-cell table:style-name="ce105" office:value-type="string" calcext:value-type="string" table:number-columns-spanned="5" table:number-rows-spanned="1">
            <text:p>被EXR病毒感染的小型無人機。擁有一定的智慧，可以輔助持有者的行動。</text:p>
            <text:p>於場景中登場的任意角色進行判定前使用，使其判定的骰子+3D，一個場景中最多可以使用一次。</text:p>
            <text:p>此外，墮天小精靈還可以作為聽從你命令的臨時角色進行簡單的工作（搬運小對象，按下你不在的地方的開關等等），具體能夠做何種程度由GM決定。</text:p>
          </table:table-cell>
          <table:covered-table-cell table:number-columns-repeated="4"/>
          <table:table-cell table:style-name="ce95" office:value-type="string" calcext:value-type="string">
            <text:p>HR P90</text:p>
          </table:table-cell>
          <table:table-cell table:style-name="ce95"/>
          <table:table-cell table:style-name="ce112" table:number-columns-repeated="14"/>
          <table:table-cell table:number-columns-repeated="998"/>
        </table:table-row>
        <table:table-row table:style-name="ro8">
          <table:table-cell table:style-name="ce95" table:number-columns-repeated="5"/>
          <table:table-cell table:style-name="ce105" table:number-columns-spanned="5" table:number-rows-spanned="1"/>
          <table:covered-table-cell table:number-columns-repeated="4"/>
          <table:table-cell table:style-name="ce95" table:number-columns-repeated="2"/>
          <table:table-cell table:style-name="ce112" table:number-columns-repeated="14"/>
          <table:table-cell table:number-columns-repeated="998"/>
        </table:table-row>
        <table:table-row table:style-name="ro4" table:number-rows-repeated="1048533">
          <table:table-cell table:number-columns-repeated="1024"/>
        </table:table-row>
        <table:table-row table:style-name="ro4">
          <table:table-cell table:number-columns-repeated="1024"/>
        </table:table-row>
      </table:table>
      <table:table table:name="D-lois No.98 遺產繼承者專用道具" table:style-name="ta9">
        <table:table-column table:style-name="co26" table:default-cell-style-name="Default"/>
        <table:table-column table:style-name="co27" table:default-cell-style-name="Default"/>
        <table:table-column table:style-name="co29" table:default-cell-style-name="Default"/>
        <table:table-column table:style-name="co20" table:default-cell-style-name="Default"/>
        <table:table-column table:style-name="co27" table:default-cell-style-name="Default"/>
        <table:table-column table:style-name="co9" table:default-cell-style-name="Default"/>
        <table:table-column table:style-name="co14" table:default-cell-style-name="Default"/>
        <table:table-column table:style-name="co34" table:default-cell-style-name="Default"/>
        <table:table-column table:style-name="co35" table:default-cell-style-name="Default"/>
        <table:table-column table:style-name="co36" table:default-cell-style-name="Default"/>
        <table:table-column table:style-name="co32" table:default-cell-style-name="Default"/>
        <table:table-column table:style-name="co33" table:default-cell-style-name="Default"/>
        <table:table-column table:style-name="co32" table:number-columns-repeated="14" table:default-cell-style-name="Default"/>
        <table:table-column table:style-name="co4" table:number-columns-repeated="998" table:default-cell-style-name="Default"/>
        <table:table-row table:style-name="ro1">
          <table:table-cell table:style-name="ce93" office:value-type="string" calcext:value-type="string" table:number-columns-spanned="12" table:number-rows-spanned="1">
            <text:p>武器</text:p>
          </table:table-cell>
          <table:covered-table-cell table:number-columns-repeated="11"/>
          <table:table-cell table:style-name="ce112" table:number-columns-repeated="14"/>
          <table:table-cell table:number-columns-repeated="998"/>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94" office:value-type="string" calcext:value-type="string">
            <text:p>命中</text:p>
          </table:table-cell>
          <table:table-cell table:style-name="ce94" office:value-type="string" calcext:value-type="string">
            <text:p>攻擊力</text:p>
          </table:table-cell>
          <table:table-cell table:style-name="ce94" office:value-type="string" calcext:value-type="string">
            <text:p>格擋值</text:p>
          </table:table-cell>
          <table:table-cell table:style-name="ce94" office:value-type="string" calcext:value-type="string">
            <text:p>射程</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ext:p>解說</text:p>
          </table:table-cell>
          <table:table-cell table:style-name="ce94" office:value-type="string" calcext:value-type="string">
            <text:p>參照</text:p>
          </table:table-cell>
          <table:table-cell table:style-name="ce94" office:value-type="string" calcext:value-type="string">
            <text:p>備註</text:p>
          </table:table-cell>
          <table:table-cell table:style-name="ce8" table:number-columns-repeated="14"/>
          <table:table-cell table:number-columns-repeated="998"/>
        </table:table-row>
        <table:table-row table:style-name="ro1">
          <table:table-cell table:style-name="ce113" office:value-type="string" calcext:value-type="string">
            <text:p>榮光與勝利之槍</text:p>
          </table:table-cell>
          <table:table-cell table:style-name="ce113" office:value-type="string" calcext:value-type="string">
            <text:p>近戰／射擊</text:p>
          </table:table-cell>
          <table:table-cell table:style-name="ce113" office:value-type="string" calcext:value-type="string">
            <text:p>&lt;近戰&gt;&lt;射擊&gt;</text:p>
          </table:table-cell>
          <table:table-cell table:style-name="ce113" office:value-type="float" office:value="-1" calcext:value-type="float">
            <text:p>-1</text:p>
          </table:table-cell>
          <table:table-cell table:style-name="ce113" office:value-type="float" office:value="11" calcext:value-type="float">
            <text:p>11</text:p>
          </table:table-cell>
          <table:table-cell table:style-name="ce113" office:value-type="float" office:value="3" calcext:value-type="float">
            <text:p>3</text:p>
          </table:table-cell>
          <table:table-cell table:style-name="ce113" office:value-type="string" calcext:value-type="string">
            <text:p>至近/視界</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10" office:value-type="string" calcext:value-type="string">
            <office:annotation draw:style-name="gr4" draw:text-style-name="P2" svg:width="174.36pt" svg:height="175.49pt" svg:x="975.03pt" svg:y="52.5pt" draw:caption-point-x="-11.54pt" draw:caption-point-y="-22.22pt">
              <dc:date>2026-04-24T00:00:00</dc:date>
              <text:p text:style-name="P1">反擊</text:p>
              <text:p text:style-name="P1">最大等級：3</text:p>
              <text:p text:style-name="P1">時機：回應階段</text:p>
              <text:p text:style-name="P1">技能：&lt;近戰&gt;&lt;射擊&gt; 難易度：對決</text:p>
              <text:p text:style-name="P1">對象：單體 射程：武器</text:p>
              <text:p text:style-name="P1">侵蝕值：4 限制：80%</text:p>
              <text:p text:style-name="P1">次數：LV/劇本</text:p>
              <text:p text:style-name="P1">效果：對象對你進行「對象：單體」的攻擊時，可作為回應動作使用。</text:p>
              <text:p text:style-name="P1">向對象進行攻擊，此時可組合「時機：主要動作」的異能，對決勝利的一方才會命中。</text:p>
              <text:p text:style-name="P1">只能在未行動時使用，使用後變成已行動。</text:p>
              <text:p text:style-name="P1">======</text:p>
            </office:annotation>
            <text:p>傳說是英雄使用過的必勝之槍，只要投出就必定能貫穿敵人。</text:p>
            <text:p>取得異能《反擊》LV1，取得時不需要支付經驗點，可使用經驗點升級。</text:p>
            <text:p>進行射擊攻擊時，技能、射程會使用右邊的資料。</text:p>
            <text:p>作為代價，契約者總是會被迫追求勝利，侵蝕率基本值+6。</text:p>
          </table:table-cell>
          <table:table-cell table:style-name="ce113" office:value-type="string" calcext:value-type="string">
            <text:p>LM P120</text:p>
          </table:table-cell>
          <table:table-cell table:style-name="ce111"/>
          <table:table-cell table:style-name="ce112" table:number-columns-repeated="14"/>
          <table:table-cell table:number-columns-repeated="998"/>
        </table:table-row>
        <table:table-row table:style-name="ro1">
          <table:table-cell table:style-name="ce113" office:value-type="string" calcext:value-type="string">
            <text:p>斬鬼的古太刀</text:p>
          </table:table-cell>
          <table:table-cell table:style-name="ce113" office:value-type="string" calcext:value-type="string">
            <text:p>近戰</text:p>
          </table:table-cell>
          <table:table-cell table:style-name="ce113" office:value-type="string" calcext:value-type="string">
            <text:p>&lt;近戰&gt;</text:p>
          </table:table-cell>
          <table:table-cell table:style-name="ce113" office:value-type="float" office:value="0" calcext:value-type="float">
            <text:p>0</text:p>
          </table:table-cell>
          <table:table-cell table:style-name="ce113" office:value-type="float" office:value="10" calcext:value-type="float">
            <text:p>10</text:p>
          </table:table-cell>
          <table:table-cell table:style-name="ce113" office:value-type="float" office:value="3" calcext:value-type="float">
            <text:p>3</text:p>
          </table:table-cell>
          <table:table-cell table:style-name="ce113" office:value-type="string" calcext:value-type="string">
            <text:p>至近</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10" office:value-type="string" calcext:value-type="string">
            <text:p>傳說是曾斬殺過鬼的太刀，有著可以終結邪惡魔術的能力。</text:p>
            <text:p>使用該武器的攻擊造成至少1點HP傷害時，可以將一個對象使用的，效果仍在持續生效的E-lois解除。但是當設定了其他解除條件時，需要得到GM的允許才能解除。</text:p>
            <text:p>契約者會變得非常討厭原菌，侵蝕率基本值+4。</text:p>
          </table:table-cell>
          <table:table-cell table:style-name="ce113" office:value-type="string" calcext:value-type="string">
            <text:p>LM P120</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侏羅紀記錄</text:p>
            <text:p>（ジュラシックレコード）</text:p>
          </table:table-cell>
          <table:table-cell table:style-name="ce95" office:value-type="string" calcext:value-type="string">
            <text:p>近戰</text:p>
          </table:table-cell>
          <table:table-cell table:style-name="ce95" office:value-type="string" calcext:value-type="string">
            <text:p>&lt;近戰&gt;</text:p>
          </table:table-cell>
          <table:table-cell table:style-name="ce95" office:value-type="float" office:value="-2" calcext:value-type="float">
            <text:p>-2</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string" calcext:value-type="string">
            <text:p>至近</text:p>
          </table:table-cell>
          <table:table-cell table:style-name="ce99" office:value-type="string" calcext:value-type="string">
            <text:p>購入不可/不可</text:p>
          </table:table-cell>
          <table:table-cell table:style-name="ce95" office:value-type="string" calcext:value-type="string">
            <text:p>——</text:p>
          </table:table-cell>
          <table:table-cell table:style-name="ce110" office:value-type="string" calcext:value-type="string">
            <text:p>沉睡著恐龍基因的神秘石斧，可以提高契約者的潛在能力，並且皮膚會變得跟鱗片一樣強韌。</text:p>
            <text:p>取得時從能力值之中選擇一項使其上升2點，並將上升前後的數值分別記錄，如：【肉體】5 (7)，使用經驗點進行能力值成長時，使用上升前的原數值作為參照，此外，你的裝甲值+10。</text:p>
            <text:p>而契約者將會害怕火焰。侵蝕率基本值+2。</text:p>
          </table:table-cell>
          <table:table-cell table:style-name="ce95" office:value-type="string" calcext:value-type="string">
            <text:p>HR P91</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必中之弓</text:p>
          </table:table-cell>
          <table:table-cell table:style-name="ce95" office:value-type="string" calcext:value-type="string">
            <text:p>射擊</text:p>
          </table:table-cell>
          <table:table-cell table:style-name="ce95" office:value-type="string" calcext:value-type="string">
            <text:p>&lt;射擊&gt;</text:p>
          </table:table-cell>
          <table:table-cell table:style-name="ce95" office:value-type="float" office:value="0" calcext:value-type="float">
            <text:p>0</text:p>
          </table:table-cell>
          <table:table-cell table:style-name="ce95" office:value-type="float" office:value="11" calcext:value-type="float">
            <text:p>11</text:p>
          </table:table-cell>
          <table:table-cell table:style-name="ce95" office:value-type="string" calcext:value-type="string">
            <text:p>——</text:p>
          </table:table-cell>
          <table:table-cell table:style-name="ce95" office:value-type="string" calcext:value-type="string">
            <text:p>視界</text:p>
          </table:table-cell>
          <table:table-cell table:style-name="ce99" office:value-type="string" calcext:value-type="string">
            <text:p>購入不可/不可</text:p>
          </table:table-cell>
          <table:table-cell table:style-name="ce95" office:value-type="string" calcext:value-type="string">
            <text:p>——</text:p>
          </table:table-cell>
          <table:table-cell table:style-name="ce110" office:value-type="string" calcext:value-type="string">
            <text:p>無論持有者的水準如何都能以達人般的技術操控的謎一般的長弓。</text:p>
            <text:p>使用該武器進行的射擊攻擊達成值+10。另外，該武器的射擊攻擊不會受到來自異能的減骰懲罰效果。</text:p>
            <text:p>契約者被強迫必須做到百發百中。使用該武器的攻擊未能命中時，你將會受到暴走異常狀態。</text:p>
          </table:table-cell>
          <table:table-cell table:style-name="ce95" office:value-type="string" calcext:value-type="string">
            <text:p>HR P91</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聖劍之王者</text:p>
          </table:table-cell>
          <table:table-cell table:style-name="ce113" office:value-type="string" calcext:value-type="string">
            <text:p>近戰</text:p>
          </table:table-cell>
          <table:table-cell table:style-name="ce113" office:value-type="string" calcext:value-type="string">
            <text:p>&lt;近戰&gt;</text:p>
          </table:table-cell>
          <table:table-cell table:style-name="ce95" office:value-type="float" office:value="0" calcext:value-type="float">
            <text:p>0</text:p>
          </table:table-cell>
          <table:table-cell table:style-name="ce95" office:value-type="float" office:value="15" calcext:value-type="float">
            <text:p>15</text:p>
          </table:table-cell>
          <table:table-cell table:style-name="ce95" office:value-type="float" office:value="7" calcext:value-type="float">
            <text:p>7</text:p>
          </table:table-cell>
          <table:table-cell table:style-name="ce95" office:value-type="string" calcext:value-type="string">
            <text:p>至近</text:p>
          </table:table-cell>
          <table:table-cell table:style-name="ce99" office:value-type="string" calcext:value-type="string">
            <text:p>購入不可/不可</text:p>
          </table:table-cell>
          <table:table-cell table:style-name="ce95" office:value-type="string" calcext:value-type="string">
            <text:p>——</text:p>
          </table:table-cell>
          <table:table-cell table:style-name="ce110" office:value-type="string" calcext:value-type="string">
            <text:p>即使在無數的傳說之劍中也被稱為個中王者的無鞘之劍。</text:p>
            <text:p>消耗次要動作使用，該主要階段間使用該武器進行的攻擊的暴擊值-2（下限值4）。這個效果一個劇本中只能使用一次。</text:p>
            <text:p>契約者將變得追求不會被力量所吞噬的強大。你在受到暴走異常狀態期間無法進行攻擊。</text:p>
          </table:table-cell>
          <table:table-cell table:style-name="ce95" office:value-type="string" calcext:value-type="string">
            <text:p>RW P55</text:p>
          </table:table-cell>
          <table:table-cell table:style-name="ce111"/>
          <table:table-cell table:style-name="ce112" table:number-columns-repeated="14"/>
          <table:table-cell table:number-columns-repeated="998"/>
        </table:table-row>
        <table:table-row table:style-name="ro1">
          <table:table-cell table:style-name="ce95" table:number-columns-repeated="7"/>
          <table:table-cell table:style-name="ce99"/>
          <table:table-cell table:style-name="ce95"/>
          <table:table-cell table:style-name="ce110"/>
          <table:table-cell table:style-name="ce95"/>
          <table:table-cell table:style-name="ce111"/>
          <table:table-cell table:style-name="ce112" table:number-columns-repeated="14"/>
          <table:table-cell table:number-columns-repeated="998"/>
        </table:table-row>
        <table:table-row table:style-name="ro1">
          <table:table-cell table:style-name="ce93" office:value-type="string" calcext:value-type="string" table:number-columns-spanned="12" table:number-rows-spanned="1">
            <text:p>防具</text:p>
          </table:table-cell>
          <table:covered-table-cell table:number-columns-repeated="11"/>
          <table:table-cell table:style-name="ce112" table:number-columns-repeated="14"/>
          <table:table-cell table:number-columns-repeated="998"/>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回避</text:p>
          </table:table-cell>
          <table:table-cell table:style-name="ce94" office:value-type="string" calcext:value-type="string">
            <text:p>行動值</text:p>
          </table:table-cell>
          <table:table-cell table:style-name="ce94" office:value-type="string" calcext:value-type="string">
            <text:p>裝甲值</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able:number-columns-spanned="3" table:number-rows-spanned="1">
            <text:p>解說</text:p>
          </table:table-cell>
          <table:covered-table-cell table:number-columns-repeated="2" table:style-name="ce106"/>
          <table:table-cell table:style-name="ce94" office:value-type="string" calcext:value-type="string">
            <text:p>參照</text:p>
          </table:table-cell>
          <table:table-cell table:style-name="ce94" office:value-type="string" calcext:value-type="string">
            <text:p>備註</text:p>
          </table:table-cell>
          <table:table-cell table:style-name="ce8" table:number-columns-repeated="14"/>
          <table:table-cell table:number-columns-repeated="998"/>
        </table:table-row>
        <table:table-row table:style-name="ro1">
          <table:table-cell table:style-name="ce95" office:value-type="string" calcext:value-type="string">
            <text:p>蛇王的外套</text:p>
          </table:table-cell>
          <table:table-cell table:style-name="ce95" office:value-type="string" calcext:value-type="string">
            <text:p>防具</text:p>
          </table:table-cell>
          <table:table-cell table:number-columns-repeated="2" table:style-name="ce95" office:value-type="string" calcext:value-type="string">
            <text:p>——</text:p>
          </table:table-cell>
          <table:table-cell table:style-name="ce95" office:value-type="float" office:value="7" calcext:value-type="float">
            <text:p>7</text:p>
          </table:table-cell>
          <table:table-cell table:style-name="ce99" office:value-type="string" calcext:value-type="string">
            <text:p>購買不可/不可</text:p>
          </table:table-cell>
          <table:table-cell table:style-name="ce95" office:value-type="string" calcext:value-type="string">
            <text:p>——</text:p>
          </table:table-cell>
          <table:table-cell table:style-name="ce108" office:value-type="string" calcext:value-type="string" table:number-columns-spanned="3" table:number-rows-spanned="1">
            <text:p>古代的王與惡魔定下契約後得到的外套，傳說契約者的雙肩將會浮現蛇形的斑痕並接受來自惡魔的各種知識。</text:p>
            <text:p>選擇並免費取得一個【噬身影蛇】的「限制：—」異能LV1，該異能可以使用經驗點成長。</text:p>
            <text:p>契約者會漸漸失去良心而變得冷漠，侵蝕率基本值+8。</text:p>
          </table:table-cell>
          <table:covered-table-cell table:number-columns-repeated="2" table:style-name="ce107"/>
          <table:table-cell table:style-name="ce113" office:value-type="string" calcext:value-type="string">
            <text:p>LM P120</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白猿的額冠</text:p>
          </table:table-cell>
          <table:table-cell table:style-name="ce95" office:value-type="string" calcext:value-type="string">
            <text:p>防具※</text:p>
          </table:table-cell>
          <table:table-cell table:style-name="ce95" office:value-type="string" calcext:value-type="string">
            <text:p>——</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5" office:value-type="string" calcext:value-type="string" table:number-columns-spanned="3" table:number-rows-spanned="1">
            <text:p>猿人姿態的超越者的所遺留下的頭箍。選擇並免費取得一個【疾速靈猿】的「限制：—」異能LV1，該異能可以使用經驗點來進行成長。</text:p>
            <text:p>作為代價，契約者被要求理性行動，每當你受到暴走狀態時都將失去5D10點HP。</text:p>
          </table:table-cell>
          <table:covered-table-cell table:number-columns-repeated="2"/>
          <table:table-cell table:style-name="ce95" office:value-type="string" calcext:value-type="string">
            <text:p>HR P91</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祈禱之造花</text:p>
          </table:table-cell>
          <table:table-cell table:style-name="ce95" office:value-type="string" calcext:value-type="string">
            <text:p>防具</text:p>
          </table:table-cell>
          <table:table-cell table:number-columns-repeated="2" table:style-name="ce95" office:value-type="string" calcext:value-type="string">
            <text:p>——</text:p>
          </table:table-cell>
          <table:table-cell table:style-name="ce95" office:value-type="float" office:value="8" calcext:value-type="float">
            <text:p>8</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5" office:value-type="string" calcext:value-type="string" table:number-columns-spanned="3" table:number-rows-spanned="1">
            <office:annotation draw:style-name="gr5" draw:text-style-name="P2" svg:width="436.11pt" svg:height="341.97pt" svg:x="632.58pt" svg:y="202.51pt" draw:caption-point-x="330.92pt" draw:caption-point-y="-22.22pt">
              <dc:date>2026-04-24T00:00:00</dc:date>
              <text:p text:style-name="P1">無限武器</text:p>
              <text:p text:style-name="P1">最大等級：5</text:p>
              <text:p text:style-name="P1">時機：次要動作</text:p>
              <text:p text:style-name="P1">技能：－ 難易度：自動成功</text:p>
              <text:p text:style-name="P1">對象：自身 射程：至近</text:p>
              <text:p text:style-name="P1">侵蝕值：3 限制：－</text:p>
              <text:p text:style-name="P1">效果：變換物質，制作近戰用的武器的異能。形狀隨你所想。</text:p>
              <text:p text:style-name="P1">該場景中，制作並裝備以下數據的武器。</text:p>
              <text:p text:style-name="P1">種類：近戰　技能：&lt;近戰&gt;　命中：0</text:p>
              <text:p text:style-name="P1">攻擊力：+[LV+7]　格擋值：3　射程：至近</text:p>
              <text:p text:style-name="P1"/>
              <text:p text:style-name="P1">百槍</text:p>
              <text:p text:style-name="P1">最大等級：5</text:p>
              <text:p text:style-name="P1">時機：次要動作</text:p>
              <text:p text:style-name="P1">技能：－ 難易度：自動成功</text:p>
              <text:p text:style-name="P1">對象：自身 射程：至近</text:p>
              <text:p text:style-name="P1">侵蝕值：3 限制：－</text:p>
              <text:p text:style-name="P1">效果：變換物質，制作射擊戰用的武器的異能。形狀隨你所想。</text:p>
              <text:p text:style-name="P1">該場景中，制作並裝備以下數據的武器。</text:p>
              <text:p text:style-name="P1">種類：射擊　技能：&lt;射擊&gt;　命中：0</text:p>
              <text:p text:style-name="P1">攻擊力：+[LV+4]　格擋值：－　射程：30m</text:p>
              <text:p text:style-name="P1">======</text:p>
            </office:annotation>
            <text:p>由無數少女的祈禱之力轉化而成的石之玫瑰，通過禱告可以使其變換成戰鬥服和武器。</text:p>
            <text:p>你取得LV5的《無限武器》或《百槍》，取得時不需消耗經驗點。</text:p>
            <text:p>契約者將被立下直面絕望不斷奮戰的誓約。你于回歸階段原菌化時會以死亡代替原菌化，並化作該遺產的一部分。</text:p>
          </table:table-cell>
          <table:covered-table-cell table:number-columns-repeated="2"/>
          <table:table-cell table:style-name="ce95" office:value-type="string" calcext:value-type="string">
            <text:p>RW P55</text:p>
          </table:table-cell>
          <table:table-cell table:style-name="ce111"/>
          <table:table-cell table:style-name="ce112" table:number-columns-repeated="14"/>
          <table:table-cell table:number-columns-repeated="998"/>
        </table:table-row>
        <table:table-row table:style-name="ro1">
          <table:table-cell table:style-name="ce111" table:number-columns-repeated="7"/>
          <table:table-cell table:style-name="ce116" table:number-columns-repeated="2"/>
          <table:table-cell table:style-name="ce117"/>
          <table:table-cell table:style-name="ce111" table:number-columns-repeated="2"/>
          <table:table-cell table:style-name="ce112" table:number-columns-repeated="14"/>
          <table:table-cell table:number-columns-repeated="998"/>
        </table:table-row>
        <table:table-row table:style-name="ro1">
          <table:table-cell table:style-name="ce96" office:value-type="string" calcext:value-type="string" table:number-columns-spanned="12" table:number-rows-spanned="1">
            <text:p>載具</text:p>
          </table:table-cell>
          <table:covered-table-cell table:number-columns-repeated="11"/>
          <table:table-cell table:style-name="ce112" table:number-columns-repeated="14"/>
          <table:table-cell table:number-columns-repeated="998"/>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94" office:value-type="string" calcext:value-type="string">
            <text:p>攻擊力</text:p>
          </table:table-cell>
          <table:table-cell table:style-name="ce94" office:value-type="string" calcext:value-type="string">
            <text:p>行動值</text:p>
          </table:table-cell>
          <table:table-cell table:style-name="ce94" office:value-type="string" calcext:value-type="string">
            <text:p>裝甲值</text:p>
          </table:table-cell>
          <table:table-cell table:style-name="ce94" office:value-type="string" calcext:value-type="string">
            <text:p>全力移動</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ext:p>解說</text:p>
          </table:table-cell>
          <table:table-cell table:style-name="ce94" office:value-type="string" calcext:value-type="string">
            <text:p>參照</text:p>
          </table:table-cell>
          <table:table-cell table:style-name="ce94" office:value-type="string" calcext:value-type="string">
            <text:p>備註</text:p>
          </table:table-cell>
          <table:table-cell table:style-name="ce112" table:number-columns-repeated="14"/>
          <table:table-cell table:number-columns-repeated="998"/>
        </table:table-row>
        <table:table-row table:style-name="ro1">
          <table:table-cell table:style-name="ce95" office:value-type="string" calcext:value-type="string">
            <text:p>戰車挽馬</text:p>
            <text:p>（チャリオットバラー）</text:p>
          </table:table-cell>
          <table:table-cell table:style-name="ce113" office:value-type="string" calcext:value-type="string">
            <text:p>載具</text:p>
          </table:table-cell>
          <table:table-cell table:style-name="ce113" office:value-type="string" calcext:value-type="string">
            <text:p>&lt;駕駛：馬&gt;</text:p>
          </table:table-cell>
          <table:table-cell table:style-name="ce113" office:value-type="float" office:value="13" calcext:value-type="float">
            <text:p>13</text:p>
          </table:table-cell>
          <table:table-cell table:style-name="ce113" office:value-type="float" office:value="-1" calcext:value-type="float">
            <text:p>-1</text:p>
          </table:table-cell>
          <table:table-cell table:style-name="ce113" office:value-type="float" office:value="6" calcext:value-type="float">
            <text:p>6</text:p>
          </table:table-cell>
          <table:table-cell table:style-name="ce113" office:value-type="string" calcext:value-type="string">
            <text:p>200m</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10" office:value-type="string" calcext:value-type="string">
            <office:annotation draw:style-name="gr6" draw:text-style-name="P2" svg:width="174.36pt" svg:height="130.51pt" svg:x="975.03pt" svg:y="262.49pt" draw:caption-point-x="-11.54pt" draw:caption-point-y="-22.22pt">
              <dc:date>2026-04-24T00:00:00</dc:date>
              <text:p text:style-name="P1">戰術</text:p>
              <text:p text:style-name="P1">最大等級：5</text:p>
              <text:p text:style-name="P1">時機：準備階段</text:p>
              <text:p text:style-name="P1">技能：－ 難易度：自動成功</text:p>
              <text:p text:style-name="P1">對象：場景(選擇) 射程：視界</text:p>
              <text:p text:style-name="P1">侵蝕值：6 限制：－</text:p>
              <text:p text:style-name="P1">效果：你以外的對象在此回合中的主要動作骰數+LV顆。</text:p>
              <text:p text:style-name="P1">======</text:p>
            </office:annotation>
            <text:p>古時勇將跨越山野所騎乘的動物，回應你的呼喚而顯現。</text:p>
            <text:p>免費取得【神腦演算】的異能《戰術》LV1，並且可以使用經驗點升級。契約者會變得追求速度，侵蝕率基本值+3。</text:p>
          </table:table-cell>
          <table:table-cell table:style-name="ce113" office:value-type="string" calcext:value-type="string">
            <text:p>LM P120</text:p>
          </table:table-cell>
          <table:table-cell table:style-name="ce95"/>
          <table:table-cell table:style-name="ce112" table:number-columns-repeated="14"/>
          <table:table-cell table:number-columns-repeated="998"/>
        </table:table-row>
        <table:table-row table:style-name="ro1">
          <table:table-cell table:style-name="ce95" table:number-columns-repeated="7"/>
          <table:table-cell table:style-name="ce109" table:number-columns-spanned="3" table:number-rows-spanned="1"/>
          <table:covered-table-cell table:number-columns-repeated="2"/>
          <table:table-cell table:style-name="ce95"/>
          <table:table-cell table:style-name="ce111"/>
          <table:table-cell table:style-name="ce112" table:number-columns-repeated="14"/>
          <table:table-cell table:number-columns-repeated="998"/>
        </table:table-row>
        <table:table-row table:style-name="ro1">
          <table:table-cell table:style-name="ce96" office:value-type="string" calcext:value-type="string" table:number-columns-spanned="12" table:number-rows-spanned="1">
            <text:p>其他</text:p>
          </table:table-cell>
          <table:covered-table-cell table:number-columns-repeated="11"/>
          <table:table-cell table:style-name="ce112" table:number-columns-repeated="14"/>
          <table:table-cell table:number-columns-repeated="998"/>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ext:p>解說</text:p>
          </table:table-cell>
          <table:table-cell table:style-name="ce102" table:number-columns-repeated="4"/>
          <table:table-cell table:style-name="ce94" office:value-type="string" calcext:value-type="string">
            <text:p>參照</text:p>
          </table:table-cell>
          <table:table-cell table:style-name="ce94" office:value-type="string" calcext:value-type="string">
            <text:p>備註</text:p>
          </table:table-cell>
          <table:table-cell table:style-name="ce112" table:number-columns-repeated="14"/>
          <table:table-cell table:number-columns-repeated="998"/>
        </table:table-row>
        <table:table-row table:style-name="ro1">
          <table:table-cell table:style-name="ce114" office:value-type="string" calcext:value-type="string">
            <text:p>伊弗利特之臂</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3" office:value-type="string" calcext:value-type="string" table:number-columns-spanned="5" table:number-rows-spanned="1">
            <text:p>被稱作炎之魔神的存在的雙臂，寄宿於契約者的手臂之上，並賜予其操縱火焰的力量。</text:p>
            <text:p>空手攻擊力+6，選擇並免費取得一個【冰炎奇蜥】的「限制：—」異能LV1，該異能可以使用經驗點成長。</text:p>
            <text:p>契約者會漸漸失去憤怒和哀傷的感情，侵蝕率基本值+8。</text:p>
          </table:table-cell>
          <table:covered-table-cell table:number-columns-repeated="4" table:style-name="ce107"/>
          <table:table-cell table:style-name="ce113" office:value-type="string" calcext:value-type="string">
            <text:p>LM P120</text:p>
          </table:table-cell>
          <table:table-cell table:style-name="ce95"/>
          <table:table-cell table:style-name="ce112" table:number-columns-repeated="14"/>
          <table:table-cell table:number-columns-repeated="998"/>
        </table:table-row>
        <table:table-row table:style-name="ro1">
          <table:table-cell table:style-name="ce113" office:value-type="string" calcext:value-type="string">
            <text:p>誓約之瞳</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15" office:value-type="string" calcext:value-type="string" table:number-columns-spanned="5" table:number-rows-spanned="1">
            <office:annotation draw:style-name="gr7" draw:text-style-name="P2" svg:width="463.55pt" svg:height="162pt" svg:x="511.48pt" svg:y="337.49pt" draw:caption-point-x="452.01pt" draw:caption-point-y="-22.22pt">
              <dc:date>2026-04-24T00:00:00</dc:date>
              <text:p text:style-name="P1">神經劫取（效果變更後）</text:p>
              <text:p text:style-name="P1">最大等級：1</text:p>
              <text:p text:style-name="P1">時機：主要動作</text:p>
              <text:p text:style-name="P1">技能：&lt;RC&gt; 難易度：對決</text:p>
              <text:p text:style-name="P1">對象：單體 射程：視界</text:p>
              <text:p text:style-name="P1">侵蝕值：10 限制：120%</text:p>
              <text:p text:style-name="P1">次數：1/劇本</text:p>
              <text:p text:style-name="P1">效果：與對象的&lt;意志&gt;進行對決，你勝利的話，可使對象進行1次主要動作，行動內容由你決定，</text:p>
              <text:p text:style-name="P1">但是不能使用有次數限制的異能或裝備。此異能的對象不能因組合變更。</text:p>
              <text:p text:style-name="P1">======</text:p>
            </office:annotation>
            <text:p>與契約者的眼睛一體化的黑色石頭，給予其隨心所欲操縱他人的力量。</text:p>
            <text:p>你所進行的&lt;RC&gt;判定骰數+2D。免費取得【冥府領域】的異能《神經劫取》LV1，該異能的侵蝕率上升變更為10，並變成一個劇本只能使用一次。</text:p>
            <text:p>契約者會漸漸變得無法相信他人，侵蝕率基本值+7。</text:p>
          </table:table-cell>
          <table:covered-table-cell table:number-columns-repeated="4"/>
          <table:table-cell table:style-name="ce113" office:value-type="string" calcext:value-type="string">
            <text:p>LM P120</text:p>
          </table:table-cell>
          <table:table-cell table:style-name="ce95"/>
          <table:table-cell table:style-name="ce112" table:number-columns-repeated="14"/>
          <table:table-cell table:number-columns-repeated="998"/>
        </table:table-row>
        <table:table-row table:style-name="ro1">
          <table:table-cell table:style-name="ce113" office:value-type="string" calcext:value-type="string">
            <text:p>尼伯龍根的指環</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4" office:value-type="string" calcext:value-type="string" table:number-columns-spanned="5" table:number-rows-spanned="1">
            <text:p>能生出黃金的魔性指環，傳說是由名為尼伯龍根的妖精製造的。</text:p>
            <text:p>你的常備化點數+20，此外，你進行的格擋格擋值+5。</text:p>
            <text:p>作為代價，契約者的身邊將會常常發生不幸。你所進行的全部判定判定骰數-1D，侵蝕率基本值+2。</text:p>
          </table:table-cell>
          <table:covered-table-cell table:number-columns-repeated="4"/>
          <table:table-cell table:style-name="ce113" office:value-type="string" calcext:value-type="string">
            <text:p>LM P120</text:p>
          </table:table-cell>
          <table:table-cell table:style-name="ce95"/>
          <table:table-cell table:style-name="ce112" table:number-columns-repeated="14"/>
          <table:table-cell table:number-columns-repeated="998"/>
        </table:table-row>
        <table:table-row table:style-name="ro1">
          <table:table-cell table:style-name="ce113" office:value-type="string" calcext:value-type="string">
            <text:p>約頓巨人的鮮血</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4" office:value-type="string" calcext:value-type="string" table:number-columns-spanned="5" table:number-rows-spanned="1">
            <office:annotation draw:style-name="gr8" draw:text-style-name="P2" svg:width="463.55pt" svg:height="146.98pt" svg:x="511.48pt" svg:y="367.51pt" draw:caption-point-x="452.01pt" draw:caption-point-y="-22.25pt">
              <dc:date>2026-04-24T00:00:00</dc:date>
              <text:p text:style-name="P1">完全獸化</text:p>
              <text:p text:style-name="P1">最大等級：3</text:p>
              <text:p text:style-name="P1">時機：次要動作</text:p>
              <text:p text:style-name="P1">技能：－ 難易度：自動成功</text:p>
              <text:p text:style-name="P1">對象：自身 射程：至近</text:p>
              <text:p text:style-name="P1">侵蝕值：6 限制：－</text:p>
              <text:p text:style-name="P1">效果：將肉體變化成完全的戰鬥型態的異能。</text:p>
              <text:p text:style-name="P1">此場景中，所有使用【肉體】能力值的判定骰數+[LV+2]顆，但在此異能持續發揮效果的期間，不能裝備、使用空手以外的所有道具。</text:p>
              <text:p text:style-name="P1">======</text:p>
            </office:annotation>
            <text:p>受被稱作巨人族的存在所擁有的背教者病毒感染的血液，抑或是表示你承繼了這種血統。</text:p>
            <text:p>你的最大HP+20，免費取得【變異魔獸】的異能《完全獸化》LV1，並且可以使用經驗點升級。</text:p>
            <text:p>雖然契約者能夠將自己的肉體變得非常巨大，但卻也承受著相對應的強烈侵蝕。侵蝕率基本值+7。</text:p>
          </table:table-cell>
          <table:covered-table-cell table:number-columns-repeated="4"/>
          <table:table-cell table:style-name="ce113" office:value-type="string" calcext:value-type="string">
            <text:p>LM P120</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海鳴的石板</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4" office:value-type="string" calcext:value-type="string" table:number-columns-spanned="5" table:number-rows-spanned="1">
            <text:p>刻著曾經分割大海的偉人所留下的契約誓言的石板，具有擁有操縱暴風和海流的力量。</text:p>
            <text:p>任意角色進行判定後立即使用，那個判定的達成值-15。此效果一個劇本中最多可以使用三次。</text:p>
            <text:p>契約者將會以合理的判斷為優先並逐漸忘卻感情。每當你的Lois昇華為Titus時，即使不是出於自己的意願，侵蝕率都會上升5點。</text:p>
          </table:table-cell>
          <table:covered-table-cell table:number-columns-repeated="4"/>
          <table:table-cell table:style-name="ce95" office:value-type="string" calcext:value-type="string">
            <text:p>HR P91</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巨人殺手</text:p>
            <text:p>（ジャイアントキル）</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4" office:value-type="string" calcext:value-type="string" table:number-columns-spanned="5" table:number-rows-spanned="1">
            <office:annotation draw:style-name="gr7" draw:text-style-name="P2" svg:width="463.55pt" svg:height="162pt" svg:x="511.48pt" svg:y="397.5pt" draw:caption-point-x="452.01pt" draw:caption-point-y="-22.22pt">
              <dc:date>2026-04-24T00:00:00</dc:date>
              <text:p text:style-name="P1">骨之槍</text:p>
              <text:p text:style-name="P1">最大等級：5</text:p>
              <text:p text:style-name="P1">時機：次要動作</text:p>
              <text:p text:style-name="P1">技能：－ 難易度：自動成功</text:p>
              <text:p text:style-name="P1">對象：自身 射程：至近</text:p>
              <text:p text:style-name="P1">侵蝕值：3 限制：－</text:p>
              <text:p text:style-name="P1">效果：該場景中，制作並裝備以下數據的武器。</text:p>
              <text:p text:style-name="P1">種類：射擊　技能：&lt;射擊&gt;　命中：-1</text:p>
              <text:p text:style-name="P1">攻擊力：+[LV+5]　格擋值：－　射程：20m</text:p>
              <text:p text:style-name="P1">======</text:p>
            </office:annotation>
            <text:p>能夠將被稱為巨人的原菌一擊打昏的投石索，通過使契約者的肉體產生變化來產出彈藥，</text:p>
            <text:p>你以LV1取得《骨之槍》，取得時不需要經驗點，之後也可以使用經驗點來進行成長。</text:p>
            <text:p>同時，你使用這個異能製作出來的武器進行的射擊攻擊的傷害+2D。</text:p>
            <text:p>契約者將會變得勇敢起來，並且逐漸忘記恐懼為何物。侵蝕率基本值+4。</text:p>
          </table:table-cell>
          <table:covered-table-cell table:number-columns-repeated="4"/>
          <table:table-cell table:style-name="ce95" office:value-type="string" calcext:value-type="string">
            <text:p>HR P91</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聖者的遺骨</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4" office:value-type="string" calcext:value-type="string" table:number-columns-spanned="5" table:number-rows-spanned="1">
            <text:p>這是曾經被稱為鬼的超越者盜走的聖人之骨，骨頭中混合寄宿著取回它的偉人與鬼的力量。</text:p>
            <text:p>你進行的近戰攻擊的攻擊力和你的【行動值】+5，你的侵蝕率超過99%時，近戰攻擊的攻擊力將會再+5。</text:p>
            <text:p>契約者將會聽到從內心傳來的，唆使自己逐漸變得傲慢的聲音。侵蝕率基本值+2。</text:p>
          </table:table-cell>
          <table:covered-table-cell table:number-columns-repeated="4"/>
          <table:table-cell table:style-name="ce95" office:value-type="string" calcext:value-type="string">
            <text:p>HR P91</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欲望的公主</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4" office:value-type="string" calcext:value-type="string" table:number-columns-spanned="5" table:number-rows-spanned="1">
            <office:annotation draw:style-name="gr9" draw:text-style-name="P2" svg:width="463.55pt" svg:height="281.99pt" svg:x="511.48pt" svg:y="427.49pt" draw:caption-point-x="452.01pt" draw:caption-point-y="-22.22pt">
              <dc:date>2026-04-24T00:00:00</dc:date>
              <text:p text:style-name="P1">砂之刃</text:p>
              <text:p text:style-name="P1">最大等級：10</text:p>
              <text:p text:style-name="P1">時機：主要動作</text:p>
              <text:p text:style-name="P1">技能：&lt;RC&gt; 難易度：對決</text:p>
              <text:p text:style-name="P1">對象：－ 射程：視界</text:p>
              <text:p text:style-name="P1">侵蝕值：2 限制：－</text:p>
              <text:p text:style-name="P1">效果：進行「攻擊力：+[LV+2]」的射擊攻擊。格擋此攻擊的話，該格擋的格擋值-5。</text:p>
              <text:p text:style-name="P1"/>
              <text:p text:style-name="P1">晶化</text:p>
              <text:p text:style-name="P1">最大等級：3</text:p>
              <text:p text:style-name="P1">時機：主要動作</text:p>
              <text:p text:style-name="P1">技能：癥狀 難易度：對決</text:p>
              <text:p text:style-name="P1">對象：－ 射程：－</text:p>
              <text:p text:style-name="P1">侵蝕值：4 限制：100%</text:p>
              <text:p text:style-name="P1">次數：3/劇本</text:p>
              <text:p text:style-name="P1">效果：從攻擊命中的地方開始，使對象結晶化並粉碎的異能。</text:p>
              <text:p text:style-name="P1">組合此異能的攻擊的攻擊力+[LV×3]，且無視對象的裝甲值。</text:p>
              <text:p text:style-name="P1">======</text:p>
            </office:annotation>
            <text:p>由寶石構成的果實，吃起來和普通的果肉一樣柔軟，通過食用來完成契約。存在著寶石、果實種類各不相同的個體。</text:p>
            <text:p>你取得LV1的《砂之刃》和《晶化》，取得時不需要經驗點，之後也可以使用經驗點來進行成長。</text:p>
            <text:p>契約者將會被要求收集某種東西，至於是什麼東西將由締結契約的個體決定。侵蝕率基本值+6。</text:p>
          </table:table-cell>
          <table:covered-table-cell table:number-columns-repeated="4"/>
          <table:table-cell table:style-name="ce95" office:value-type="string" calcext:value-type="string">
            <text:p>HR P91</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夜之小鳥</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4" office:value-type="string" calcext:value-type="string" table:number-columns-spanned="5" table:number-rows-spanned="1">
            <office:annotation draw:style-name="gr10" draw:text-style-name="P2" svg:width="463.55pt" svg:height="312.01pt" svg:x="511.48pt" svg:y="442.49pt" draw:caption-point-x="452.01pt" draw:caption-point-y="-22.22pt">
              <dc:date>2026-04-24T00:00:00</dc:date>
              <text:p text:style-name="P1">陽炎之衣</text:p>
              <text:p text:style-name="P1">最大等級：3</text:p>
              <text:p text:style-name="P1">時機：次要動作</text:p>
              <text:p text:style-name="P1">技能：－ 難易度：自動成功</text:p>
              <text:p text:style-name="P1">對象：自身 射程：至近</text:p>
              <text:p text:style-name="P1">侵蝕值：3 限制：－</text:p>
              <text:p text:style-name="P1">次數：LV/場景</text:p>
              <text:p text:style-name="P1">效果：使光線折射，隱藏自己身形的異能。</text:p>
              <text:p text:style-name="P1">變成隱蔽狀態，持續到該主要階段結束。即使與敵人接戰，也能以此效果變成隱蔽狀態。</text:p>
              <text:p text:style-name="P1"/>
              <text:p text:style-name="P1">光與闇之眼</text:p>
              <text:p text:style-name="P1">最大等級：1</text:p>
              <text:p text:style-name="P1">時機：常駐</text:p>
              <text:p text:style-name="P1">技能：－ 難易度：自動成功</text:p>
              <text:p text:style-name="P1">對象：自身 射程：至近</text:p>
              <text:p text:style-name="P1">侵蝕值：－ 限制：－</text:p>
              <text:p text:style-name="P1">效果：強化視覺，看出隱藏的人事物的異能。</text:p>
              <text:p text:style-name="P1">你可以選擇隱蔽狀態的角色作為主要動作的對象。此異能的等級不受侵蝕率影響。</text:p>
              <text:p text:style-name="P1">取得此異能的話，侵蝕率基本值+4。</text:p>
              <text:p text:style-name="P1">======</text:p>
            </office:annotation>
            <text:p>塗成黑色的木雕鳥。可以與他人進行交談，也自由自在地飛翔。這個遺產將給予契約者隱藏身形與看破隱藏之物的力量。</text:p>
            <text:p>你取得LV1的《陽炎之衣》和《光與闇之眼》，取得時不需要經驗點，之後也可以使用經驗點來進行成長。此外，你於隱蔽狀態中進行判定的骰數+3D。</text:p>
            <text:p>契約者將被鼓勵盜竊。你無法使用財產點數。</text:p>
          </table:table-cell>
          <table:covered-table-cell table:number-columns-repeated="4"/>
          <table:table-cell table:style-name="ce95" office:value-type="string" calcext:value-type="string">
            <text:p>HR P91</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失卻的歌聲</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5" office:value-type="string" calcext:value-type="string" table:number-columns-spanned="5" table:number-rows-spanned="1">
            <text:p>傳說是魚人或鳥人的神之眷屬的遺產，形狀不明。作為契約者的聲音出現，以音波操縱背教者。</text:p>
            <text:p>你於主要動作間使用的不進行攻擊的異能均按照LV+1計算效果，但不會因此而增加使用次數。</text:p>
            <text:p>作為代價，契約者會失去原本的聲音，同時魔性之聲對契約者的負荷也十分沉重。你取得的「時機：主要動作」的異能的侵蝕值全部+1。</text:p>
          </table:table-cell>
          <table:covered-table-cell table:number-columns-repeated="4"/>
          <table:table-cell table:style-name="ce95" office:value-type="string" calcext:value-type="string">
            <text:p>RW P56</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深海都市之夢</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5" office:value-type="string" calcext:value-type="string" table:number-columns-spanned="5" table:number-rows-spanned="1">
            <text:p>沉沒於世界某處的古代都市，這座都市本身即是遺產，會將其末裔指定為契約者，並賦予契約者異常的再生力。</text:p>
            <text:p>即使身處水中，你也可以像魚一樣自由行動。此外，直至侵蝕率達到110%以上之前，你都可以照常使用《復蘇》</text:p>
            <text:p>契約者會在夢中被命令“為了沉沒都市的再興而行動”。侵蝕率基本值+4。</text:p>
          </table:table-cell>
          <table:covered-table-cell table:number-columns-repeated="4"/>
          <table:table-cell table:style-name="ce95" office:value-type="string" calcext:value-type="string">
            <text:p>RW P56</text:p>
          </table:table-cell>
          <table:table-cell table:style-name="ce95"/>
          <table:table-cell table:style-name="ce112" table:number-columns-repeated="14"/>
          <table:table-cell table:number-columns-repeated="998"/>
        </table:table-row>
        <table:table-row table:style-name="ro1">
          <table:table-cell table:style-name="ce95" office:value-type="string" calcext:value-type="string">
            <text:p>雷神之槌</text:p>
          </table:table-cell>
          <table:table-cell table:style-name="ce113" office:value-type="string" calcext:value-type="string">
            <text:p>其他</text:p>
          </table:table-cell>
          <table:table-cell table:style-name="ce113" office:value-type="string" calcext:value-type="string">
            <text:p>——</text:p>
          </table:table-cell>
          <table:table-cell table:style-name="ce113" office:value-type="string" calcext:value-type="string">
            <text:p>購買不可/不可</text:p>
          </table:table-cell>
          <table:table-cell table:style-name="ce95" office:value-type="string" calcext:value-type="string">
            <text:p>——</text:p>
          </table:table-cell>
          <table:table-cell table:style-name="ce105" office:value-type="string" calcext:value-type="string" table:number-columns-spanned="5" table:number-rows-spanned="1">
            <text:p>曾被稱作戰神的存在遺留下來的暴雷之餘威，寄宿於契約者的一臂，並將其投射物化為閃電。</text:p>
            <text:p>你進行的射擊攻擊的攻擊力常時+10。但是，每當觸發此效果時你都會失去3點HP。</text:p>
            <text:p>此外，你還可以於射擊攻擊的傷害擲骰前使用，使此次傷害+2D，這個效果一個劇本中只能使用一次。</text:p>
            <text:p>神之雷會侵蝕契約者的生命，你的最大HP-7。</text:p>
          </table:table-cell>
          <table:covered-table-cell table:number-columns-repeated="4"/>
          <table:table-cell table:style-name="ce95" office:value-type="string" calcext:value-type="string">
            <text:p>RW P56</text:p>
          </table:table-cell>
          <table:table-cell table:style-name="ce95"/>
          <table:table-cell table:style-name="ce112" table:number-columns-repeated="14"/>
          <table:table-cell table:number-columns-repeated="998"/>
        </table:table-row>
        <table:table-row table:style-name="ro8">
          <table:table-cell table:style-name="ce111" table:number-columns-repeated="7"/>
          <table:table-cell table:style-name="ce116" table:number-columns-repeated="2"/>
          <table:table-cell table:style-name="ce117"/>
          <table:table-cell table:style-name="ce111"/>
          <table:table-cell table:style-name="ce95"/>
          <table:table-cell table:style-name="ce112" table:number-columns-repeated="14"/>
          <table:table-cell table:number-columns-repeated="998"/>
        </table:table-row>
        <table:table-row table:style-name="ro4" table:number-rows-repeated="1048542">
          <table:table-cell table:number-columns-repeated="1024"/>
        </table:table-row>
        <table:table-row table:style-name="ro4">
          <table:table-cell table:number-columns-repeated="1024"/>
        </table:table-row>
      </table:table>
      <table:table table:name="D-lois No.CRC08 超能力者超能力" table:style-name="ta10">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19" table:default-cell-style-name="Default"/>
        <table:table-column table:style-name="co21" table:default-cell-style-name="Default"/>
        <table:table-column table:style-name="co22" table:default-cell-style-name="Default"/>
        <table:table-column table:style-name="co24" table:default-cell-style-name="Default"/>
        <table:table-column table:style-name="co22" table:number-columns-repeated="12" table:default-cell-style-name="Default"/>
        <table:table-column table:style-name="co4" table:number-columns-repeated="1000" table:default-cell-style-name="Default"/>
        <table:table-row table:style-name="ro1">
          <table:table-cell table:style-name="ce51" office:value-type="string" calcext:value-type="string">
            <text:p>名稱</text:p>
          </table:table-cell>
          <table:table-cell table:style-name="ce71" office:value-type="string" calcext:value-type="string">
            <text:p>最大等級</text:p>
          </table:table-cell>
          <table:table-cell table:style-name="ce71" office:value-type="string" calcext:value-type="string">
            <text:p>時機</text:p>
          </table:table-cell>
          <table:table-cell table:style-name="ce71" office:value-type="string" calcext:value-type="string">
            <text:p>技能</text:p>
          </table:table-cell>
          <table:table-cell table:style-name="ce71" office:value-type="string" calcext:value-type="string">
            <text:p>難易度</text:p>
          </table:table-cell>
          <table:table-cell table:style-name="ce71" office:value-type="string" calcext:value-type="string">
            <text:p>對象</text:p>
          </table:table-cell>
          <table:table-cell table:style-name="ce71" office:value-type="string" calcext:value-type="string">
            <text:p>射程</text:p>
          </table:table-cell>
          <table:table-cell table:style-name="ce71" office:value-type="string" calcext:value-type="string">
            <text:p>HP減少</text:p>
          </table:table-cell>
          <table:table-cell table:style-name="ce71" office:value-type="string" calcext:value-type="string">
            <text:p>次數</text:p>
          </table:table-cell>
          <table:table-cell table:style-name="ce51" office:value-type="string" calcext:value-type="string">
            <text:p>效果</text:p>
          </table:table-cell>
          <table:table-cell table:style-name="ce71" office:value-type="string" calcext:value-type="string">
            <text:p>參照</text:p>
          </table:table-cell>
          <table:table-cell table:style-name="ce71" office:value-type="string" calcext:value-type="string">
            <text:p>備註</text:p>
          </table:table-cell>
          <table:table-cell table:style-name="ce3" table:number-columns-repeated="12"/>
          <table:table-cell table:number-columns-repeated="1000"/>
        </table:table-row>
        <table:table-row table:style-name="ro1">
          <table:table-cell table:style-name="ce86" office:value-type="string" calcext:value-type="string">
            <text:p>星界視覺</text:p>
            <text:p>(アストラルサイト)</text:p>
          </table:table-cell>
          <table:table-cell table:style-name="ce72" office:value-type="float" office:value="1" calcext:value-type="float">
            <text:p>1</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3" calcext:value-type="float">
            <text:p>3</text:p>
          </table:table-cell>
          <table:table-cell table:style-name="ce72" office:value-type="string" calcext:value-type="string">
            <text:p>-</text:p>
          </table:table-cell>
          <table:table-cell table:style-name="ce76" office:value-type="string" calcext:value-type="string">
            <text:p>前提條件：《ESP》。</text:p>
            <text:p>集中精神，透過超知覺發現靈體或透明化超自然生物的超能力。擁有較弱的此超能力的人，是所謂"靈感"強烈的存在。</text:p>
            <text:p>該場景中，你能視認不可視的存在，不受《透明化》《不可視》的影響。</text:p>
          </table:table-cell>
          <table:table-cell table:style-name="ce72" office:value-type="string" calcext:value-type="string">
            <text:p>NCP112</text:p>
          </table:table-cell>
          <table:table-cell table:style-name="ce72"/>
          <table:table-cell table:style-name="ce3" table:number-columns-repeated="12"/>
          <table:table-cell table:number-columns-repeated="1000"/>
        </table:table-row>
        <table:table-row table:style-name="ro1">
          <table:table-cell table:style-name="ce69" office:value-type="string" calcext:value-type="string">
            <text:p>星界身體</text:p>
            <text:p>(アストラルボディ)</text:p>
          </table:table-cell>
          <table:table-cell table:style-name="ce72" office:value-type="float" office:value="1" calcext:value-type="float">
            <text:p>1</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string" calcext:value-type="string">
            <text:p>2D10</text:p>
          </table:table-cell>
          <table:table-cell table:style-name="ce72" office:value-type="string" calcext:value-type="string">
            <text:p>-</text:p>
          </table:table-cell>
          <table:table-cell table:style-name="ce76" office:value-type="string" calcext:value-type="string">
            <text:p>前提條件：《星界視覺》。</text:p>
            <text:p>從肉體分離星幽體，也就是不可視的非實體的超能力。</text:p>
            <text:p>登場時，或場景開始時使用。你在該場景中獲得《非實體》[飛行狀態]，為了隱藏身形的判定達成值+10。效果中，你完全不適用任何裝甲值，無法進入搭乘狀態。你在效果中，可以穿透不含鉛的牆壁。</text:p>
          </table:table-cell>
          <table:table-cell table:style-name="ce72" office:value-type="string" calcext:value-type="string">
            <text:p>NCP112</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心靈傳送</text:p>
            <text:p>(アポート)</text:p>
          </table:table-cell>
          <table:table-cell table:style-name="ce72" office:value-type="float" office:value="1" calcext:value-type="float">
            <text:p>1</text:p>
          </table:table-cell>
          <table:table-cell table:style-name="ce72" office:value-type="string" calcext:value-type="string">
            <text:p>主要動作</text:p>
          </table:table-cell>
          <table:table-cell table:style-name="ce72" office:value-type="string" calcext:value-type="string">
            <text:p>〈意志〉</text:p>
          </table:table-cell>
          <table:table-cell table:style-name="ce72" office:value-type="string" calcext:value-type="string">
            <text:p>10/對決</text:p>
          </table:table-cell>
          <table:table-cell table:style-name="ce72" office:value-type="string" calcext:value-type="string">
            <text:p>單體</text:p>
          </table:table-cell>
          <table:table-cell table:style-name="ce72" office:value-type="string" calcext:value-type="string">
            <text:p>100km</text:p>
          </table:table-cell>
          <table:table-cell table:style-name="ce72" office:value-type="float" office:value="4" calcext:value-type="float">
            <text:p>4</text:p>
          </table:table-cell>
          <table:table-cell table:style-name="ce72" office:value-type="string" calcext:value-type="string">
            <text:p>-</text:p>
          </table:table-cell>
          <table:table-cell table:style-name="ce76" office:value-type="string" calcext:value-type="string">
            <text:p>前提條件：《ESP》《念動力》。</text:p>
            <text:p>以一個物體為對象。裝備品因持有者不會放手而排除在外。要拉近視界外的物體時，需要事先使用《探尋感知》。</text:p>
            <text:p>要偷取持有品時與持有者的〈知覺〉進行對決。用於透過道具盜竊獲得時，將購買判定的難易度設為獲得的難易度。</text:p>
          </table:table-cell>
          <table:table-cell table:style-name="ce72" office:value-type="string" calcext:value-type="string">
            <text:p>NCP112</text:p>
          </table:table-cell>
          <table:table-cell table:style-name="ce72"/>
          <table:table-cell table:style-name="ce3" table:number-columns-repeated="12"/>
          <table:table-cell table:number-columns-repeated="1000"/>
        </table:table-row>
        <table:table-row table:style-name="ro1">
          <table:table-cell table:style-name="ce69" office:value-type="string" calcext:value-type="string">
            <text:p>反超能力</text:p>
            <text:p>(アンチサイ)</text:p>
          </table:table-cell>
          <table:table-cell table:style-name="ce72" office:value-type="float" office:value="10" calcext:value-type="float">
            <text:p>10</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float" office:value="2" calcext:value-type="float">
            <text:p>2</text:p>
          </table:table-cell>
          <table:table-cell table:style-name="ce72" office:value-type="string" calcext:value-type="string">
            <text:p>-</text:p>
          </table:table-cell>
          <table:table-cell table:style-name="ce76" office:value-type="string" calcext:value-type="string">
            <text:p>阻礙超能力的特殊超能力。據說潛在擁有此超能力的超能力者可能是最多的。</text:p>
            <text:p>在視界內(也包含電視直播等)他人發動超能力的時機使用。將該判定的骰子-[LV×2]個。</text:p>
          </table:table-cell>
          <table:table-cell table:style-name="ce72" office:value-type="string" calcext:value-type="string">
            <text:p>NCP112</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ESP</text:p>
          </table:table-cell>
          <table:table-cell table:style-name="ce72" office:value-type="float" office:value="20" calcext:value-type="float">
            <text:p>20</text:p>
          </table:table-cell>
          <table:table-cell table:style-name="ce72" office:value-type="string" calcext:value-type="string">
            <text:p>主要動作</text:p>
          </table:table-cell>
          <table:table-cell table:style-name="ce72" office:value-type="string" calcext:value-type="string">
            <text:p>〈知覺〉</text:p>
          </table:table-cell>
          <table:table-cell table:style-name="ce72" office:value-type="float" office:value="7" calcext:value-type="float">
            <text:p>7</text:p>
          </table:table-cell>
          <table:table-cell table:style-name="ce72" office:value-type="string" calcext:value-type="string">
            <text:p>單體</text:p>
          </table:table-cell>
          <table:table-cell table:style-name="ce72" office:value-type="string" calcext:value-type="string">
            <text:p>效果參照</text:p>
          </table:table-cell>
          <table:table-cell table:style-name="ce72" office:value-type="float" office:value="2" calcext:value-type="float">
            <text:p>2</text:p>
          </table:table-cell>
          <table:table-cell table:style-name="ce72" office:value-type="string" calcext:value-type="string">
            <text:p>-</text:p>
          </table:table-cell>
          <table:table-cell table:style-name="ce76" office:value-type="string" calcext:value-type="string">
            <text:p>相當於透視或透聽等所謂千里眼的超能力。能夠感知遠處發生的事件，或視認牆壁另一側或箱子內部。</text:p>
            <text:p>此超能力的射程為 [LV×LV×LV] m。LV達到10以上時單位變更為km。你透過判定成功，能夠認識射程內發生的一個事件。</text:p>
          </table:table-cell>
          <table:table-cell table:style-name="ce72" office:value-type="string" calcext:value-type="string">
            <text:p>NCP112</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幻象</text:p>
            <text:p>(イリュージョン)</text:p>
          </table:table-cell>
          <table:table-cell table:style-name="ce72" office:value-type="float" office:value="10" calcext:value-type="float">
            <text:p>10</text:p>
          </table:table-cell>
          <table:table-cell table:style-name="ce72" office:value-type="string" calcext:value-type="string">
            <text:p>主要動作</text:p>
          </table:table-cell>
          <table:table-cell table:style-name="ce72" office:value-type="string" calcext:value-type="string">
            <text:p>〈意志〉</text:p>
          </table:table-cell>
          <table:table-cell table:style-name="ce72" office:value-type="string" calcext:value-type="string">
            <text:p>對決</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float" office:value="5" calcext:value-type="float">
            <text:p>5</text:p>
          </table:table-cell>
          <table:table-cell table:style-name="ce72" office:value-type="string" calcext:value-type="string">
            <text:p>-</text:p>
          </table:table-cell>
          <table:table-cell table:style-name="ce76" office:value-type="string" calcext:value-type="string">
            <text:p>前提條件：《心電感應》。</text:p>
            <text:p>讓對象看到鮮明幻覺或夢境的超能力。</text:p>
            <text:p>與對象的〈意志〉對決，勝利時讓對象看到幻覺 (對象可以放棄對決)。這作為異常狀態處理，場景中持續。對象進行的 【肉體】【感覺】用骰子 - [LV×2] 個。</text:p>
          </table:table-cell>
          <table:table-cell table:style-name="ce72" office:value-type="string" calcext:value-type="string">
            <text:p>NCP112</text:p>
          </table:table-cell>
          <table:table-cell table:style-name="ce72"/>
          <table:table-cell table:style-name="ce3" table:number-columns-repeated="12"/>
          <table:table-cell table:number-columns-repeated="1000"/>
        </table:table-row>
        <table:table-row table:style-name="ro1">
          <table:table-cell table:style-name="ce69" office:value-type="string" calcext:value-type="string">
            <text:p>他者傳送</text:p>
            <text:p>(エグゾテレポート)</text:p>
          </table:table-cell>
          <table:table-cell table:style-name="ce72" office:value-type="float" office:value="1" calcext:value-type="float">
            <text:p>1</text:p>
          </table:table-cell>
          <table:table-cell table:style-name="ce72" office:value-type="string" calcext:value-type="string">
            <text:p>自動動作</text:p>
          </table:table-cell>
          <table:table-cell table:number-columns-repeated="2" table:style-name="ce72" office:value-type="string" calcext:value-type="string">
            <text:p>-</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3" calcext:value-type="float">
            <text:p>3</text:p>
          </table:table-cell>
          <table:table-cell table:style-name="ce72" office:value-type="string" calcext:value-type="string">
            <text:p>-</text:p>
          </table:table-cell>
          <table:table-cell table:style-name="ce76" office:value-type="string" calcext:value-type="string">
            <text:p>前提條件：《瞬間移動》。</text:p>
            <text:p>不讓自己瞬間移動，只讓他人瞬間移動的超能力。</text:p>
            <text:p>《瞬間移動》使用時使用。將《瞬間移動》變更為「對象: 範圍 (選擇)」「射程:至近」。但是，這時無法以自身為對象(只讓自身的持有品瞬間移動也可以)。</text:p>
          </table:table-cell>
          <table:table-cell table:style-name="ce72" office:value-type="string" calcext:value-type="string">
            <text:p>NCP112</text:p>
          </table:table-cell>
          <table:table-cell table:style-name="ce72"/>
          <table:table-cell table:style-name="ce3" table:number-columns-repeated="12"/>
          <table:table-cell table:number-columns-repeated="1000"/>
        </table:table-row>
        <table:table-row table:style-name="ro1">
          <table:table-cell table:style-name="ce69" office:value-type="string" calcext:value-type="string">
            <text:p>能量護盾</text:p>
            <text:p>(エナジーシールド)</text:p>
          </table:table-cell>
          <table:table-cell table:style-name="ce72" office:value-type="float" office:value="5" calcext:value-type="float">
            <text:p>5</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單體</text:p>
          </table:table-cell>
          <table:table-cell table:style-name="ce72" office:value-type="string" calcext:value-type="string">
            <text:p>LV×3m</text:p>
          </table:table-cell>
          <table:table-cell table:style-name="ce72" office:value-type="string" calcext:value-type="string">
            <text:p><text:s/>1D10</text:p>
          </table:table-cell>
          <table:table-cell table:style-name="ce72" office:value-type="string" calcext:value-type="string">
            <text:p>1/回合</text:p>
          </table:table-cell>
          <table:table-cell table:style-name="ce76" office:value-type="string" calcext:value-type="string">
            <text:p>前提條件：《念動力》。</text:p>
            <text:p>透過念動力干擾大氣分子或運動能量來偏轉攻擊的超能力。</text:p>
            <text:p>對象受到HP傷害適用的之前使用。對象受到的(預定)傷害 - [1D + LV×2]。此超能力1回合限用1次。</text:p>
          </table:table-cell>
          <table:table-cell table:style-name="ce72" office:value-type="string" calcext:value-type="string">
            <text:p>NCP112</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情感感知</text:p>
            <text:p>(エモーションセンス)</text:p>
          </table:table-cell>
          <table:table-cell table:style-name="ce72" office:value-type="float" office:value="10" calcext:value-type="float">
            <text:p>10</text:p>
          </table:table-cell>
          <table:table-cell table:style-name="ce72" office:value-type="string" calcext:value-type="string">
            <text:p>主要動作</text:p>
          </table:table-cell>
          <table:table-cell table:style-name="ce72" office:value-type="string" calcext:value-type="string">
            <text:p>〈意志〉</text:p>
          </table:table-cell>
          <table:table-cell table:style-name="ce72" office:value-type="string" calcext:value-type="string">
            <text:p>對決</text:p>
          </table:table-cell>
          <table:table-cell table:style-name="ce72" office:value-type="string" calcext:value-type="string">
            <text:p>單體</text:p>
          </table:table-cell>
          <table:table-cell table:style-name="ce72" office:value-type="string" calcext:value-type="string">
            <text:p><text:s/>LV×5m</text:p>
          </table:table-cell>
          <table:table-cell table:style-name="ce72" office:value-type="float" office:value="1" calcext:value-type="float">
            <text:p>1</text:p>
          </table:table-cell>
          <table:table-cell table:style-name="ce72" office:value-type="string" calcext:value-type="string">
            <text:p>-</text:p>
          </table:table-cell>
          <table:table-cell table:style-name="ce76" office:value-type="string" calcext:value-type="string">
            <text:p>前提條件：《心電感應》。</text:p>
            <text:p>讀取對象感情的超能力。有人與對方的感情同調，也有人以"顏色"來讀取。</text:p>
            <text:p>與對象的〈意志〉對決。勝利的話，能夠讀取對象目前抱持的感情。要察覺到此超能力被使用，需要對象的【精神】在10以上，或使用者大失敗。</text:p>
          </table:table-cell>
          <table:table-cell table:style-name="ce72" office:value-type="string" calcext:value-type="string">
            <text:p>NCP113</text:p>
          </table:table-cell>
          <table:table-cell table:style-name="ce72"/>
          <table:table-cell table:style-name="ce3" table:number-columns-repeated="12"/>
          <table:table-cell table:number-columns-repeated="1000"/>
        </table:table-row>
        <table:table-row table:style-name="ro1">
          <table:table-cell table:style-name="ce68" office:value-type="string" calcext:value-type="string">
            <text:p>自動瞬移</text:p>
            <text:p>(オートテレポート)</text:p>
          </table:table-cell>
          <table:table-cell table:style-name="ce72" office:value-type="float" office:value="3" calcext:value-type="float">
            <text:p>3</text:p>
          </table:table-cell>
          <table:table-cell table:style-name="ce72" office:value-type="string" calcext:value-type="string">
            <text:p>回應動作</text:p>
          </table:table-cell>
          <table:table-cell table:style-name="ce72" office:value-type="string" calcext:value-type="string">
            <text:p>〈意志〉</text:p>
          </table:table-cell>
          <table:table-cell table:style-name="ce72" office:value-type="string" calcext:value-type="string">
            <text:p>對決</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3" calcext:value-type="float">
            <text:p>3</text:p>
          </table:table-cell>
          <table:table-cell table:style-name="ce72" office:value-type="string" calcext:value-type="string">
            <text:p>-</text:p>
          </table:table-cell>
          <table:table-cell table:style-name="ce76" office:value-type="string" calcext:value-type="string">
            <text:p>前提條件：《瞬間移動》。</text:p>
            <text:p>用ESP察知對手的攻擊，透過瞬間進行短距離瞬間移動來回避攻擊的超能力。</text:p>
            <text:p>閃避不用〈回避〉而用〈意志〉進行(修正等照常適用)。這時，判定骰數+LV個。</text:p>
          </table:table-cell>
          <table:table-cell table:style-name="ce72" office:value-type="string" calcext:value-type="string">
            <text:p>NCP113</text:p>
          </table:table-cell>
          <table:table-cell table:style-name="ce72"/>
          <table:table-cell table:style-name="ce3" table:number-columns-repeated="12"/>
          <table:table-cell table:number-columns-repeated="1000"/>
        </table:table-row>
        <table:table-row table:style-name="ro1">
          <table:table-cell table:style-name="ce69" office:value-type="string" calcext:value-type="string">
            <text:p>精神吸血</text:p>
            <text:p>(サイコヴァンパイア)</text:p>
          </table:table-cell>
          <table:table-cell table:style-name="ce72" office:value-type="float" office:value="10" calcext:value-type="float">
            <text:p>10</text:p>
          </table:table-cell>
          <table:table-cell table:style-name="ce72" office:value-type="string" calcext:value-type="string">
            <text:p>自動動作</text:p>
          </table:table-cell>
          <table:table-cell table:style-name="ce72" office:value-type="string" calcext:value-type="string">
            <text:p>〈意志〉</text:p>
          </table:table-cell>
          <table:table-cell table:style-name="ce72" office:value-type="string" calcext:value-type="string">
            <text:p>-</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1" calcext:value-type="float">
            <text:p>1</text:p>
          </table:table-cell>
          <table:table-cell table:style-name="ce72" office:value-type="string" calcext:value-type="string">
            <text:p>-</text:p>
          </table:table-cell>
          <table:table-cell table:style-name="ce76" office:value-type="string" calcext:value-type="string">
            <text:p>前提條件：《精神爆破》。</text:p>
            <text:p>從他者的精神或夢境中吸取能量的超能力。擁有此能力的超能力者被當作夢魔來恐懼。</text:p>
            <text:p>《精神爆破》使用時使用。你的HP回復[LV×2]點。你可以選擇將該《精神爆破》的傷害變為1/10(端數進位)，藉此不讓對手變成廢人而吸取能量。</text:p>
          </table:table-cell>
          <table:table-cell table:style-name="ce72" office:value-type="string" calcext:value-type="string">
            <text:p>NCP113</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念動力</text:p>
            <text:p>(サイコキネシス)</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意志〉</text:p>
          </table:table-cell>
          <table:table-cell table:style-name="ce72" office:value-type="string" calcext:value-type="string">
            <text:p>7/對決</text:p>
          </table:table-cell>
          <table:table-cell table:style-name="ce72" office:value-type="string" calcext:value-type="string">
            <text:p>單體</text:p>
          </table:table-cell>
          <table:table-cell table:style-name="ce72" office:value-type="string" calcext:value-type="string">
            <text:p><text:s/>LV×5m</text:p>
          </table:table-cell>
          <table:table-cell table:style-name="ce72" office:value-type="float" office:value="3" calcext:value-type="float">
            <text:p>3</text:p>
          </table:table-cell>
          <table:table-cell table:style-name="ce72" office:value-type="string" calcext:value-type="string">
            <text:p>-</text:p>
          </table:table-cell>
          <table:table-cell table:style-name="ce76" office:value-type="string" calcext:value-type="string">
            <text:p>用精神力量讓物體浮在空中或彎曲湯匙的超能力。</text:p>
            <text:p>能夠移動的物體最多為[【精神】×LV×LV]kg。將浮起的物體撞擊等進行攻擊時，作為攻擊力+LV的射擊攻擊處理。</text:p>
          </table:table-cell>
          <table:table-cell table:style-name="ce72" office:value-type="string" calcext:value-type="string">
            <text:p>NCP113</text:p>
          </table:table-cell>
          <table:table-cell table:style-name="ce72"/>
          <table:table-cell table:style-name="ce3" table:number-columns-repeated="12"/>
          <table:table-cell table:number-columns-repeated="1000"/>
        </table:table-row>
        <table:table-row table:style-name="ro1">
          <table:table-cell table:style-name="ce86" office:value-type="string" calcext:value-type="string">
            <text:p>精神強化</text:p>
            <text:p>(サイコブースト)</text:p>
          </table:table-cell>
          <table:table-cell table:style-name="ce72" office:value-type="string" calcext:value-type="string">
            <text:p>效果參照</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2" calcext:value-type="float">
            <text:p>2</text:p>
          </table:table-cell>
          <table:table-cell table:style-name="ce72" office:value-type="string" calcext:value-type="string">
            <text:p>-</text:p>
          </table:table-cell>
          <table:table-cell table:style-name="ce76" office:value-type="string" calcext:value-type="string">
            <text:p>集中精神，將自己的超能力提升至極限的超能力。</text:p>
            <text:p>該主要流程中進行的使用超能力的主要行動的暴擊值-LV(最低7)。此超能力的最大等級等於你的〈意志〉÷2(最大3)。</text:p>
          </table:table-cell>
          <table:table-cell table:style-name="ce72" office:value-type="string" calcext:value-type="string">
            <text:p>NCP113</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精神治療</text:p>
            <text:p> (サイコヒーリング)</text:p>
          </table:table-cell>
          <table:table-cell table:style-name="ce72" office:value-type="float" office:value="10" calcext:value-type="float">
            <text:p>10</text:p>
          </table:table-cell>
          <table:table-cell table:style-name="ce72" office:value-type="string" calcext:value-type="string">
            <text:p>主要動作</text:p>
          </table:table-cell>
          <table:table-cell table:style-name="ce72" office:value-type="string" calcext:value-type="string">
            <text:p>〈知覺〉</text:p>
          </table:table-cell>
          <table:table-cell table:style-name="ce72" office:value-type="float" office:value="8" calcext:value-type="float">
            <text:p>8</text:p>
          </table:table-cell>
          <table:table-cell table:style-name="ce72" office:value-type="string" calcext:value-type="string">
            <text:p>單體</text:p>
          </table:table-cell>
          <table:table-cell table:style-name="ce72" office:value-type="string" calcext:value-type="string">
            <text:p>至近</text:p>
          </table:table-cell>
          <table:table-cell table:style-name="ce72" office:value-type="float" office:value="4" calcext:value-type="float">
            <text:p>4</text:p>
          </table:table-cell>
          <table:table-cell table:style-name="ce72" office:value-type="string" calcext:value-type="string">
            <text:p>-</text:p>
          </table:table-cell>
          <table:table-cell table:style-name="ce76" office:value-type="string" calcext:value-type="string">
            <text:p>前提條件：《ESP》。</text:p>
            <text:p>將自己的精神力分給他人，或進行心靈手術的超能力。</text:p>
            <text:p>此超能力無法以自身為對象。判定成功時，對象的HP回復[1D+LV×3]點。GM可以認為能治療疾病等，此時可以變更難易度。此超能力每場景限用1次。</text:p>
          </table:table-cell>
          <table:table-cell table:style-name="ce72" office:value-type="string" calcext:value-type="string">
            <text:p>NCP113</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精神感應</text:p>
            <text:p>(サイコメトリー)</text:p>
          </table:table-cell>
          <table:table-cell table:style-name="ce72" office:value-type="float" office:value="10" calcext:value-type="float">
            <text:p>10</text:p>
          </table:table-cell>
          <table:table-cell table:style-name="ce72" office:value-type="string" calcext:value-type="string">
            <text:p>主要動作</text:p>
          </table:table-cell>
          <table:table-cell table:style-name="ce72" office:value-type="string" calcext:value-type="string">
            <text:p>〈知覺〉</text:p>
          </table:table-cell>
          <table:table-cell table:style-name="ce72" office:value-type="float" office:value="9" calcext:value-type="float">
            <text:p>9</text:p>
          </table:table-cell>
          <table:table-cell table:style-name="ce72" office:value-type="string" calcext:value-type="string">
            <text:p>單體</text:p>
          </table:table-cell>
          <table:table-cell table:style-name="ce72" office:value-type="string" calcext:value-type="string">
            <text:p>至近</text:p>
          </table:table-cell>
          <table:table-cell table:style-name="ce72" office:value-type="float" office:value="4" calcext:value-type="float">
            <text:p>4</text:p>
          </table:table-cell>
          <table:table-cell table:style-name="ce72" office:value-type="string" calcext:value-type="string">
            <text:p>-</text:p>
          </table:table-cell>
          <table:table-cell table:style-name="ce76" office:value-type="string" calcext:value-type="string">
            <text:p>前提條件：《ESP》。</text:p>
            <text:p>幻視一個物體(最大戰車大小)或一個場所中蘊含的強烈記憶的超能力。</text:p>
            <text:p>判定成功時，可以讀取[LV×〈意志〉]年以內強烈烙印的記憶(但是，GM可以認為非常強烈的話能讀取更過去的記憶)。能獲得什麼樣的資訊由GM決定。</text:p>
          </table:table-cell>
          <table:table-cell table:style-name="ce72" office:value-type="string" calcext:value-type="string">
            <text:p>NCP113</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探尋感知</text:p>
            <text:p>(シーカーセンス)</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知覺〉</text:p>
          </table:table-cell>
          <table:table-cell table:style-name="ce72" office:value-type="float" office:value="8" calcext:value-type="float">
            <text:p>8</text:p>
          </table:table-cell>
          <table:table-cell table:style-name="ce72" office:value-type="string" calcext:value-type="string">
            <text:p>單體</text:p>
          </table:table-cell>
          <table:table-cell table:style-name="ce72" office:value-type="string" calcext:value-type="string">
            <text:p>效果參照</text:p>
          </table:table-cell>
          <table:table-cell table:style-name="ce72" office:value-type="float" office:value="3" calcext:value-type="float">
            <text:p>3</text:p>
          </table:table-cell>
          <table:table-cell table:style-name="ce72" office:value-type="string" calcext:value-type="string">
            <text:p>-</text:p>
          </table:table-cell>
          <table:table-cell table:style-name="ce76" office:value-type="string" calcext:value-type="string">
            <text:p>前提條件：《ESP》。</text:p>
            <text:p>模糊掌握想要尋找的人物或物品方向的超能力。用於尋找遺失物或探知水源等。</text:p>
            <text:p>指定想尋找的對象。過於模糊的對象無法尋找(殺人犯、PC①的戀人等)。判定成功時，24小時內能掌握對象所在方向，尋找對象的判定骰數+LV個。</text:p>
          </table:table-cell>
          <table:table-cell table:style-name="ce72" office:value-type="string" calcext:value-type="string">
            <text:p>NCP113</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心電感應</text:p>
            <text:p>(テレパシー)</text:p>
          </table:table-cell>
          <table:table-cell table:style-name="ce72" office:value-type="float" office:value="1" calcext:value-type="float">
            <text:p>1</text:p>
          </table:table-cell>
          <table:table-cell table:style-name="ce72" office:value-type="string" calcext:value-type="string">
            <text:p>主要行動</text:p>
          </table:table-cell>
          <table:table-cell table:style-name="ce72" office:value-type="string" calcext:value-type="string">
            <text:p>〈意志〉</text:p>
          </table:table-cell>
          <table:table-cell table:style-name="ce72" office:value-type="float" office:value="7" calcext:value-type="float">
            <text:p>7</text:p>
          </table:table-cell>
          <table:table-cell table:style-name="ce72" office:value-type="string" calcext:value-type="string">
            <text:p>單體</text:p>
          </table:table-cell>
          <table:table-cell table:style-name="ce72" office:value-type="string" calcext:value-type="string">
            <text:p>效果參照</text:p>
          </table:table-cell>
          <table:table-cell table:style-name="ce72" office:value-type="float" office:value="1" calcext:value-type="float">
            <text:p>1</text:p>
          </table:table-cell>
          <table:table-cell table:style-name="ce72" office:value-type="string" calcext:value-type="string">
            <text:p>-</text:p>
          </table:table-cell>
          <table:table-cell table:style-name="ce76" office:value-type="string" calcext:value-type="string">
            <text:p>前提條件：《ESP》。</text:p>
            <text:p>透過精神進行"對話"的超能力。不需要與對話對象使用相同語言，能夠無誤解地相互理解。對〈舊日支配者〉或神話生物使用時，可能需要進行恐怖判定。</text:p>
            <text:p>此超能力的射程等於你的《ESP》射程。因為只是對話，無法讀取對方不想傳達的資訊或遺忘的事情。</text:p>
          </table:table-cell>
          <table:table-cell table:style-name="ce72" office:value-type="string" calcext:value-type="string">
            <text:p>NCP113</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瞬間移動</text:p>
            <text:p>(テレポート)</text:p>
          </table:table-cell>
          <table:table-cell table:style-name="ce72" office:value-type="float" office:value="5" calcext:value-type="float">
            <text:p>5</text:p>
          </table:table-cell>
          <table:table-cell table:style-name="ce72" office:value-type="string" calcext:value-type="string">
            <text:p>主要行動</text:p>
          </table:table-cell>
          <table:table-cell table:style-name="ce72" office:value-type="string" calcext:value-type="string">
            <text:p>〈意志〉</text:p>
          </table:table-cell>
          <table:table-cell table:style-name="ce72" office:value-type="float" office:value="8" calcext:value-type="float">
            <text:p>8</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2" calcext:value-type="float">
            <text:p>2</text:p>
          </table:table-cell>
          <table:table-cell table:style-name="ce72" office:value-type="string" calcext:value-type="string">
            <text:p>-</text:p>
          </table:table-cell>
          <table:table-cell table:style-name="ce76" office:value-type="string" calcext:value-type="string">
            <text:p>前提條件：《心靈傳送》。</text:p>
            <text:p>瞬間推開空間進行移動的超能力。移動目的地的大氣等會精密地替換。</text:p>
            <text:p>判定成功時，你和與你在同一交戰區域內【精神】人數以內同意的角色進行[LV×5]m移動。此時可以進行脫離，但移動目的地所有人都必須在同一場所。</text:p>
          </table:table-cell>
          <table:table-cell table:style-name="ce72" office:value-type="string" calcext:value-type="string">
            <text:p>NCP114</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發火能力</text:p>
            <text:p>(パイロキネシス)</text:p>
          </table:table-cell>
          <table:table-cell table:style-name="ce72" office:value-type="float" office:value="3" calcext:value-type="float">
            <text:p>3</text:p>
          </table:table-cell>
          <table:table-cell table:style-name="ce72" office:value-type="string" calcext:value-type="string">
            <text:p>主要行動</text:p>
          </table:table-cell>
          <table:table-cell table:style-name="ce72" office:value-type="string" calcext:value-type="string">
            <text:p>〈意志〉</text:p>
          </table:table-cell>
          <table:table-cell table:style-name="ce72" office:value-type="string" calcext:value-type="string">
            <text:p>7/對決</text:p>
          </table:table-cell>
          <table:table-cell table:style-name="ce72" office:value-type="string" calcext:value-type="string">
            <text:p>單體</text:p>
          </table:table-cell>
          <table:table-cell table:style-name="ce72" office:value-type="string" calcext:value-type="string">
            <text:p>LV×2m</text:p>
          </table:table-cell>
          <table:table-cell table:style-name="ce72" office:value-type="float" office:value="3" calcext:value-type="float">
            <text:p>3</text:p>
          </table:table-cell>
          <table:table-cell table:style-name="ce72" office:value-type="string" calcext:value-type="string">
            <text:p>-</text:p>
          </table:table-cell>
          <table:table-cell table:style-name="ce76" office:value-type="string" calcext:value-type="string">
            <text:p>透過意志力加速分子運動產生高熱，引起發火現象的超能力。經常在思春期發症，成為火災原因，或與冰炎奇蜥相同。</text:p>
            <text:p>判定成功時讓射程內的一個對象著火。藉此進行攻擊時，作為攻擊力+[LV×3]的射擊攻擊處理。</text:p>
          </table:table-cell>
          <table:table-cell table:style-name="ce72" office:value-type="string" calcext:value-type="string">
            <text:p>NCP114</text:p>
          </table:table-cell>
          <table:table-cell table:style-name="ce72"/>
          <table:table-cell table:style-name="ce3" table:number-columns-repeated="12"/>
          <table:table-cell table:number-columns-repeated="1000"/>
        </table:table-row>
        <table:table-row table:style-name="ro1">
          <table:table-cell table:style-name="ce69" office:value-type="string" calcext:value-type="string">
            <text:p>影像感光</text:p>
            <text:p>(フォトキネシス)</text:p>
          </table:table-cell>
          <table:table-cell table:style-name="ce72" office:value-type="float" office:value="1" calcext:value-type="float">
            <text:p>1</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3" calcext:value-type="float">
            <text:p>3</text:p>
          </table:table-cell>
          <table:table-cell table:style-name="ce72" office:value-type="string" calcext:value-type="string">
            <text:p>-</text:p>
          </table:table-cell>
          <table:table-cell table:style-name="ce76" office:value-type="string" calcext:value-type="string">
            <text:p>前提條件：《ESP》。</text:p>
            <text:p>將自己腦內的資訊感光到底片式相機上拍攝照片的超能力。目前尚未知道數位相機的成功例子。</text:p>
            <text:p>《ESP》《精神感應》《預知》《記憶讀取》使用時使用。將該光景烙印到你持有的相機(常備化成本為1)上。</text:p>
          </table:table-cell>
          <table:table-cell table:style-name="ce72" office:value-type="string" calcext:value-type="string">
            <text:p>NCP114</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預知</text:p>
            <text:p>(プレコグニション)</text:p>
          </table:table-cell>
          <table:table-cell table:style-name="ce72" office:value-type="float" office:value="10" calcext:value-type="float">
            <text:p>10</text:p>
          </table:table-cell>
          <table:table-cell table:style-name="ce72" office:value-type="string" calcext:value-type="string">
            <text:p>主要行動</text:p>
          </table:table-cell>
          <table:table-cell table:style-name="ce72" office:value-type="string" calcext:value-type="string">
            <text:p>〈意志〉</text:p>
          </table:table-cell>
          <table:table-cell table:style-name="ce72" office:value-type="float" office:value="12" calcext:value-type="float">
            <text:p>12</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6" calcext:value-type="float">
            <text:p>6</text:p>
          </table:table-cell>
          <table:table-cell table:style-name="ce72" office:value-type="string" calcext:value-type="string">
            <text:p>-</text:p>
          </table:table-cell>
          <table:table-cell table:style-name="ce76" office:value-type="string" calcext:value-type="string">
            <text:p>前提條件：《ESP》。</text:p>
            <text:p>預知未來的超能力。由於未來並非確定，無法讀取遙遠的未來，即使是近期未來也只能以夢境般朦朧的預兆來感知。</text:p>
            <text:p>判定成功時，可以預測[LV]周內的一個重大未來事件。什麼是重大事件由GM決定。</text:p>
          </table:table-cell>
          <table:table-cell table:style-name="ce72" office:value-type="string" calcext:value-type="string">
            <text:p>NCP114</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精神爆破</text:p>
            <text:p>(マインドブラスト)</text:p>
          </table:table-cell>
          <table:table-cell table:style-name="ce72" office:value-type="float" office:value="10" calcext:value-type="float">
            <text:p>10</text:p>
          </table:table-cell>
          <table:table-cell table:style-name="ce72" office:value-type="string" calcext:value-type="string">
            <text:p>主要行動</text:p>
          </table:table-cell>
          <table:table-cell table:style-name="ce72" office:value-type="string" calcext:value-type="string">
            <text:p>〈意志〉</text:p>
          </table:table-cell>
          <table:table-cell table:style-name="ce72" office:value-type="string" calcext:value-type="string">
            <text:p>對決</text:p>
          </table:table-cell>
          <table:table-cell table:style-name="ce72" office:value-type="string" calcext:value-type="string">
            <text:p>單體</text:p>
          </table:table-cell>
          <table:table-cell table:style-name="ce72" office:value-type="string" calcext:value-type="string">
            <text:p>10m</text:p>
          </table:table-cell>
          <table:table-cell table:style-name="ce72" office:value-type="float" office:value="6" calcext:value-type="float">
            <text:p>6</text:p>
          </table:table-cell>
          <table:table-cell table:style-name="ce72" office:value-type="string" calcext:value-type="string">
            <text:p>-</text:p>
          </table:table-cell>
          <table:table-cell table:style-name="ce76" office:value-type="string" calcext:value-type="string">
            <text:p>前提條件：《精神抹除》。</text:p>
            <text:p>透過心電感應將強烈影像或死亡幻覺衝擊對方，破壞對手精神本身的超能力。</text:p>
            <text:p>進行攻擊力+LV的射擊攻擊。此攻擊無視對象的裝甲值計算傷害，無法進行格檔。對象為[兵器][植物]時無效果。</text:p>
          </table:table-cell>
          <table:table-cell table:style-name="ce72" office:value-type="string" calcext:value-type="string">
            <text:p>NCP114</text:p>
          </table:table-cell>
          <table:table-cell table:style-name="ce72"/>
          <table:table-cell table:style-name="ce3" table:number-columns-repeated="12"/>
          <table:table-cell table:number-columns-repeated="1000"/>
        </table:table-row>
        <table:table-row table:style-name="ro1">
          <table:table-cell table:style-name="ce69" office:value-type="string" calcext:value-type="string">
            <text:p>精神抹除</text:p>
            <text:p>(マインドワイプ)</text:p>
          </table:table-cell>
          <table:table-cell table:style-name="ce72" office:value-type="float" office:value="1" calcext:value-type="float">
            <text:p>1</text:p>
          </table:table-cell>
          <table:table-cell table:style-name="ce72" office:value-type="string" calcext:value-type="string">
            <text:p>自動動作</text:p>
          </table:table-cell>
          <table:table-cell table:number-columns-repeated="2" table:style-name="ce72" office:value-type="string" calcext:value-type="string">
            <text:p>-</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string" calcext:value-type="string">
            <text:p>2D10</text:p>
          </table:table-cell>
          <table:table-cell table:style-name="ce72" office:value-type="string" calcext:value-type="string">
            <text:p>-</text:p>
          </table:table-cell>
          <table:table-cell table:style-name="ce76" office:value-type="string" calcext:value-type="string">
            <text:p>前提條件：《記憶讀取》。</text:p>
            <text:p>改寫對象人格或記憶的超能力。</text:p>
            <text:p>《記憶讀取》使用時使用。變更《記憶讀取》對象的人格、記憶、價值觀等。GM可以要求另外的判定，結果如何由GM判斷。對象為超越者時，支付HP5點可以無效化此效果。</text:p>
          </table:table-cell>
          <table:table-cell table:style-name="ce72" office:value-type="string" calcext:value-type="string">
            <text:p>NCP114</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記憶讀取</text:p>
            <text:p>(メモリーリード)</text:p>
          </table:table-cell>
          <table:table-cell table:style-name="ce72" office:value-type="float" office:value="1" calcext:value-type="float">
            <text:p>1</text:p>
          </table:table-cell>
          <table:table-cell table:style-name="ce72" office:value-type="string" calcext:value-type="string">
            <text:p>主要行動</text:p>
          </table:table-cell>
          <table:table-cell table:style-name="ce72" office:value-type="string" calcext:value-type="string">
            <text:p>〈意志〉</text:p>
          </table:table-cell>
          <table:table-cell table:style-name="ce72" office:value-type="float" office:value="8" calcext:value-type="float">
            <text:p>8</text:p>
          </table:table-cell>
          <table:table-cell table:style-name="ce72" office:value-type="string" calcext:value-type="string">
            <text:p>單體</text:p>
          </table:table-cell>
          <table:table-cell table:style-name="ce72" office:value-type="string" calcext:value-type="string">
            <text:p>至近</text:p>
          </table:table-cell>
          <table:table-cell table:style-name="ce72" office:value-type="float" office:value="4" calcext:value-type="float">
            <text:p>4</text:p>
          </table:table-cell>
          <table:table-cell table:style-name="ce72" office:value-type="string" calcext:value-type="string">
            <text:p>-</text:p>
          </table:table-cell>
          <table:table-cell table:style-name="ce76" office:value-type="string" calcext:value-type="string">
            <text:p>前提條件：《心電感應》。</text:p>
            <text:p>讀取對象記憶的超能力。使用此超能力最少需要1小時。</text:p>
            <text:p>對失去意識或同意的對象使用。判定成功時，讀取對象的記憶。GM可以根據記憶深度變更難易度。對象為[神性]時，使用者發狂，HP立即變為0。</text:p>
          </table:table-cell>
          <table:table-cell table:style-name="ce72" office:value-type="string" calcext:value-type="string">
            <text:p>NCP114</text:p>
          </table:table-cell>
          <table:table-cell table:style-name="ce72"/>
          <table:table-cell table:style-name="ce3" table:number-columns-repeated="12"/>
          <table:table-cell table:number-columns-repeated="1000"/>
        </table:table-row>
        <table:table-row table:style-name="ro1">
          <table:table-cell table:style-name="ce69" office:value-type="string" calcext:value-type="string">
            <text:p>致命攻擊</text:p>
            <text:p>(リーサルアタック)</text:p>
          </table:table-cell>
          <table:table-cell table:style-name="ce72" office:value-type="float" office:value="5" calcext:value-type="float">
            <text:p>5</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6" calcext:value-type="float">
            <text:p>6</text:p>
          </table:table-cell>
          <table:table-cell table:style-name="ce72" office:value-type="string" calcext:value-type="string">
            <text:p>-</text:p>
          </table:table-cell>
          <table:table-cell table:style-name="ce76" office:value-type="string" calcext:value-type="string">
            <text:p>前提條件：《ESP》。</text:p>
            <text:p>用ESP讀取對手體內構造，破壞其致命部分，例如心臟血管、中樞神經系統、腦髓、氣道等的超能力。</text:p>
            <text:p>與《念動力》《發火能力》的射擊攻擊同時使用。該攻擊無視對象的裝甲值計算傷害，但攻擊力-[5-LV]。</text:p>
          </table:table-cell>
          <table:table-cell table:style-name="ce72" office:value-type="string" calcext:value-type="string">
            <text:p>NCP114</text:p>
          </table:table-cell>
          <table:table-cell table:style-name="ce72"/>
          <table:table-cell table:style-name="ce3" table:number-columns-repeated="12"/>
          <table:table-cell table:number-columns-repeated="1000"/>
        </table:table-row>
        <table:table-row table:style-name="ro1">
          <table:table-cell table:style-name="ce55" office:value-type="string" calcext:value-type="string">
            <text:p>躍擊爆破</text:p>
            <text:p>(リープブラスト)</text:p>
          </table:table-cell>
          <table:table-cell table:style-name="ce72" office:value-type="float" office:value="5" calcext:value-type="float">
            <text:p>5</text:p>
          </table:table-cell>
          <table:table-cell table:style-name="ce72" office:value-type="string" calcext:value-type="string">
            <text:p>主要行動</text:p>
          </table:table-cell>
          <table:table-cell table:style-name="ce72" office:value-type="string" calcext:value-type="string">
            <text:p>〈意志〉</text:p>
          </table:table-cell>
          <table:table-cell table:style-name="ce72" office:value-type="string" calcext:value-type="string">
            <text:p>對決</text:p>
          </table:table-cell>
          <table:table-cell table:style-name="ce72" office:value-type="string" calcext:value-type="string">
            <text:p>範圍(選擇)</text:p>
          </table:table-cell>
          <table:table-cell table:style-name="ce72" office:value-type="string" calcext:value-type="string">
            <text:p>5m</text:p>
          </table:table-cell>
          <table:table-cell table:style-name="ce72" office:value-type="float" office:value="5" calcext:value-type="float">
            <text:p>5</text:p>
          </table:table-cell>
          <table:table-cell table:style-name="ce72" office:value-type="string" calcext:value-type="string">
            <text:p>-</text:p>
          </table:table-cell>
          <table:table-cell table:style-name="ce76" office:value-type="string" calcext:value-type="string">
            <text:p>前提條件：《瞬間移動》。</text:p>
            <text:p>將對象拋到空中，透過墜落造成巨大傷害的超能力。</text:p>
            <text:p>進行攻擊力+LV的射擊攻擊。此攻擊無法進行掩護，對象為[飛行狀態]時無效果。</text:p>
          </table:table-cell>
          <table:table-cell table:style-name="ce72" office:value-type="string" calcext:value-type="string">
            <text:p>NCP114</text:p>
          </table:table-cell>
          <table:table-cell table:style-name="ce72"/>
          <table:table-cell table:style-name="ce3" table:number-columns-repeated="12"/>
          <table:table-cell table:number-columns-repeated="1000"/>
        </table:table-row>
        <table:table-row table:style-name="ro7">
          <table:table-cell table:style-name="ce70"/>
          <table:table-cell table:style-name="ce74" table:number-columns-repeated="8"/>
          <table:table-cell table:style-name="ce78"/>
          <table:table-cell table:style-name="ce3"/>
          <table:table-cell table:style-name="ce74"/>
          <table:table-cell table:style-name="ce3" table:number-columns-repeated="12"/>
          <table:table-cell table:number-columns-repeated="1000"/>
        </table:table-row>
        <table:table-row table:style-name="ro4" table:number-rows-repeated="1048547">
          <table:table-cell table:number-columns-repeated="1024"/>
        </table:table-row>
        <table:table-row table:style-name="ro4">
          <table:table-cell table:number-columns-repeated="1024"/>
        </table:table-row>
      </table:table>
      <table:table table:name="D-lois No.CRC11 咒物污染者專用道具 咒物" table:style-name="ta11">
        <table:table-column table:style-name="co26" table:default-cell-style-name="Default"/>
        <table:table-column table:style-name="co27" table:default-cell-style-name="Default"/>
        <table:table-column table:style-name="co29" table:default-cell-style-name="Default"/>
        <table:table-column table:style-name="co22" table:default-cell-style-name="Default"/>
        <table:table-column table:style-name="co27" table:number-columns-repeated="2" table:default-cell-style-name="Default"/>
        <table:table-column table:style-name="co14" table:default-cell-style-name="Default"/>
        <table:table-column table:style-name="co37" table:default-cell-style-name="Default"/>
        <table:table-column table:style-name="co38" table:default-cell-style-name="Default"/>
        <table:table-column table:style-name="co31" table:default-cell-style-name="Default"/>
        <table:table-column table:style-name="co32" table:default-cell-style-name="Default"/>
        <table:table-column table:style-name="co33" table:default-cell-style-name="Default"/>
        <table:table-column table:style-name="co32" table:number-columns-repeated="14" table:default-cell-style-name="Default"/>
        <table:table-column table:style-name="co4" table:number-columns-repeated="998" table:default-cell-style-name="Default"/>
        <table:table-row table:style-name="ro1">
          <table:table-cell table:style-name="ce93" office:value-type="string" calcext:value-type="string" table:number-columns-spanned="12" table:number-rows-spanned="1">
            <text:p>武器</text:p>
          </table:table-cell>
          <table:covered-table-cell table:number-columns-repeated="11"/>
          <table:table-cell table:style-name="ce112" table:number-columns-repeated="14"/>
          <table:table-cell table:number-columns-repeated="998"/>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94" office:value-type="string" calcext:value-type="string">
            <text:p>命中</text:p>
          </table:table-cell>
          <table:table-cell table:style-name="ce94" office:value-type="string" calcext:value-type="string">
            <text:p>攻擊力</text:p>
          </table:table-cell>
          <table:table-cell table:style-name="ce94" office:value-type="string" calcext:value-type="string">
            <text:p>格擋值</text:p>
          </table:table-cell>
          <table:table-cell table:style-name="ce94" office:value-type="string" calcext:value-type="string">
            <text:p>射程</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ext:p>解說</text:p>
          </table:table-cell>
          <table:table-cell table:style-name="ce94" office:value-type="string" calcext:value-type="string">
            <text:p>參照</text:p>
          </table:table-cell>
          <table:table-cell table:style-name="ce94" office:value-type="string" calcext:value-type="string">
            <text:p>備註</text:p>
          </table:table-cell>
          <table:table-cell table:style-name="ce8" table:number-columns-repeated="14"/>
          <table:table-cell table:number-columns-repeated="998"/>
        </table:table-row>
        <table:table-row table:style-name="ro1">
          <table:table-cell table:style-name="ce95" office:value-type="string" calcext:value-type="string">
            <text:p>常暗之劍</text:p>
            <text:p>（常闇の剣）</text:p>
          </table:table-cell>
          <table:table-cell table:style-name="ce95" office:value-type="string" calcext:value-type="string">
            <text:p>近戰</text:p>
          </table:table-cell>
          <table:table-cell table:style-name="ce95" office:value-type="string" calcext:value-type="string">
            <text:p>&lt;近戰&gt;</text:p>
          </table:table-cell>
          <table:table-cell table:style-name="ce95" office:value-type="float" office:value="-3" calcext:value-type="float">
            <text:p>-3</text:p>
          </table:table-cell>
          <table:table-cell table:style-name="ce95" office:value-type="float" office:value="20" calcext:value-type="float">
            <text:p>20</text:p>
          </table:table-cell>
          <table:table-cell table:style-name="ce95" office:value-type="float" office:value="6" calcext:value-type="float">
            <text:p>6</text:p>
          </table:table-cell>
          <table:table-cell table:style-name="ce95" office:value-type="string" calcext:value-type="string">
            <text:p>至近</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8" office:value-type="string" calcext:value-type="string">
            <text:p>傳說中人類最初的殺人者所用的漆黑之劍，由黑曜石製成。從刀身到刀柄通體漆黑，就連裝飾於握把末段的寶石都是黑色。在給持有者帶來勝利榮耀的同時，若裝備者不配擁有那榮耀則會反過來加害其身。</text:p>
            <text:p>以該武器進行的攻擊的達成值為40以上時，無視對象的裝甲值計算傷害。達成值為60以上時，再無視格擋和掩護計算傷害。</text:p>
            <text:p>以該武器進行的攻擊未能將對象的HP降為0時，你失去1D10點HP。</text:p>
          </table:table-cell>
          <table:table-cell table:style-name="ce95" office:value-type="string" calcext:value-type="string">
            <text:p>NC P115</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烏撒的偃月刀</text:p>
            <text:p>（バルザイの偃月刀）</text:p>
          </table:table-cell>
          <table:table-cell table:style-name="ce95" office:value-type="string" calcext:value-type="string">
            <text:p>近戰</text:p>
          </table:table-cell>
          <table:table-cell table:style-name="ce95" office:value-type="string" calcext:value-type="string">
            <text:p>&lt;近戰&gt;</text:p>
          </table:table-cell>
          <table:table-cell table:style-name="ce95" office:value-type="float" office:value="0" calcext:value-type="float">
            <text:p>0</text:p>
          </table:table-cell>
          <table:table-cell table:style-name="ce95" office:value-type="float" office:value="10" calcext:value-type="float">
            <text:p>10</text:p>
          </table:table-cell>
          <table:table-cell table:style-name="ce95" office:value-type="float" office:value="3" calcext:value-type="float">
            <text:p>3</text:p>
          </table:table-cell>
          <table:table-cell table:style-name="ce95" office:value-type="string" calcext:value-type="string">
            <text:p>至近</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10" office:value-type="string" calcext:value-type="string">
            <text:p>《死靈之書》中記載的、帶有土星領域力量的彎刀（scimitar）。帶有侍奉阿撒托斯宮廷的舊神們的力量，用於繪製魔法陣或幾何學記號來強化咒力，以及用來討滅靈性存在。平時必須用黑色絲布覆蓋。使用者以希望作為代價，背負著在各個多元宇宙中與〈外神〉戰鬥的宿命。</text:p>
            <text:p>使用此武器攻擊造成1點以上傷害時，可以解除對象正在使用且效果持續中的一個E-Lois。但是，如果解除設有其他條件，未經GM許可則無法解除。</text:p>
            <text:p>此武器無法從裝備中卸下，裝備中，你受到來自[神性][神話生物]的異常狀態【恐怖】會變更為【暴走】。</text:p>
          </table:table-cell>
          <table:table-cell table:style-name="ce95" office:value-type="string" calcext:value-type="string">
            <text:p>NC P115</text:p>
          </table:table-cell>
          <table:table-cell table:style-name="ce111"/>
          <table:table-cell table:style-name="ce112" table:number-columns-repeated="14"/>
          <table:table-cell table:number-columns-repeated="998"/>
        </table:table-row>
        <table:table-row table:style-name="ro1">
          <table:table-cell table:style-name="ce96" office:value-type="string" calcext:value-type="string" table:number-columns-spanned="12" table:number-rows-spanned="1">
            <text:p>其他</text:p>
          </table:table-cell>
          <table:covered-table-cell table:number-columns-repeated="11"/>
          <table:table-cell table:style-name="ce112" table:number-columns-repeated="14"/>
          <table:table-cell table:number-columns-repeated="998"/>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able:number-columns-spanned="5" table:number-rows-spanned="1">
            <text:p>解說</text:p>
          </table:table-cell>
          <table:covered-table-cell table:number-columns-repeated="4" table:style-name="ce106"/>
          <table:table-cell table:style-name="ce94" office:value-type="string" calcext:value-type="string">
            <text:p>參照</text:p>
          </table:table-cell>
          <table:table-cell table:style-name="ce94" office:value-type="string" calcext:value-type="string">
            <text:p>備註</text:p>
          </table:table-cell>
          <table:table-cell table:style-name="ce112" table:number-columns-repeated="14"/>
          <table:table-cell table:number-columns-repeated="998"/>
        </table:table-row>
        <table:table-row table:style-name="ro1">
          <table:table-cell table:style-name="ce97" office:value-type="string" calcext:value-type="string">
            <text:p>阿爾哈紮德之燈</text:p>
            <text:p>（アルハザードのランプ）</text:p>
          </table:table-cell>
          <table:table-cell table:style-name="ce95" office:value-type="string" calcext:value-type="string">
            <text:p>其他</text:p>
          </table:table-cell>
          <table:table-cell table:style-name="ce118" office:value-type="string" calcext:value-type="string">
            <text:p>—</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03" office:value-type="string" calcext:value-type="string" table:number-columns-spanned="5" table:number-rows-spanned="1">
            <text:p>據說那個瘋狂的阿拉伯人曾經持有的黃金油燈，點燃火焰後，被其煙霧包圍的人會看到關於〈舊日支配者〉和〈外神〉的幻視。幻視的內容由GM判斷，但多數情況下會伴隨恐怖判定。一說此燈是原本埋藏在瘋狂都市中的秘寶。</text:p>
            <text:p>但是，這盞燈還有另一個用途。在用骰子決定魔術侵蝕率上升時，燈的持有者可以在原本骰子範圍內任意決定侵蝕率上升多少（2D10的話為2~20）。此效果一劇本限用一次。可以對同一接戰區域內的其他角色使用。</text:p>
          </table:table-cell>
          <table:covered-table-cell table:number-columns-repeated="4" table:style-name="ce107"/>
          <table:table-cell table:style-name="ce95" office:value-type="string" calcext:value-type="string">
            <text:p>NC P115</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伊斯的時間結晶</text:p>
            <text:p>（イスの時間結晶）</text:p>
          </table:table-cell>
          <table:table-cell table:style-name="ce95" office:value-type="string" calcext:value-type="string">
            <text:p>其他</text:p>
          </table:table-cell>
          <table:table-cell table:style-name="ce118" office:value-type="string" calcext:value-type="string">
            <text:p>—</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04" office:value-type="string" calcext:value-type="string" table:number-columns-spanned="5" table:number-rows-spanned="1">
            <text:p>這個複雜的方塊乍看之下像是小型立方體，但展開後會呈現由多個立方體碎形結構組成的形狀。這是伊斯的偉大種族為了蓄積時間能量而創造的一種提普勒圓筒。</text:p>
            <text:p>此結晶展開後最大可擴大至2立方米，內部的時間流速最多可減速至1兆分之1。也就是說，外面經過數千年，內部也只經過1秒。</text:p>
            <text:p>使用者可以釋放時間結晶的力量，一劇本可以使用一次《時之棺》。但是，其侵蝕值變更為20。</text:p>
          </table:table-cell>
          <table:covered-table-cell table:number-columns-repeated="4"/>
          <table:table-cell table:style-name="ce95" office:value-type="string" calcext:value-type="string">
            <text:p>NC P115</text:p>
          </table:table-cell>
          <table:table-cell table:style-name="ce111"/>
          <table:table-cell table:style-name="ce112" table:number-columns-repeated="14"/>
          <table:table-cell table:number-columns-repeated="998"/>
        </table:table-row>
        <table:table-row table:style-name="ro1">
          <table:table-cell table:style-name="ce95" office:value-type="string" calcext:value-type="string">
            <text:p>閃耀的偏方三八面體</text:p>
            <text:p>（輝くトラペゾヘドロン）</text:p>
          </table:table-cell>
          <table:table-cell table:style-name="ce95" office:value-type="string" calcext:value-type="string">
            <text:p>其他</text:p>
          </table:table-cell>
          <table:table-cell table:style-name="ce118" office:value-type="string" calcext:value-type="string">
            <text:p>—</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04" office:value-type="string" calcext:value-type="string" table:number-columns-spanned="5" table:number-rows-spanned="1">
            <text:p>放在金屬盒中的這個不可思議的多面體，是帶有紅色紋路的漆黑結晶。每個面都切割成幾何學上不可能的形狀，光是試圖理解其整體結構就會帶來瘋狂。</text:p>
            <text:p>在這個結晶內部，封印著〈外神〉的領域，也就是他們被〈舊神〉放逐的領域本身。</text:p>
            <text:p>被此咒物選中的人將背教者的力量注入梯形多面體，就能引出〈外神〉的力量。</text:p>
            <text:p>也就是用於傷害擲骰時，對場景內任意角色造成的傷害+6D。傷害的對象多於一個時，傷害增加僅對其中一個對象生效。另外，受到此效果的攻擊對象無法變更，也無法受到掩護。但是，行使此效果時，使用者的侵蝕率+2D。此效果一劇本可以使用一次。</text:p>
          </table:table-cell>
          <table:covered-table-cell table:number-columns-repeated="4"/>
          <table:table-cell table:style-name="ce95" office:value-type="string" calcext:value-type="string">
            <text:p>NC P115</text:p>
          </table:table-cell>
          <table:table-cell table:style-name="ce111"/>
          <table:table-cell table:style-name="ce112" table:number-columns-repeated="14"/>
          <table:table-cell table:number-columns-repeated="998"/>
        </table:table-row>
        <table:table-row table:style-name="ro4" table:number-rows-repeated="1048566">
          <table:table-cell table:number-columns-repeated="1024"/>
        </table:table-row>
        <table:table-row table:style-name="ro4">
          <table:table-cell table:number-columns-repeated="1024"/>
        </table:table-row>
      </table:table>
      <table:table table:name="D-lois No.UA01 抗改變者異能" table:style-name="ta12">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number-columns-repeated="3" table:default-cell-style-name="Default"/>
        <table:table-column table:style-name="co19" table:default-cell-style-name="Default"/>
        <table:table-column table:style-name="co21" table:default-cell-style-name="Default"/>
        <table:table-column table:style-name="co22" table:default-cell-style-name="Default"/>
        <table:table-column table:style-name="co24" table:default-cell-style-name="Default"/>
        <table:table-column table:style-name="co4" table:number-columns-repeated="1011" table:default-cell-style-name="Default"/>
        <table:table-row table:style-name="ro1">
          <table:table-cell table:style-name="ce51" office:value-type="string" calcext:value-type="string">
            <text:p>名稱</text:p>
          </table:table-cell>
          <table:table-cell table:style-name="ce71" office:value-type="string" calcext:value-type="string">
            <text:p>最大等級</text:p>
          </table:table-cell>
          <table:table-cell table:style-name="ce71" office:value-type="string" calcext:value-type="string">
            <text:p>時機</text:p>
          </table:table-cell>
          <table:table-cell table:style-name="ce71" office:value-type="string" calcext:value-type="string">
            <text:p>技能</text:p>
          </table:table-cell>
          <table:table-cell table:style-name="ce71" office:value-type="string" calcext:value-type="string">
            <text:p>難易度</text:p>
          </table:table-cell>
          <table:table-cell table:style-name="ce71" office:value-type="string" calcext:value-type="string">
            <text:p>對象</text:p>
          </table:table-cell>
          <table:table-cell table:style-name="ce71" office:value-type="string" calcext:value-type="string">
            <text:p>射程</text:p>
          </table:table-cell>
          <table:table-cell table:style-name="ce71" office:value-type="string" calcext:value-type="string">
            <text:p>侵蝕值</text:p>
          </table:table-cell>
          <table:table-cell table:style-name="ce71" office:value-type="string" calcext:value-type="string">
            <text:p>限制</text:p>
          </table:table-cell>
          <table:table-cell table:style-name="ce71" office:value-type="string" calcext:value-type="string">
            <text:p>次數</text:p>
          </table:table-cell>
          <table:table-cell table:style-name="ce51" office:value-type="string" calcext:value-type="string">
            <text:p>效果</text:p>
          </table:table-cell>
          <table:table-cell table:style-name="ce71" office:value-type="string" calcext:value-type="string">
            <text:p>參照</text:p>
          </table:table-cell>
          <table:table-cell table:style-name="ce71" office:value-type="string" calcext:value-type="string">
            <text:p>備註</text:p>
          </table:table-cell>
          <table:table-cell table:number-columns-repeated="1011"/>
        </table:table-row>
        <table:table-row table:style-name="ro1">
          <table:table-cell table:style-name="ce55" office:value-type="string" calcext:value-type="string" table:number-columns-spanned="13" table:number-rows-spanned="1">
            <text:p>這裡介紹的異能僅能由持有D-Lois：抗改變者的角色獲得。 限制標註有「特殊」的異能可以無視症候群限制取得。 限制標註為「特殊」的異能，其可獲得的最大等級不會因血統而改變。 請注意，這些異能都不被視為轉化異能。</text:p>
          </table:table-cell>
          <table:covered-table-cell table:number-columns-repeated="11" table:style-name="ce42"/>
          <table:covered-table-cell table:style-name="ce120"/>
          <table:table-cell table:number-columns-repeated="1011"/>
        </table:table-row>
        <table:table-row table:style-name="ro1">
          <table:table-cell table:style-name="ce52" office:value-type="string" calcext:value-type="string">
            <text:p>黑曜的光弓</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RC〉</text:p>
          </table:table-cell>
          <table:table-cell table:style-name="ce72" office:value-type="string" calcext:value-type="string">
            <text:p>對決</text:p>
          </table:table-cell>
          <table:table-cell table:style-name="ce72" office:value-type="string" calcext:value-type="string">
            <text:p>3體</text:p>
          </table:table-cell>
          <table:table-cell table:style-name="ce72" office:value-type="string" calcext:value-type="string">
            <text:p>視界</text:p>
          </table:table-cell>
          <table:table-cell table:style-name="ce72" office:value-type="float" office:value="6" calcext:value-type="float">
            <text:p>6</text:p>
          </table:table-cell>
          <table:table-cell table:style-name="ce72" office:value-type="string" calcext:value-type="string">
            <text:p>D-Lois</text:p>
            <text:p>天使光環</text:p>
          </table:table-cell>
          <table:table-cell table:style-name="ce72" office:value-type="string" calcext:value-type="string">
            <text:p>LV/劇本</text:p>
          </table:table-cell>
          <table:table-cell table:style-name="ce76" office:value-type="string" calcext:value-type="string">
            <text:p>同時發射5道黑色的光的異能力。</text:p>
            <text:p>進行[攻擊力：+LV×2+4]的射擊攻擊。無法以與你同一接戰區域的角色為對象。</text:p>
          </table:table-cell>
          <table:table-cell table:style-name="ce72" office:value-type="string" calcext:value-type="string">
            <text:p>DFP38</text:p>
          </table:table-cell>
          <table:table-cell table:style-name="ce72"/>
          <table:table-cell table:number-columns-repeated="1011"/>
        </table:table-row>
        <table:table-row table:style-name="ro1">
          <table:table-cell table:style-name="ce53" office:value-type="string" calcext:value-type="string">
            <text:p>狂王的鐵錘</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RC〉</text:p>
          </table:table-cell>
          <table:table-cell table:style-name="ce72" office:value-type="string" calcext:value-type="string">
            <text:p>對決</text:p>
          </table:table-cell>
          <table:table-cell table:style-name="ce72" office:value-type="string" calcext:value-type="string">
            <text:p>-</text:p>
          </table:table-cell>
          <table:table-cell table:style-name="ce72" office:value-type="string" calcext:value-type="string">
            <text:p>視界</text:p>
          </table:table-cell>
          <table:table-cell table:style-name="ce72" office:value-type="float" office:value="6" calcext:value-type="float">
            <text:p>6</text:p>
          </table:table-cell>
          <table:table-cell table:style-name="ce72" office:value-type="string" calcext:value-type="string">
            <text:p>D-Lois</text:p>
            <text:p>重力魔眼</text:p>
          </table:table-cell>
          <table:table-cell table:style-name="ce72" office:value-type="string" calcext:value-type="string">
            <text:p>LV/劇本</text:p>
          </table:table-cell>
          <table:table-cell table:style-name="ce76" office:value-type="string" calcext:value-type="string">
            <text:p>操縱重力粉碎敵人的異能力。接觸到你的衝動，魔眼會發出無法控制的咆哮。</text:p>
            <text:p>進行[攻擊力：+5]的射擊攻擊。當你受到暴走狀態時，攻擊力再+[LV×3]。</text:p>
          </table:table-cell>
          <table:table-cell table:style-name="ce72" office:value-type="string" calcext:value-type="string">
            <text:p>DFP38</text:p>
          </table:table-cell>
          <table:table-cell table:style-name="ce72"/>
          <table:table-cell table:number-columns-repeated="1011"/>
        </table:table-row>
        <table:table-row table:style-name="ro1">
          <table:table-cell table:style-name="ce54" office:value-type="string" calcext:value-type="string">
            <text:p>殲滅者</text:p>
            <text:p>（eliminator）</text:p>
          </table:table-cell>
          <table:table-cell table:style-name="ce72" office:value-type="float" office:value="5" calcext:value-type="float">
            <text:p>5</text:p>
          </table:table-cell>
          <table:table-cell table:style-name="ce72" office:value-type="string" calcext:value-type="string">
            <text:p>主要動作/回應動作</text:p>
          </table:table-cell>
          <table:table-cell table:style-name="ce72" office:value-type="string" calcext:value-type="string">
            <text:p>症狀</text:p>
          </table:table-cell>
          <table:table-cell table:number-columns-repeated="3" table:style-name="ce72" office:value-type="string" calcext:value-type="string">
            <text:p>-</text:p>
          </table:table-cell>
          <table:table-cell table:style-name="ce72" office:value-type="float" office:value="4" calcext:value-type="float">
            <text:p>4</text:p>
          </table:table-cell>
          <table:table-cell table:style-name="ce72" office:value-type="string" calcext:value-type="string">
            <text:p>D-Lois</text:p>
            <text:p>雷擊黑犬</text:p>
          </table:table-cell>
          <table:table-cell table:style-name="ce72" office:value-type="string" calcext:value-type="string">
            <text:p>LV/劇本</text:p>
          </table:table-cell>
          <table:table-cell table:style-name="ce76" office:value-type="string" calcext:value-type="string">
            <text:p>全身施加戰鬥用程序，代替機械化部件的異能力。</text:p>
            <text:p>組合的攻擊的命中判定和閃避的達成值+[LV×3]。</text:p>
          </table:table-cell>
          <table:table-cell table:style-name="ce72" office:value-type="string" calcext:value-type="string">
            <text:p>DFP38</text:p>
          </table:table-cell>
          <table:table-cell table:style-name="ce72"/>
          <table:table-cell table:number-columns-repeated="1011"/>
        </table:table-row>
        <table:table-row table:style-name="ro1">
          <table:table-cell table:style-name="ce55" office:value-type="string" calcext:value-type="string">
            <text:p>赫之鎖</text:p>
          </table:table-cell>
          <table:table-cell table:style-name="ce72" office:value-type="float" office:value="5" calcext:value-type="float">
            <text:p>5</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6" calcext:value-type="float">
            <text:p>6</text:p>
          </table:table-cell>
          <table:table-cell table:style-name="ce72" office:value-type="string" calcext:value-type="string">
            <text:p>D-Lois</text:p>
            <text:p>鮮血真祖</text:p>
          </table:table-cell>
          <table:table-cell table:style-name="ce72" office:value-type="string" calcext:value-type="string">
            <text:p>LV/劇本</text:p>
          </table:table-cell>
          <table:table-cell table:style-name="ce76" office:value-type="string" calcext:value-type="string">
            <text:p>從血液中生出鎖鏈的異能力。在這一場景中，製作並裝備以下武器。使用時失去LV點HP。</text:p>
            <text:p>類別：近戰</text:p>
            <text:p>技能：&lt;近戰&gt;</text:p>
            <text:p>命中：0</text:p>
            <text:p>攻擊力:[+LV×3+5]</text:p>
            <text:p>格擋值：-</text:p>
            <text:p>射程：視界</text:p>
          </table:table-cell>
          <table:table-cell table:style-name="ce72" office:value-type="string" calcext:value-type="string">
            <text:p>DFP38</text:p>
          </table:table-cell>
          <table:table-cell table:style-name="ce72"/>
          <table:table-cell table:number-columns-repeated="1011"/>
        </table:table-row>
        <table:table-row table:style-name="ro1">
          <table:table-cell table:style-name="ce51" office:value-type="string" calcext:value-type="string">
            <text:p>奇異之獸</text:p>
          </table:table-cell>
          <table:table-cell table:style-name="ce72" office:value-type="float" office:value="5" calcext:value-type="float">
            <text:p>5</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6" calcext:value-type="float">
            <text:p>6</text:p>
          </table:table-cell>
          <table:table-cell table:style-name="ce72" office:value-type="string" calcext:value-type="string">
            <text:p>D-Lois</text:p>
            <text:p>變異魔獸</text:p>
          </table:table-cell>
          <table:table-cell table:style-name="ce72" office:value-type="string" calcext:value-type="string">
            <text:p>LV/劇本</text:p>
          </table:table-cell>
          <table:table-cell table:style-name="ce76" office:value-type="string" calcext:value-type="string">
            <text:p>變異成異形的怪物的異能力。</text:p>
            <text:p>取得時任意選擇一個能力值，在這一場景中，使用所選的能力值進行的判定骰數+[LV+2]個。</text:p>
          </table:table-cell>
          <table:table-cell table:style-name="ce72" office:value-type="string" calcext:value-type="string">
            <text:p>DFP38</text:p>
          </table:table-cell>
          <table:table-cell table:style-name="ce72"/>
          <table:table-cell table:number-columns-repeated="1011"/>
        </table:table-row>
        <table:table-row table:style-name="ro1">
          <table:table-cell table:style-name="ce56" office:value-type="string" calcext:value-type="string">
            <text:p>命定射程</text:p>
            <text:p>（fatal range）</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症狀</text:p>
          </table:table-cell>
          <table:table-cell table:style-name="ce72" office:value-type="string" calcext:value-type="string">
            <text:p>對決</text:p>
          </table:table-cell>
          <table:table-cell table:style-name="ce72" office:value-type="string" calcext:value-type="string">
            <text:p>-</text:p>
          </table:table-cell>
          <table:table-cell table:style-name="ce72" office:value-type="string" calcext:value-type="string">
            <text:p>視界</text:p>
          </table:table-cell>
          <table:table-cell table:style-name="ce72" office:value-type="float" office:value="4" calcext:value-type="float">
            <text:p>4</text:p>
          </table:table-cell>
          <table:table-cell table:style-name="ce72" office:value-type="string" calcext:value-type="string">
            <text:p>D-Lois</text:p>
            <text:p>流亡畸體</text:p>
          </table:table-cell>
          <table:table-cell table:style-name="ce72" office:value-type="string" calcext:value-type="string">
            <text:p>LV/劇本</text:p>
          </table:table-cell>
          <table:table-cell table:style-name="ce76" office:value-type="string" calcext:value-type="string">
            <text:p>從四肢生出無數的觸手，從各個方向瞄準敵人的死角。</text:p>
            <text:p>組合這個異能的判定骰數+[LV×2]個。如果是攻擊，變為[射程：視野]。</text:p>
          </table:table-cell>
          <table:table-cell table:style-name="ce72" office:value-type="string" calcext:value-type="string">
            <text:p>DFP38</text:p>
          </table:table-cell>
          <table:table-cell table:style-name="ce72"/>
          <table:table-cell table:number-columns-repeated="1011"/>
        </table:table-row>
        <table:table-row table:style-name="ro1">
          <table:table-cell table:style-name="ce57" office:value-type="string" calcext:value-type="string">
            <text:p>灰色的咆哮</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RC〉</text:p>
          </table:table-cell>
          <table:table-cell table:style-name="ce72" office:value-type="string" calcext:value-type="string">
            <text:p>對決</text:p>
          </table:table-cell>
          <table:table-cell table:style-name="ce72" office:value-type="string" calcext:value-type="string">
            <text:p>場景(選擇)</text:p>
          </table:table-cell>
          <table:table-cell table:style-name="ce72" office:value-type="string" calcext:value-type="string">
            <text:p>視界</text:p>
          </table:table-cell>
          <table:table-cell table:style-name="ce72" office:value-type="float" office:value="10" calcext:value-type="float">
            <text:p>10</text:p>
          </table:table-cell>
          <table:table-cell table:style-name="ce72" office:value-type="string" calcext:value-type="string">
            <text:p>D-Lois</text:p>
            <text:p>疾速靈猿</text:p>
          </table:table-cell>
          <table:table-cell table:style-name="ce72" office:value-type="string" calcext:value-type="string">
            <text:p>LV/劇本</text:p>
          </table:table-cell>
          <table:table-cell table:style-name="ce76" office:value-type="string" calcext:value-type="string">
            <text:p>對周圍全域施加振動波攻擊的異能力。你的振動波會將所有物質塗成灰色。</text:p>
            <text:p>進行攻擊力+[LV×3]的射擊攻擊，這個異能力的對象變為[對象：場景（選擇）]，射程變為[射程：視野]。</text:p>
          </table:table-cell>
          <table:table-cell table:style-name="ce72" office:value-type="string" calcext:value-type="string">
            <text:p>DFP38</text:p>
          </table:table-cell>
          <table:table-cell table:style-name="ce72"/>
          <table:table-cell table:number-columns-repeated="1011"/>
        </table:table-row>
        <table:table-row table:style-name="ro1">
          <table:table-cell table:style-name="ce58" office:value-type="string" calcext:value-type="string">
            <text:p>顛覆</text:p>
            <text:p>（disruption）</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近戰〉</text:p>
          </table:table-cell>
          <table:table-cell table:style-name="ce72" office:value-type="string" calcext:value-type="string">
            <text:p>對決</text:p>
          </table:table-cell>
          <table:table-cell table:style-name="ce72" office:value-type="string" calcext:value-type="string">
            <text:p>-</text:p>
          </table:table-cell>
          <table:table-cell table:style-name="ce72" office:value-type="string" calcext:value-type="string">
            <text:p>10m</text:p>
          </table:table-cell>
          <table:table-cell table:style-name="ce72" office:value-type="float" office:value="8" calcext:value-type="float">
            <text:p>8</text:p>
          </table:table-cell>
          <table:table-cell table:style-name="ce72" office:value-type="string" calcext:value-type="string">
            <text:p>D-Lois</text:p>
            <text:p>煉金化形</text:p>
          </table:table-cell>
          <table:table-cell table:style-name="ce72" office:value-type="string" calcext:value-type="string">
            <text:p>LV/劇本</text:p>
          </table:table-cell>
          <table:table-cell table:style-name="ce76" office:value-type="string" calcext:value-type="string">
            <text:p>將周圍的物質改寫成混亂的樣子，令其崩潰的異能力。</text:p>
            <text:p>進行攻擊力：+[LV×3]的近戰攻擊。組合這個異能力的攻擊在計算傷害時無視對象的裝甲值，但此時無法加算所裝備的武器的攻擊力。</text:p>
          </table:table-cell>
          <table:table-cell table:style-name="ce72" office:value-type="string" calcext:value-type="string">
            <text:p>DFP38</text:p>
          </table:table-cell>
          <table:table-cell table:style-name="ce72"/>
          <table:table-cell table:number-columns-repeated="1011"/>
        </table:table-row>
        <table:table-row table:style-name="ro1">
          <table:table-cell table:style-name="ce59" office:value-type="string" calcext:value-type="string">
            <text:p>啟示之語</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RC〉〈交涉〉</text:p>
          </table:table-cell>
          <table:table-cell table:style-name="ce72" office:value-type="string" calcext:value-type="string">
            <text:p>自動成功</text:p>
          </table:table-cell>
          <table:table-cell table:style-name="ce72" office:value-type="string" calcext:value-type="string">
            <text:p>範圍(選擇)</text:p>
          </table:table-cell>
          <table:table-cell table:style-name="ce72" office:value-type="string" calcext:value-type="string">
            <text:p>至近</text:p>
          </table:table-cell>
          <table:table-cell table:style-name="ce72" office:value-type="float" office:value="10" calcext:value-type="float">
            <text:p>10</text:p>
          </table:table-cell>
          <table:table-cell table:style-name="ce72" office:value-type="string" calcext:value-type="string">
            <text:p>D-Lois</text:p>
            <text:p>神腦演算</text:p>
          </table:table-cell>
          <table:table-cell table:style-name="ce72" office:value-type="string" calcext:value-type="string">
            <text:p>LV/劇本</text:p>
          </table:table-cell>
          <table:table-cell table:style-name="ce76" office:value-type="string" calcext:value-type="string">
            <text:p>借助鎖鏈之環，將你的助言變質、大範圍擴散的異能力。你的言語能夠直擊人心。組合的判定變為對象：範圍（選擇），對象下一次進行的主要動作的暴擊值-1（下限6）。</text:p>
          </table:table-cell>
          <table:table-cell table:style-name="ce72" office:value-type="string" calcext:value-type="string">
            <text:p>DFP39</text:p>
          </table:table-cell>
          <table:table-cell table:style-name="ce72"/>
          <table:table-cell table:number-columns-repeated="1011"/>
        </table:table-row>
        <table:table-row table:style-name="ro1">
          <table:table-cell table:style-name="ce60" office:value-type="string" calcext:value-type="string">
            <text:p>楔之陣型</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症狀</text:p>
          </table:table-cell>
          <table:table-cell table:style-name="ce72" office:value-type="string" calcext:value-type="string">
            <text:p>-</text:p>
          </table:table-cell>
          <table:table-cell table:style-name="ce72" office:value-type="string" calcext:value-type="string">
            <text:p>[LV+2]體</text:p>
          </table:table-cell>
          <table:table-cell table:style-name="ce72" office:value-type="string" calcext:value-type="string">
            <text:p>-</text:p>
          </table:table-cell>
          <table:table-cell table:style-name="ce72" office:value-type="float" office:value="5" calcext:value-type="float">
            <text:p>5</text:p>
          </table:table-cell>
          <table:table-cell table:style-name="ce72" office:value-type="string" calcext:value-type="string">
            <text:p>D-Lois</text:p>
            <text:p>冥府領域</text:p>
          </table:table-cell>
          <table:table-cell table:style-name="ce72" office:value-type="string" calcext:value-type="string">
            <text:p>LV/劇本</text:p>
          </table:table-cell>
          <table:table-cell table:style-name="ce76" office:value-type="string" calcext:value-type="string">
            <text:p>將因子作為楔子打入周圍，令領域變質的異能。被奪取的領域會漸漸被你的衝動侵蝕。</text:p>
            <text:p>組合這個異能力的對象變為對象：[LV+2]體。</text:p>
          </table:table-cell>
          <table:table-cell table:style-name="ce72" office:value-type="string" calcext:value-type="string">
            <text:p>DFP39</text:p>
          </table:table-cell>
          <table:table-cell table:style-name="ce72"/>
          <table:table-cell table:number-columns-repeated="1011"/>
        </table:table-row>
        <table:table-row table:style-name="ro1">
          <table:table-cell table:style-name="ce61" office:value-type="string" calcext:value-type="string">
            <text:p>焦熱的冰塔</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RC〉</text:p>
          </table:table-cell>
          <table:table-cell table:style-name="ce72" office:value-type="string" calcext:value-type="string">
            <text:p>對決</text:p>
          </table:table-cell>
          <table:table-cell table:style-name="ce72" office:value-type="string" calcext:value-type="string">
            <text:p>範圍(選擇)</text:p>
          </table:table-cell>
          <table:table-cell table:style-name="ce72" office:value-type="string" calcext:value-type="string">
            <text:p>視界</text:p>
          </table:table-cell>
          <table:table-cell table:style-name="ce72" office:value-type="float" office:value="6" calcext:value-type="float">
            <text:p>6</text:p>
          </table:table-cell>
          <table:table-cell table:style-name="ce72" office:value-type="string" calcext:value-type="string">
            <text:p>D-Lois</text:p>
            <text:p>冰炎奇蜥</text:p>
          </table:table-cell>
          <table:table-cell table:style-name="ce72" office:value-type="string" calcext:value-type="string">
            <text:p>LV/劇本</text:p>
          </table:table-cell>
          <table:table-cell table:style-name="ce76" office:value-type="string" calcext:value-type="string">
            <text:p>在攻擊上附加燃燒的冰、絕對零度的火焰的異能力。正負混亂的純粹的能量只能吞噬周圍、引發崩潰。</text:p>
            <text:p>進行攻擊力：+[LV×4]的射擊攻擊。</text:p>
          </table:table-cell>
          <table:table-cell table:style-name="ce72" office:value-type="string" calcext:value-type="string">
            <text:p>DFP39</text:p>
          </table:table-cell>
          <table:table-cell table:style-name="ce72"/>
          <table:table-cell table:number-columns-repeated="1011"/>
        </table:table-row>
        <table:table-row table:style-name="ro1">
          <table:table-cell table:style-name="ce62" office:value-type="string" calcext:value-type="string">
            <text:p>絕對的瘋狂</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RC〉〈交涉〉</text:p>
          </table:table-cell>
          <table:table-cell table:style-name="ce72" office:value-type="string" calcext:value-type="string">
            <text:p>對決</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float" office:value="6" calcext:value-type="float">
            <text:p>6</text:p>
          </table:table-cell>
          <table:table-cell table:style-name="ce72" office:value-type="string" calcext:value-type="string">
            <text:p>D-Lois</text:p>
            <text:p>幻象惑星</text:p>
          </table:table-cell>
          <table:table-cell table:style-name="ce72" office:value-type="string" calcext:value-type="string">
            <text:p>LV/劇本</text:p>
          </table:table-cell>
          <table:table-cell table:style-name="ce76" office:value-type="string" calcext:value-type="string">
            <text:p>生成荒唐的腦內物質，引發瘋狂的異能力。</text:p>
            <text:p>進行攻擊力+[LV×3]的射擊攻擊，計算傷害時無視對象的裝甲值。</text:p>
          </table:table-cell>
          <table:table-cell table:style-name="ce72" office:value-type="string" calcext:value-type="string">
            <text:p>DFP39</text:p>
          </table:table-cell>
          <table:table-cell table:style-name="ce72"/>
          <table:table-cell table:number-columns-repeated="1011"/>
        </table:table-row>
        <table:table-row table:style-name="ro1">
          <table:table-cell table:style-name="ce63" office:value-type="string" calcext:value-type="string">
            <text:p>孤獨之影</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參照效果</text:p>
          </table:table-cell>
          <table:table-cell table:number-columns-repeated="3" table:style-name="ce72" office:value-type="string" calcext:value-type="string">
            <text:p>-</text:p>
          </table:table-cell>
          <table:table-cell table:style-name="ce72" office:value-type="float" office:value="4" calcext:value-type="float">
            <text:p>4</text:p>
          </table:table-cell>
          <table:table-cell table:style-name="ce72" office:value-type="string" calcext:value-type="string">
            <text:p>D-Lois</text:p>
            <text:p>噬身影蛇</text:p>
          </table:table-cell>
          <table:table-cell table:style-name="ce72" office:value-type="string" calcext:value-type="string">
            <text:p>LV/劇本</text:p>
          </table:table-cell>
          <table:table-cell table:style-name="ce76" office:value-type="string" calcext:value-type="string">
            <text:p>自己化作影子的一部分，無拘無束地行動的異能力。</text:p>
            <text:p>可以與任何判定組合，組合的判定用【精神】進行。</text:p>
          </table:table-cell>
          <table:table-cell table:style-name="ce72" office:value-type="string" calcext:value-type="string">
            <text:p>DFP39</text:p>
          </table:table-cell>
          <table:table-cell table:style-name="ce72"/>
          <table:table-cell table:number-columns-repeated="1011"/>
        </table:table-row>
        <table:table-row table:style-name="ro1">
          <table:table-cell table:style-name="ce80" office:value-type="string" calcext:value-type="string">
            <text:p>生命入侵</text:p>
          </table:table-cell>
          <table:table-cell table:style-name="ce72" office:value-type="float" office:value="3" calcext:value-type="float">
            <text:p>3</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7" calcext:value-type="float">
            <text:p>7</text:p>
          </table:table-cell>
          <table:table-cell table:style-name="ce72" office:value-type="string" calcext:value-type="string">
            <text:p>D-Lois</text:p>
            <text:p>特殊</text:p>
          </table:table-cell>
          <table:table-cell table:style-name="ce72" office:value-type="string" calcext:value-type="string">
            <text:p>1/劇本</text:p>
          </table:table-cell>
          <table:table-cell table:style-name="ce76" office:value-type="string" calcext:value-type="string">
            <text:p>改變自己的肉體，獲得暫時性的活力的異能力。</text:p>
            <text:p>使用時你的HP+[LV×10]點，此時可以超過HP最大值。增加的HP持續到因傷害失去或一回合結束時為止。</text:p>
          </table:table-cell>
          <table:table-cell table:style-name="ce72" office:value-type="string" calcext:value-type="string">
            <text:p>DFP39</text:p>
          </table:table-cell>
          <table:table-cell table:style-name="ce72"/>
          <table:table-cell table:number-columns-repeated="1011"/>
        </table:table-row>
        <table:table-row table:style-name="ro1">
          <table:table-cell table:style-name="ce55" office:value-type="string" calcext:value-type="string">
            <text:p>轉化神經</text:p>
            <text:p>（trance nerves）</text:p>
          </table:table-cell>
          <table:table-cell table:style-name="ce72" office:value-type="float" office:value="3" calcext:value-type="float">
            <text:p>3</text:p>
          </table:table-cell>
          <table:table-cell table:style-name="ce72" office:value-type="string" calcext:value-type="string">
            <text:p>主要動作/回應動作</text:p>
          </table:table-cell>
          <table:table-cell table:style-name="ce72" office:value-type="string" calcext:value-type="string">
            <text:p>參照效果</text:p>
          </table:table-cell>
          <table:table-cell table:style-name="ce72" office:value-type="string" calcext:value-type="string">
            <text:p>-</text:p>
          </table:table-cell>
          <table:table-cell table:style-name="ce72" office:value-type="string" calcext:value-type="string">
            <text:p>單體</text:p>
          </table:table-cell>
          <table:table-cell table:style-name="ce72" office:value-type="string" calcext:value-type="string">
            <text:p>-</text:p>
          </table:table-cell>
          <table:table-cell table:style-name="ce72" office:value-type="float" office:value="10" calcext:value-type="float">
            <text:p>10</text:p>
          </table:table-cell>
          <table:table-cell table:style-name="ce72" office:value-type="string" calcext:value-type="string">
            <text:p>D-Lois</text:p>
            <text:p>特殊</text:p>
          </table:table-cell>
          <table:table-cell table:style-name="ce72" office:value-type="string" calcext:value-type="string">
            <text:p>1/劇本</text:p>
          </table:table-cell>
          <table:table-cell table:style-name="ce76" office:value-type="string" calcext:value-type="string">
            <text:p>可以與任何能力值判定和技能判定組合。組合的判定暴擊值-LV（下限5）。無法與《集中》《反射》組合。</text:p>
          </table:table-cell>
          <table:table-cell table:style-name="ce72" office:value-type="string" calcext:value-type="string">
            <text:p>DFP39</text:p>
          </table:table-cell>
          <table:table-cell table:style-name="ce72"/>
          <table:table-cell table:number-columns-repeated="1011"/>
        </table:table-row>
        <table:table-row table:style-name="ro1">
          <table:table-cell table:style-name="ce69" office:value-type="string" calcext:value-type="string">
            <text:p>轉化復蘇</text:p>
            <text:p>（trance resurrect）</text:p>
          </table:table-cell>
          <table:table-cell table:style-name="ce72" office:value-type="float" office:value="3" calcext:value-type="float">
            <text:p>3</text:p>
          </table:table-cell>
          <table:table-cell table:style-name="ce72" office:value-type="string" calcext:value-type="string">
            <text:p>自動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5" calcext:value-type="float">
            <text:p>5</text:p>
          </table:table-cell>
          <table:table-cell table:style-name="ce72" office:value-type="string" calcext:value-type="string">
            <text:p>D-Lois</text:p>
            <text:p>特殊</text:p>
          </table:table-cell>
          <table:table-cell table:style-name="ce72" office:value-type="string" calcext:value-type="string">
            <text:p>1/劇本</text:p>
          </table:table-cell>
          <table:table-cell table:style-name="ce76" office:value-type="string" calcext:value-type="string">
            <text:p>改變自己受到損傷的部位，將其改寫成肉體之外的東西。</text:p>
            <text:p>在你使用《復蘇》的場景結束時使用，你的HP恢復到最大值。</text:p>
          </table:table-cell>
          <table:table-cell table:style-name="ce72" office:value-type="string" calcext:value-type="string">
            <text:p>DFP39</text:p>
          </table:table-cell>
          <table:table-cell table:style-name="ce72"/>
          <table:table-cell table:number-columns-repeated="1011"/>
        </table:table-row>
        <table:table-row table:style-name="ro1">
          <table:table-cell table:style-name="ce67" office:value-type="string" calcext:value-type="string">
            <text:p>驚異之體</text:p>
            <text:p>（wonder body）</text:p>
          </table:table-cell>
          <table:table-cell table:style-name="ce72" office:value-type="float" office:value="3" calcext:value-type="float">
            <text:p>3</text:p>
          </table:table-cell>
          <table:table-cell table:style-name="ce72" office:value-type="string" calcext:value-type="string">
            <text:p>次要動作</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10" calcext:value-type="float">
            <text:p>10</text:p>
          </table:table-cell>
          <table:table-cell table:style-name="ce72" office:value-type="string" calcext:value-type="string">
            <text:p>D-Lois</text:p>
            <text:p>特殊</text:p>
          </table:table-cell>
          <table:table-cell table:style-name="ce72" office:value-type="string" calcext:value-type="string">
            <text:p>1/劇本</text:p>
          </table:table-cell>
          <table:table-cell table:style-name="ce76" office:value-type="string" calcext:value-type="string">
            <text:p>改變自己的肉體性質，對抗不適的異能力。</text:p>
            <text:p>重壓狀態下也可使用。回復你受到的所有異常狀態，解除受到的所有異能力效果。</text:p>
          </table:table-cell>
          <table:table-cell table:style-name="ce72" office:value-type="string" calcext:value-type="string">
            <text:p>DFP39</text:p>
          </table:table-cell>
          <table:table-cell table:style-name="ce72"/>
          <table:table-cell table:number-columns-repeated="1011"/>
        </table:table-row>
        <table:table-row table:style-name="ro4" table:number-rows-repeated="1048556">
          <table:table-cell table:number-columns-repeated="1024"/>
        </table:table-row>
        <table:table-row table:style-name="ro4">
          <table:table-cell table:number-columns-repeated="1024"/>
        </table:table-row>
      </table:table>
      <table:table table:name="D-lois No.UA03 封具專用道具" table:style-name="ta13">
        <table:table-column table:style-name="co26" table:default-cell-style-name="Default"/>
        <table:table-column table:style-name="co34" table:default-cell-style-name="Default"/>
        <table:table-column table:style-name="co39" table:default-cell-style-name="Default"/>
        <table:table-column table:style-name="co29" table:default-cell-style-name="Default"/>
        <table:table-column table:style-name="co27" table:default-cell-style-name="Default"/>
        <table:table-column table:style-name="co40" table:default-cell-style-name="Default"/>
        <table:table-column table:style-name="co14" table:default-cell-style-name="Default"/>
        <table:table-column table:style-name="co41" table:default-cell-style-name="Default"/>
        <table:table-column table:style-name="co35" table:default-cell-style-name="Default"/>
        <table:table-column table:style-name="co31" table:default-cell-style-name="Default"/>
        <table:table-column table:style-name="co32" table:number-columns-repeated="2" table:default-cell-style-name="Default"/>
        <table:table-column table:style-name="co4" table:number-columns-repeated="1012" table:default-cell-style-name="Default"/>
        <table:table-row table:style-name="ro1">
          <table:table-cell table:style-name="ce93" office:value-type="string" calcext:value-type="string" table:number-columns-spanned="11" table:number-rows-spanned="1">
            <text:p>武器</text:p>
          </table:table-cell>
          <table:covered-table-cell table:number-columns-repeated="10"/>
          <table:table-cell table:number-columns-repeated="1013"/>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94" office:value-type="string" calcext:value-type="string">
            <text:p>命中</text:p>
          </table:table-cell>
          <table:table-cell table:style-name="ce94" office:value-type="string" calcext:value-type="string">
            <text:p>攻擊力</text:p>
          </table:table-cell>
          <table:table-cell table:style-name="ce94" office:value-type="string" calcext:value-type="string">
            <text:p>格擋值</text:p>
          </table:table-cell>
          <table:table-cell table:style-name="ce94" office:value-type="string" calcext:value-type="string">
            <text:p>射程</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ext:p>解說</text:p>
          </table:table-cell>
          <table:table-cell table:style-name="ce94" office:value-type="string" calcext:value-type="string">
            <text:p>參照</text:p>
          </table:table-cell>
          <table:table-cell table:style-name="ce94" office:value-type="string" calcext:value-type="string">
            <text:p>備註</text:p>
          </table:table-cell>
          <table:table-cell table:number-columns-repeated="1012"/>
        </table:table-row>
        <table:table-row table:style-name="ro1">
          <table:table-cell table:style-name="ce95" office:value-type="string" calcext:value-type="string">
            <text:p>忠義之刀</text:p>
          </table:table-cell>
          <table:table-cell table:style-name="ce95" office:value-type="string" calcext:value-type="string">
            <text:p>近戰</text:p>
          </table:table-cell>
          <table:table-cell table:style-name="ce95" office:value-type="string" calcext:value-type="string">
            <text:p>&lt;近戰&gt;</text:p>
          </table:table-cell>
          <table:table-cell table:style-name="ce95" office:value-type="float" office:value="-1" calcext:value-type="float">
            <text:p>-1</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string" calcext:value-type="string">
            <text:p>至近</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22" office:value-type="string" calcext:value-type="string">
            <text:p>會保護持有者的日本刀型RB。說話使用古風的語氣。</text:p>
            <text:p>封具效果：在對你的HP傷害算出後使用，你預計受到的傷害-20點。</text:p>
          </table:table-cell>
          <table:table-cell table:style-name="ce95" office:value-type="string" calcext:value-type="string">
            <text:p>DF P41</text:p>
          </table:table-cell>
          <table:table-cell table:style-name="ce95"/>
          <table:table-cell table:number-columns-repeated="1012"/>
        </table:table-row>
        <table:table-row table:style-name="ro1">
          <table:table-cell table:style-name="ce95" office:value-type="string" calcext:value-type="string">
            <text:p>飛斧</text:p>
          </table:table-cell>
          <table:table-cell table:style-name="ce95" office:value-type="string" calcext:value-type="string">
            <text:p>近戰</text:p>
          </table:table-cell>
          <table:table-cell table:style-name="ce95" office:value-type="string" calcext:value-type="string">
            <text:p>&lt;近戰&gt;&lt;射擊&gt;</text:p>
          </table:table-cell>
          <table:table-cell table:style-name="ce95" office:value-type="float" office:value="-3" calcext:value-type="float">
            <text:p>-3</text:p>
          </table:table-cell>
          <table:table-cell table:style-name="ce95" office:value-type="float" office:value="12" calcext:value-type="float">
            <text:p>12</text:p>
          </table:table-cell>
          <table:table-cell table:style-name="ce95" office:value-type="float" office:value="2" calcext:value-type="float">
            <text:p>2</text:p>
          </table:table-cell>
          <table:table-cell table:style-name="ce95" office:value-type="string" calcext:value-type="string">
            <text:p>至近/10m</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22" office:value-type="string" calcext:value-type="string">
            <text:p>具有浮游能力、喜歡自由的雙刃斧型RB。這個武器不計入裝備的武器個數中。若以「種類：射擊」使用時，技能與射程採用「/」右側的數值。</text:p>
            <text:p>封具效果：在用這個武器進行近戰攻擊時使用，這一次攻擊變為射程：視界，攻擊力+3D。</text:p>
          </table:table-cell>
          <table:table-cell table:style-name="ce95" office:value-type="string" calcext:value-type="string">
            <text:p>DF P41</text:p>
          </table:table-cell>
          <table:table-cell table:style-name="ce95"/>
          <table:table-cell table:number-columns-repeated="1012"/>
        </table:table-row>
        <table:table-row table:style-name="ro1">
          <table:table-cell table:style-name="ce95" office:value-type="string" calcext:value-type="string">
            <text:p>殺戮的聖甲蟲</text:p>
          </table:table-cell>
          <table:table-cell table:style-name="ce95" office:value-type="string" calcext:value-type="string">
            <text:p>射擊</text:p>
          </table:table-cell>
          <table:table-cell table:style-name="ce95" office:value-type="string" calcext:value-type="string">
            <text:p>&lt;射擊&gt;</text:p>
          </table:table-cell>
          <table:table-cell table:style-name="ce95" office:value-type="float" office:value="0" calcext:value-type="float">
            <text:p>0</text:p>
          </table:table-cell>
          <table:table-cell table:style-name="ce95" office:value-type="float" office:value="20" calcext:value-type="float">
            <text:p>20</text:p>
          </table:table-cell>
          <table:table-cell table:style-name="ce118" office:value-type="string" calcext:value-type="string">
            <text:p>—</text:p>
          </table:table-cell>
          <table:table-cell table:style-name="ce95" office:value-type="string" calcext:value-type="string">
            <text:p>20m</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22" office:value-type="string" calcext:value-type="string">
            <text:p>寶石工藝品形狀的、兇暴的RB。扔出之後會變為昆蟲攻擊。1場景只能使用1次。</text:p>
            <text:p>封具效果：主要動作使用，可以無視這個道具的使用次數進行攻擊，這次攻擊的對象變為範圍（選擇），傷害+2D。</text:p>
          </table:table-cell>
          <table:table-cell table:style-name="ce95" office:value-type="string" calcext:value-type="string">
            <text:p>DF P41</text:p>
          </table:table-cell>
          <table:table-cell table:style-name="ce95"/>
          <table:table-cell table:number-columns-repeated="1012"/>
        </table:table-row>
        <table:table-row table:style-name="ro1">
          <table:table-cell table:style-name="ce95" office:value-type="string" calcext:value-type="string">
            <text:p>妖精弓</text:p>
          </table:table-cell>
          <table:table-cell table:style-name="ce95" office:value-type="string" calcext:value-type="string">
            <text:p>射擊</text:p>
          </table:table-cell>
          <table:table-cell table:style-name="ce95" office:value-type="string" calcext:value-type="string">
            <text:p>&lt;射擊&gt;</text:p>
          </table:table-cell>
          <table:table-cell table:style-name="ce95" office:value-type="float" office:value="0" calcext:value-type="float">
            <text:p>0</text:p>
          </table:table-cell>
          <table:table-cell table:style-name="ce95" office:value-type="float" office:value="9" calcext:value-type="float">
            <text:p>9</text:p>
          </table:table-cell>
          <table:table-cell table:style-name="ce118" office:value-type="string" calcext:value-type="string">
            <text:p>—</text:p>
          </table:table-cell>
          <table:table-cell table:style-name="ce95" office:value-type="string" calcext:value-type="string">
            <text:p>30m</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22" office:value-type="string" calcext:value-type="string">
            <text:p>喜歡惡作劇的植物型RB變成的弓。視為兩手武器，對使用這個武器的攻擊的回應動作骰數-2D。</text:p>
            <text:p>封具效果：在場景中登場的角色進行判定後使用，達成值-20。</text:p>
          </table:table-cell>
          <table:table-cell table:style-name="ce95" office:value-type="string" calcext:value-type="string">
            <text:p>DF P41</text:p>
          </table:table-cell>
          <table:table-cell table:style-name="ce95"/>
          <table:table-cell table:number-columns-repeated="1012"/>
        </table:table-row>
        <table:table-row table:style-name="ro1">
          <table:table-cell table:style-name="ce95" office:value-type="string" calcext:value-type="string">
            <text:p>天才手槍</text:p>
          </table:table-cell>
          <table:table-cell table:style-name="ce95" office:value-type="string" calcext:value-type="string">
            <text:p>射擊</text:p>
          </table:table-cell>
          <table:table-cell table:style-name="ce95" office:value-type="string" calcext:value-type="string">
            <text:p>&lt;射擊&gt;</text:p>
          </table:table-cell>
          <table:table-cell table:number-columns-repeated="2" table:style-name="ce95" office:value-type="float" office:value="5" calcext:value-type="float">
            <text:p>5</text:p>
          </table:table-cell>
          <table:table-cell table:style-name="ce118" office:value-type="string" calcext:value-type="string">
            <text:p>—</text:p>
          </table:table-cell>
          <table:table-cell table:style-name="ce95" office:value-type="string" calcext:value-type="string">
            <text:p>100m</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22" office:value-type="string" calcext:value-type="string">
            <text:p>冷靜、有著極高思考能力的手槍型RB。</text:p>
            <text:p>封具效果：在使用這個武器進行射擊攻擊時使用，對象無法閃避或格擋。</text:p>
          </table:table-cell>
          <table:table-cell table:style-name="ce95" office:value-type="string" calcext:value-type="string">
            <text:p>DF P41</text:p>
          </table:table-cell>
          <table:table-cell table:style-name="ce95"/>
          <table:table-cell table:number-columns-repeated="1012"/>
        </table:table-row>
        <table:table-row table:style-name="ro1">
          <table:table-cell table:style-name="ce96" office:value-type="string" calcext:value-type="string" table:number-columns-spanned="11" table:number-rows-spanned="1">
            <text:p>防具</text:p>
          </table:table-cell>
          <table:covered-table-cell table:number-columns-repeated="10"/>
          <table:table-cell table:number-columns-repeated="1013"/>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回避</text:p>
          </table:table-cell>
          <table:table-cell table:style-name="ce100" office:value-type="string" calcext:value-type="string">
            <text:p>行動值</text:p>
          </table:table-cell>
          <table:table-cell table:style-name="ce100" office:value-type="string" calcext:value-type="string">
            <text:p>裝甲值</text:p>
          </table:table-cell>
          <table:table-cell table:style-name="ce94" office:value-type="string" calcext:value-type="string">
            <text:p>購買/常備化</text:p>
          </table:table-cell>
          <table:table-cell table:style-name="ce94" office:value-type="string" calcext:value-type="string">
            <text:p>必要經驗點</text:p>
          </table:table-cell>
          <table:table-cell table:style-name="ce102" office:value-type="string" calcext:value-type="string" table:number-columns-spanned="3" table:number-rows-spanned="1">
            <text:p>解說</text:p>
          </table:table-cell>
          <table:covered-table-cell table:number-columns-repeated="2" table:style-name="ce106"/>
          <table:table-cell table:style-name="ce94" office:value-type="string" calcext:value-type="string">
            <text:p>參照</text:p>
          </table:table-cell>
          <table:table-cell table:style-name="ce94" office:value-type="string" calcext:value-type="string">
            <text:p>備註</text:p>
          </table:table-cell>
          <table:table-cell table:number-columns-repeated="1012"/>
        </table:table-row>
        <table:table-row table:style-name="ro1">
          <table:table-cell table:style-name="ce97" office:value-type="string" calcext:value-type="string">
            <text:p>黑泥之鎧</text:p>
          </table:table-cell>
          <table:table-cell table:style-name="ce95" office:value-type="string" calcext:value-type="string">
            <text:p>防具</text:p>
          </table:table-cell>
          <table:table-cell table:style-name="ce118" office:value-type="float" office:value="0" calcext:value-type="float">
            <text:p>0</text:p>
          </table:table-cell>
          <table:table-cell table:style-name="ce119" office:value-type="string" calcext:value-type="string">
            <text:p>-2</text:p>
          </table:table-cell>
          <table:table-cell table:style-name="ce118" office:value-type="float" office:value="9" calcext:value-type="float">
            <text:p>9</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21" office:value-type="string" calcext:value-type="string" table:number-columns-spanned="3" table:number-rows-spanned="1">
            <text:p>裝在小瓶中的漆黑的液體形狀的RB。平時沉默，偶爾會露出殘忍的一面。可以用準備階段的自動動作裝備。</text:p>
            <text:p>封具效果：主要階段使用，進行任意手段的攻擊，射程變為[射程：至近]，攻擊力+5D。</text:p>
          </table:table-cell>
          <table:covered-table-cell table:number-columns-repeated="2"/>
          <table:table-cell table:style-name="ce95" office:value-type="string" calcext:value-type="string">
            <text:p>DF P41</text:p>
          </table:table-cell>
          <table:table-cell table:style-name="ce95"/>
          <table:table-cell table:number-columns-repeated="1012"/>
        </table:table-row>
        <table:table-row table:style-name="ro1">
          <table:table-cell table:style-name="ce95" office:value-type="string" calcext:value-type="string">
            <text:p>翼之靴</text:p>
          </table:table-cell>
          <table:table-cell table:style-name="ce95" office:value-type="string" calcext:value-type="string">
            <text:p>防具（輔助）</text:p>
          </table:table-cell>
          <table:table-cell table:style-name="ce118" office:value-type="float" office:value="0" calcext:value-type="float">
            <text:p>0</text:p>
          </table:table-cell>
          <table:table-cell table:style-name="ce119" office:value-type="string" calcext:value-type="string">
            <text:p>0</text:p>
          </table:table-cell>
          <table:table-cell table:style-name="ce118" office:value-type="float" office:value="3" calcext:value-type="float">
            <text:p>3</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21" office:value-type="string" calcext:value-type="string" table:number-columns-spanned="3" table:number-rows-spanned="1">
            <text:p>總是很有精神、性格頑皮的靴子型RB。</text:p>
            <text:p>裝備中，當你進行移動時，變為飛行狀態。</text:p>
            <text:p>封具效果：在你閃避時使用，解除所有你受到的負面狀態，判定的達成值+20。</text:p>
          </table:table-cell>
          <table:covered-table-cell table:number-columns-repeated="2"/>
          <table:table-cell table:style-name="ce95" office:value-type="string" calcext:value-type="string">
            <text:p>DF P41</text:p>
          </table:table-cell>
          <table:table-cell table:style-name="ce95"/>
          <table:table-cell table:number-columns-repeated="1012"/>
        </table:table-row>
        <table:table-row table:style-name="ro1">
          <table:table-cell table:style-name="ce95" office:value-type="string" calcext:value-type="string">
            <text:p>紅斗篷</text:p>
          </table:table-cell>
          <table:table-cell table:style-name="ce95" office:value-type="string" calcext:value-type="string">
            <text:p>防具（輔助）</text:p>
          </table:table-cell>
          <table:table-cell table:style-name="ce118" office:value-type="float" office:value="5" calcext:value-type="float">
            <text:p>5</text:p>
          </table:table-cell>
          <table:table-cell table:style-name="ce119" office:value-type="string" calcext:value-type="string">
            <text:p>0</text:p>
          </table:table-cell>
          <table:table-cell table:style-name="ce118" office:value-type="float" office:value="0" calcext:value-type="float">
            <text:p>0</text:p>
          </table:table-cell>
          <table:table-cell table:style-name="ce119" office:value-type="string" calcext:value-type="string">
            <text:p>購入不可/不可</text:p>
          </table:table-cell>
          <table:table-cell table:style-name="ce118" office:value-type="string" calcext:value-type="string">
            <text:p>—</text:p>
          </table:table-cell>
          <table:table-cell table:style-name="ce121" office:value-type="string" calcext:value-type="string" table:number-columns-spanned="3" table:number-rows-spanned="1">
            <text:p>玩弄眼前之人的紅布斗篷。性格裝腔作勢，但非常高傲。</text:p>
            <text:p>準備階段使用。在這一回合間，場景中登場的一個角色的判定骰子-2個。</text:p>
            <text:p>封具效果：在攻擊對象包含與你處於同一接戰區域的角色時使用，攻擊變為[對象：單體]，對象變為你。</text:p>
          </table:table-cell>
          <table:covered-table-cell table:number-columns-repeated="2"/>
          <table:table-cell table:style-name="ce95" office:value-type="string" calcext:value-type="string">
            <text:p>DF P41</text:p>
          </table:table-cell>
          <table:table-cell table:style-name="ce95"/>
          <table:table-cell table:number-columns-repeated="1012"/>
        </table:table-row>
        <table:table-row table:style-name="ro1">
          <table:table-cell table:style-name="ce96" office:value-type="string" calcext:value-type="string" table:number-columns-spanned="11" table:number-rows-spanned="1">
            <text:p>載具</text:p>
          </table:table-cell>
          <table:covered-table-cell table:number-columns-repeated="10"/>
          <table:table-cell table:number-columns-repeated="1013"/>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94" office:value-type="string" calcext:value-type="string">
            <text:p>攻擊力</text:p>
          </table:table-cell>
          <table:table-cell table:style-name="ce94" office:value-type="string" calcext:value-type="string">
            <text:p>行動值</text:p>
          </table:table-cell>
          <table:table-cell table:style-name="ce94" office:value-type="string" calcext:value-type="string">
            <text:p>裝甲值</text:p>
          </table:table-cell>
          <table:table-cell table:style-name="ce94" office:value-type="string" calcext:value-type="string">
            <text:p>全力移動</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ext:p>解說</text:p>
          </table:table-cell>
          <table:table-cell table:style-name="ce94" office:value-type="string" calcext:value-type="string">
            <text:p>參照</text:p>
          </table:table-cell>
          <table:table-cell table:style-name="ce94" office:value-type="string" calcext:value-type="string">
            <text:p>備註</text:p>
          </table:table-cell>
          <table:table-cell table:number-columns-repeated="1012"/>
        </table:table-row>
        <table:table-row table:style-name="ro1">
          <table:table-cell table:style-name="ce95" office:value-type="string" calcext:value-type="string">
            <text:p>鋼鐵坐騎</text:p>
          </table:table-cell>
          <table:table-cell table:style-name="ce95" office:value-type="string" calcext:value-type="string">
            <text:p>載具</text:p>
          </table:table-cell>
          <table:table-cell table:style-name="ce95" office:value-type="string" calcext:value-type="string">
            <text:p>＜駕駛：二輪＞</text:p>
          </table:table-cell>
          <table:table-cell table:style-name="ce95" office:value-type="float" office:value="9" calcext:value-type="float">
            <text:p>9</text:p>
          </table:table-cell>
          <table:table-cell table:style-name="ce95" office:value-type="float" office:value="0" calcext:value-type="float">
            <text:p>0</text:p>
          </table:table-cell>
          <table:table-cell table:style-name="ce95" office:value-type="float" office:value="9" calcext:value-type="float">
            <text:p>9</text:p>
          </table:table-cell>
          <table:table-cell table:style-name="ce95" office:value-type="string" calcext:value-type="string">
            <text:p>250m</text:p>
          </table:table-cell>
          <table:table-cell table:style-name="ce95" office:value-type="string" calcext:value-type="string">
            <text:p>購買不可/不可</text:p>
          </table:table-cell>
          <table:table-cell table:style-name="ce118" office:value-type="string" calcext:value-type="string">
            <text:p>—</text:p>
          </table:table-cell>
          <table:table-cell table:style-name="ce122" office:value-type="string" calcext:value-type="string">
            <text:p>能夠變形的摩托車型RB。蔑視人類，但會承認主人。</text:p>
            <text:p>封具效果：先制階段使用，你可以與同乘者立刻進行戰鬥移動或者脫離。這時可以無視封鎖或硬直的效果。</text:p>
          </table:table-cell>
          <table:table-cell table:style-name="ce95" office:value-type="string" calcext:value-type="string">
            <text:p>DF P42</text:p>
          </table:table-cell>
          <table:table-cell table:style-name="ce95"/>
          <table:table-cell table:number-columns-repeated="1012"/>
        </table:table-row>
        <table:table-row table:style-name="ro1">
          <table:table-cell table:style-name="ce95" office:value-type="string" calcext:value-type="string">
            <text:p>神秘台座</text:p>
          </table:table-cell>
          <table:table-cell table:style-name="ce95" office:value-type="string" calcext:value-type="string">
            <text:p>載具</text:p>
          </table:table-cell>
          <table:table-cell table:style-name="ce95" office:value-type="string" calcext:value-type="string">
            <text:p>＜駕駛：騎乘動物＞</text:p>
          </table:table-cell>
          <table:table-cell table:style-name="ce95" office:value-type="float" office:value="-3" calcext:value-type="float">
            <text:p>-3</text:p>
          </table:table-cell>
          <table:table-cell table:number-columns-repeated="2" table:style-name="ce95" office:value-type="float" office:value="10" calcext:value-type="float">
            <text:p>10</text:p>
          </table:table-cell>
          <table:table-cell table:style-name="ce95" office:value-type="string" calcext:value-type="string">
            <text:p>150m</text:p>
          </table:table-cell>
          <table:table-cell table:style-name="ce95" office:value-type="string" calcext:value-type="string">
            <text:p>購買不可/不可</text:p>
          </table:table-cell>
          <table:table-cell table:style-name="ce118" office:value-type="string" calcext:value-type="string">
            <text:p>—</text:p>
          </table:table-cell>
          <table:table-cell table:style-name="ce122" office:value-type="string" calcext:value-type="string">
            <text:p>跟隨主人的小動物型RB。可以巨大化，讓主人坐在背上。性格悠閒而粗心大意。</text:p>
            <text:p>準備階段使用，裝備並變更這個道具。</text:p>
            <text:p>封具效果：在使用這個載具進行攻擊時使用，攻擊變為[對象：範圍（選擇）]，傷害+2D。</text:p>
          </table:table-cell>
          <table:table-cell table:style-name="ce95" office:value-type="string" calcext:value-type="string">
            <text:p>DF P42</text:p>
          </table:table-cell>
          <table:table-cell table:style-name="ce95"/>
          <table:table-cell table:number-columns-repeated="1012"/>
        </table:table-row>
        <table:table-row table:style-name="ro1">
          <table:table-cell table:style-name="ce96" office:value-type="string" calcext:value-type="string" table:number-columns-spanned="11" table:number-rows-spanned="1">
            <text:p>其他</text:p>
          </table:table-cell>
          <table:covered-table-cell table:number-columns-repeated="10"/>
          <table:table-cell table:number-columns-repeated="1013"/>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able:number-columns-spanned="5" table:number-rows-spanned="1">
            <text:p>解說</text:p>
          </table:table-cell>
          <table:covered-table-cell table:number-columns-repeated="4" table:style-name="ce106"/>
          <table:table-cell table:style-name="ce94" office:value-type="string" calcext:value-type="string">
            <text:p>參照</text:p>
          </table:table-cell>
          <table:table-cell table:style-name="ce94" office:value-type="string" calcext:value-type="string">
            <text:p>備註</text:p>
          </table:table-cell>
          <table:table-cell table:number-columns-repeated="1012"/>
        </table:table-row>
        <table:table-row table:style-name="ro1">
          <table:table-cell table:style-name="ce97" office:value-type="string" calcext:value-type="string">
            <text:p>嵐之杖</text:p>
          </table:table-cell>
          <table:table-cell table:style-name="ce95" office:value-type="string" calcext:value-type="string">
            <text:p>一般</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118" office:value-type="string" calcext:value-type="string">
            <text:p>—</text:p>
          </table:table-cell>
          <table:table-cell table:style-name="ce103" office:value-type="string" calcext:value-type="string" table:number-columns-spanned="5" table:number-rows-spanned="1">
            <text:p>揮動就能隨意操作天氣的手杖。性格老謀深算，偶爾會使壞。</text:p>
            <text:p>準備階段使用。在這一回合中，你進行的&lt;RC&gt;判定骰數+3個。1場景最多1次。</text:p>
            <text:p>封具效果：準備階段使用，讓場景中登場的一個集團無法戰鬥。</text:p>
          </table:table-cell>
          <table:covered-table-cell table:number-columns-repeated="4" table:style-name="ce107"/>
          <table:table-cell table:style-name="ce95" office:value-type="string" calcext:value-type="string">
            <text:p>DF P42</text:p>
          </table:table-cell>
          <table:table-cell table:style-name="ce95"/>
          <table:table-cell table:number-columns-repeated="1012"/>
        </table:table-row>
        <table:table-row table:style-name="ro1">
          <table:table-cell table:style-name="ce95" office:value-type="string" calcext:value-type="string">
            <text:p>助言的骷髏</text:p>
          </table:table-cell>
          <table:table-cell table:style-name="ce95" office:value-type="string" calcext:value-type="string">
            <text:p>一般</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118" office:value-type="string" calcext:value-type="string">
            <text:p>—</text:p>
          </table:table-cell>
          <table:table-cell table:style-name="ce104" office:value-type="string" calcext:value-type="string" table:number-columns-spanned="5" table:number-rows-spanned="1">
            <text:p>骷髏頭形狀的銀飾。會給予主人建議。個性輕浮而愛說話。</text:p>
            <text:p>在進行主要階段的判定之前使用，這個判定的暴擊值-1（下限6）。1劇本最多可以使用3次。</text:p>
            <text:p>封具效果：使用上述效果時宣言，這次判定的暴擊值再-1（下限5）</text:p>
          </table:table-cell>
          <table:covered-table-cell table:number-columns-repeated="4"/>
          <table:table-cell table:style-name="ce95" office:value-type="string" calcext:value-type="string">
            <text:p>DF P42</text:p>
          </table:table-cell>
          <table:table-cell table:style-name="ce95"/>
          <table:table-cell table:number-columns-repeated="1012"/>
        </table:table-row>
        <table:table-row table:style-name="ro1">
          <table:table-cell table:style-name="ce95" office:value-type="string" calcext:value-type="string">
            <text:p>小櫃子</text:p>
          </table:table-cell>
          <table:table-cell table:style-name="ce95" office:value-type="string" calcext:value-type="string">
            <text:p>一般</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118" office:value-type="string" calcext:value-type="string">
            <text:p>—</text:p>
          </table:table-cell>
          <table:table-cell table:style-name="ce104" office:value-type="string" calcext:value-type="string" table:number-columns-spanned="5" table:number-rows-spanned="1">
            <text:p>能夠拿出主人想要的道具的小箱子型RB。基本上很愛照顧人，偶爾會顯得冷淡。</text:p>
            <text:p>主要動作使用，可以獲得一個購入難度在20以下的道具。1劇本最多使用3次。</text:p>
            <text:p>封具效果：主要階段使用，獲得一個購入難易度40以下的道具並立刻裝備。場景結束時道具會消失。</text:p>
          </table:table-cell>
          <table:covered-table-cell table:number-columns-repeated="4"/>
          <table:table-cell table:style-name="ce95" office:value-type="string" calcext:value-type="string">
            <text:p>DF P42</text:p>
          </table:table-cell>
          <table:table-cell table:style-name="ce95"/>
          <table:table-cell table:number-columns-repeated="1012"/>
        </table:table-row>
        <table:table-row table:style-name="ro1">
          <table:table-cell table:style-name="ce95" office:value-type="string" calcext:value-type="string">
            <text:p>遠見石</text:p>
          </table:table-cell>
          <table:table-cell table:style-name="ce95" office:value-type="string" calcext:value-type="string">
            <text:p>一般</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118" office:value-type="string" calcext:value-type="string">
            <text:p>—</text:p>
          </table:table-cell>
          <table:table-cell table:style-name="ce104" office:value-type="string" calcext:value-type="string" table:number-columns-spanned="5" table:number-rows-spanned="1">
            <text:p>好奇心旺盛的寶石型RB。性格任性，會折騰主人。</text:p>
            <text:p>你進行的【感覺】【精神】的判定骰數+2個。</text:p>
            <text:p>封具效果：在你進行【感覺】【精神】判定之前使用，這個判定的骰數+10個。</text:p>
          </table:table-cell>
          <table:covered-table-cell table:number-columns-repeated="4"/>
          <table:table-cell table:style-name="ce95" office:value-type="string" calcext:value-type="string">
            <text:p>DF P42</text:p>
          </table:table-cell>
          <table:table-cell table:style-name="ce95"/>
          <table:table-cell table:number-columns-repeated="1012"/>
        </table:table-row>
        <table:table-row table:style-name="ro1">
          <table:table-cell table:style-name="ce95" office:value-type="string" calcext:value-type="string">
            <text:p>忠臣之兵</text:p>
          </table:table-cell>
          <table:table-cell table:style-name="ce95" office:value-type="string" calcext:value-type="string">
            <text:p>一般</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118" office:value-type="string" calcext:value-type="string">
            <text:p>—</text:p>
          </table:table-cell>
          <table:table-cell table:style-name="ce104" office:value-type="string" calcext:value-type="string" table:number-columns-spanned="5" table:number-rows-spanned="1">
            <text:p>黑檀木製成的國際象棋棋子RB。一套只有五枚兵。會將主人作為君主加以保護，有點吵。</text:p>
            <text:p>在計算你受到的HP傷害之後使用。你（預計）受到的傷害-5。1劇本最多使用5次。</text:p>
            <text:p>封具效果：在你進行攻擊、投擲傷害骰時使用，傷害+16。</text:p>
          </table:table-cell>
          <table:covered-table-cell table:number-columns-repeated="4"/>
          <table:table-cell table:style-name="ce95" office:value-type="string" calcext:value-type="string">
            <text:p>DF P42</text:p>
          </table:table-cell>
          <table:table-cell table:style-name="ce95"/>
          <table:table-cell table:number-columns-repeated="1012"/>
        </table:table-row>
        <table:table-row table:style-name="ro1">
          <table:table-cell table:style-name="ce95" office:value-type="string" calcext:value-type="string">
            <text:p>七彩人偶</text:p>
          </table:table-cell>
          <table:table-cell table:style-name="ce95" office:value-type="string" calcext:value-type="string">
            <text:p>一般</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118" office:value-type="string" calcext:value-type="string">
            <text:p>—</text:p>
          </table:table-cell>
          <table:table-cell table:style-name="ce104" office:value-type="string" calcext:value-type="string" table:number-columns-spanned="5" table:number-rows-spanned="1">
            <text:p>小小的人形RB。能夠變身成想變成的人類、潛入各種地方。對主人有獻身精神，但嫉妒心很強。</text:p>
            <text:p>你進行的情報收集判定的&lt;情報：&gt;達成值+5。</text:p>
            <text:p>封具效果：在無法戰鬥時使用，回復無法戰鬥狀態，HP恢復到1點。</text:p>
          </table:table-cell>
          <table:covered-table-cell table:number-columns-repeated="4"/>
          <table:table-cell table:style-name="ce95" office:value-type="string" calcext:value-type="string">
            <text:p>DF P42</text:p>
          </table:table-cell>
          <table:table-cell table:style-name="ce95"/>
          <table:table-cell table:number-columns-repeated="1012"/>
        </table:table-row>
        <table:table-row table:style-name="ro1">
          <table:table-cell table:style-name="ce95" office:value-type="string" calcext:value-type="string">
            <text:p>不可視之王冠</text:p>
          </table:table-cell>
          <table:table-cell table:style-name="ce95" office:value-type="string" calcext:value-type="string">
            <text:p>一般</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118" office:value-type="string" calcext:value-type="string">
            <text:p>—</text:p>
          </table:table-cell>
          <table:table-cell table:style-name="ce104" office:value-type="string" calcext:value-type="string" table:number-columns-spanned="5" table:number-rows-spanned="1">
            <text:p>王冠型的RB。透明、感受不到重量，只有無機質的聲音在不斷誘惑著持有者走向榮光。</text:p>
            <text:p>你進行的&lt;交涉&gt;判定骰數+3個。</text:p>
            <text:p>封具效果：在你進行&lt;交涉&gt;判定前使用，判定骰數+12個。</text:p>
          </table:table-cell>
          <table:covered-table-cell table:number-columns-repeated="4"/>
          <table:table-cell table:style-name="ce95" office:value-type="string" calcext:value-type="string">
            <text:p>DF P42</text:p>
          </table:table-cell>
          <table:table-cell table:style-name="ce95"/>
          <table:table-cell table:number-columns-repeated="1012"/>
        </table:table-row>
        <table:table-row table:style-name="ro4" table:number-rows-repeated="1048550">
          <table:table-cell table:number-columns-repeated="1024"/>
        </table:table-row>
        <table:table-row table:style-name="ro4">
          <table:table-cell table:number-columns-repeated="1024"/>
        </table:table-row>
      </table:table>
      <table:table table:name="D-lois No.UA11 本質的根源異能" table:style-name="ta14">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16" table:default-cell-style-name="Default"/>
        <table:table-column table:style-name="co19" table:default-cell-style-name="Default"/>
        <table:table-column table:style-name="co21" table:default-cell-style-name="Default"/>
        <table:table-column table:style-name="co22" table:default-cell-style-name="Default"/>
        <table:table-column table:style-name="co24" table:default-cell-style-name="Default"/>
        <table:table-column table:style-name="co4" table:number-columns-repeated="1011" table:default-cell-style-name="Default"/>
        <table:table-row table:style-name="ro1">
          <table:table-cell table:style-name="ce51" office:value-type="string" calcext:value-type="string">
            <text:p>名稱</text:p>
          </table:table-cell>
          <table:table-cell table:style-name="ce71" office:value-type="string" calcext:value-type="string">
            <text:p>最大等級</text:p>
          </table:table-cell>
          <table:table-cell table:style-name="ce71" office:value-type="string" calcext:value-type="string">
            <text:p>時機</text:p>
          </table:table-cell>
          <table:table-cell table:style-name="ce71" office:value-type="string" calcext:value-type="string">
            <text:p>技能</text:p>
          </table:table-cell>
          <table:table-cell table:style-name="ce71" office:value-type="string" calcext:value-type="string">
            <text:p>難易度</text:p>
          </table:table-cell>
          <table:table-cell table:style-name="ce71" office:value-type="string" calcext:value-type="string">
            <text:p>對象</text:p>
          </table:table-cell>
          <table:table-cell table:style-name="ce71" office:value-type="string" calcext:value-type="string">
            <text:p>射程</text:p>
          </table:table-cell>
          <table:table-cell table:style-name="ce71" office:value-type="string" calcext:value-type="string">
            <text:p>侵蝕值</text:p>
          </table:table-cell>
          <table:table-cell table:style-name="ce71" office:value-type="string" calcext:value-type="string">
            <text:p>限制</text:p>
          </table:table-cell>
          <table:table-cell table:style-name="ce71" office:value-type="string" calcext:value-type="string">
            <text:p>次數</text:p>
          </table:table-cell>
          <table:table-cell table:style-name="ce51" office:value-type="string" calcext:value-type="string">
            <text:p>效果</text:p>
          </table:table-cell>
          <table:table-cell table:style-name="ce71" office:value-type="string" calcext:value-type="string">
            <text:p>參照</text:p>
          </table:table-cell>
          <table:table-cell table:style-name="ce71" office:value-type="string" calcext:value-type="string">
            <text:p>備註</text:p>
          </table:table-cell>
          <table:table-cell table:number-columns-repeated="1011"/>
        </table:table-row>
        <table:table-row table:style-name="ro1">
          <table:table-cell table:style-name="ce55" office:value-type="string" calcext:value-type="string" table:number-columns-spanned="13" table:number-rows-spanned="1">
            <text:p>這裡介紹的異能僅能由持有D-Lois：本質的根源的角色獲得。異能的最大等級不會因血統而改變。另外，〈深層實現〉不論已取得哪一種《起源：●●》，皆可取得。</text:p>
          </table:table-cell>
          <table:covered-table-cell table:number-columns-repeated="11" table:style-name="ce42"/>
          <table:covered-table-cell table:style-name="ce120"/>
          <table:table-cell table:number-columns-repeated="1011"/>
        </table:table-row>
        <table:table-row table:style-name="ro1">
          <table:table-cell table:style-name="ce55" office:value-type="string" calcext:value-type="string">
            <text:p>野獸奮起</text:p>
            <text:p>（beast rave）</text:p>
          </table:table-cell>
          <table:table-cell table:style-name="ce72" office:value-type="float" office:value="3" calcext:value-type="float">
            <text:p>3</text:p>
          </table:table-cell>
          <table:table-cell table:style-name="ce72" office:value-type="string" calcext:value-type="string">
            <text:p>主要動作</text:p>
          </table:table-cell>
          <table:table-cell table:style-name="ce72" office:value-type="string" calcext:value-type="string">
            <text:p>〈近戰〉</text:p>
          </table:table-cell>
          <table:table-cell table:number-columns-repeated="3" table:style-name="ce72" office:value-type="string" calcext:value-type="string">
            <text:p>-</text:p>
          </table:table-cell>
          <table:table-cell table:style-name="ce72" office:value-type="float" office:value="4" calcext:value-type="float">
            <text:p>4</text:p>
          </table:table-cell>
          <table:table-cell table:style-name="ce72" office:value-type="string" calcext:value-type="string">
            <text:p>D-Lois</text:p>
            <text:p>《起源：動物》</text:p>
          </table:table-cell>
          <table:table-cell table:style-name="ce72" office:value-type="string" calcext:value-type="string">
            <text:p>3/劇本</text:p>
          </table:table-cell>
          <table:table-cell table:style-name="ce76" office:value-type="string" calcext:value-type="string">
            <text:p>用內在的生存本能暫時強化身體的異能力。</text:p>
            <text:p>取得時需要《起源：動物》。組合的近戰攻擊傷害+[LV×3]。當你受到暴走時，再加上[《起源：動物》的LV×2]。</text:p>
          </table:table-cell>
          <table:table-cell table:style-name="ce72" office:value-type="string" calcext:value-type="string">
            <text:p>DFP40</text:p>
          </table:table-cell>
          <table:table-cell table:style-name="ce72"/>
          <table:table-cell table:number-columns-repeated="1011"/>
        </table:table-row>
        <table:table-row table:style-name="ro1">
          <table:table-cell table:style-name="ce80" office:value-type="string" calcext:value-type="string">
            <text:p>爆發性增殖</text:p>
          </table:table-cell>
          <table:table-cell table:style-name="ce72" office:value-type="float" office:value="3" calcext:value-type="float">
            <text:p>3</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單體</text:p>
          </table:table-cell>
          <table:table-cell table:style-name="ce72" office:value-type="string" calcext:value-type="string">
            <text:p>視界</text:p>
          </table:table-cell>
          <table:table-cell table:style-name="ce72" office:value-type="float" office:value="6" calcext:value-type="float">
            <text:p>6</text:p>
          </table:table-cell>
          <table:table-cell table:style-name="ce72" office:value-type="string" calcext:value-type="string">
            <text:p>D-Lois</text:p>
            <text:p>《起源：群集》</text:p>
          </table:table-cell>
          <table:table-cell table:style-name="ce72" office:value-type="string" calcext:value-type="string">
            <text:p>1/場景</text:p>
          </table:table-cell>
          <table:table-cell table:style-name="ce76" office:value-type="string" calcext:value-type="string">
            <text:p>極速成長自己的肉體，埋沒周圍的異能力。</text:p>
            <text:p>取得時需要《起源：集群》。在這一回合中，對象進行的判定的達成值-[LV×2],再減去[《起源：集群》的LV×2]。</text:p>
          </table:table-cell>
          <table:table-cell table:style-name="ce72" office:value-type="string" calcext:value-type="string">
            <text:p>DFP40</text:p>
          </table:table-cell>
          <table:table-cell table:style-name="ce72"/>
          <table:table-cell table:number-columns-repeated="1011"/>
        </table:table-row>
        <table:table-row table:style-name="ro1">
          <table:table-cell table:style-name="ce80" office:value-type="string" calcext:value-type="string">
            <text:p>巨型蜘蛛</text:p>
            <text:p>（queen spider）</text:p>
          </table:table-cell>
          <table:table-cell table:style-name="ce72" office:value-type="float" office:value="3" calcext:value-type="float">
            <text:p>3</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3體</text:p>
          </table:table-cell>
          <table:table-cell table:style-name="ce72" office:value-type="string" calcext:value-type="string">
            <text:p>視界</text:p>
          </table:table-cell>
          <table:table-cell table:style-name="ce72" office:value-type="float" office:value="4" calcext:value-type="float">
            <text:p>4</text:p>
          </table:table-cell>
          <table:table-cell table:style-name="ce72" office:value-type="string" calcext:value-type="string">
            <text:p>D-Lois</text:p>
            <text:p>《起源：網路》</text:p>
          </table:table-cell>
          <table:table-cell table:style-name="ce72" office:value-type="string" calcext:value-type="string">
            <text:p>LV/劇本</text:p>
          </table:table-cell>
          <table:table-cell table:style-name="ce76" office:value-type="string" calcext:value-type="string">
            <text:p>掌控周圍一帶的電子機器，協助同伴的異能力。</text:p>
            <text:p>取得時需要《起源：電子》。組合的判定變為3體，在這一回合中，對象進行的判定的達成值+[《起源：電子》的LV×2]。</text:p>
          </table:table-cell>
          <table:table-cell table:style-name="ce72" office:value-type="string" calcext:value-type="string">
            <text:p>DFP40</text:p>
          </table:table-cell>
          <table:table-cell table:style-name="ce72"/>
          <table:table-cell table:number-columns-repeated="1011"/>
        </table:table-row>
        <table:table-row table:style-name="ro1">
          <table:table-cell table:style-name="ce55" office:value-type="string" calcext:value-type="string">
            <text:p>超越</text:p>
            <text:p>（overcome）</text:p>
          </table:table-cell>
          <table:table-cell table:style-name="ce72" office:value-type="float" office:value="5" calcext:value-type="float">
            <text:p>5</text:p>
          </table:table-cell>
          <table:table-cell table:style-name="ce72" office:value-type="string" calcext:value-type="string">
            <text:p>主要動作</text:p>
          </table:table-cell>
          <table:table-cell table:style-name="ce72" office:value-type="string" calcext:value-type="string">
            <text:p>參照效果</text:p>
          </table:table-cell>
          <table:table-cell table:number-columns-repeated="3" table:style-name="ce72" office:value-type="string" calcext:value-type="string">
            <text:p>-</text:p>
          </table:table-cell>
          <table:table-cell table:style-name="ce72" office:value-type="float" office:value="7" calcext:value-type="float">
            <text:p>7</text:p>
          </table:table-cell>
          <table:table-cell table:style-name="ce72" office:value-type="string" calcext:value-type="string">
            <text:p>D-Lois</text:p>
            <text:p>《起源：人類》</text:p>
          </table:table-cell>
          <table:table-cell table:style-name="ce72" office:value-type="string" calcext:value-type="string">
            <text:p>LV/劇本</text:p>
          </table:table-cell>
          <table:table-cell table:style-name="ce76" office:value-type="string" calcext:value-type="string">
            <text:p>能夠最大限度激發你作為人類和背教者的可能性的異能力。</text:p>
            <text:p>取得時需要《起源：人類》。可以和任何能力值判定或技能判定組合，組合的判定的達成值+[《起源：人類》的LV×2]。</text:p>
          </table:table-cell>
          <table:table-cell table:style-name="ce72" office:value-type="string" calcext:value-type="string">
            <text:p>DFP40</text:p>
          </table:table-cell>
          <table:table-cell table:style-name="ce72"/>
          <table:table-cell table:number-columns-repeated="1011"/>
        </table:table-row>
        <table:table-row table:style-name="ro1">
          <table:table-cell table:style-name="ce80" office:value-type="string" calcext:value-type="string">
            <text:p>森之王</text:p>
          </table:table-cell>
          <table:table-cell table:style-name="ce72" office:value-type="float" office:value="3" calcext:value-type="float">
            <text:p>3</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3體</text:p>
          </table:table-cell>
          <table:table-cell table:style-name="ce72" office:value-type="string" calcext:value-type="string">
            <text:p>視界</text:p>
          </table:table-cell>
          <table:table-cell table:style-name="ce72" office:value-type="float" office:value="4" calcext:value-type="float">
            <text:p>4</text:p>
          </table:table-cell>
          <table:table-cell table:style-name="ce72" office:value-type="string" calcext:value-type="string">
            <text:p>D-Lois</text:p>
            <text:p>《起源：植物》</text:p>
          </table:table-cell>
          <table:table-cell table:style-name="ce72" office:value-type="string" calcext:value-type="string">
            <text:p>LV/劇本</text:p>
          </table:table-cell>
          <table:table-cell table:style-name="ce76" office:value-type="string" calcext:value-type="string">
            <text:p>提高感覺，完全把握對象行動的異能力。取得時需要《起源：植物》。組合的判定變為3體，在這一回合間對象的行動值-[《起源：植物》的LV×2]。</text:p>
          </table:table-cell>
          <table:table-cell table:style-name="ce72" office:value-type="string" calcext:value-type="string">
            <text:p>DFP40</text:p>
          </table:table-cell>
          <table:table-cell table:style-name="ce72"/>
          <table:table-cell table:number-columns-repeated="1011"/>
        </table:table-row>
        <table:table-row table:style-name="ro1">
          <table:table-cell table:style-name="ce80" office:value-type="string" calcext:value-type="string">
            <text:p>超硬度結合</text:p>
          </table:table-cell>
          <table:table-cell table:style-name="ce72" office:value-type="float" office:value="3" calcext:value-type="float">
            <text:p>3</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2" calcext:value-type="float">
            <text:p>2</text:p>
          </table:table-cell>
          <table:table-cell table:style-name="ce72" office:value-type="string" calcext:value-type="string">
            <text:p>D-Lois</text:p>
            <text:p>《起源：礦物》</text:p>
          </table:table-cell>
          <table:table-cell table:style-name="ce72" office:value-type="string" calcext:value-type="string">
            <text:p>3/劇本</text:p>
          </table:table-cell>
          <table:table-cell table:style-name="ce76" office:value-type="string" calcext:value-type="string">
            <text:p>將肉體的硬度提高到極限，進行攻擊的異能力。</text:p>
            <text:p>取得時需要《起源：礦物》。這一場景中，你進行的攻擊的攻擊力+[LV×2]+[《起源：礦物》的LV×2]。</text:p>
          </table:table-cell>
          <table:table-cell table:style-name="ce72" office:value-type="string" calcext:value-type="string">
            <text:p>DFP40</text:p>
          </table:table-cell>
          <table:table-cell table:style-name="ce72"/>
          <table:table-cell table:number-columns-repeated="1011"/>
        </table:table-row>
        <table:table-row table:style-name="ro1">
          <table:table-cell table:style-name="ce80" office:value-type="string" calcext:value-type="string">
            <text:p>舞臺之上</text:p>
          </table:table-cell>
          <table:table-cell table:style-name="ce72" office:value-type="float" office:value="3" calcext:value-type="float">
            <text:p>3</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3" calcext:value-type="float">
            <text:p>3</text:p>
          </table:table-cell>
          <table:table-cell table:style-name="ce72" office:value-type="string" calcext:value-type="string">
            <text:p>D-Lois</text:p>
            <text:p>《起源：傳說》</text:p>
          </table:table-cell>
          <table:table-cell table:style-name="ce72" office:value-type="string" calcext:value-type="string">
            <text:p>LV/劇本</text:p>
          </table:table-cell>
          <table:table-cell table:style-name="ce76" office:value-type="string" calcext:value-type="string">
            <text:p>操縱周圍的狀況，將周圍變為你能自由發揮的舞臺的異能力。</text:p>
            <text:p>取得時需要《起源：傳說》。在這一回合間，你的【行動值】+[《起源：傳說》的LV×3]。</text:p>
          </table:table-cell>
          <table:table-cell table:style-name="ce72" office:value-type="string" calcext:value-type="string">
            <text:p>DFP40</text:p>
          </table:table-cell>
          <table:table-cell table:style-name="ce72"/>
          <table:table-cell table:number-columns-repeated="1011"/>
        </table:table-row>
        <table:table-row table:style-name="ro1">
          <table:table-cell table:style-name="ce80" office:value-type="string" calcext:value-type="string">
            <text:p>深層察覺</text:p>
          </table:table-cell>
          <table:table-cell table:style-name="ce72" office:value-type="float" office:value="3" calcext:value-type="float">
            <text:p>3</text:p>
          </table:table-cell>
          <table:table-cell table:style-name="ce72" office:value-type="string" calcext:value-type="string">
            <text:p>準備階段</text:p>
          </table:table-cell>
          <table:table-cell table:style-name="ce72" office:value-type="string" calcext:value-type="string">
            <text:p>-</text:p>
          </table:table-cell>
          <table:table-cell table:style-name="ce72" office:value-type="string" calcext:value-type="string">
            <text:p>自動成功</text:p>
          </table:table-cell>
          <table:table-cell table:style-name="ce72" office:value-type="string" calcext:value-type="string">
            <text:p>自身</text:p>
          </table:table-cell>
          <table:table-cell table:style-name="ce72" office:value-type="string" calcext:value-type="string">
            <text:p>至近</text:p>
          </table:table-cell>
          <table:table-cell table:style-name="ce72" office:value-type="float" office:value="5" calcext:value-type="float">
            <text:p>5</text:p>
          </table:table-cell>
          <table:table-cell table:style-name="ce72" office:value-type="string" calcext:value-type="string">
            <text:p>D-Lois</text:p>
          </table:table-cell>
          <table:table-cell table:style-name="ce72" office:value-type="string" calcext:value-type="string">
            <text:p>1/劇本</text:p>
          </table:table-cell>
          <table:table-cell table:style-name="ce76" office:value-type="string" calcext:value-type="string">
            <text:p>更加接近自身起源的異能力。</text:p>
            <text:p>這一場景中，你所取得的《起源：●●》的等級+LV，此時可超過LV的上限。</text:p>
          </table:table-cell>
          <table:table-cell table:style-name="ce72" office:value-type="string" calcext:value-type="string">
            <text:p>DFP40</text:p>
          </table:table-cell>
          <table:table-cell table:style-name="ce72"/>
          <table:table-cell table:number-columns-repeated="1011"/>
        </table:table-row>
        <table:table-row table:style-name="ro4" table:number-rows-repeated="1048565">
          <table:table-cell table:number-columns-repeated="1024"/>
        </table:table-row>
        <table:table-row table:style-name="ro4">
          <table:table-cell table:number-columns-repeated="1024"/>
        </table:table-row>
      </table:table>
      <table:table table:name="D-lois No.RW06 前反派專用道具" table:style-name="ta15">
        <table:table-column table:style-name="co26" table:default-cell-style-name="Default"/>
        <table:table-column table:style-name="co34" table:default-cell-style-name="Default"/>
        <table:table-column table:style-name="co39" table:default-cell-style-name="Default"/>
        <table:table-column table:style-name="co29" table:default-cell-style-name="Default"/>
        <table:table-column table:style-name="co27" table:default-cell-style-name="Default"/>
        <table:table-column table:style-name="co40" table:default-cell-style-name="Default"/>
        <table:table-column table:style-name="co14" table:default-cell-style-name="Default"/>
        <table:table-column table:style-name="co41" table:default-cell-style-name="Default"/>
        <table:table-column table:style-name="co35" table:default-cell-style-name="Default"/>
        <table:table-column table:style-name="co31" table:default-cell-style-name="Default"/>
        <table:table-column table:style-name="co32" table:number-columns-repeated="2" table:default-cell-style-name="Default"/>
        <table:table-column table:style-name="co4" table:number-columns-repeated="1012" table:default-cell-style-name="Default"/>
        <table:table-row table:style-name="ro1">
          <table:table-cell table:style-name="ce93" office:value-type="string" calcext:value-type="string" table:number-columns-spanned="11" table:number-rows-spanned="1">
            <text:p>武器</text:p>
          </table:table-cell>
          <table:covered-table-cell table:number-columns-repeated="10"/>
          <table:table-cell table:number-columns-repeated="1013"/>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94" office:value-type="string" calcext:value-type="string">
            <text:p>命中</text:p>
          </table:table-cell>
          <table:table-cell table:style-name="ce94" office:value-type="string" calcext:value-type="string">
            <text:p>攻擊力</text:p>
          </table:table-cell>
          <table:table-cell table:style-name="ce94" office:value-type="string" calcext:value-type="string">
            <text:p>格擋值</text:p>
          </table:table-cell>
          <table:table-cell table:style-name="ce94" office:value-type="string" calcext:value-type="string">
            <text:p>射程</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ext:p>解說</text:p>
          </table:table-cell>
          <table:table-cell table:style-name="ce94" office:value-type="string" calcext:value-type="string">
            <text:p>參照</text:p>
          </table:table-cell>
          <table:table-cell table:style-name="ce94" office:value-type="string" calcext:value-type="string">
            <text:p>備註</text:p>
          </table:table-cell>
          <table:table-cell table:number-columns-repeated="1012"/>
        </table:table-row>
        <table:table-row table:style-name="ro1">
          <table:table-cell table:style-name="ce95" office:value-type="string" calcext:value-type="string">
            <text:p>破答者</text:p>
          </table:table-cell>
          <table:table-cell table:style-name="ce95" office:value-type="string" calcext:value-type="string">
            <text:p>近戰</text:p>
          </table:table-cell>
          <table:table-cell table:style-name="ce95" office:value-type="string" calcext:value-type="string">
            <text:p>&lt;近戰&gt;</text:p>
          </table:table-cell>
          <table:table-cell table:style-name="ce95" office:value-type="float" office:value="-2" calcext:value-type="float">
            <text:p>-2</text:p>
          </table:table-cell>
          <table:table-cell table:style-name="ce95" office:value-type="float" office:value="8" calcext:value-type="float">
            <text:p>8</text:p>
          </table:table-cell>
          <table:table-cell table:style-name="ce95" office:value-type="float" office:value="1" calcext:value-type="float">
            <text:p>1</text:p>
          </table:table-cell>
          <table:table-cell table:style-name="ce95" office:value-type="string" calcext:value-type="string">
            <text:p>至近</text:p>
          </table:table-cell>
          <table:table-cell table:style-name="ce119" office:value-type="string" calcext:value-type="string">
            <text:p>購入不可/不可</text:p>
          </table:table-cell>
          <table:table-cell table:style-name="ce118" office:value-type="float" office:value="20" calcext:value-type="float">
            <text:p>20</text:p>
          </table:table-cell>
          <table:table-cell table:style-name="ce8" office:value-type="string" calcext:value-type="string">
            <text:p>感染了會分泌猛毒之EX背教者病毒的刀。這把刀的性質接近被稱為「對抗種」的背教者，其毒素僅對超越者有害。</text:p>
            <text:p/>
            <text:p>若此武器攻擊的對象為超越者，傷害+1D。</text:p>
            <text:p>若攻擊對象為複數，需分別計算各自傷害。</text:p>
            <text:p/>
            <text:p>每次使用此武器進行攻擊後，你會失去3點HP。。</text:p>
          </table:table-cell>
          <table:table-cell table:style-name="ce95" office:value-type="string" calcext:value-type="string">
            <text:p>CE P56</text:p>
          </table:table-cell>
          <table:table-cell table:style-name="ce95"/>
          <table:table-cell table:number-columns-repeated="1012"/>
        </table:table-row>
        <table:table-row table:style-name="ro1">
          <table:table-cell table:style-name="ce95" office:value-type="string" calcext:value-type="string">
            <text:p>賭場荷官</text:p>
          </table:table-cell>
          <table:table-cell table:style-name="ce95" office:value-type="string" calcext:value-type="string">
            <text:p>射擊</text:p>
          </table:table-cell>
          <table:table-cell table:style-name="ce95" office:value-type="string" calcext:value-type="string">
            <text:p>&lt;射擊&gt;</text:p>
          </table:table-cell>
          <table:table-cell table:style-name="ce95" office:value-type="float" office:value="-2" calcext:value-type="float">
            <text:p>-2</text:p>
          </table:table-cell>
          <table:table-cell table:style-name="ce95" office:value-type="float" office:value="11" calcext:value-type="float">
            <text:p>11</text:p>
          </table:table-cell>
          <table:table-cell table:style-name="ce118" office:value-type="string" calcext:value-type="string">
            <text:p>—</text:p>
          </table:table-cell>
          <table:table-cell table:style-name="ce95" office:value-type="string" calcext:value-type="string">
            <text:p>50m</text:p>
          </table:table-cell>
          <table:table-cell table:style-name="ce119" office:value-type="string" calcext:value-type="string">
            <text:p>購入不可/不可</text:p>
          </table:table-cell>
          <table:table-cell table:style-name="ce118" office:value-type="float" office:value="20" calcext:value-type="float">
            <text:p>20</text:p>
          </table:table-cell>
          <table:table-cell table:style-name="ce110" office:value-type="string" calcext:value-type="string">
            <text:p>別名「敗犬殺手」的衝鋒槍。據說附著了眾多反派與其所殺害之受害者的怨念。</text:p>
            <text:p/>
            <text:p>若此武器攻擊的對象已受到至少1點HP傷害，則該次判定骰+4顆。</text:p>
          </table:table-cell>
          <table:table-cell table:style-name="ce95" office:value-type="string" calcext:value-type="string">
            <text:p>CE P56</text:p>
          </table:table-cell>
          <table:table-cell table:style-name="ce95"/>
          <table:table-cell table:number-columns-repeated="1012"/>
        </table:table-row>
        <table:table-row table:style-name="ro1">
          <table:table-cell table:style-name="ce95" office:value-type="string" calcext:value-type="string">
            <text:p>自殺小丑</text:p>
          </table:table-cell>
          <table:table-cell table:style-name="ce95" office:value-type="string" calcext:value-type="string">
            <text:p>射擊</text:p>
          </table:table-cell>
          <table:table-cell table:style-name="ce95" office:value-type="string" calcext:value-type="string">
            <text:p>&lt;射擊&gt;</text:p>
          </table:table-cell>
          <table:table-cell table:number-columns-repeated="2" table:style-name="ce95" office:value-type="float" office:value="5" calcext:value-type="float">
            <text:p>5</text:p>
          </table:table-cell>
          <table:table-cell table:style-name="ce118" office:value-type="string" calcext:value-type="string">
            <text:p>—</text:p>
          </table:table-cell>
          <table:table-cell table:style-name="ce95" office:value-type="string" calcext:value-type="string">
            <text:p>100m</text:p>
          </table:table-cell>
          <table:table-cell table:style-name="ce119" office:value-type="string" calcext:value-type="string">
            <text:p>購入不可/不可</text:p>
          </table:table-cell>
          <table:table-cell table:style-name="ce118" office:value-type="float" office:value="20" calcext:value-type="float">
            <text:p>20</text:p>
          </table:table-cell>
          <table:table-cell table:style-name="ce110" office:value-type="string" calcext:value-type="string">
            <text:p>感染了煉金化形EX背教者病毒的無人機型炸彈。會自動追蹤攻擊目標，接觸後發生大爆炸。爆炸後會自動再構築並返回。</text:p>
            <text:p/>
            <text:p>以此武器進行的射擊攻擊在計算傷害時無視目標的裝甲值。</text:p>
            <text:p>此武器每個劇本可使用3次。</text:p>
          </table:table-cell>
          <table:table-cell table:style-name="ce95" office:value-type="string" calcext:value-type="string">
            <text:p>CE P56</text:p>
          </table:table-cell>
          <table:table-cell table:style-name="ce95"/>
          <table:table-cell table:number-columns-repeated="1012"/>
        </table:table-row>
        <table:table-row table:style-name="ro1">
          <table:table-cell table:style-name="ce96" office:value-type="string" calcext:value-type="string" table:number-columns-spanned="11" table:number-rows-spanned="1">
            <text:p>其他</text:p>
          </table:table-cell>
          <table:covered-table-cell table:number-columns-repeated="10"/>
          <table:table-cell table:number-columns-repeated="1013"/>
        </table:table-row>
        <table:table-row table:style-name="ro1">
          <table:table-cell table:style-name="ce94" office:value-type="string" calcext:value-type="string">
            <text:p>名稱</text:p>
          </table:table-cell>
          <table:table-cell table:style-name="ce94" office:value-type="string" calcext:value-type="string">
            <text:p>種類</text:p>
          </table:table-cell>
          <table:table-cell table:style-name="ce94" office:value-type="string" calcext:value-type="string">
            <text:p>技能</text:p>
          </table:table-cell>
          <table:table-cell table:style-name="ce100" office:value-type="string" calcext:value-type="string">
            <text:p>購買/常備化</text:p>
          </table:table-cell>
          <table:table-cell table:style-name="ce100" office:value-type="string" calcext:value-type="string">
            <text:p>必要經驗點</text:p>
          </table:table-cell>
          <table:table-cell table:style-name="ce102" office:value-type="string" calcext:value-type="string" table:number-columns-spanned="5" table:number-rows-spanned="1">
            <text:p>解說</text:p>
          </table:table-cell>
          <table:covered-table-cell table:number-columns-repeated="4" table:style-name="ce106"/>
          <table:table-cell table:style-name="ce94" office:value-type="string" calcext:value-type="string">
            <text:p>參照</text:p>
          </table:table-cell>
          <table:table-cell table:style-name="ce94" office:value-type="string" calcext:value-type="string">
            <text:p>備註</text:p>
          </table:table-cell>
          <table:table-cell table:number-columns-repeated="1012"/>
        </table:table-row>
        <table:table-row table:style-name="ro1">
          <table:table-cell table:style-name="ce97" office:value-type="string" calcext:value-type="string">
            <text:p>幽靈</text:p>
          </table:table-cell>
          <table:table-cell table:style-name="ce95" office:value-type="string" calcext:value-type="string">
            <text:p>其他</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118" office:value-type="float" office:value="20" calcext:value-type="float">
            <text:p>20</text:p>
          </table:table-cell>
          <table:table-cell table:style-name="ce103" office:value-type="string" calcext:value-type="string" table:number-columns-spanned="5" table:number-rows-spanned="1">
            <text:p>外觀宛如裸露骨骼的強化骨架義手。平時偽裝得近似生身並縮小收納，但完全展開後會變得極為修長，左右明顯不對稱。</text:p>
            <text:p>你的徒手數據變更為以下內容。</text:p>
            <text:p>若你使用會變更徒手數據的異能，則此裝備效果失效。</text:p>
            <text:p/>
            <text:p>種類：近戰</text:p>
            <text:p>技能：〈近戰〉</text:p>
            <text:p>命中：-2</text:p>
            <text:p>攻擊力：+9</text:p>
            <text:p>格檔值：5</text:p>
            <text:p>射程：5m</text:p>
          </table:table-cell>
          <table:covered-table-cell table:number-columns-repeated="4" table:style-name="ce107"/>
          <table:table-cell table:style-name="ce95" office:value-type="string" calcext:value-type="string">
            <text:p>CE P56</text:p>
          </table:table-cell>
          <table:table-cell table:style-name="ce95"/>
          <table:table-cell table:number-columns-repeated="1012"/>
        </table:table-row>
        <table:table-row table:style-name="ro1">
          <table:table-cell table:style-name="ce95" office:value-type="string" calcext:value-type="string">
            <text:p>瑪莉西亞</text:p>
          </table:table-cell>
          <table:table-cell table:style-name="ce95" office:value-type="string" calcext:value-type="string">
            <text:p>其他</text:p>
          </table:table-cell>
          <table:table-cell table:style-name="ce95" office:value-type="string" calcext:value-type="string">
            <text:p>——</text:p>
          </table:table-cell>
          <table:table-cell table:style-name="ce95" office:value-type="string" calcext:value-type="string">
            <text:p>購買不可/不可</text:p>
          </table:table-cell>
          <table:table-cell table:style-name="ce118" office:value-type="float" office:value="20" calcext:value-type="float">
            <text:p>20</text:p>
          </table:table-cell>
          <table:table-cell table:style-name="ce104" office:value-type="string" calcext:value-type="string" table:number-columns-spanned="5" table:number-rows-spanned="1">
            <text:p>據說原為軍用開發的戰術支援型AI，會輔助持有者行動。雖然不以語言進行溝通，但據說性格相當毒舌。</text:p>
            <text:p/>
            <text:p>你進行的【感覺】【精神】【社會】判定骰+2顆。此外，你的行動值+4。</text:p>
            <text:p>但在戰鬥中，你於每次結算階段時，侵蝕率+3。</text:p>
          </table:table-cell>
          <table:covered-table-cell table:number-columns-repeated="4"/>
          <table:table-cell table:style-name="ce95" office:value-type="string" calcext:value-type="string">
            <text:p>CE P56</text:p>
          </table:table-cell>
          <table:table-cell table:style-name="ce95"/>
          <table:table-cell table:number-columns-repeated="1012"/>
        </table:table-row>
        <table:table-row table:style-name="ro4" table:number-rows-repeated="1048566">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Microsoft Yahei" svg:font-family="'Microsoft Yahei'"/>
    <style:font-face style:name="PMingLiu" svg:font-family="PMingLiu"/>
    <style:font-face style:name="SimSun" svg:font-family="SimSu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2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Calibri" fo:font-family="Calibri"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更新紀錄" style:display-name="PageStyle_更新紀錄" style:page-layout-name="Mpm3">
      <style:header style:display="false"/>
      <style:header-left style:display="false"/>
      <style:footer style:display="false"/>
      <style:footer-left style:display="false"/>
    </style:master-page>
    <style:master-page style:name="PageStyle_5f_D-Lois" style:display-name="PageStyle_D-Lois" style:page-layout-name="Mpm3">
      <style:header style:display="false"/>
      <style:header-left style:display="false"/>
      <style:footer style:display="false"/>
      <style:footer-left style:display="false"/>
    </style:master-page>
    <style:master-page style:name="PageStyle_5f_HR追加D-Lois" style:display-name="PageStyle_HR追加D-Lois" style:page-layout-name="Mpm4">
      <style:header style:display="false"/>
      <style:header-left style:display="false"/>
      <style:footer style:display="false"/>
      <style:footer-left style:display="false"/>
    </style:master-page>
    <style:master-page style:name="PageStyle_5f_D-lois_20_No.3_20_變異種異能力" style:display-name="PageStyle_D-lois No.3 變異種異能力" style:page-layout-name="Mpm3">
      <style:header style:display="false"/>
      <style:header-left style:display="false"/>
      <style:footer style:display="false"/>
      <style:footer-left style:display="false"/>
    </style:master-page>
    <style:master-page style:name="PageStyle_5f_D-lois_20_No.12_20_古代種異能" style:display-name="PageStyle_D-lois No.12 古代種異能" style:page-layout-name="Mpm3">
      <style:header style:display="false"/>
      <style:header-left style:display="false"/>
      <style:footer style:display="false"/>
      <style:footer-left style:display="false"/>
    </style:master-page>
    <style:master-page style:name="PageStyle_5f_D-lois_20_No.23_20_天造者異能" style:display-name="PageStyle_D-lois No.23 天造者異能" style:page-layout-name="Mpm3">
      <style:header style:display="false"/>
      <style:header-left style:display="false"/>
      <style:footer style:display="false"/>
      <style:footer-left style:display="false"/>
    </style:master-page>
    <style:master-page style:name="PageStyle_5f_D-lois_20_NO.17_20_RB異能" style:display-name="PageStyle_D-lois NO.17 RB異能" style:page-layout-name="Mpm3">
      <style:header style:display="false"/>
      <style:header-left style:display="false"/>
      <style:footer style:display="false"/>
      <style:footer-left style:display="false"/>
    </style:master-page>
    <style:master-page style:name="PageStyle_5f_D-lois_20_No.11_20_秘密武器專用道具" style:display-name="PageStyle_D-lois No.11 秘密武器專用道具" style:page-layout-name="Mpm5">
      <style:header style:display="false"/>
      <style:header-left style:display="false"/>
      <style:footer style:display="false"/>
      <style:footer-left style:display="false"/>
    </style:master-page>
    <style:master-page style:name="PageStyle_5f_D-lois_20_No.98_20_遺產繼承者專用道具" style:display-name="PageStyle_D-lois No.98 遺產繼承者專用道具" style:page-layout-name="Mpm5">
      <style:header style:display="false"/>
      <style:header-left style:display="false"/>
      <style:footer style:display="false"/>
      <style:footer-left style:display="false"/>
    </style:master-page>
    <style:master-page style:name="PageStyle_5f_D-lois_20_No.CRC08_20_超能力者超能力" style:display-name="PageStyle_D-lois No.CRC08 超能力者超能力" style:page-layout-name="Mpm3">
      <style:header style:display="false"/>
      <style:header-left style:display="false"/>
      <style:footer style:display="false"/>
      <style:footer-left style:display="false"/>
    </style:master-page>
    <style:master-page style:name="PageStyle_5f_D-lois_20_No.CRC11_20_咒物污染者專用道具_20_咒物" style:display-name="PageStyle_D-lois No.CRC11 咒物污染者專用道具 咒物" style:page-layout-name="Mpm5">
      <style:header style:display="false"/>
      <style:header-left style:display="false"/>
      <style:footer style:display="false"/>
      <style:footer-left style:display="false"/>
    </style:master-page>
    <style:master-page style:name="PageStyle_5f_D-lois_20_No.UA01_20_抗改變者異能" style:display-name="PageStyle_D-lois No.UA01 抗改變者異能" style:page-layout-name="Mpm3">
      <style:header style:display="false"/>
      <style:header-left style:display="false"/>
      <style:footer style:display="false"/>
      <style:footer-left style:display="false"/>
    </style:master-page>
    <style:master-page style:name="PageStyle_5f_D-lois_20_No.UA03_20_封具專用道具" style:display-name="PageStyle_D-lois No.UA03 封具專用道具" style:page-layout-name="Mpm5">
      <style:header style:display="false"/>
      <style:header-left style:display="false"/>
      <style:footer style:display="false"/>
      <style:footer-left style:display="false"/>
    </style:master-page>
    <style:master-page style:name="PageStyle_5f_D-lois_20_No.UA11_20_本質的根源異能" style:display-name="PageStyle_D-lois No.UA11 本質的根源異能" style:page-layout-name="Mpm3">
      <style:header style:display="false"/>
      <style:header-left style:display="false"/>
      <style:footer style:display="false"/>
      <style:footer-left style:display="false"/>
    </style:master-page>
    <style:master-page style:name="PageStyle_5f_D-lois_20_No.RW06_20_前反派專用道具" style:display-name="PageStyle_D-lois No.RW06 前反派專用道具"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16:37:00</meta:creation-date>
    <meta:initial-creator>User</meta:initial-creator>
    <meta:document-statistic meta:table-count="15" meta:cell-count="3439" meta:object-count="0"/>
    <meta:generator>LibreOfficeDev/6.0.5.2$Linux_X86_64 LibreOffice_project/</meta:generator>
    <meta:user-defined meta:name="AppVersion">14.0300</meta:user-defined>
    <meta:user-defined meta:name="DocSecurity" meta:value-type="float">0</meta:user-defined>
    <meta:user-defined meta:name="HyperlinksChanged" meta:value-type="boolean">false</meta:user-defined>
    <meta:user-defined meta:name="KSOProductBuildVer">2052-9.1.0.4569</meta:user-defined>
    <meta:user-defined meta:name="LinksUpToDate" meta:value-type="boolean">false</meta:user-defined>
    <meta:user-defined meta:name="ScaleCrop" meta:value-type="boolean">false</meta:user-defined>
    <meta:user-defined meta:name="ShareDoc" meta:value-type="boolean">false</meta:user-defined>
  </office:meta>
</office:document-meta>
</file>