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Microsoft Yahei" svg:font-family="'Microsoft Yahei'"/>
    <style:font-face style:name="SimSun" svg:font-family="SimSu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9.96pt"/>
    </style:style>
    <style:style style:name="co2" style:family="table-column">
      <style:table-column-properties fo:break-before="auto" style:column-width="527.61pt"/>
    </style:style>
    <style:style style:name="co3" style:family="table-column">
      <style:table-column-properties fo:break-before="auto" style:column-width="45.41pt"/>
    </style:style>
    <style:style style:name="co4" style:family="table-column">
      <style:table-column-properties fo:break-before="auto" style:column-width="61.99pt"/>
    </style:style>
    <style:style style:name="co5" style:family="table-column">
      <style:table-column-properties fo:break-before="auto" style:column-width="72.79pt"/>
    </style:style>
    <style:style style:name="co6" style:family="table-column">
      <style:table-column-properties fo:break-before="auto" style:column-width="163.64pt"/>
    </style:style>
    <style:style style:name="co7" style:family="table-column">
      <style:table-column-properties fo:break-before="auto" style:column-width="72.11pt"/>
    </style:style>
    <style:style style:name="co8" style:family="table-column">
      <style:table-column-properties fo:break-before="auto" style:column-width="87.96pt"/>
    </style:style>
    <style:style style:name="co9" style:family="table-column">
      <style:table-column-properties fo:break-before="auto" style:column-width="30.25pt"/>
    </style:style>
    <style:style style:name="co10" style:family="table-column">
      <style:table-column-properties fo:break-before="auto" style:column-width="42.55pt"/>
    </style:style>
    <style:style style:name="co11" style:family="table-column">
      <style:table-column-properties fo:break-before="auto" style:column-width="61.26pt"/>
    </style:style>
    <style:style style:name="co12" style:family="table-column">
      <style:table-column-properties fo:break-before="auto" style:column-width="105.25pt"/>
    </style:style>
    <style:style style:name="co13" style:family="table-column">
      <style:table-column-properties fo:break-before="auto" style:column-width="539.21pt"/>
    </style:style>
    <style:style style:name="co14" style:family="table-column">
      <style:table-column-properties fo:break-before="auto" style:column-width="101.59pt"/>
    </style:style>
    <style:style style:name="co15" style:family="table-column">
      <style:table-column-properties fo:break-before="auto" style:column-width="75.71pt"/>
    </style:style>
    <style:style style:name="co16" style:family="table-column">
      <style:table-column-properties fo:break-before="auto" style:column-width="103.1pt"/>
    </style:style>
    <style:style style:name="co17" style:family="table-column">
      <style:table-column-properties fo:break-before="auto" style:column-width="59.05pt"/>
    </style:style>
    <style:style style:name="co18" style:family="table-column">
      <style:table-column-properties fo:break-before="auto" style:column-width="115.34pt"/>
    </style:style>
    <style:style style:name="co19" style:family="table-column">
      <style:table-column-properties fo:break-before="auto" style:column-width="542.75pt"/>
    </style:style>
    <style:style style:name="co20" style:family="table-column">
      <style:table-column-properties fo:break-before="auto" style:column-width="76.39pt"/>
    </style:style>
    <style:style style:name="co21" style:family="table-column">
      <style:table-column-properties fo:break-before="auto" style:column-width="71.35pt"/>
    </style:style>
    <style:style style:name="co22" style:family="table-column">
      <style:table-column-properties fo:break-before="auto" style:column-width="520.41pt"/>
    </style:style>
    <style:style style:name="co23" style:family="table-column">
      <style:table-column-properties fo:break-before="auto" style:column-width="50.46pt"/>
    </style:style>
    <style:style style:name="co24" style:family="table-column">
      <style:table-column-properties fo:break-before="auto" style:column-width="51.96pt"/>
    </style:style>
    <style:style style:name="co25" style:family="table-column">
      <style:table-column-properties fo:break-before="auto" style:column-width="66.3pt"/>
    </style:style>
    <style:style style:name="co26" style:family="table-column">
      <style:table-column-properties fo:break-before="auto" style:column-width="201.86pt"/>
    </style:style>
    <style:style style:name="co27" style:family="table-column">
      <style:table-column-properties fo:break-before="auto" style:column-width="78.55pt"/>
    </style:style>
    <style:style style:name="co28" style:family="table-column">
      <style:table-column-properties fo:break-before="auto" style:column-width="65.59pt"/>
    </style:style>
    <style:style style:name="co29" style:family="table-column">
      <style:table-column-properties fo:break-before="auto" style:column-width="55.5pt"/>
    </style:style>
    <style:style style:name="co30" style:family="table-column">
      <style:table-column-properties fo:break-before="auto" style:column-width="313.54pt"/>
    </style:style>
    <style:style style:name="co31" style:family="table-column">
      <style:table-column-properties fo:break-before="auto" style:column-width="44.7pt"/>
    </style:style>
    <style:style style:name="co32" style:family="table-column">
      <style:table-column-properties fo:break-before="auto" style:column-width="77.16pt"/>
    </style:style>
    <style:style style:name="co33" style:family="table-column">
      <style:table-column-properties fo:break-before="auto" style:column-width="316.4pt"/>
    </style:style>
    <style:style style:name="co34" style:family="table-column">
      <style:table-column-properties fo:break-before="auto" style:column-width="186.01pt"/>
    </style:style>
    <style:style style:name="co35" style:family="table-column">
      <style:table-column-properties fo:break-before="auto" style:column-width="67.8pt"/>
    </style:style>
    <style:style style:name="co36" style:family="table-column">
      <style:table-column-properties fo:break-before="auto" style:column-width="64.09pt"/>
    </style:style>
    <style:style style:name="co37" style:family="table-column">
      <style:table-column-properties fo:break-before="auto" style:column-width="54.06pt"/>
    </style:style>
    <style:style style:name="co38" style:family="table-column">
      <style:table-column-properties fo:break-before="auto" style:column-width="73.5pt"/>
    </style:style>
    <style:style style:name="co39" style:family="table-column">
      <style:table-column-properties fo:break-before="auto" style:column-width="273.15pt"/>
    </style:style>
    <style:style style:name="co40" style:family="table-column">
      <style:table-column-properties fo:break-before="auto" style:column-width="130.51pt"/>
    </style:style>
    <style:style style:name="co41" style:family="table-column">
      <style:table-column-properties fo:break-before="auto" style:column-width="62.76pt"/>
    </style:style>
    <style:style style:name="co42" style:family="table-column">
      <style:table-column-properties fo:break-before="auto" style:column-width="99.44pt"/>
    </style:style>
    <style:style style:name="co43" style:family="table-column">
      <style:table-column-properties fo:break-before="auto" style:column-width="56.21pt"/>
    </style:style>
    <style:style style:name="co44" style:family="table-column">
      <style:table-column-properties fo:break-before="auto" style:column-width="256.59pt"/>
    </style:style>
    <style:style style:name="co45" style:family="table-column">
      <style:table-column-properties fo:break-before="auto" style:column-width="111.71pt"/>
    </style:style>
    <style:style style:name="co46" style:family="table-column">
      <style:table-column-properties fo:break-before="auto" style:column-width="75pt"/>
    </style:style>
    <style:style style:name="co47" style:family="table-column">
      <style:table-column-properties fo:break-before="auto" style:column-width="279.01pt"/>
    </style:style>
    <style:style style:name="co48" style:family="table-column">
      <style:table-column-properties fo:break-before="auto" style:column-width="208.35pt"/>
    </style:style>
    <style:style style:name="co49" style:family="table-column">
      <style:table-column-properties fo:break-before="auto" style:column-width="206.84pt"/>
    </style:style>
    <style:style style:name="co50" style:family="table-column">
      <style:table-column-properties fo:break-before="auto" style:column-width="49.75pt"/>
    </style:style>
    <style:style style:name="co51" style:family="table-column">
      <style:table-column-properties fo:break-before="auto" style:column-width="160.75pt"/>
    </style:style>
    <style:style style:name="co52" style:family="table-column">
      <style:table-column-properties fo:break-before="auto" style:column-width="63.41pt"/>
    </style:style>
    <style:style style:name="co53" style:family="table-column">
      <style:table-column-properties fo:break-before="auto" style:column-width="80.76pt"/>
    </style:style>
    <style:style style:name="co54" style:family="table-column">
      <style:table-column-properties fo:break-before="auto" style:column-width="57pt"/>
    </style:style>
    <style:style style:name="co55" style:family="table-column">
      <style:table-column-properties fo:break-before="auto" style:column-width="278.19pt"/>
    </style:style>
    <style:style style:name="co56" style:family="table-column">
      <style:table-column-properties fo:break-before="auto" style:column-width="322.21pt"/>
    </style:style>
    <style:style style:name="co57" style:family="table-column">
      <style:table-column-properties fo:break-before="auto" style:column-width="67.04pt"/>
    </style:style>
    <style:style style:name="co58" style:family="table-column">
      <style:table-column-properties fo:break-before="auto" style:column-width="57.71pt"/>
    </style:style>
    <style:style style:name="co59" style:family="table-column">
      <style:table-column-properties fo:break-before="auto" style:column-width="52.64pt"/>
    </style:style>
    <style:style style:name="co60" style:family="table-column">
      <style:table-column-properties fo:break-before="auto" style:column-width="46.09pt"/>
    </style:style>
    <style:style style:name="co61" style:family="table-column">
      <style:table-column-properties fo:break-before="auto" style:column-width="164.3pt"/>
    </style:style>
    <style:style style:name="co62" style:family="table-column">
      <style:table-column-properties fo:break-before="auto" style:column-width="105.96pt"/>
    </style:style>
    <style:style style:name="co63" style:family="table-column">
      <style:table-column-properties fo:break-before="auto" style:column-width="109.56pt"/>
    </style:style>
    <style:style style:name="co64" style:family="table-column">
      <style:table-column-properties fo:break-before="auto" style:column-width="37.5pt"/>
    </style:style>
    <style:style style:name="co65" style:family="table-column">
      <style:table-column-properties fo:break-before="auto" style:column-width="29.54pt"/>
    </style:style>
    <style:style style:name="co66" style:family="table-column">
      <style:table-column-properties fo:break-before="auto" style:column-width="48.25pt"/>
    </style:style>
    <style:style style:name="co67" style:family="table-column">
      <style:table-column-properties fo:break-before="auto" style:column-width="100.2pt"/>
    </style:style>
    <style:style style:name="co68" style:family="table-column">
      <style:table-column-properties fo:break-before="auto" style:column-width="93.71pt"/>
    </style:style>
    <style:style style:name="co69" style:family="table-column">
      <style:table-column-properties fo:break-before="auto" style:column-width="201.09pt"/>
    </style:style>
    <style:style style:name="co70" style:family="table-column">
      <style:table-column-properties fo:break-before="auto" style:column-width="342.4pt"/>
    </style:style>
    <style:style style:name="co71" style:family="table-column">
      <style:table-column-properties fo:break-before="auto" style:column-width="347.44pt"/>
    </style:style>
    <style:style style:name="co72" style:family="table-column">
      <style:table-column-properties fo:break-before="auto" style:column-width="54.79pt"/>
    </style:style>
    <style:style style:name="co73" style:family="table-column">
      <style:table-column-properties fo:break-before="auto" style:column-width="126.85pt"/>
    </style:style>
    <style:style style:name="ro1" style:family="table-row">
      <style:table-row-properties style:row-height="33.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54.74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4.26pt" fo:break-before="auto" style:use-optimal-row-height="false"/>
    </style:style>
    <style:style style:name="ro6" style:family="table-row">
      <style:table-row-properties style:row-height="11.99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16.5pt" fo:break-before="auto" style:use-optimal-row-height="false"/>
    </style:style>
    <style:style style:name="ro9" style:family="table-row">
      <style:table-row-properties style:row-height="15.76pt" fo:break-before="auto" style:use-optimal-row-height="false"/>
    </style:style>
    <style:style style:name="ro10" style:family="table-row">
      <style:table-row-properties style:row-height="58.51pt" fo:break-before="auto" style:use-optimal-row-height="false"/>
    </style:style>
    <style:style style:name="ro11" style:family="table-row">
      <style:table-row-properties style:row-height="43.51pt" fo:break-before="auto" style:use-optimal-row-height="false"/>
    </style:style>
    <style:style style:name="ro12" style:family="table-row">
      <style:table-row-properties style:row-height="57.74pt" fo:break-before="auto" style:use-optimal-row-height="false"/>
    </style:style>
    <style:style style:name="ro13" style:family="table-row">
      <style:table-row-properties style:row-height="46.49pt" fo:break-before="auto" style:use-optimal-row-height="false"/>
    </style:style>
    <style:style style:name="ro14" style:family="table-row">
      <style:table-row-properties style:row-height="45.01pt" fo:break-before="auto" style:use-optimal-row-height="false"/>
    </style:style>
    <style:style style:name="ro15" style:family="table-row">
      <style:table-row-properties style:row-height="44.2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59.24pt" fo:break-before="auto" style:use-optimal-row-height="false"/>
    </style:style>
    <style:style style:name="ro18" style:family="table-row">
      <style:table-row-properties style:row-height="72pt" fo:break-before="auto" style:use-optimal-row-height="false"/>
    </style:style>
    <style:style style:name="ro19" style:family="table-row">
      <style:table-row-properties style:row-height="47.99pt" fo:break-before="auto" style:use-optimal-row-height="false"/>
    </style:style>
    <style:style style:name="ro20" style:family="table-row">
      <style:table-row-properties style:row-height="60.01pt" fo:break-before="auto" style:use-optimal-row-height="false"/>
    </style:style>
    <style:style style:name="ro21" style:family="table-row">
      <style:table-row-properties style:row-height="75pt" fo:break-before="auto" style:use-optimal-row-height="false"/>
    </style:style>
    <style:style style:name="ro22" style:family="table-row">
      <style:table-row-properties style:row-height="73.5pt" fo:break-before="auto" style:use-optimal-row-height="false"/>
    </style:style>
    <style:style style:name="ro23" style:family="table-row">
      <style:table-row-properties style:row-height="64.49pt" fo:break-before="auto" style:use-optimal-row-height="false"/>
    </style:style>
    <style:style style:name="ro24" style:family="table-row">
      <style:table-row-properties style:row-height="31.49pt" fo:break-before="auto" style:use-optimal-row-height="false"/>
    </style:style>
    <style:style style:name="ta1" style:family="table" style:master-page-name="PageStyle_5f_更新記錄及道具分類說明">
      <style:table-properties table:display="true" style:writing-mode="lr-tb"/>
    </style:style>
    <style:style style:name="ta2" style:family="table" style:master-page-name="PageStyle_5f_一般道具">
      <style:table-properties table:display="true" style:writing-mode="lr-tb"/>
    </style:style>
    <style:style style:name="ta3" style:family="table" style:master-page-name="PageStyle_5f_FH道具">
      <style:table-properties table:display="true" style:writing-mode="lr-tb"/>
    </style:style>
    <style:style style:name="ta4" style:family="table" style:master-page-name="PageStyle_5f_症候專用獨特道具">
      <style:table-properties table:display="true" style:writing-mode="lr-tb"/>
    </style:style>
    <style:style style:name="ta5" style:family="table" style:master-page-name="PageStyle_5f_獨特道具">
      <style:table-properties table:display="true" style:writing-mode="lr-tb"/>
    </style:style>
    <style:style style:name="ta6" style:family="table" style:master-page-name="PageStyle_5f_D-Lois秘密武器專用道具">
      <style:table-properties table:display="true" style:writing-mode="lr-tb"/>
    </style:style>
    <style:style style:name="ta7" style:family="table" style:master-page-name="PageStyle_5f_D-Lois遺產繼承者專用道具">
      <style:table-properties table:display="true" style:writing-mode="lr-tb"/>
    </style:style>
    <style:style style:name="ta8" style:family="table" style:master-page-name="PageStyle_5f_D-lois_20_No.CRC11_20_咒物污染者專用道具_20_咒物">
      <style:table-properties table:display="true" style:writing-mode="lr-tb"/>
    </style:style>
    <style:style style:name="ta9" style:family="table" style:master-page-name="PageStyle_5f_D-lois_20_No.UA03_20_封具專用道具">
      <style:table-properties table:display="true" style:writing-mode="lr-tb"/>
    </style:style>
    <style:style style:name="ta10" style:family="table" style:master-page-name="PageStyle_5f_REC道具">
      <style:table-properties table:display="true" style:writing-mode="lr-tb"/>
    </style:style>
    <style:style style:name="ta11" style:family="table" style:master-page-name="PageStyle_5f_REPLAY道具">
      <style:table-properties table:display="true" style:writing-mode="lr-tb"/>
    </style:style>
    <style:style style:name="ta12" style:family="table" style:master-page-name="PageStyle_5f_異能力道具">
      <style:table-properties table:display="true" style:writing-mode="lr-tb"/>
    </style:style>
    <style:style style:name="ta13" style:family="table" style:master-page-name="PageStyle_5f_道具自定義項">
      <style:table-properties table:display="true" style:writing-mode="lr-tb"/>
    </style:style>
    <style:style style:name="ta14" style:family="table" style:master-page-name="PageStyle_5f_紋章">
      <style:table-properties table:display="true" style:writing-mode="lr-tb"/>
    </style:style>
    <number:text-style style:name="N100">
      <number:text-content/>
    </number:text-style>
    <style:style style:name="ce1" style:family="table-cell" style:parent-style-name="Default">
      <style:table-cell-properties fo:border="none" style:rotation-align="none"/>
      <style:text-properties fo:color="#000000" style:text-outline="false" style:text-line-through-style="none" style:text-line-through-type="none" style:font-name="Microsoft Yahei" fo:font-size="24pt" fo:font-style="normal" fo:text-shadow="none" style:text-underline-style="none" fo:font-weight="bold" style:font-size-asian="24pt" style:font-style-asian="normal" style:font-weight-asian="bold" style:font-name-complex="Microsoft Yahei" style:font-size-complex="24pt" style:font-style-complex="normal" style:font-weight-complex="bold"/>
    </style:style>
    <style:style style:name="ce2" style:family="table-cell" style:parent-style-name="Default">
      <style:table-cell-properties fo:border="none" style:rotation-align="none"/>
      <style:text-properties fo:color="#000000" style:text-outline="false" style:text-line-through-style="none" style:text-line-through-type="none" style:font-name="Microsoft Yahei" fo:font-size="12pt" fo:font-style="normal" fo:text-shadow="none" style:text-underline-style="none" fo:font-weight="normal" style:font-size-asian="12pt" style:font-style-asian="normal" style:font-weight-asian="normal" style:font-name-complex="Microsoft Yahei" style:font-size-complex="12pt" style:font-style-complex="normal" style:font-weight-complex="normal"/>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2pt" fo:font-style="normal" fo:text-shadow="none" style:text-underline-style="none" fo:font-weight="normal" style:font-size-asian="12pt" style:font-style-asian="normal" style:font-weight-asian="normal" style:font-name-complex="Microsoft Yahei"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5" style:family="table-cell" style:parent-style-name="Default" style:data-style-name="N125">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6" style:family="table-cell" style:parent-style-name="Default" style:data-style-name="N10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rotation-align="non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4"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5" style:family="table-cell" style:parent-style-name="Default" style:data-style-name="N125">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6"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3"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bold" style:font-size-asian="10pt" style:font-style-asian="normal" style:font-weight-asian="bold" style:font-name-complex="SimSun" style:font-size-complex="10pt" style:font-style-complex="normal" style:font-weight-complex="bold"/>
    </style:style>
    <style:style style:name="ce2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3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4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4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48"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3" style:family="table-cell" style:parent-style-name="Default">
      <style:table-cell-properties style:rotation-align="non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55"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5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6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SimSun" fo:font-size="16pt" fo:font-style="normal" fo:text-shadow="none" style:text-underline-style="none" fo:font-weight="bold" style:font-size-asian="16pt" style:font-style-asian="normal" style:font-weight-asian="bold" style:font-name-complex="SimSun" style:font-size-complex="16pt" style:font-style-complex="normal" style:font-weight-complex="bold"/>
    </style:style>
    <style:style style:name="ce61"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6pt" fo:font-style="normal" fo:text-shadow="none" style:text-underline-style="none" fo:font-weight="bold" style:font-size-asian="16pt" style:font-style-asian="normal" style:font-weight-asian="bold" style:font-name-complex="SimSun" style:font-size-complex="16pt" style:font-style-complex="normal" style:font-weight-complex="bold"/>
    </style:style>
    <style:style style:name="ce63"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65" style:family="table-cell" style:parent-style-name="Default" style:data-style-name="N100">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67" style:family="table-cell" style:parent-style-name="Default" style:data-style-name="N2013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68"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6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7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71"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72"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73" style:family="table-cell" style:parent-style-name="Default" style:data-style-name="N100">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74" style:family="table-cell" style:parent-style-name="Default">
      <style:table-cell-properties fo:border-bottom="1.76pt double-thin #000000" style:border-line-width-bottom="0.51pt 0.74pt 0.51pt"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diagonal-bl-tr="none" style:diagonal-tl-br="none" fo:border-left="none" fo:border-right="none" style:rotation-align="none" fo:border-top="1.76pt double-thin #000000" style:border-line-width-top="0.51pt 0.74pt 0.51pt"/>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77" style:family="table-cell" style:parent-style-name="Default" style:data-style-name="N10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78"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7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8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size-asian="10pt" style:font-style-asian="normal" style:font-weight-asian="normal" style:font-name-complex="SimSun" style:font-size-complex="10pt" style:font-style-complex="normal" style:font-weight-complex="normal"/>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8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8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89"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9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normal" style:font-size-asian="12pt" style:font-style-asian="normal" style:font-weight-asian="normal" style:font-name-complex="SimSun" style:font-size-complex="12pt" style:font-style-complex="normal" style:font-weight-complex="normal"/>
    </style:style>
    <style:style style:name="ce91"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6pt" fo:font-style="normal" fo:text-shadow="none" style:text-underline-style="none" fo:font-weight="bold" style:font-size-asian="16pt" style:font-style-asian="normal" style:font-weight-asian="bold" style:font-name-complex="Microsoft Yahei" style:font-size-complex="16pt" style:font-style-complex="normal" style:font-weight-complex="bold"/>
    </style:style>
    <style:style style:name="ce92" style:family="table-cell" style:parent-style-name="Default">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bold" style:font-size-asian="11pt" style:font-style-asian="normal" style:font-weight-asian="bold" style:font-name-complex="Microsoft Yahei" style:font-size-complex="11pt" style:font-style-complex="normal" style:font-weight-complex="bold"/>
    </style:style>
    <style:style style:name="ce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normal" style:font-size-asian="11pt" style:font-style-asian="normal" style:font-weight-asian="normal" style:font-name-complex="Microsoft Yahei" style:font-size-complex="11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normal" style:font-size-asian="11pt" style:font-style-asian="normal" style:font-weight-asian="normal" style:font-name-complex="Microsoft Yahei" style:font-size-complex="11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100">
      <style:table-cell-properties fo:border-bottom="1.76pt double-thin #000000" style:border-line-width-bottom="0.51pt 0.74pt 0.51pt"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bold" style:font-size-asian="11pt" style:font-style-asian="normal" style:font-weight-asian="bold" style:font-name-complex="Microsoft Yahei" style:font-size-complex="11pt" style:font-style-complex="normal" style:font-weight-complex="bold"/>
    </style:style>
    <style:style style:name="ce9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9pt" fo:font-style="normal" fo:text-shadow="none" style:text-underline-style="none" fo:font-weight="normal" style:font-size-asian="9pt" style:font-style-asian="normal" style:font-weight-asian="normal" style:font-name-complex="Microsoft Yahei" style:font-size-complex="9pt" style:font-style-complex="normal" style:font-weight-complex="normal"/>
    </style:style>
    <style:style style:name="ce98" style:family="table-cell" style:parent-style-name="Default">
      <style:table-cell-properties fo:border-bottom="1.76pt double-thin #000000" style:border-line-width-bottom="0.51pt 0.74pt 0.51pt"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bold" style:font-size-asian="11pt" style:font-style-asian="normal" style:font-weight-asian="bold" style:font-name-complex="Microsoft Yahei" style:font-size-complex="11pt" style:font-style-complex="normal" style:font-weight-complex="bold"/>
    </style:style>
    <style:style style:name="ce9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normal" style:font-size-asian="11pt" style:font-style-asian="normal" style:font-weight-asian="normal" style:font-name-complex="Microsoft Yahei" style:font-size-complex="11pt" style:font-style-complex="normal" style:font-weight-complex="normal"/>
    </style:style>
    <style:style style:name="ce100"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normal" style:font-size-asian="11pt" style:font-style-asian="normal" style:font-weight-asian="normal" style:font-name-complex="Microsoft Yahei" style:font-size-complex="11pt" style:font-style-complex="normal" style:font-weight-complex="normal"/>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normal" style:font-size-asian="11pt" style:font-style-asian="normal" style:font-weight-asian="normal" style:font-name-complex="Microsoft Yahei" style:font-size-complex="11pt" style:font-style-complex="normal" style:font-weight-complex="normal"/>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1.76pt solid #000000" fo:background-color="#ffd965"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06" style:family="table-cell" style:parent-style-name="Default">
      <style:table-cell-properties fo:border-bottom="0.74pt solid #000000" fo:background-color="#fef2cb"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07" style:family="table-cell" style:parent-style-name="Default">
      <style:table-cell-properties fo:border-bottom="0.74pt solid #000000" fo:background-color="#fef2cb"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08" style:family="table-cell" style:parent-style-name="Default">
      <style:table-cell-properties fo:border-bottom="0.74pt solid #000000" fo:background-color="#fef2cb"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0" style:family="table-cell" style:parent-style-name="Default">
      <style:table-cell-properties fo:border-bottom="1.76pt solid #000000" fo:background-color="#ffd965"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1" style:family="table-cell" style:parent-style-name="Default">
      <style:table-cell-properties fo:border-bottom="0.74pt solid #000000" fo:background-color="#fef2cb"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2" style:family="table-cell" style:parent-style-name="Default">
      <style:table-cell-properties fo:background-color="#fef2c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3" style:family="table-cell" style:parent-style-name="Default">
      <style:table-cell-properties fo:border-bottom="0.74pt solid #000000" fo:background-color="#fef2cb"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4" style:family="table-cell" style:parent-style-name="Default">
      <style:table-cell-properties fo:border-bottom="none" fo:background-color="#fef2cb"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5" style:family="table-cell" style:parent-style-name="Default">
      <style:table-cell-properties fo:border-bottom="0.74pt solid #000000" fo:background-color="#fef2cb"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6" style:family="table-cell" style:parent-style-name="Default">
      <style:table-cell-properties fo:background-color="#fef2cb"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7" style:family="table-cell" style:parent-style-name="Default">
      <style:table-cell-properties fo:border-bottom="none" fo:background-color="#fef2cb"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19" style:family="table-cell" style:parent-style-name="Default">
      <style:table-cell-properties fo:border-bottom="0.74pt solid #000000" fo:background-color="#fef2cb"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20" style:family="table-cell" style:parent-style-name="Default">
      <style:table-cell-properties fo:border-bottom="1.76pt solid #000000" fo:background-color="#ffd965"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21" style:family="table-cell" style:parent-style-name="Default">
      <style:table-cell-properties fo:background-color="#ffd965"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SimSun" fo:font-size="12pt" fo:font-style="normal" fo:text-shadow="none" style:text-underline-style="none" fo:font-weight="bold" style:font-size-asian="12pt" style:font-style-asian="normal" style:font-weight-asian="bold" style:font-name-complex="SimSun" style:font-size-complex="12pt" style:font-style-complex="normal" style:font-weight-complex="bold"/>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12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51pt 0.74pt 0.51pt"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6pt" fo:font-style="normal" fo:text-shadow="none" style:text-underline-style="none" fo:font-weight="bold" style:font-size-asian="16pt" style:font-style-asian="normal" style:font-weight-asian="bold" style:font-name-complex="Microsoft Yahei" style:font-size-complex="16pt" style:font-style-complex="normal" style:font-weight-complex="bold"/>
    </style:style>
    <style:style style:name="ce1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2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2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6pt" fo:font-style="normal" fo:text-shadow="none" style:text-underline-style="none" fo:font-weight="bold" style:font-size-asian="16pt" style:font-style-asian="normal" style:font-weight-asian="bold" style:font-name-complex="Microsoft Yahei" style:font-size-complex="16pt" style:font-style-complex="normal" style:font-weight-complex="bold"/>
    </style:style>
    <style:style style:name="ce1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bold" style:font-size-asian="10pt" style:font-style-asian="normal" style:font-weight-asian="bold" style:font-name-complex="Microsoft Yahei" style:font-size-complex="10pt" style:font-style-complex="normal" style:font-weight-complex="bold"/>
    </style:style>
    <style:style style:name="ce13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Microsoft Yahei" fo:font-size="10pt" fo:font-style="normal" fo:text-shadow="none" style:text-underline-style="none" fo:font-weight="normal" style:font-size-asian="10pt" style:font-style-asian="normal" style:font-weight-asian="normal" style:font-name-complex="Microsoft Yahei" style:font-size-complex="10pt" style:font-style-complex="normal" style:font-weight-complex="normal"/>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Microsoft Yahei" fo:font-size="12pt" fo:font-style="normal" fo:text-shadow="none" style:text-underline-style="none" fo:font-weight="bold" style:font-size-asian="12pt" style:font-style-asian="normal" style:font-weight-asian="bold" style:font-name-complex="Microsoft Yahei" style:font-size-complex="12pt" style:font-style-complex="normal" style:font-weight-complex="bold"/>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2pt" fo:font-style="normal" fo:text-shadow="none" style:text-underline-style="none" fo:font-weight="bold" style:font-size-asian="12pt" style:font-style-asian="normal" style:font-weight-asian="bold" style:font-name-complex="Microsoft Yahei" style:font-size-complex="12pt" style:font-style-complex="normal" style:font-weight-complex="bold"/>
    </style:style>
    <style:style style:name="ce13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Microsoft Yahei" fo:font-size="12pt" fo:font-style="normal" fo:text-shadow="none" style:text-underline-style="none" fo:font-weight="bold" style:font-size-asian="12pt" style:font-style-asian="normal" style:font-weight-asian="bold" style:font-name-complex="Microsoft Yahei" style:font-size-complex="12pt" style:font-style-complex="normal" style:font-weight-complex="bold"/>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2pt" fo:font-style="normal" fo:text-shadow="none" style:text-underline-style="none" fo:font-weight="normal" style:font-size-asian="12pt" style:font-style-asian="normal" style:font-weight-asian="normal" style:font-name-complex="Microsoft Yahei" style:font-size-complex="12pt" style:font-style-complex="normal" style:font-weight-complex="normal"/>
    </style:style>
    <style:style style:name="ce1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Microsoft Yahei" fo:font-size="12pt" fo:font-style="normal" fo:text-shadow="none" style:text-underline-style="none" fo:font-weight="bold" style:font-size-asian="12pt" style:font-style-asian="normal" style:font-weight-asian="bold" style:font-name-complex="Microsoft Yahei" style:font-size-complex="12pt" style:font-style-complex="normal" style:font-weight-complex="bold"/>
    </style:style>
    <style:style style:name="ce1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2pt" fo:font-style="normal" fo:text-shadow="none" style:text-underline-style="none" fo:font-weight="normal" style:font-size-asian="12pt" style:font-style-asian="normal" style:font-weight-asian="normal" style:font-name-complex="Microsoft Yahei" style:font-size-complex="12pt" style:font-style-complex="normal" style:font-weight-complex="normal"/>
    </style:style>
    <style:style style:name="ce1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980000" style:text-outline="false" style:text-line-through-style="none" style:text-line-through-type="none" style:font-name="Microsoft Yahei" fo:font-size="12pt" fo:font-style="normal" fo:text-shadow="none" style:text-underline-style="none" fo:font-weight="bold" style:font-size-asian="12pt" style:font-style-asian="normal" style:font-weight-asian="bold" style:font-name-complex="Microsoft Yahei" style:font-size-complex="12pt" style:font-style-complex="normal" style:font-weight-complex="bold"/>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2pt" fo:font-style="normal" fo:text-shadow="none" style:text-underline-style="none" fo:font-weight="normal" style:font-size-asian="12pt" style:font-style-asian="normal" style:font-weight-asian="normal" style:font-name-complex="Microsoft Yahei" style:font-size-complex="12pt" style:font-style-complex="normal" style:font-weight-complex="normal"/>
    </style:style>
    <style:style style:name="ce1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bold" style:font-size-asian="11pt" style:font-style-asian="normal" style:font-weight-asian="bold" style:font-name-complex="Microsoft Yahei" style:font-size-complex="11pt" style:font-style-complex="normal" style:font-weight-complex="bold"/>
    </style:style>
    <style:style style:name="ce14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6pt" fo:font-style="normal" fo:text-shadow="none" style:text-underline-style="none" fo:font-weight="bold" style:font-size-asian="16pt" style:font-style-asian="normal" style:font-weight-asian="bold" style:font-name-complex="Microsoft Yahei" style:font-size-complex="16pt" style:font-style-complex="normal" style:font-weight-complex="bold"/>
    </style:style>
    <style:style style:name="ce1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normal" style:font-size-asian="11pt" style:font-style-asian="normal" style:font-weight-asian="normal" style:font-name-complex="Microsoft Yahei" style:font-size-complex="11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bold" style:font-size-asian="11pt" style:font-style-asian="normal" style:font-weight-asian="bold" style:font-name-complex="Microsoft Yahei" style:font-size-complex="11pt" style:font-style-complex="normal" style:font-weight-complex="bold"/>
    </style:style>
    <style:style style:name="ce1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icrosoft Yahei" fo:font-size="11pt" fo:font-style="normal" fo:text-shadow="none" style:text-underline-style="none" fo:font-weight="normal" style:font-size-asian="11pt" style:font-style-asian="normal" style:font-weight-asian="normal" style:font-name-complex="Microsoft Yahei"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16.83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24.3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3.8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6.0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05.33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27.83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3.84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69.33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4.82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4.83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9.82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9.82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83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4.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更新記錄及道具分類說明"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2" table:default-cell-style-name="Default"/>
        <table:table-column table:style-name="co5" table:number-columns-repeated="998" table:default-cell-style-name="Default"/>
        <table:table-row table:style-name="ro1">
          <table:table-cell table:style-name="ce1" office:value-type="string" calcext:value-type="string" table:number-columns-spanned="2" table:number-rows-spanned="1">
            <text:p>Double Cross 3rd 一般舞臺道具表</text:p>
          </table:table-cell>
          <table:covered-table-cell/>
          <table:table-cell table:style-name="ce22" table:number-columns-repeated="2"/>
          <table:table-cell table:style-name="ce24" office:value-type="string" calcext:value-type="string" table:number-columns-spanned="2" table:number-rows-spanned="1">
            <text:p>詞條</text:p>
          </table:table-cell>
          <table:covered-table-cell table:style-name="ce30"/>
          <table:table-cell table:style-name="ce24" office:value-type="string" calcext:value-type="string" table:number-columns-spanned="5" table:number-rows-spanned="1">
            <text:p>效果</text:p>
          </table:table-cell>
          <table:covered-table-cell table:number-columns-repeated="3" table:style-name="ce37"/>
          <table:covered-table-cell table:style-name="ce30"/>
          <table:table-cell table:style-name="ce26" table:number-columns-repeated="2"/>
          <table:table-cell table:style-name="ce22" table:number-columns-repeated="13"/>
          <table:table-cell table:number-columns-repeated="998"/>
        </table:table-row>
        <table:table-row table:style-name="ro2">
          <table:table-cell table:style-name="ce2" office:value-type="string" calcext:value-type="string" table:number-columns-spanned="2" table:number-rows-spanned="1">
            <text:p>包括規則：規則書一、二、PE、IC、EA、LM、HR、RW，暫不包括舞臺專用道具。</text:p>
          </table:table-cell>
          <table:covered-table-cell/>
          <table:table-cell table:style-name="ce23" table:number-columns-repeated="2"/>
          <table:table-cell table:style-name="ce25" office:value-type="string" calcext:value-type="string" table:number-columns-spanned="2" table:number-rows-spanned="1">
            <text:p>雙手持握</text:p>
          </table:table-cell>
          <table:covered-table-cell table:style-name="ce30"/>
          <table:table-cell table:style-name="ce25" office:value-type="string" calcext:value-type="string" table:number-columns-spanned="5" table:number-rows-spanned="1">
            <text:p>裝備該武器時無法裝備其他武器</text:p>
          </table:table-cell>
          <table:covered-table-cell table:number-columns-repeated="3" table:style-name="ce37"/>
          <table:covered-table-cell table:style-name="ce30"/>
          <table:table-cell table:style-name="ce26" table:number-columns-repeated="2"/>
          <table:table-cell table:style-name="ce23" table:number-columns-repeated="13"/>
          <table:table-cell table:number-columns-repeated="998"/>
        </table:table-row>
        <table:table-row table:style-name="ro3">
          <table:table-cell table:style-name="ce3" office:value-type="string" calcext:value-type="string" table:number-columns-spanned="2" table:number-rows-spanned="1">
            <text:p>寫在前面：如有錯誤歡迎指出。雖然自己補充翻譯了一些，但大部分是使用了其他譯者翻譯的資料。有一些得到了譯者的同意和支持，有一些因為年代久遠無從考證譯者身份，因此未能得到同意。如果該表格使用了您的翻譯但您不希望如此的話，請與我聯繫，我會儘快刪除，謝謝。</text:p>
          </table:table-cell>
          <table:covered-table-cell/>
          <table:table-cell table:style-name="ce12" table:number-columns-repeated="2"/>
          <table:table-cell table:style-name="ce25" office:value-type="string" calcext:value-type="string" table:number-columns-spanned="2" table:number-rows-spanned="1">
            <text:p>搭載火器</text:p>
          </table:table-cell>
          <table:covered-table-cell table:style-name="ce30"/>
          <table:table-cell table:style-name="ce25" office:value-type="string" calcext:value-type="string" table:number-columns-spanned="5" table:number-rows-spanned="1">
            <text:p>非搭乘狀態無法裝備</text:p>
          </table:table-cell>
          <table:covered-table-cell table:number-columns-repeated="3" table:style-name="ce37"/>
          <table:covered-table-cell table:style-name="ce30"/>
          <table:table-cell table:style-name="ce26" table:number-columns-repeated="2"/>
          <table:table-cell table:style-name="ce12" table:number-columns-repeated="13"/>
          <table:table-cell table:number-columns-repeated="998"/>
        </table:table-row>
        <table:table-row table:style-name="ro2">
          <table:table-cell table:style-name="ce4"/>
          <table:table-cell table:style-name="ce13"/>
          <table:table-cell table:style-name="ce12" table:number-columns-repeated="2"/>
          <table:table-cell table:style-name="ce25" office:value-type="string" calcext:value-type="string" table:number-columns-spanned="2" table:number-rows-spanned="1">
            <text:p>購入不可</text:p>
          </table:table-cell>
          <table:covered-table-cell table:style-name="ce30"/>
          <table:table-cell table:style-name="ce25" office:value-type="string" calcext:value-type="string" table:number-columns-spanned="5" table:number-rows-spanned="1">
            <text:p>無法在遊戲進行中購買</text:p>
          </table:table-cell>
          <table:covered-table-cell table:number-columns-repeated="3" table:style-name="ce37"/>
          <table:covered-table-cell table:style-name="ce30"/>
          <table:table-cell table:style-name="ce26" table:number-columns-repeated="2"/>
          <table:table-cell table:style-name="ce12" table:number-columns-repeated="13"/>
          <table:table-cell table:number-columns-repeated="998"/>
        </table:table-row>
        <table:table-row table:style-name="ro2">
          <table:table-cell table:style-name="ce5" office:value-type="string" calcext:value-type="string">
            <text:p>更新記錄</text:p>
          </table:table-cell>
          <table:table-cell table:style-name="ce14" office:value-type="string" calcext:value-type="string">
            <text:p>內容</text:p>
          </table:table-cell>
          <table:table-cell table:style-name="ce12" table:number-columns-repeated="2"/>
          <table:table-cell table:style-name="ce25" office:value-type="string" calcext:value-type="string" table:number-columns-spanned="2" table:number-rows-spanned="1">
            <text:p>搭載火器不可</text:p>
          </table:table-cell>
          <table:covered-table-cell table:style-name="ce30"/>
          <table:table-cell table:style-name="ce25" office:value-type="string" calcext:value-type="string" table:number-columns-spanned="5" table:number-rows-spanned="1">
            <text:p>該載具的搭乘者無法裝備搭載火器</text:p>
          </table:table-cell>
          <table:covered-table-cell table:number-columns-repeated="3" table:style-name="ce37"/>
          <table:covered-table-cell table:style-name="ce30"/>
          <table:table-cell table:style-name="ce26" table:number-columns-repeated="2"/>
          <table:table-cell table:style-name="ce12" table:number-columns-repeated="13"/>
          <table:table-cell table:number-columns-repeated="998"/>
        </table:table-row>
        <table:table-row table:style-name="ro4">
          <table:table-cell table:style-name="ce6" office:value-type="string" calcext:value-type="string">
            <text:p>1.0</text:p>
          </table:table-cell>
          <table:table-cell table:style-name="ce15" office:value-type="string" calcext:value-type="string">
            <text:p>將一般舞臺可以使用的所有道具歸納並整理，調整了排版，並將缺少翻譯的內容翻譯完成</text:p>
          </table:table-cell>
          <table:table-cell table:style-name="ce12" table:number-columns-repeated="2"/>
          <table:table-cell table:style-name="ce25" office:value-type="string" calcext:value-type="string" table:number-columns-spanned="2" table:number-rows-spanned="1">
            <text:p>稀有道具</text:p>
          </table:table-cell>
          <table:covered-table-cell table:style-name="ce30"/>
          <table:table-cell table:style-name="ce25" office:value-type="string" calcext:value-type="string" table:number-columns-spanned="5" table:number-rows-spanned="1">
            <text:p>每名角色不能擁有兩件或以上的同名稀有道具</text:p>
          </table:table-cell>
          <table:covered-table-cell table:number-columns-repeated="3" table:style-name="ce37"/>
          <table:covered-table-cell table:style-name="ce30"/>
          <table:table-cell table:style-name="ce26" table:number-columns-repeated="2"/>
          <table:table-cell table:style-name="ce12" table:number-columns-repeated="13"/>
          <table:table-cell table:number-columns-repeated="998"/>
        </table:table-row>
        <table:table-row table:style-name="ro5">
          <table:table-cell table:style-name="ce7" office:value-type="string" calcext:value-type="string">
            <text:p>1.01</text:p>
          </table:table-cell>
          <table:table-cell table:style-name="ce16" office:value-type="string" calcext:value-type="string">
            <text:p>糾錯：支付→制服</text:p>
          </table:table-cell>
          <table:table-cell table:style-name="ce12" table:number-columns-repeated="2"/>
          <table:table-cell table:style-name="ce25" office:value-type="string" calcext:value-type="string" table:number-columns-spanned="2" table:number-rows-spanned="1">
            <text:p>至近不可</text:p>
          </table:table-cell>
          <table:covered-table-cell table:style-name="ce30"/>
          <table:table-cell table:style-name="ce25" office:value-type="string" calcext:value-type="string" table:number-columns-spanned="5" table:number-rows-spanned="1">
            <text:p>該武器無法（射擊）攻擊同一接戰區域內的角色</text:p>
          </table:table-cell>
          <table:covered-table-cell table:number-columns-repeated="3" table:style-name="ce37"/>
          <table:covered-table-cell table:style-name="ce30"/>
          <table:table-cell table:style-name="ce26" table:number-columns-repeated="2"/>
          <table:table-cell table:style-name="ce12" table:number-columns-repeated="13"/>
          <table:table-cell table:number-columns-repeated="998"/>
        </table:table-row>
        <table:table-row table:style-name="ro5">
          <table:table-cell table:style-name="ce7" office:value-type="string" calcext:value-type="string">
            <text:p>1.02</text:p>
          </table:table-cell>
          <table:table-cell table:style-name="ce16" office:value-type="string" calcext:value-type="string">
            <text:p>修正：銃槍→打樁機，エシジェン結晶，雷神之槌</text:p>
          </table:table-cell>
          <table:table-cell table:style-name="ce12" table:number-columns-repeated="2"/>
          <table:table-cell table:style-name="ce25" office:value-type="string" calcext:value-type="string" table:number-columns-spanned="2" table:number-rows-spanned="1">
            <text:p>核心紋章</text:p>
          </table:table-cell>
          <table:covered-table-cell table:style-name="ce30"/>
          <table:table-cell table:style-name="ce25" office:value-type="string" calcext:value-type="string" table:number-columns-spanned="5" table:number-rows-spanned="1">
            <text:p>每名角色只能擁有一件核心紋章，以†標示。</text:p>
          </table:table-cell>
          <table:covered-table-cell table:number-columns-repeated="3" table:style-name="ce37"/>
          <table:covered-table-cell table:style-name="ce30"/>
          <table:table-cell table:style-name="ce26" table:number-columns-repeated="2"/>
          <table:table-cell table:style-name="ce12" table:number-columns-repeated="13"/>
          <table:table-cell table:number-columns-repeated="998"/>
        </table:table-row>
        <table:table-row table:style-name="ro6">
          <table:table-cell table:style-name="ce7" office:value-type="string" calcext:value-type="string">
            <text:p>1.03</text:p>
          </table:table-cell>
          <table:table-cell table:style-name="ce16" office:value-type="string" calcext:value-type="string">
            <text:p>修正：シザーリッパー，バラキエル</text:p>
          </table:table-cell>
          <table:table-cell table:style-name="ce12" table:number-columns-repeated="2"/>
          <table:table-cell table:style-name="ce26" table:number-columns-repeated="9"/>
          <table:table-cell table:style-name="ce12" table:number-columns-repeated="13"/>
          <table:table-cell table:number-columns-repeated="998"/>
        </table:table-row>
        <table:table-row table:style-name="ro7">
          <table:table-cell table:style-name="ce7" office:value-type="string" calcext:value-type="string">
            <text:p>1.1</text:p>
          </table:table-cell>
          <table:table-cell table:style-name="ce16" office:value-type="string" calcext:value-type="string">
            <text:p>修正：射出式電擊槍，ヴェノムスピナー，サイレントシーカー，セルスタッフ：アサルト，セルスタッフ：ガード，從者の選別，α迷幻，戰鬥卡車，狂怒射手，來福/來福槍→步槍，關聯：博主，奪命籌碼</text:p>
          </table:table-cell>
          <table:table-cell table:style-name="ce12" table:number-columns-repeated="2"/>
          <table:table-cell table:style-name="ce27" office:value-type="string" calcext:value-type="string" table:number-columns-spanned="2" table:number-rows-spanned="1">
            <text:p>一般道具</text:p>
          </table:table-cell>
          <table:covered-table-cell table:style-name="ce30"/>
          <table:table-cell table:style-name="ce34" office:value-type="string" calcext:value-type="string" table:number-columns-spanned="7" table:number-rows-spanned="1">
            <text:p>可以正常取得的道具，使用財富點數購入、使用常備化點數常備化</text:p>
          </table:table-cell>
          <table:covered-table-cell table:number-columns-repeated="5" table:style-name="ce37"/>
          <table:covered-table-cell table:style-name="ce30"/>
          <table:table-cell table:style-name="ce12" table:number-columns-repeated="13"/>
          <table:table-cell table:number-columns-repeated="998"/>
        </table:table-row>
        <table:table-row table:style-name="ro6">
          <table:table-cell table:style-name="ce7" office:value-type="string" calcext:value-type="string">
            <text:p>1.11</text:p>
          </table:table-cell>
          <table:table-cell table:style-name="ce16" office:value-type="string" calcext:value-type="string">
            <text:p>チャリオットバラー，怨毒紡蛛</text:p>
          </table:table-cell>
          <table:table-cell table:style-name="ce12" table:number-columns-repeated="2"/>
          <table:table-cell table:style-name="ce27" office:value-type="string" calcext:value-type="string" table:number-columns-spanned="2" table:number-rows-spanned="1">
            <text:p>FH道具</text:p>
          </table:table-cell>
          <table:covered-table-cell table:style-name="ce30"/>
          <table:table-cell table:style-name="ce34" office:value-type="string" calcext:value-type="string" table:number-columns-spanned="7" table:number-rows-spanned="1">
            <text:p>特殊道具。只有選擇FH專用D-Lois才能常備化</text:p>
          </table:table-cell>
          <table:covered-table-cell table:number-columns-repeated="5" table:style-name="ce37"/>
          <table:covered-table-cell table:style-name="ce30"/>
          <table:table-cell table:style-name="ce12" table:number-columns-repeated="13"/>
          <table:table-cell table:number-columns-repeated="998"/>
        </table:table-row>
        <table:table-row table:style-name="ro6">
          <table:table-cell table:style-name="ce7" office:value-type="string" calcext:value-type="string">
            <text:p>2.0</text:p>
          </table:table-cell>
          <table:table-cell table:style-name="ce16" office:value-type="string" calcext:value-type="string">
            <text:p>大量校對和修改，格式名稱等統一</text:p>
          </table:table-cell>
          <table:table-cell table:style-name="ce12" table:number-columns-repeated="2"/>
          <table:table-cell table:style-name="ce27" office:value-type="string" calcext:value-type="string" table:number-columns-spanned="2" table:number-rows-spanned="2">
            <text:p>道具自定義項</text:p>
          </table:table-cell>
          <table:covered-table-cell table:style-name="ce31"/>
          <table:table-cell table:style-name="ce34" office:value-type="string" calcext:value-type="string" table:number-columns-spanned="7" table:number-rows-spanned="2">
            <text:p>每件常備化的道具最多可以選擇一項需要消耗經驗值的自定義項，[必要經驗值：0]的選項可以隨意選擇。</text:p>
          </table:table-cell>
          <table:covered-table-cell table:number-columns-repeated="5" table:style-name="ce38"/>
          <table:covered-table-cell table:style-name="ce31"/>
          <table:table-cell table:style-name="ce12" table:number-columns-repeated="13"/>
          <table:table-cell table:number-columns-repeated="998"/>
        </table:table-row>
        <table:table-row table:style-name="ro6">
          <table:table-cell table:style-name="ce7" office:value-type="string" calcext:value-type="string">
            <text:p>2.01</text:p>
          </table:table-cell>
          <table:table-cell table:style-name="ce16" office:value-type="string" calcext:value-type="string">
            <text:p>大量校對和修改，格式名稱等統一</text:p>
          </table:table-cell>
          <table:table-cell table:style-name="ce12" table:number-columns-repeated="2"/>
          <table:covered-table-cell table:style-name="ce28"/>
          <table:covered-table-cell table:style-name="ce32"/>
          <table:covered-table-cell table:style-name="ce28"/>
          <table:covered-table-cell table:number-columns-repeated="5" table:style-name="ce39"/>
          <table:covered-table-cell table:style-name="ce32"/>
          <table:table-cell table:style-name="ce12" table:number-columns-repeated="13"/>
          <table:table-cell table:number-columns-repeated="998"/>
        </table:table-row>
        <table:table-row table:style-name="ro6">
          <table:table-cell table:style-name="ce7" office:value-type="string" calcext:value-type="string">
            <text:p>2.02</text:p>
          </table:table-cell>
          <table:table-cell table:style-name="ce16" office:value-type="string" calcext:value-type="string">
            <text:p>細節修改</text:p>
          </table:table-cell>
          <table:table-cell table:style-name="ce12" table:number-columns-repeated="2"/>
          <table:table-cell table:style-name="ce27" office:value-type="string" calcext:value-type="string" table:number-columns-spanned="2" table:number-rows-spanned="1">
            <text:p>獨特道具</text:p>
          </table:table-cell>
          <table:covered-table-cell table:style-name="ce30"/>
          <table:table-cell table:style-name="ce34" office:value-type="string" calcext:value-type="string" table:number-columns-spanned="7" table:number-rows-spanned="1">
            <text:p>需要使用經驗值進行常備化的道具</text:p>
          </table:table-cell>
          <table:covered-table-cell table:number-columns-repeated="5" table:style-name="ce37"/>
          <table:covered-table-cell table:style-name="ce30"/>
          <table:table-cell table:style-name="ce12" table:number-columns-repeated="13"/>
          <table:table-cell table:number-columns-repeated="998"/>
        </table:table-row>
        <table:table-row table:style-name="ro6">
          <table:table-cell table:style-name="ce7" office:value-type="string" calcext:value-type="string">
            <text:p>2.03</text:p>
          </table:table-cell>
          <table:table-cell table:style-name="ce16" office:value-type="string" calcext:value-type="string">
            <text:p>細節修改</text:p>
          </table:table-cell>
          <table:table-cell table:style-name="ce12" table:number-columns-repeated="2"/>
          <table:table-cell table:style-name="ce27" office:value-type="string" calcext:value-type="string" table:number-columns-spanned="2" table:number-rows-spanned="1">
            <text:p>症候專用獨特道具</text:p>
          </table:table-cell>
          <table:covered-table-cell table:style-name="ce30"/>
          <table:table-cell table:style-name="ce34" office:value-type="string" calcext:value-type="string" table:number-columns-spanned="7" table:number-rows-spanned="1">
            <text:p>只有特定症候的超越者可以取得並常備化的獨特道具</text:p>
          </table:table-cell>
          <table:covered-table-cell table:number-columns-repeated="5" table:style-name="ce37"/>
          <table:covered-table-cell table:style-name="ce30"/>
          <table:table-cell table:style-name="ce12" table:number-columns-repeated="13"/>
          <table:table-cell table:number-columns-repeated="998"/>
        </table:table-row>
        <table:table-row table:style-name="ro6">
          <table:table-cell table:style-name="ce7" office:value-type="string" calcext:value-type="string">
            <text:p>2.04</text:p>
          </table:table-cell>
          <table:table-cell table:style-name="ce16" office:value-type="string" calcext:value-type="string">
            <text:p>統一了回應動作等譯名</text:p>
          </table:table-cell>
          <table:table-cell table:style-name="ce12" table:number-columns-repeated="2"/>
          <table:table-cell table:style-name="ce27" office:value-type="string" calcext:value-type="string" table:number-columns-spanned="2" table:number-rows-spanned="2">
            <text:p>D-Lois秘密武器</text:p>
          </table:table-cell>
          <table:covered-table-cell table:style-name="ce31"/>
          <table:table-cell table:style-name="ce34" office:value-type="string" calcext:value-type="string" table:number-columns-spanned="7" table:number-rows-spanned="2">
            <text:p>特殊道具。只有選擇D-Lois：秘密武器才能取得的道具，第一件免費，額外使用經驗值最多可取得三件，只有持有者可以裝備/使用。</text:p>
          </table:table-cell>
          <table:covered-table-cell table:number-columns-repeated="5" table:style-name="ce38"/>
          <table:covered-table-cell table:style-name="ce31"/>
          <table:table-cell table:style-name="ce12" table:number-columns-repeated="13"/>
          <table:table-cell table:number-columns-repeated="998"/>
        </table:table-row>
        <table:table-row table:style-name="ro6">
          <table:table-cell table:style-name="ce7" office:value-type="string" calcext:value-type="string">
            <text:p>2.05</text:p>
          </table:table-cell>
          <table:table-cell table:style-name="ce16" office:value-type="string" calcext:value-type="string">
            <text:p>修正部分細節</text:p>
          </table:table-cell>
          <table:table-cell table:style-name="ce12" table:number-columns-repeated="2"/>
          <table:covered-table-cell table:style-name="ce28"/>
          <table:covered-table-cell table:style-name="ce32"/>
          <table:covered-table-cell table:style-name="ce28"/>
          <table:covered-table-cell table:number-columns-repeated="5" table:style-name="ce39"/>
          <table:covered-table-cell table:style-name="ce32"/>
          <table:table-cell table:style-name="ce12" table:number-columns-repeated="13"/>
          <table:table-cell table:number-columns-repeated="998"/>
        </table:table-row>
        <table:table-row table:style-name="ro6">
          <table:table-cell table:style-name="ce7" office:value-type="string" calcext:value-type="string">
            <text:p>2.06</text:p>
          </table:table-cell>
          <table:table-cell table:style-name="ce16" office:value-type="string" calcext:value-type="string">
            <text:p>將聯絡紋章的說明和果園的PE翻譯統一了一下，修正了一處“傳說的武器”的描述錯誤</text:p>
          </table:table-cell>
          <table:table-cell table:style-name="ce12" table:number-columns-repeated="2"/>
          <table:table-cell table:style-name="ce27" office:value-type="string" calcext:value-type="string" table:number-columns-spanned="2" table:number-rows-spanned="2">
            <text:p>D-Lois遺產繼承者</text:p>
          </table:table-cell>
          <table:covered-table-cell table:style-name="ce31"/>
          <table:table-cell table:style-name="ce34" office:value-type="string" calcext:value-type="string" table:number-columns-spanned="7" table:number-rows-spanned="2">
            <text:p>特殊道具。只有選擇D-Lois：遺產繼承者才能取得的道具，只有契約者可以裝備/使用。</text:p>
          </table:table-cell>
          <table:covered-table-cell table:number-columns-repeated="5" table:style-name="ce38"/>
          <table:covered-table-cell table:style-name="ce31"/>
          <table:table-cell table:style-name="ce12" table:number-columns-repeated="13"/>
          <table:table-cell table:number-columns-repeated="998"/>
        </table:table-row>
        <table:table-row table:style-name="ro6">
          <table:table-cell table:style-name="ce7" office:value-type="string" calcext:value-type="string">
            <text:p>2.061</text:p>
          </table:table-cell>
          <table:table-cell table:style-name="ce16" office:value-type="string" calcext:value-type="string">
            <text:p>把所有“來自該武器”改成了大概更通順的“以該武器進行”</text:p>
          </table:table-cell>
          <table:table-cell table:style-name="ce12" table:number-columns-repeated="2"/>
          <table:covered-table-cell table:style-name="ce28"/>
          <table:covered-table-cell table:style-name="ce32"/>
          <table:covered-table-cell table:style-name="ce28"/>
          <table:covered-table-cell table:number-columns-repeated="5" table:style-name="ce39"/>
          <table:covered-table-cell table:style-name="ce32"/>
          <table:table-cell table:style-name="ce12" table:number-columns-repeated="13"/>
          <table:table-cell table:number-columns-repeated="998"/>
        </table:table-row>
        <table:table-row table:style-name="ro6">
          <table:table-cell table:style-name="ce7" office:value-type="string" calcext:value-type="string">
            <text:p>2.1</text:p>
          </table:table-cell>
          <table:table-cell table:style-name="ce16" office:value-type="string" calcext:value-type="string">
            <text:p>追加了HR擴的REC道具</text:p>
          </table:table-cell>
          <table:table-cell table:style-name="ce12" table:number-columns-repeated="2"/>
          <table:table-cell table:style-name="ce27" office:value-type="string" calcext:value-type="string" table:number-columns-spanned="2" table:number-rows-spanned="2">
            <text:p>replay道具</text:p>
          </table:table-cell>
          <table:covered-table-cell table:style-name="ce31"/>
          <table:table-cell table:style-name="ce34" office:value-type="string" calcext:value-type="string" table:number-columns-spanned="7" table:number-rows-spanned="2">
            <text:p>特殊道具。與特定replay相關的獨特道具，主要為replay中PC與NPC的設定道具化</text:p>
          </table:table-cell>
          <table:covered-table-cell table:number-columns-repeated="5" table:style-name="ce38"/>
          <table:covered-table-cell table:style-name="ce31"/>
          <table:table-cell table:style-name="ce12" table:number-columns-repeated="13"/>
          <table:table-cell table:number-columns-repeated="998"/>
        </table:table-row>
        <table:table-row table:style-name="ro6">
          <table:table-cell table:style-name="ce7" office:value-type="string" calcext:value-type="string">
            <text:p>2.11</text:p>
          </table:table-cell>
          <table:table-cell table:style-name="ce17" office:value-type="string" calcext:value-type="string">
            <text:p>修復了REC道具中“守衛者之刃”的資料缺失和強化效果的“1次”重複，“使徒之衣”的裝甲值（錯誤：-9 正確：9）</text:p>
          </table:table-cell>
          <table:table-cell table:style-name="ce12" table:number-columns-repeated="2"/>
          <table:covered-table-cell table:style-name="ce28"/>
          <table:covered-table-cell table:style-name="ce32"/>
          <table:covered-table-cell table:style-name="ce28"/>
          <table:covered-table-cell table:number-columns-repeated="5" table:style-name="ce39"/>
          <table:covered-table-cell table:style-name="ce32"/>
          <table:table-cell table:style-name="ce12" table:number-columns-repeated="13"/>
          <table:table-cell table:number-columns-repeated="998"/>
        </table:table-row>
        <table:table-row table:style-name="ro6">
          <table:table-cell table:style-name="ce7" office:value-type="string" calcext:value-type="string">
            <text:p>非更新</text:p>
          </table:table-cell>
          <table:table-cell table:style-name="ce16" office:value-type="string" calcext:value-type="string">
            <text:p>應玉米要求，暫時撤下REC道具部分玉米的介紹譯文，之後會找時間自己重新翻譯補上（咕咕咕）</text:p>
          </table:table-cell>
          <table:table-cell table:style-name="ce12" table:number-columns-repeated="2"/>
          <table:table-cell table:style-name="ce27" office:value-type="string" calcext:value-type="string" table:number-columns-spanned="2" table:number-rows-spanned="3">
            <text:p>REC道具</text:p>
          </table:table-cell>
          <table:covered-table-cell table:style-name="ce31"/>
          <table:table-cell table:style-name="ce35" office:value-type="string" calcext:value-type="string" table:number-columns-spanned="7" table:number-rows-spanned="3">
            <text:p>特殊道具。分為持有時即可生效的通常效果和取得特定角色的Lois後才能生效的強化效果。</text:p>
          </table:table-cell>
          <table:covered-table-cell table:number-columns-repeated="5" table:style-name="ce38"/>
          <table:covered-table-cell table:style-name="ce31"/>
          <table:table-cell table:style-name="ce12" table:number-columns-repeated="13"/>
          <table:table-cell table:number-columns-repeated="998"/>
        </table:table-row>
        <table:table-row table:style-name="ro6">
          <table:table-cell table:style-name="ce7" office:value-type="string" calcext:value-type="string">
            <text:p>2.12</text:p>
          </table:table-cell>
          <table:table-cell table:style-name="ce16" office:value-type="string" calcext:value-type="string">
            <text:p>修正了情報收集班的描述缺漏問題，這麼久過去才發現的我是屑orz</text:p>
          </table:table-cell>
          <table:table-cell table:style-name="ce12" table:number-columns-repeated="2"/>
          <table:covered-table-cell table:style-name="ce29"/>
          <table:covered-table-cell table:style-name="ce33"/>
          <table:covered-table-cell table:style-name="ce29"/>
          <table:covered-table-cell table:number-columns-repeated="5"/>
          <table:covered-table-cell table:style-name="ce33"/>
          <table:table-cell table:style-name="ce12" table:number-columns-repeated="13"/>
          <table:table-cell table:number-columns-repeated="998"/>
        </table:table-row>
        <table:table-row table:style-name="ro2">
          <table:table-cell table:style-name="ce7" office:value-type="float" office:value="2.13" calcext:value-type="float">
            <text:p>2.13</text:p>
          </table:table-cell>
          <table:table-cell table:style-name="ce16" office:value-type="string" calcext:value-type="string">
            <text:p>修正了聯絡紋章裡的錯別字，修正了黑須左京的關聯錯誤的使用了“回應動作”，修正了防具部分應為近戰攻擊的攻擊力+x的內容錯誤的為近戰的攻擊力+x</text:p>
          </table:table-cell>
          <table:table-cell table:style-name="ce12" table:number-columns-repeated="2"/>
          <table:covered-table-cell table:style-name="ce28"/>
          <table:covered-table-cell table:style-name="ce32"/>
          <table:covered-table-cell table:style-name="ce28"/>
          <table:covered-table-cell table:number-columns-repeated="5" table:style-name="ce39"/>
          <table:covered-table-cell table:style-name="ce32"/>
          <table:table-cell table:style-name="ce12" table:number-columns-repeated="13"/>
          <table:table-cell table:number-columns-repeated="998"/>
        </table:table-row>
        <table:table-row table:style-name="ro2">
          <table:table-cell table:style-name="ce7" office:value-type="string" calcext:value-type="string">
            <text:p>2.14</text:p>
          </table:table-cell>
          <table:table-cell table:style-name="ce16" office:value-type="string" calcext:value-type="string">
            <text:p>重新校對細化了book2、上級、IC的內容，主要是一些描述較為模糊的遺留文本的進一步優化，以及一些細枝末節的文本優化，順便補充了原文。</text:p>
            <text:p>此次更新修正了資料的道具：堅實外套（誤：行動-1 裝甲值5  正：行動-2 裝甲值2）、重力吸收者（誤：未進行格擋的攻擊命中時 正：無法進行格擋的攻擊命中時）、雷蟲（補充了使用多個異能時只能選擇一個的說明文本）&gt;、原初混沌（任意一件→任意）、無色魔鏡（組合了影蛇異能的射擊→組合了影蛇異能的射擊攻擊、1點HP傷害→1點傷害）</text:p>
            <text:p>此次更新譯名發生改變的道具：強化外套→堅實外套、多功能支援護甲→多功能支援套裝</text:p>
          </table:table-cell>
          <table:table-cell table:style-name="ce12" table:number-columns-repeated="24"/>
          <table:table-cell table:number-columns-repeated="998"/>
        </table:table-row>
        <table:table-row table:style-name="ro2">
          <table:table-cell table:style-name="ce7" office:value-type="string" calcext:value-type="string">
            <text:p>2.15beta</text:p>
          </table:table-cell>
          <table:table-cell table:style-name="ce16" office:value-type="string" calcext:value-type="string">
            <text:p>追加了新擴《Namless City》新增的道具和特殊道具（由於個人精力問題，描述文留待後日陸續補充）</text:p>
            <text:p>優化修正了一小部分熊熊自己暫時也記不起來的錯別字、行文不佳等問題，以及一些原文補充</text:p>
          </table:table-cell>
          <table:table-cell table:style-name="ce12" table:number-columns-repeated="2"/>
          <table:table-cell table:style-name="ce27" office:value-type="string" calcext:value-type="string" table:number-columns-spanned="2" table:number-rows-spanned="3">
            <text:p>部分重要規則</text:p>
          </table:table-cell>
          <table:covered-table-cell table:style-name="ce31"/>
          <table:table-cell table:style-name="ce36" office:value-type="string" calcext:value-type="string" table:number-columns-spanned="7" table:number-rows-spanned="3">
            <text:p>1.對能力值進行修正的道具，在能力值成長時參照被道具修正前的能力值計算所需經驗值。以道具取得的異能以記述的最大等級為准。</text:p>
            <text:p>2.【行動值】會因裝備修正降低到-1或以下時，無法裝備該道具。</text:p>
          </table:table-cell>
          <table:covered-table-cell table:number-columns-repeated="5" table:style-name="ce38"/>
          <table:covered-table-cell table:style-name="ce31"/>
          <table:table-cell table:style-name="ce12" table:number-columns-repeated="13"/>
          <table:table-cell table:number-columns-repeated="998"/>
        </table:table-row>
        <table:table-row table:style-name="ro6">
          <table:table-cell table:style-name="ce7" office:value-type="string" calcext:value-type="string">
            <text:p>2.15β</text:p>
          </table:table-cell>
          <table:table-cell table:style-name="ce16" office:value-type="string" calcext:value-type="string">
            <text:p>適配了2022/2/22的勘誤</text:p>
          </table:table-cell>
          <table:table-cell table:style-name="ce12" table:number-columns-repeated="2"/>
          <table:covered-table-cell table:style-name="ce29"/>
          <table:covered-table-cell table:style-name="ce33"/>
          <table:covered-table-cell table:style-name="ce29"/>
          <table:covered-table-cell table:number-columns-repeated="5"/>
          <table:covered-table-cell table:style-name="ce33"/>
          <table:table-cell table:style-name="ce12" table:number-columns-repeated="13"/>
          <table:table-cell table:number-columns-repeated="998"/>
        </table:table-row>
        <table:table-row table:style-name="ro2">
          <table:table-cell table:style-name="ce8" office:value-type="string" calcext:value-type="string">
            <text:p>2.15γ</text:p>
          </table:table-cell>
          <table:table-cell table:style-name="ce18" office:value-type="string" calcext:value-type="string">
            <text:p>修正了防具【機密訂制】和FH關聯【支援人員】的資料錯誤問題、雜兵改為舊譯“集團單位”（後續或許會對トループ這一詞匯進行重新統一）</text:p>
          </table:table-cell>
          <table:table-cell table:style-name="ce12" table:number-columns-repeated="2"/>
          <table:covered-table-cell table:style-name="ce28"/>
          <table:covered-table-cell table:style-name="ce32"/>
          <table:covered-table-cell table:style-name="ce28"/>
          <table:covered-table-cell table:number-columns-repeated="5" table:style-name="ce39"/>
          <table:covered-table-cell table:style-name="ce32"/>
          <table:table-cell table:style-name="ce12" table:number-columns-repeated="13"/>
          <table:table-cell table:number-columns-repeated="998"/>
        </table:table-row>
        <table:table-row table:style-name="ro2">
          <table:table-cell table:style-name="ce9" office:value-type="string" calcext:value-type="string">
            <text:p>2.15δ</text:p>
          </table:table-cell>
          <table:table-cell table:style-name="ce13" office:value-type="string" calcext:value-type="string">
            <text:p>適配了2022/9/13的勘誤</text:p>
          </table:table-cell>
          <table:table-cell table:style-name="ce12" table:number-columns-repeated="24"/>
          <table:table-cell table:number-columns-repeated="998"/>
        </table:table-row>
        <table:table-row table:style-name="ro2">
          <table:table-cell table:style-name="ce9" office:value-type="string" calcext:value-type="string">
            <text:p>2.16</text:p>
          </table:table-cell>
          <table:table-cell table:style-name="ce13" office:value-type="string" calcext:value-type="string">
            <text:p>追加了UA擴的偽神天鎖症狀專屬道具以及SSS6劇本集長青魔劍症狀專屬道具</text:p>
          </table:table-cell>
          <table:table-cell table:style-name="ce12" table:number-columns-repeated="24"/>
          <table:table-cell table:number-columns-repeated="998"/>
        </table:table-row>
        <table:table-row table:style-name="ro8">
          <table:table-cell table:style-name="ce9" office:value-type="string" calcext:value-type="string">
            <text:p>3.0</text:p>
          </table:table-cell>
          <table:table-cell table:style-name="ce19" office:value-type="string" calcext:value-type="string">
            <text:p>全方位更新至IA格式&amp;SSS6內容，暫時未添加CRC舞臺數據。</text:p>
          </table:table-cell>
          <table:table-cell table:style-name="ce12" table:number-columns-repeated="24"/>
          <table:table-cell table:number-columns-repeated="998"/>
        </table:table-row>
        <table:table-row table:style-name="ro2">
          <table:table-cell table:style-name="ce9" office:value-type="string" calcext:value-type="string">
            <text:p>3.01</text:p>
          </table:table-cell>
          <table:table-cell table:style-name="ce12" office:value-type="string" calcext:value-type="string">
            <text:p>修正遺產巨人殺手描述及某兩個夜之XX的數據錯誤，補充影蛇專屬道具數據缺漏，修正“世界之卵”描述</text:p>
          </table:table-cell>
          <table:table-cell table:style-name="ce12" table:number-columns-repeated="24"/>
          <table:table-cell table:number-columns-repeated="998"/>
        </table:table-row>
        <table:table-row table:style-name="ro2">
          <table:table-cell table:style-name="ce9" office:value-type="string" calcext:value-type="string">
            <text:p>3.03</text:p>
          </table:table-cell>
          <table:table-cell table:style-name="ce20" office:value-type="string" calcext:value-type="string">
            <text:p>新增CRC/DF的D-Lois道具</text:p>
          </table:table-cell>
          <table:table-cell table:style-name="ce12" table:number-columns-repeated="24"/>
          <table:table-cell table:number-columns-repeated="998"/>
        </table:table-row>
        <table:table-row table:style-name="ro2">
          <table:table-cell table:style-name="ce9" office:value-type="string" calcext:value-type="string">
            <text:p>3.04</text:p>
          </table:table-cell>
          <table:table-cell table:style-name="ce21" office:value-type="string" calcext:value-type="string">
            <text:p>適配了2026/3/04的勘誤</text:p>
          </table:table-cell>
          <table:table-cell table:style-name="ce12" table:number-columns-repeated="24"/>
          <table:table-cell table:number-columns-repeated="998"/>
        </table:table-row>
        <table:table-row table:style-name="ro2" table:number-rows-repeated="4">
          <table:table-cell table:style-name="ce10"/>
          <table:table-cell table:style-name="ce12" table:number-columns-repeated="25"/>
          <table:table-cell table:number-columns-repeated="998"/>
        </table:table-row>
        <table:table-row table:style-name="ro2">
          <table:table-cell table:style-name="ce11"/>
          <table:table-cell table:style-name="ce12" table:number-columns-repeated="25"/>
          <table:table-cell table:number-columns-repeated="998"/>
        </table:table-row>
        <table:table-row table:style-name="ro2" table:number-rows-repeated="193">
          <table:table-cell table:style-name="ce12" table:number-columns-repeated="26"/>
          <table:table-cell table:number-columns-repeated="998"/>
        </table:table-row>
        <table:table-row table:style-name="ro9" table:number-rows-repeated="768">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一般道具"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9"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4" table:default-cell-style-name="Default"/>
        <table:table-column table:style-name="co14" table:default-cell-style-name="Default"/>
        <table:table-column table:style-name="co5" table:number-columns-repeated="1010" table:default-cell-style-name="Default"/>
        <table:table-row table:style-name="ro2">
          <table:table-cell table:style-name="ce40" office:value-type="string" calcext:value-type="string">
            <text:p>名稱</text:p>
          </table:table-cell>
          <table:table-cell table:style-name="ce40" office:value-type="string" calcext:value-type="string">
            <text:p>種類</text:p>
          </table:table-cell>
          <table:table-cell table:style-name="ce40" office:value-type="string" calcext:value-type="string">
            <text:p>技能</text:p>
          </table:table-cell>
          <table:table-cell table:style-name="ce40" office:value-type="string" calcext:value-type="string">
            <text:p>命中</text:p>
          </table:table-cell>
          <table:table-cell table:style-name="ce40" office:value-type="string" calcext:value-type="string">
            <text:p>攻擊力</text:p>
          </table:table-cell>
          <table:table-cell table:style-name="ce40" office:value-type="string" calcext:value-type="string">
            <text:p>格擋值</text:p>
          </table:table-cell>
          <table:table-cell table:style-name="ce40" office:value-type="string" calcext:value-type="string">
            <text:p>射程</text:p>
          </table:table-cell>
          <table:table-cell table:style-name="ce40" office:value-type="string" calcext:value-type="string">
            <text:p>閃避</text:p>
          </table:table-cell>
          <table:table-cell table:style-name="ce40" office:value-type="string" calcext:value-type="string">
            <text:p>行動</text:p>
          </table:table-cell>
          <table:table-cell table:style-name="ce40" office:value-type="string" calcext:value-type="string">
            <text:p>裝甲值</text:p>
          </table:table-cell>
          <table:table-cell table:style-name="ce40" office:value-type="string" calcext:value-type="string">
            <text:p>購入難度/常備化</text:p>
          </table:table-cell>
          <table:table-cell table:style-name="ce40" office:value-type="string" calcext:value-type="string">
            <text:p>解說</text:p>
          </table:table-cell>
          <table:table-cell table:style-name="ce40" office:value-type="string" calcext:value-type="string">
            <text:p>參照</text:p>
          </table:table-cell>
          <table:table-cell table:style-name="ce40" office:value-type="string" calcext:value-type="string">
            <text:p>備註</text:p>
          </table:table-cell>
          <table:table-cell table:style-name="ce44" table:number-columns-repeated="12"/>
          <table:table-cell table:number-columns-repeated="998"/>
        </table:table-row>
        <table:table-row table:style-name="ro2">
          <table:table-cell table:style-name="ce41" office:value-type="string" calcext:value-type="string" table:number-columns-spanned="13" table:number-rows-spanned="1">
            <text:p>武器</text:p>
          </table:table-cell>
          <table:covered-table-cell table:number-columns-repeated="12"/>
          <table:table-cell table:style-name="ce51"/>
          <table:table-cell table:style-name="ce44" table:number-columns-repeated="12"/>
          <table:table-cell table:number-columns-repeated="998"/>
        </table:table-row>
        <table:table-row table:style-name="ro2">
          <table:table-cell table:style-name="ce42" office:value-type="string" calcext:value-type="string">
            <text:p>空手</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5" calcext:value-type="float">
            <text:p>-5</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購入不可/-</text:p>
          </table:table-cell>
          <table:table-cell table:style-name="ce49" office:value-type="string" calcext:value-type="string">
            <text:p>將空手作為武器使用時的數據。</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電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5" table:number-columns-repeated="3"/>
          <table:table-cell table:style-name="ce47" office:value-type="string" calcext:value-type="string">
            <text:p>4/1</text:p>
          </table:table-cell>
          <table:table-cell table:style-name="ce49" office:value-type="string" calcext:value-type="string">
            <text:p>伸縮式護身警棍，按下按鈕就能用電流將敵人無力化，在保安公司當中很常見，但對付超越者力不從心。</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指虎</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4/1</text:p>
          </table:table-cell>
          <table:table-cell table:style-name="ce49" office:value-type="string" calcext:value-type="string">
            <text:p>夾在指間提升拳頭攻擊力的武器。使用時不攥緊的話，拳頭會很痛。</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伸縮警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5/2</text:p>
          </table:table-cell>
          <table:table-cell table:style-name="ce49" office:value-type="string" calcext:value-type="string">
            <text:p>伸縮式金屬護身武器，極易攜帶。</text:p>
            <text:p>隨時可以使用自動動作裝備。</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電擊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number-columns-repeated="2"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7/2</text:p>
          </table:table-cell>
          <table:table-cell table:style-name="ce49" office:value-type="string" calcext:value-type="string">
            <text:p>能放出數萬到50萬的電壓的防身武器，因為電流比較小所以殺傷力較低。</text:p>
            <text:p>使用該武器進行的近戰攻擊給對象造成至少1點HP傷害時，使對象陷入不良狀態[硬直]。該武器一場景可以使用一次。</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匕首</text:p>
          </table:table-cell>
          <table:table-cell table:style-name="ce45" office:value-type="string" calcext:value-type="string">
            <text:p>近戰/射擊</text:p>
          </table:table-cell>
          <table:table-cell table:style-name="ce45" office:value-type="string" calcext:value-type="string">
            <text:p>&lt;近戰&gt;/&lt;射擊&gt;</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0" calcext:value-type="float">
            <text:p>0</text:p>
          </table:table-cell>
          <table:table-cell table:style-name="ce45" office:value-type="string" calcext:value-type="string">
            <text:p>至近/10m</text:p>
          </table:table-cell>
          <table:table-cell table:style-name="ce45" table:number-columns-repeated="3"/>
          <table:table-cell table:style-name="ce47" office:value-type="string" calcext:value-type="string">
            <text:p>6/2</text:p>
          </table:table-cell>
          <table:table-cell table:style-name="ce49" office:value-type="string" calcext:value-type="string">
            <text:p>戰鬥用小刀。</text:p>
            <text:p>以[種類：射擊]使用時數據參照右側。</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折疊式圓盾</text:p>
          </table:table-cell>
          <table:table-cell table:style-name="ce45" office:value-type="string" calcext:value-type="string">
            <text:p>近戰</text:p>
          </table:table-cell>
          <table:table-cell table:style-name="ce45" office:value-type="string" calcext:value-type="string">
            <text:p>&lt;近戰&gt;</text:p>
          </table:table-cell>
          <table:table-cell table:number-columns-repeated="2" table:style-name="ce45" office:value-type="float" office:value="0" calcext:value-type="float">
            <text:p>0</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5" table:number-columns-repeated="3"/>
          <table:table-cell table:style-name="ce47" office:value-type="string" calcext:value-type="string">
            <text:p>8/2</text:p>
          </table:table-cell>
          <table:table-cell table:style-name="ce49" office:value-type="string" calcext:value-type="string">
            <text:p>緊急時可以迅速使用，但由於是折疊式所以尺寸較小，防禦性能只能說是一般。</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吉他</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7/3</text:p>
          </table:table-cell>
          <table:table-cell table:style-name="ce49" office:value-type="string" calcext:value-type="string">
            <text:p>演奏音樂時用的絃樂器，因為很重也能當鈍器。</text:p>
            <text:p>你進行的&lt;藝術：音樂&gt;判定達成值+1。</text:p>
          </table:table-cell>
          <table:table-cell table:style-name="ce45" office:value-type="string" calcext:value-type="string">
            <text:p>IA P2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拐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5" table:number-columns-repeated="3"/>
          <table:table-cell table:style-name="ce47" office:value-type="string" calcext:value-type="string">
            <text:p>5/3</text:p>
          </table:table-cell>
          <table:table-cell table:style-name="ce49" office:value-type="string" calcext:value-type="string">
            <text:p>古武道中使用的棍棒，其中一端附近有握把，可以為腕部到肘部提供防禦，攻守優秀，在西方作為警棍使用。</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木刀</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5" table:number-columns-repeated="3"/>
          <table:table-cell table:style-name="ce47" office:value-type="string" calcext:value-type="string">
            <text:p>5/3</text:p>
          </table:table-cell>
          <table:table-cell table:style-name="ce49" office:value-type="string" calcext:value-type="string">
            <text:p>刀狀的木質武器，在高手的手中也會變成恐怖的兇器。</text:p>
            <text:p>作為旅遊景點定番的土特產常常被修學旅行的學生買走。</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釘頭錘</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4" calcext:value-type="float">
            <text:p>4</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5" table:number-columns-repeated="3"/>
          <table:table-cell table:style-name="ce47" office:value-type="string" calcext:value-type="string">
            <text:p>8/4</text:p>
          </table:table-cell>
          <table:table-cell table:style-name="ce49" office:value-type="string" calcext:value-type="string">
            <text:p>專門用來戰鬥的鈍器，有釘頭錘、戰錘、大錘等，包含晨星錘等帶刺的武器。</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西洋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number-columns-repeated="2" table:style-name="ce45" office:value-type="float" office:value="4" calcext:value-type="float">
            <text:p>4</text:p>
          </table:table-cell>
          <table:table-cell table:style-name="ce45" office:value-type="string" calcext:value-type="string">
            <text:p>至近</text:p>
          </table:table-cell>
          <table:table-cell table:style-name="ce45" table:number-columns-repeated="3"/>
          <table:table-cell table:style-name="ce47" office:value-type="string" calcext:value-type="string">
            <text:p>11/5</text:p>
          </table:table-cell>
          <table:table-cell table:style-name="ce49" office:value-type="string" calcext:value-type="string">
            <text:p>可攻可防的西洋劍，包含寬刃劍、單手劍、雙手長劍、軍刀等等款式。</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高壓電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3" calcext:value-type="float">
            <text:p>3</text:p>
          </table:table-cell>
          <table:table-cell table:style-name="ce45" office:value-type="float" office:value="1" calcext:value-type="float">
            <text:p>1</text:p>
          </table:table-cell>
          <table:table-cell table:style-name="ce45" office:value-type="string" calcext:value-type="string">
            <text:p>至近</text:p>
          </table:table-cell>
          <table:table-cell table:style-name="ce45" table:number-columns-repeated="3"/>
          <table:table-cell table:style-name="ce47" office:value-type="string" calcext:value-type="string">
            <text:p>15/5</text:p>
          </table:table-cell>
          <table:table-cell table:style-name="ce49" office:value-type="string" calcext:value-type="string">
            <text:p>對超越者專用，內部安裝了高壓電源的大型警棍，警察禁止攜帶，但是特殊犯罪調查室成員經常會攜帶。</text:p>
            <text:p>使用該武器進行的近戰攻擊給對象造成至少1點HP傷害時，使對象陷入不良狀態[恍惚]。該效果一場景可以使用一次。</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日本刀</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5" table:number-columns-repeated="3"/>
          <table:table-cell table:style-name="ce47" office:value-type="string" calcext:value-type="string">
            <text:p>11/5</text:p>
          </table:table-cell>
          <table:table-cell table:style-name="ce49" office:value-type="string" calcext:value-type="string">
            <text:p>刀身有些弧度的單刃劍，作為藝術品也具備一定的價值，也有很多愛好者。古刀有作為古董的價值，現代刀在美觀的同時也有作為武器的威嚇力。</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斧</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1" calcext:value-type="float">
            <text:p>1</text:p>
          </table:table-cell>
          <table:table-cell table:style-name="ce45" office:value-type="string" calcext:value-type="string">
            <text:p>至近</text:p>
          </table:table-cell>
          <table:table-cell table:style-name="ce45" table:number-columns-repeated="3"/>
          <table:table-cell table:style-name="ce47" office:value-type="string" calcext:value-type="string">
            <text:p>11/6</text:p>
          </table:table-cell>
          <table:table-cell table:style-name="ce49" office:value-type="string" calcext:value-type="string">
            <text:p>專門用來戰鬥的斧，很重，揮舞時能獲得很強的破壞力。</text:p>
            <text:p>使用該武器進行的近戰攻擊傷害擲骰後可以使用，選其中任意一顆骰子重骰，且不論結果好壞必須接受重骰結果。</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長柄武器</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5" calcext:value-type="float">
            <text:p>5</text:p>
          </table:table-cell>
          <table:table-cell table:style-name="ce45" office:value-type="float" office:value="6" calcext:value-type="float">
            <text:p>6</text:p>
          </table:table-cell>
          <table:table-cell table:style-name="ce45" office:value-type="string" calcext:value-type="string">
            <text:p>至近</text:p>
          </table:table-cell>
          <table:table-cell table:style-name="ce45" table:number-columns-repeated="3"/>
          <table:table-cell table:style-name="ce47" office:value-type="string" calcext:value-type="string">
            <text:p>8/6</text:p>
          </table:table-cell>
          <table:table-cell table:style-name="ce49" office:value-type="string" calcext:value-type="string">
            <text:p>長柄前端帶刃的武器，包括戟、薙刀、竹槍、農具等，對超越者來說揮舞著火把和長柄武器的暴徒們是最需要恐懼的。</text:p>
            <text:p>你的【行動值】-2。</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長槍</text:p>
          </table:table-cell>
          <table:table-cell table:style-name="ce45" office:value-type="string" calcext:value-type="string">
            <text:p>近戰/射擊</text:p>
          </table:table-cell>
          <table:table-cell table:style-name="ce45" office:value-type="string" calcext:value-type="string">
            <text:p>&lt;近戰&gt;/&lt;射擊&gt;</text:p>
          </table:table-cell>
          <table:table-cell table:style-name="ce45" office:value-type="float" office:value="-2" calcext:value-type="float">
            <text:p>-2</text:p>
          </table:table-cell>
          <table:table-cell table:style-name="ce45" office:value-type="float" office:value="5" calcext:value-type="float">
            <text:p>5</text:p>
          </table:table-cell>
          <table:table-cell table:style-name="ce45" office:value-type="float" office:value="1" calcext:value-type="float">
            <text:p>1</text:p>
          </table:table-cell>
          <table:table-cell table:style-name="ce45" office:value-type="string" calcext:value-type="string">
            <text:p>至近/20m</text:p>
          </table:table-cell>
          <table:table-cell table:style-name="ce45" table:number-columns-repeated="3"/>
          <table:table-cell table:style-name="ce47" office:value-type="string" calcext:value-type="string">
            <text:p>11/6</text:p>
          </table:table-cell>
          <table:table-cell table:style-name="ce49" office:value-type="string" calcext:value-type="string">
            <text:p>一般的長槍，從古至今實用性極高的武器，也可以投擲。</text:p>
            <text:p>以[種類：射擊]使用時數據參照右側。</text:p>
          </table:table-cell>
          <table:table-cell table:style-name="ce45" office:value-type="string" calcext:value-type="string">
            <text:p>IA P2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壓縮瓦斯刀</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13/7</text:p>
          </table:table-cell>
          <table:table-cell table:style-name="ce49" office:value-type="string" calcext:value-type="string">
            <text:p>匕首握柄內部裝有小型氣壓瓶，突刺後從刀尖噴射出去可以對敵人的體內造成極大的破壞。</text:p>
            <text:p>使用該武器進行的近戰攻擊傷害擲骰前使用，該攻擊的攻擊力+5，該效果一劇本可以使用一次。</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電鋸</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5" calcext:value-type="float">
            <text:p>-5</text:p>
          </table:table-cell>
          <table:table-cell table:style-name="ce45" office:value-type="float" office:value="6" calcext:value-type="float">
            <text:p>6</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5" table:number-columns-repeated="3"/>
          <table:table-cell table:style-name="ce47" office:value-type="string" calcext:value-type="string">
            <text:p>10/7</text:p>
          </table:table-cell>
          <table:table-cell table:style-name="ce49" office:value-type="string" calcext:value-type="string">
            <text:p>用來鋸木頭的機器，鋸刃因鎖鏈旋轉產生強大的切斷力，會因為激烈的震動而難以命中敵人。</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鑽頭</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6" calcext:value-type="float">
            <text:p>-6</text:p>
          </table:table-cell>
          <table:table-cell table:style-name="ce45" office:value-type="float" office:value="6" calcext:value-type="float">
            <text:p>6</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13/7</text:p>
          </table:table-cell>
          <table:table-cell table:style-name="ce49" office:value-type="string" calcext:value-type="string">
            <text:p>用來給東西開洞的機器，因為本身不是武器所以不好操縱。</text:p>
            <text:p>使用該武器進行的攻擊，以對方的裝甲值-2（最低為0）計算傷害。</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彈道戰術刀</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13/7</text:p>
          </table:table-cell>
          <table:table-cell table:style-name="ce49" office:value-type="string" calcext:value-type="string">
            <text:p>據說曾由特殊部隊使用的特殊匕首，刀柄內裝有強力彈簧能將刀身射出。</text:p>
            <text:p>使用該武器進行的近戰攻擊判定前使用，該攻擊的攻擊對象進行的回避判定骰數-4個，該主要階段結束後該武器破壞。</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巨木/巨岩</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4" calcext:value-type="float">
            <text:p>-4</text:p>
          </table:table-cell>
          <table:table-cell table:style-name="ce45" office:value-type="float" office:value="8" calcext:value-type="float">
            <text:p>8</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5" table:number-columns-repeated="3"/>
          <table:table-cell table:style-name="ce47" office:value-type="string" calcext:value-type="string">
            <text:p>11/8</text:p>
          </table:table-cell>
          <table:table-cell table:style-name="ce49" office:value-type="string" calcext:value-type="string">
            <text:p>利用自然環境製造的武器。</text:p>
            <text:p>使用該武器需要【肉體】6。</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纖維鞭</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6" calcext:value-type="float">
            <text:p>-6</text:p>
          </table:table-cell>
          <table:table-cell table:style-name="ce45" office:value-type="float" office:value="6" calcext:value-type="float">
            <text:p>6</text:p>
          </table:table-cell>
          <table:table-cell table:style-name="ce45" office:value-type="float" office:value="0" calcext:value-type="float">
            <text:p>0</text:p>
          </table:table-cell>
          <table:table-cell table:style-name="ce45" office:value-type="string" calcext:value-type="string">
            <text:p>10m</text:p>
          </table:table-cell>
          <table:table-cell table:style-name="ce45" table:number-columns-repeated="3"/>
          <table:table-cell table:style-name="ce47" office:value-type="string" calcext:value-type="string">
            <text:p>12/8</text:p>
          </table:table-cell>
          <table:table-cell table:style-name="ce49" office:value-type="string" calcext:value-type="string">
            <text:p>用非常細的纖維製成的鞭子，很難使用。</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強化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6" calcext:value-type="float">
            <text:p>6</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5" table:number-columns-repeated="3"/>
          <table:table-cell table:style-name="ce47" office:value-type="string" calcext:value-type="string">
            <text:p>15/8</text:p>
          </table:table-cell>
          <table:table-cell table:style-name="ce49" office:value-type="string" calcext:value-type="string">
            <text:p>利用來自超越者的素材製作的高耐久性刀劍，以經常進行超高速戰鬥的疾速靈猿症候為主要受眾，有很多人喜歡用，有著即使被超越者的怪力使用也能承受住的剛性。</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打樁機</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4" calcext:value-type="float">
            <text:p>-4</text:p>
          </table:table-cell>
          <table:table-cell table:style-name="ce45" office:value-type="float" office:value="2" calcext:value-type="float">
            <text:p>2</text:p>
          </table:table-cell>
          <table:table-cell table:style-name="ce45" office:value-type="float" office:value="4" calcext:value-type="float">
            <text:p>4</text:p>
          </table:table-cell>
          <table:table-cell table:style-name="ce45" office:value-type="string" calcext:value-type="string">
            <text:p>至近</text:p>
          </table:table-cell>
          <table:table-cell table:style-name="ce45" table:number-columns-repeated="3"/>
          <table:table-cell table:style-name="ce47" office:value-type="string" calcext:value-type="string">
            <text:p>13/9</text:p>
          </table:table-cell>
          <table:table-cell table:style-name="ce49" office:value-type="string" calcext:value-type="string">
            <text:p>外觀像盾牌，但內部藏有巨大的金屬樁，是利用火藥的爆發力將金屬樁打入對方體內的武器。</text:p>
            <text:p>使用該武器進行的近戰攻擊判定前使用，該攻擊的攻擊力+10。該效果一劇本可以使用三次。</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雙手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3" calcext:value-type="float">
            <text:p>-3</text:p>
          </table:table-cell>
          <table:table-cell table:style-name="ce45" office:value-type="float" office:value="10" calcext:value-type="float">
            <text:p>10</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5" table:number-columns-repeated="3"/>
          <table:table-cell table:style-name="ce47" office:value-type="string" calcext:value-type="string">
            <text:p>13/9</text:p>
          </table:table-cell>
          <table:table-cell table:style-name="ce49" office:value-type="string" calcext:value-type="string">
            <text:p>大太刀或德式雙手劍等必須用兩隻手使用的劍，破壞力非常大的同時也很笨重。</text:p>
            <text:p>雙手持握。</text:p>
          </table:table-cell>
          <table:table-cell table:style-name="ce45" office:value-type="string" calcext:value-type="string">
            <text:p>IA P2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大錘</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3" calcext:value-type="float">
            <text:p>-3</text:p>
          </table:table-cell>
          <table:table-cell table:style-name="ce45" office:value-type="float" office:value="12" calcext:value-type="float">
            <text:p>12</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5" table:number-columns-repeated="3"/>
          <table:table-cell table:style-name="ce47" office:value-type="string" calcext:value-type="string">
            <text:p>14/10</text:p>
          </table:table-cell>
          <table:table-cell table:style-name="ce49" office:value-type="string" calcext:value-type="string">
            <text:p>必須用雙手使用的大錘，作為質量武器非常單純而有效。</text:p>
            <text:p>你進行的全力移動-10m。雙手持握。</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三連打樁機</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4" calcext:value-type="float">
            <text:p>-4</text:p>
          </table:table-cell>
          <table:table-cell table:style-name="ce45" office:value-type="float" office:value="6" calcext:value-type="float">
            <text:p>6</text:p>
          </table:table-cell>
          <table:table-cell table:style-name="ce45" office:value-type="float" office:value="4" calcext:value-type="float">
            <text:p>4</text:p>
          </table:table-cell>
          <table:table-cell table:style-name="ce45" office:value-type="string" calcext:value-type="string">
            <text:p>至近</text:p>
          </table:table-cell>
          <table:table-cell table:style-name="ce45" table:number-columns-repeated="3"/>
          <table:table-cell table:style-name="ce47" office:value-type="string" calcext:value-type="string">
            <text:p>46/12</text:p>
          </table:table-cell>
          <table:table-cell table:style-name="ce49" office:value-type="string" calcext:value-type="string">
            <text:p>使用三發40mm彈藥聯裝加速的特殊結晶鋼制打樁機，作為UGN開發的武器普及。</text:p>
            <text:p>使用該武器進行的近戰攻擊判定前使用，該攻擊的攻擊力+10。該效果一劇本可以使用三次。搭載火器。稀有道具。</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熱能鞭</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6" calcext:value-type="float">
            <text:p>-6</text:p>
          </table:table-cell>
          <table:table-cell table:style-name="ce45" office:value-type="float" office:value="10" calcext:value-type="float">
            <text:p>10</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17/12</text:p>
          </table:table-cell>
          <table:table-cell table:style-name="ce49" office:value-type="string" calcext:value-type="string">
            <text:p>高熱化的熱能鞭，擁有高溫帶來的恐怖鋒利度，但也很難使用。</text:p>
            <text:p>使用該武器進行的近戰攻擊判定前使用，該攻擊計算傷害時無視對象裝甲值，使用該效果的主要階段結束時該武器破壞。稀有道具。</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高速振動劍</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12" calcext:value-type="float">
            <text:p>12</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5" table:number-columns-repeated="3"/>
          <table:table-cell table:style-name="ce47" office:value-type="string" calcext:value-type="string">
            <text:p>20/13</text:p>
          </table:table-cell>
          <table:table-cell table:style-name="ce49" office:value-type="string" calcext:value-type="string">
            <text:p>使劍刃振動增強攻擊力的劍，但需要電力是其缺點。</text:p>
            <text:p>裝備並以次要動作激活其使用，使其維持在該場景中可用。稀有道具。</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機械拳</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5" calcext:value-type="float">
            <text:p>5</text:p>
          </table:table-cell>
          <table:table-cell table:style-name="ce45" office:value-type="float" office:value="0" calcext:value-type="float">
            <text:p>0</text:p>
          </table:table-cell>
          <table:table-cell table:style-name="ce45" office:value-type="string" calcext:value-type="string">
            <text:p>至近</text:p>
          </table:table-cell>
          <table:table-cell table:style-name="ce45" table:number-columns-repeated="3"/>
          <table:table-cell table:style-name="ce47" office:value-type="string" calcext:value-type="string">
            <text:p>35/18</text:p>
          </table:table-cell>
          <table:table-cell table:style-name="ce49" office:value-type="string" calcext:value-type="string">
            <text:p>機械式動力輔助手甲，活塞撞針產生的衝擊力能讓對方的防禦無效</text:p>
            <text:p>使用該武器進行的攻擊不能被格擋，對該近戰攻擊進行掩護時無視格擋計算傷害。該武器一劇本可以使用一次。稀有道具。</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特殊塑料盾牌</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office:value-type="float" office:value="4" calcext:value-type="float">
            <text:p>4</text:p>
          </table:table-cell>
          <table:table-cell table:style-name="ce45" office:value-type="string" calcext:value-type="string">
            <text:p>至近</text:p>
          </table:table-cell>
          <table:table-cell table:style-name="ce45" table:number-columns-repeated="3"/>
          <table:table-cell table:style-name="ce47" office:value-type="string" calcext:value-type="string">
            <text:p>9/4</text:p>
          </table:table-cell>
          <table:table-cell table:style-name="ce49" office:value-type="string" calcext:value-type="string">
            <text:p>聚碳酸酯制盾牌。重量輕，易於使用，盾身透明不會遮擋視線</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鋁合金盾牌</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6" calcext:value-type="float">
            <text:p>6</text:p>
          </table:table-cell>
          <table:table-cell table:style-name="ce45" office:value-type="string" calcext:value-type="string">
            <text:p>至近</text:p>
          </table:table-cell>
          <table:table-cell table:style-name="ce45" table:number-columns-repeated="3"/>
          <table:table-cell table:style-name="ce47" office:value-type="string" calcext:value-type="string">
            <text:p>12/8</text:p>
          </table:table-cell>
          <table:table-cell table:style-name="ce49" office:value-type="string" calcext:value-type="string">
            <text:p>機動隊使用的鋁合金制巨大盾牌，意外地輕巧。</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感應盾牌</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office:value-type="float" office:value="4" calcext:value-type="float">
            <text:p>4</text:p>
          </table:table-cell>
          <table:table-cell table:style-name="ce45" office:value-type="string" calcext:value-type="string">
            <text:p>至近</text:p>
          </table:table-cell>
          <table:table-cell table:style-name="ce45" table:number-columns-repeated="3"/>
          <table:table-cell table:style-name="ce47" office:value-type="string" calcext:value-type="string">
            <text:p>16/11</text:p>
          </table:table-cell>
          <table:table-cell table:style-name="ce49" office:value-type="string" calcext:value-type="string">
            <text:p>通常的聚碳酸酯制盾牌中安裝了感知周圍的感應器。</text:p>
            <text:p>你進行的&lt;知覺&gt;判定骰數+1個。</text:p>
          </table:table-cell>
          <table:table-cell table:style-name="ce45" office:value-type="string" calcext:value-type="string">
            <text:p>IA P25</text:p>
          </table:table-cell>
          <table:table-cell table:style-name="ce51"/>
          <table:table-cell table:style-name="ce44" table:number-columns-repeated="12"/>
          <table:table-cell table:number-columns-repeated="998"/>
        </table:table-row>
        <table:table-row table:style-name="ro2">
          <table:table-cell table:style-name="ce43" office:value-type="string" calcext:value-type="string">
            <text:p>電磁盾牌</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2" calcext:value-type="float">
            <text:p>-2</text:p>
          </table:table-cell>
          <table:table-cell table:style-name="ce45" office:value-type="float" office:value="2" calcext:value-type="float">
            <text:p>2</text:p>
          </table:table-cell>
          <table:table-cell table:style-name="ce46" office:value-type="float" office:value="13" calcext:value-type="float">
            <text:p>13</text:p>
          </table:table-cell>
          <table:table-cell table:style-name="ce45" office:value-type="string" calcext:value-type="string">
            <text:p>至近</text:p>
          </table:table-cell>
          <table:table-cell table:style-name="ce45" table:number-columns-repeated="3"/>
          <table:table-cell table:style-name="ce47" office:value-type="string" calcext:value-type="string">
            <text:p>17/12</text:p>
          </table:table-cell>
          <table:table-cell table:style-name="ce49" office:value-type="string" calcext:value-type="string">
            <text:p>利用磁力產生斥力的盾。</text:p>
            <text:p>裝備並以次要動作激活其使用，使其維持在該場景中可用。</text:p>
          </table:table-cell>
          <table:table-cell table:style-name="ce45" office:value-type="string" calcext:value-type="string">
            <text:p>IA P25</text:p>
          </table:table-cell>
          <table:table-cell table:style-name="ce51" office:value-type="string" calcext:value-type="string">
            <text:p>IA修改格擋值</text:p>
            <text:p>8→13</text:p>
          </table:table-cell>
          <table:table-cell table:style-name="ce44" table:number-columns-repeated="12"/>
          <table:table-cell table:number-columns-repeated="998"/>
        </table:table-row>
        <table:table-row table:style-name="ro2">
          <table:table-cell table:style-name="ce42" office:value-type="string" calcext:value-type="string">
            <text:p>卸力盾牌</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3" calcext:value-type="float">
            <text:p>-3</text:p>
          </table:table-cell>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5" table:number-columns-repeated="3"/>
          <table:table-cell table:style-name="ce47" office:value-type="string" calcext:value-type="string">
            <text:p>17/12</text:p>
          </table:table-cell>
          <table:table-cell table:style-name="ce49" office:value-type="string" calcext:value-type="string">
            <text:p>特化了對劍或爪等近戰攻擊卸力性能的小型盾。</text:p>
            <text:p>你對近戰攻擊進行的閃避判定骰數+1個。</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反應盾牌</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2" calcext:value-type="float">
            <text:p>-2</text:p>
          </table:table-cell>
          <table:table-cell table:style-name="ce45" office:value-type="float" office:value="2" calcext:value-type="float">
            <text:p>2</text:p>
          </table:table-cell>
          <table:table-cell table:style-name="ce45" office:value-type="float" office:value="6" calcext:value-type="float">
            <text:p>6</text:p>
          </table:table-cell>
          <table:table-cell table:style-name="ce45" office:value-type="string" calcext:value-type="string">
            <text:p>至近</text:p>
          </table:table-cell>
          <table:table-cell table:style-name="ce45" table:number-columns-repeated="3"/>
          <table:table-cell table:style-name="ce47" office:value-type="string" calcext:value-type="string">
            <text:p>18/12</text:p>
          </table:table-cell>
          <table:table-cell table:style-name="ce49" office:value-type="string" calcext:value-type="string">
            <text:p>表面貼有可以瞬間硬化的凝膠物質的盾牌，可以將應對衝擊的壓力最小化，但不能連續使用。</text:p>
            <text:p>你進行格擋時使用，該格擋的格擋值+1D10，該效果一場景可以使用一次。</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水晶盾</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0" calcext:value-type="float">
            <text:p>0</text:p>
          </table:table-cell>
          <table:table-cell table:style-name="ce45" office:value-type="float" office:value="12" calcext:value-type="float">
            <text:p>12</text:p>
          </table:table-cell>
          <table:table-cell table:style-name="ce45" office:value-type="string" calcext:value-type="string">
            <text:p>至近</text:p>
          </table:table-cell>
          <table:table-cell table:style-name="ce45" table:number-columns-repeated="3"/>
          <table:table-cell table:style-name="ce47" office:value-type="string" calcext:value-type="string">
            <text:p>25/15</text:p>
          </table:table-cell>
          <table:table-cell table:style-name="ce49" office:value-type="string" calcext:value-type="string">
            <text:p>像是用水晶製成的閃光透明盾牌，事實上使用了特殊合金能夠應對各種衝擊，但非常沉重。</text:p>
            <text:p>雙手持握。</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反背教者盾牌</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2" calcext:value-type="float">
            <text:p>-2</text:p>
          </table:table-cell>
          <table:table-cell table:style-name="ce45" office:value-type="float" office:value="2" calcext:value-type="float">
            <text:p>2</text:p>
          </table:table-cell>
          <table:table-cell table:style-name="ce45" office:value-type="float" office:value="12" calcext:value-type="float">
            <text:p>12</text:p>
          </table:table-cell>
          <table:table-cell table:style-name="ce45" office:value-type="string" calcext:value-type="string">
            <text:p>至近</text:p>
          </table:table-cell>
          <table:table-cell table:style-name="ce45" table:number-columns-repeated="3"/>
          <table:table-cell table:style-name="ce47" office:value-type="string" calcext:value-type="string">
            <text:p>30/18</text:p>
          </table:table-cell>
          <table:table-cell table:style-name="ce49" office:value-type="string" calcext:value-type="string">
            <text:p>使用難以被背教者侵蝕的金屬製作的盾牌，雖然防禦力很高但很重，只有很少組織使用。</text:p>
            <text:p>你的【行動值】-5。</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燃燒瓶</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5" calcext:value-type="float">
            <text:p>-5</text:p>
          </table:table-cell>
          <table:table-cell table:style-name="ce45" office:value-type="float" office:value="0" calcext:value-type="float">
            <text:p>0</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2/1</text:p>
          </table:table-cell>
          <table:table-cell table:style-name="ce49" office:value-type="string" calcext:value-type="string">
            <text:p>在玻璃瓶裡裝入固體酒精或汽油的簡易武器。</text:p>
            <text:p>該武器命中時使對象陷入不良狀態[恍惚]，該武器一劇本可以使用一次。至近不可。</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手裡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7/2</text:p>
          </table:table-cell>
          <table:table-cell table:style-name="ce49" office:value-type="string" calcext:value-type="string">
            <text:p>忍者使用的投擲特化武器，熟練的話可以一次投擲多枚</text:p>
            <text:p>使用該武器對處於同一接戰區域內的角色進行攻擊時判定達成值+2。</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射出式電擊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0" calcext:value-type="float">
            <text:p>0</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9/3</text:p>
          </table:table-cell>
          <table:table-cell table:style-name="ce49" office:value-type="string" calcext:value-type="string">
            <text:p>射出連著電線的針並放出電流的電擊槍，射出的針使用了氣動發射和單髮式導體，無法連續使用。</text:p>
            <text:p>使用該武器進行的射擊攻擊給對象造成至少1點HP傷害時，使對象陷入不良狀態[硬直]。該武器一場景可以使用一次。</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震撼手榴彈</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3" calcext:value-type="float">
            <text:p>-3</text:p>
          </table:table-cell>
          <table:table-cell table:style-name="ce45" office:value-type="float" office:value="0" calcext:value-type="float">
            <text:p>0</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5/3</text:p>
          </table:table-cell>
          <table:table-cell table:style-name="ce49" office:value-type="string" calcext:value-type="string">
            <text:p>用閃光和爆音暫時剝奪對手感官的手榴彈。</text:p>
            <text:p>使用該武器進行的攻擊的對象變為[對象：範圍]，該攻擊命中時，使對象陷入不良狀態[硬直]和[恍惚]。使用該武器無法造成HP傷害。該武器一劇本可以使用一次。</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粗糙的手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2" calcext:value-type="float">
            <text:p>2</text:p>
          </table:table-cell>
          <table:table-cell table:style-name="ce45" office:value-type="string" calcext:value-type="string">
            <text:p>-</text:p>
          </table:table-cell>
          <table:table-cell table:style-name="ce45" office:value-type="string" calcext:value-type="string">
            <text:p>15m</text:p>
          </table:table-cell>
          <table:table-cell table:style-name="ce45" table:number-columns-repeated="3"/>
          <table:table-cell table:style-name="ce47" office:value-type="string" calcext:value-type="string">
            <text:p>3/3</text:p>
          </table:table-cell>
          <table:table-cell table:style-name="ce49" office:value-type="string" calcext:value-type="string">
            <text:p>用模型槍改造或者將瓦斯槍的氣壓增強到違法等級，又或者使用3D打印製作的便宜槍，是沒法用持槍證正規買槍的人的選擇。</text:p>
            <text:p>該武器進行的攻擊判定大失敗時該武器破壞，你受到1D10HP傷害。</text:p>
          </table:table-cell>
          <table:table-cell table:style-name="ce45" office:value-type="string" calcext:value-type="string">
            <text:p>IA P2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毒氣手榴彈</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3" calcext:value-type="float">
            <text:p>-3</text:p>
          </table:table-cell>
          <table:table-cell table:style-name="ce45" office:value-type="float" office:value="0" calcext:value-type="float">
            <text:p>0</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5/3</text:p>
          </table:table-cell>
          <table:table-cell table:style-name="ce49" office:value-type="string" calcext:value-type="string">
            <text:p>散佈能通過皮膚傳染的毒的手榴彈。</text:p>
            <text:p>使用該武器進行攻擊的對象變為[對象：範圍]，該攻擊命中時使對象陷入不良狀態[邪毒：3]。使用該武器無法造成HP傷害。該武器一劇本可以使用一次。</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弓箭</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string" calcext:value-type="string">
            <text:p>-</text:p>
          </table:table-cell>
          <table:table-cell table:style-name="ce45" office:value-type="string" calcext:value-type="string">
            <text:p>60m</text:p>
          </table:table-cell>
          <table:table-cell table:style-name="ce45" table:number-columns-repeated="3"/>
          <table:table-cell table:style-name="ce47" office:value-type="string" calcext:value-type="string">
            <text:p>7/3</text:p>
          </table:table-cell>
          <table:table-cell table:style-name="ce49" office:value-type="string" calcext:value-type="string">
            <text:p>利用弦的彈力發射箭矢的人類最古老射擊武器，為了方便計算，西洋弓與和弓沒有什麼區別，也可以是用廢電線和金屬板製作的簡易弓。雖然主要是運動用和儀式用，但殺傷力也很充足。</text:p>
            <text:p>雙手持握。至近不可。</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十字弓</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2" calcext:value-type="float">
            <text:p>2</text:p>
          </table:table-cell>
          <table:table-cell table:style-name="ce45" office:value-type="string" calcext:value-type="string">
            <text:p>-</text:p>
          </table:table-cell>
          <table:table-cell table:style-name="ce45" office:value-type="string" calcext:value-type="string">
            <text:p>40m</text:p>
          </table:table-cell>
          <table:table-cell table:style-name="ce45" table:number-columns-repeated="3"/>
          <table:table-cell table:style-name="ce47" office:value-type="string" calcext:value-type="string">
            <text:p>7/4</text:p>
          </table:table-cell>
          <table:table-cell table:style-name="ce49" office:value-type="string" calcext:value-type="string">
            <text:p>機械式西式弓，也被稱為弩，使用專用的弩矢。至近不可。</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複合弓</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3" calcext:value-type="float">
            <text:p>-3</text:p>
          </table:table-cell>
          <table:table-cell table:style-name="ce45" office:value-type="string" calcext:value-type="string">
            <text:p>【肉體】</text:p>
          </table:table-cell>
          <table:table-cell table:style-name="ce45" office:value-type="string" calcext:value-type="string">
            <text:p>-</text:p>
          </table:table-cell>
          <table:table-cell table:style-name="ce45" office:value-type="string" calcext:value-type="string">
            <text:p>【肉體】+20m</text:p>
          </table:table-cell>
          <table:table-cell table:style-name="ce45" table:number-columns-repeated="3"/>
          <table:table-cell table:style-name="ce47" office:value-type="string" calcext:value-type="string">
            <text:p>6/5</text:p>
          </table:table-cell>
          <table:table-cell table:style-name="ce49" office:value-type="string" calcext:value-type="string">
            <text:p>古今中外都有使用的弓，需要人力拉開射箭。</text:p>
            <text:p>該武器的攻擊力為【肉體】。雙手持握。至近不可。</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小型火箭發射器</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10" calcext:value-type="float">
            <text:p>10</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13/5</text:p>
          </table:table-cell>
          <table:table-cell table:style-name="ce49" office:value-type="string" calcext:value-type="string">
            <text:p>以美軍M72為代表的折疊式火箭筒，火力不算強大但是能隱藏在大衣裡面，受到恐怖分子和破壞間諜喜愛。</text:p>
            <text:p>使用該武器進行攻擊的對象變為[對象：範圍]，該武器一劇本可以使用一次。至近不可。稀有道具。</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獵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4" calcext:value-type="float">
            <text:p>4</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7/5</text:p>
          </table:table-cell>
          <table:table-cell table:style-name="ce49" office:value-type="string" calcext:value-type="string">
            <text:p>使用22口徑小口徑彈藥，在狩獵小動物和鹿時廣泛應用。對熊和原菌威力不足，但是一般情況已經夠用了。</text:p>
            <text:p>以次要動作使用，該主要階段間，該武器進行的攻擊的判定達成值+5。雙手持握。至近不可。</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車載機關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9" calcext:value-type="float">
            <text:p>9</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13/6</text:p>
          </table:table-cell>
          <table:table-cell table:style-name="ce49" office:value-type="string" calcext:value-type="string">
            <text:p>附帶槍座和大型彈倉的機關槍，常用於陣地防禦和攻擊非裝甲目標</text:p>
            <text:p>該武器對集團敵人進行的射擊攻擊傷害+2D10。搭載火器（【肉體】6以上的角色可以將該武器視為雙手持握而非搭載火器裝備）。至近不可。稀有道具。</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手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4" calcext:value-type="float">
            <text:p>4</text:p>
          </table:table-cell>
          <table:table-cell table:style-name="ce45" office:value-type="string" calcext:value-type="string">
            <text:p>-</text:p>
          </table:table-cell>
          <table:table-cell table:style-name="ce45" office:value-type="string" calcext:value-type="string">
            <text:p>20m</text:p>
          </table:table-cell>
          <table:table-cell table:style-name="ce45" table:number-columns-repeated="3"/>
          <table:table-cell table:style-name="ce47" office:value-type="string" calcext:value-type="string">
            <text:p>10/6</text:p>
          </table:table-cell>
          <table:table-cell table:style-name="ce49" office:value-type="string" calcext:value-type="string">
            <text:p>使用 9mm 子彈的手槍，簡單易用的火器，很適合日本人的小手。</text:p>
          </table:table-cell>
          <table:table-cell table:style-name="ce45" office:value-type="string" calcext:value-type="string">
            <text:p>IA P27</text:p>
          </table:table-cell>
          <table:table-cell table:style-name="ce51" office:value-type="string" calcext:value-type="string">
            <text:p>IA修改命中，攻擊力</text:p>
            <text:p>-1→0,3→4</text:p>
          </table:table-cell>
          <table:table-cell table:style-name="ce44" table:number-columns-repeated="12"/>
          <table:table-cell table:number-columns-repeated="998"/>
        </table:table-row>
        <table:table-row table:style-name="ro2">
          <table:table-cell table:style-name="ce42" office:value-type="string" calcext:value-type="string">
            <text:p>破片手榴彈</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3" calcext:value-type="float">
            <text:p>-3</text:p>
          </table:table-cell>
          <table:table-cell table:style-name="ce45" office:value-type="float" office:value="5" calcext:value-type="float">
            <text:p>5</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12/6</text:p>
          </table:table-cell>
          <table:table-cell table:style-name="ce49" office:value-type="string" calcext:value-type="string">
            <text:p>內部的鋼珠會因爆炸變成破片給予傷害的手榴彈。</text:p>
            <text:p>使用該武器進行攻擊的對象變為[對象：範圍]，該武器一劇本可以使用一次。</text:p>
          </table:table-cell>
          <table:table-cell table:style-name="ce45" office:value-type="string" calcext:value-type="string">
            <text:p>IA P2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大型手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6" calcext:value-type="float">
            <text:p>6</text:p>
          </table:table-cell>
          <table:table-cell table:style-name="ce45" office:value-type="string" calcext:value-type="string">
            <text:p>-</text:p>
          </table:table-cell>
          <table:table-cell table:style-name="ce45" office:value-type="string" calcext:value-type="string">
            <text:p>20m</text:p>
          </table:table-cell>
          <table:table-cell table:style-name="ce45" table:number-columns-repeated="3"/>
          <table:table-cell table:style-name="ce47" office:value-type="string" calcext:value-type="string">
            <text:p>11/7</text:p>
          </table:table-cell>
          <table:table-cell table:style-name="ce49" office:value-type="string" calcext:value-type="string">
            <text:p>使用馬格南子彈的大型手槍，後坐力相當之大，使用需要相當程度的技術和力量。</text:p>
          </table:table-cell>
          <table:table-cell table:style-name="ce45" office:value-type="string" calcext:value-type="string">
            <text:p>IA P28</text:p>
          </table:table-cell>
          <table:table-cell table:style-name="ce51" office:value-type="string" calcext:value-type="string">
            <text:p>IA修改命中，攻擊力</text:p>
            <text:p>-2→-1,5→6</text:p>
          </table:table-cell>
          <table:table-cell table:style-name="ce44" table:number-columns-repeated="12"/>
          <table:table-cell table:number-columns-repeated="998"/>
        </table:table-row>
        <table:table-row table:style-name="ro2">
          <table:table-cell table:style-name="ce42" office:value-type="string" calcext:value-type="string">
            <text:p>霰彈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11/7</text:p>
          </table:table-cell>
          <table:table-cell table:style-name="ce49" office:value-type="string" calcext:value-type="string">
            <text:p>12號口徑霰彈槍，對近距離的對手能夠發揮更強的威力。</text:p>
            <text:p>使用該武器對處於同一接戰區域內的角色進行攻擊的攻擊力+2。</text:p>
          </table:table-cell>
          <table:table-cell table:style-name="ce45" office:value-type="string" calcext:value-type="string">
            <text:p>IA P2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獨頭霰彈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5" calcext:value-type="float">
            <text:p>5</text:p>
          </table:table-cell>
          <table:table-cell table:style-name="ce45" office:value-type="string" calcext:value-type="string">
            <text:p>-</text:p>
          </table:table-cell>
          <table:table-cell table:style-name="ce45" office:value-type="string" calcext:value-type="string">
            <text:p>30m</text:p>
          </table:table-cell>
          <table:table-cell table:style-name="ce45" table:number-columns-repeated="3"/>
          <table:table-cell table:style-name="ce47" office:value-type="string" calcext:value-type="string">
            <text:p>11/7</text:p>
          </table:table-cell>
          <table:table-cell table:style-name="ce49" office:value-type="string" calcext:value-type="string">
            <text:p>將彈藥從散彈改為獨頭彈，雖然火力會削弱，但射程和精度都有所增加。</text:p>
          </table:table-cell>
          <table:table-cell table:style-name="ce45" office:value-type="string" calcext:value-type="string">
            <text:p>IA P2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戰術霰彈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12/8</text:p>
          </table:table-cell>
          <table:table-cell table:style-name="ce49" office:value-type="string" calcext:value-type="string">
            <text:p>用來實戰的自動霰彈槍，在洞窟或地下設施等密閉空間非常好用所以受到UGN突入部隊的喜愛。</text:p>
            <text:p>使用該武器對處於同一接戰區域內的角色進行攻擊的攻擊力+2。</text:p>
          </table:table-cell>
          <table:table-cell table:style-name="ce45" office:value-type="string" calcext:value-type="string">
            <text:p>IA P2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榴彈發射器</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9" calcext:value-type="float">
            <text:p>9</text:p>
          </table:table-cell>
          <table:table-cell table:style-name="ce45" office:value-type="string" calcext:value-type="string">
            <text:p>-</text:p>
          </table:table-cell>
          <table:table-cell table:style-name="ce45" office:value-type="string" calcext:value-type="string">
            <text:p>30m</text:p>
          </table:table-cell>
          <table:table-cell table:style-name="ce45" table:number-columns-repeated="3"/>
          <table:table-cell table:style-name="ce47" office:value-type="string" calcext:value-type="string">
            <text:p>13/9</text:p>
          </table:table-cell>
          <table:table-cell table:style-name="ce49" office:value-type="string" calcext:value-type="string">
            <text:p>發射榴彈的射擊筒，利用破片進行大範圍攻擊</text:p>
            <text:p>次要動作使用，該主要階段間該武器進行攻擊的對象變為[對象：範圍]，該效果一劇本可以使用一次。雙手持握。至近不可。</text:p>
          </table:table-cell>
          <table:table-cell table:style-name="ce45" office:value-type="string" calcext:value-type="string">
            <text:p>IA P2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衝鋒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8" calcext:value-type="float">
            <text:p>8</text:p>
          </table:table-cell>
          <table:table-cell table:style-name="ce45" office:value-type="string" calcext:value-type="string">
            <text:p>-</text:p>
          </table:table-cell>
          <table:table-cell table:style-name="ce45" office:value-type="string" calcext:value-type="string">
            <text:p>20m</text:p>
          </table:table-cell>
          <table:table-cell table:style-name="ce45" table:number-columns-repeated="3"/>
          <table:table-cell table:style-name="ce47" office:value-type="string" calcext:value-type="string">
            <text:p>14/9</text:p>
          </table:table-cell>
          <table:table-cell table:style-name="ce49" office:value-type="string" calcext:value-type="string">
            <text:p>小型衝鋒槍，因為使用手槍子彈也被稱為機關手槍，速射性能和壓制能力都很優秀。</text:p>
          </table:table-cell>
          <table:table-cell table:style-name="ce45" office:value-type="string" calcext:value-type="string">
            <text:p>IA P28</text:p>
          </table:table-cell>
          <table:table-cell table:style-name="ce51" office:value-type="string" calcext:value-type="string">
            <text:p>IA刪除了“至近不可”</text:p>
          </table:table-cell>
          <table:table-cell table:style-name="ce44" table:number-columns-repeated="12"/>
          <table:table-cell table:number-columns-repeated="998"/>
        </table:table-row>
        <table:table-row table:style-name="ro2">
          <table:table-cell table:style-name="ce42" office:value-type="string" calcext:value-type="string">
            <text:p>突擊步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9" calcext:value-type="float">
            <text:p>9</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15/10</text:p>
          </table:table-cell>
          <table:table-cell table:style-name="ce49" office:value-type="string" calcext:value-type="string">
            <text:p>使用小口徑高速彈的軍用自動步槍，可以全自動射擊。至近不可。</text:p>
          </table:table-cell>
          <table:table-cell table:style-name="ce45" office:value-type="string" calcext:value-type="string">
            <text:p>IA P2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栓動式步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8" calcext:value-type="float">
            <text:p>8</text:p>
          </table:table-cell>
          <table:table-cell table:style-name="ce45" office:value-type="string" calcext:value-type="string">
            <text:p>-</text:p>
          </table:table-cell>
          <table:table-cell table:style-name="ce45" office:value-type="string" calcext:value-type="string">
            <text:p>200m</text:p>
          </table:table-cell>
          <table:table-cell table:style-name="ce45" table:number-columns-repeated="3"/>
          <table:table-cell table:style-name="ce47" office:value-type="string" calcext:value-type="string">
            <text:p>15/10</text:p>
          </table:table-cell>
          <table:table-cell table:style-name="ce49" office:value-type="string" calcext:value-type="string">
            <text:p>能通過認真瞄準提升精准度的步槍。</text:p>
            <text:p>次要動作使用，該主要階段間該武器進行的攻擊判定達成值+5。至近不可。</text:p>
          </table:table-cell>
          <table:table-cell table:style-name="ce45" office:value-type="string" calcext:value-type="string">
            <text:p>IA P2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大口徑手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8" calcext:value-type="float">
            <text:p>8</text:p>
          </table:table-cell>
          <table:table-cell table:style-name="ce45" office:value-type="string" calcext:value-type="string">
            <text:p>-</text:p>
          </table:table-cell>
          <table:table-cell table:style-name="ce45" office:value-type="string" calcext:value-type="string">
            <text:p>20m</text:p>
          </table:table-cell>
          <table:table-cell table:style-name="ce45" table:number-columns-repeated="3"/>
          <table:table-cell table:style-name="ce47" office:value-type="string" calcext:value-type="string">
            <text:p>15/11</text:p>
          </table:table-cell>
          <table:table-cell table:style-name="ce49" office:value-type="string" calcext:value-type="string">
            <text:p>使用10mm~.45口徑大型彈頭的手槍，不僅採用了最新的後坐力控制方式，還安裝了複合配件增加了精度，一般不在市面上販賣，全部被特殊部隊和執法機關採購。</text:p>
          </table:table-cell>
          <table:table-cell table:style-name="ce45" office:value-type="string" calcext:value-type="string">
            <text:p>IA P2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ATM發射器</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10" calcext:value-type="float">
            <text:p>10</text:p>
          </table:table-cell>
          <table:table-cell table:style-name="ce45" office:value-type="string" calcext:value-type="string">
            <text:p>-</text:p>
          </table:table-cell>
          <table:table-cell table:style-name="ce45" office:value-type="string" calcext:value-type="string">
            <text:p>200m</text:p>
          </table:table-cell>
          <table:table-cell table:style-name="ce45" table:number-columns-repeated="3"/>
          <table:table-cell table:style-name="ce47" office:value-type="string" calcext:value-type="string">
            <text:p>35/12</text:p>
          </table:table-cell>
          <table:table-cell table:style-name="ce49" office:value-type="string" calcext:value-type="string">
            <text:p>攜帶型反坦克導彈，大多使用激光引導，為應對UGN的電子妨礙而使用有線型的人也不少。</text:p>
            <text:p>使用該武器不能以處於飛行狀態的角色為對象進行攻擊。該武器一劇本可以使用一次。雙手持握。至近不可。稀有道具。</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對空導彈</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15" calcext:value-type="float">
            <text:p>15</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18/12</text:p>
          </table:table-cell>
          <table:table-cell table:style-name="ce49" office:value-type="string" calcext:value-type="string">
            <text:p>可以攜帶的對空導彈發射裝置，能夠追蹤鎖定的目標。</text:p>
            <text:p>使用該武器只能以處於飛行狀態的角色為對象進行攻擊。使用次要動作，該主要階段間該武器進行的攻擊的判定達成值+5。該武器一劇本可以使用一次。雙手持握。至近不可。稀有道具。</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激光發射器</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8" calcext:value-type="float">
            <text:p>8</text:p>
          </table:table-cell>
          <table:table-cell table:style-name="ce45" office:value-type="string" calcext:value-type="string">
            <text:p>-</text:p>
          </table:table-cell>
          <table:table-cell table:style-name="ce45" office:value-type="string" calcext:value-type="string">
            <text:p>200m</text:p>
          </table:table-cell>
          <table:table-cell table:style-name="ce45" table:number-columns-repeated="3"/>
          <table:table-cell table:style-name="ce47" office:value-type="string" calcext:value-type="string">
            <text:p>50/12</text:p>
          </table:table-cell>
          <table:table-cell table:style-name="ce49" office:value-type="string" calcext:value-type="string">
            <text:p>發達國家使用的激光照射器，不需要彈藥所以很便宜，只要有電就能一直攻擊。</text:p>
            <text:p>該武器進行的攻擊無視對象裝甲值。搭載火器。至近不可。稀有道具。</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智能步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9" calcext:value-type="float">
            <text:p>9</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18/13</text:p>
          </table:table-cell>
          <table:table-cell table:style-name="ce49" office:value-type="string" calcext:value-type="string">
            <text:p>使用輕量化的高剛性框架和高威力特殊穿甲彈，搭載了各種戰術支援系統的最新型突擊步槍。</text:p>
            <text:p>至近不可。稀有道具。</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全自動霰彈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20/14</text:p>
          </table:table-cell>
          <table:table-cell table:style-name="ce49" office:value-type="string" calcext:value-type="string">
            <text:p>使用氣動裝置全自動射擊的霰彈槍，大量射出的散彈能讓對方無所遁形。</text:p>
            <text:p>使用該武器對處於同一接戰區域內的角色進行攻擊時，攻擊力+5，且對象回避判定骰數-1個。</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輕機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10" calcext:value-type="float">
            <text:p>10</text:p>
          </table:table-cell>
          <table:table-cell table:style-name="ce45" office:value-type="string" calcext:value-type="string">
            <text:p>-</text:p>
          </table:table-cell>
          <table:table-cell table:style-name="ce45" office:value-type="string" calcext:value-type="string">
            <text:p>150m</text:p>
          </table:table-cell>
          <table:table-cell table:style-name="ce45" table:number-columns-repeated="3"/>
          <table:table-cell table:style-name="ce47" office:value-type="string" calcext:value-type="string">
            <text:p>20/15</text:p>
          </table:table-cell>
          <table:table-cell table:style-name="ce49" office:value-type="string" calcext:value-type="string">
            <text:p>支援前線士兵的輕機槍，擁有很高的連射力和壓制力。</text:p>
            <text:p>使用該武器進行的攻擊命中時使用，使對象陷入不良狀態[恍惚]。該效果一場景可以使用一次。雙手持握。至近不可。</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火焰噴射器</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3" calcext:value-type="float">
            <text:p>-3</text:p>
          </table:table-cell>
          <table:table-cell table:style-name="ce45" office:value-type="float" office:value="5" calcext:value-type="float">
            <text:p>5</text:p>
          </table:table-cell>
          <table:table-cell table:style-name="ce45" office:value-type="string" calcext:value-type="string">
            <text:p>-</text:p>
          </table:table-cell>
          <table:table-cell table:style-name="ce45" office:value-type="string" calcext:value-type="string">
            <text:p>10m</text:p>
          </table:table-cell>
          <table:table-cell table:style-name="ce45" table:number-columns-repeated="3"/>
          <table:table-cell table:style-name="ce47" office:value-type="string" calcext:value-type="string">
            <text:p>22/16</text:p>
          </table:table-cell>
          <table:table-cell table:style-name="ce49" office:value-type="string" calcext:value-type="string">
            <text:p>使用可燃噴射劑噴射火焰的武器，攜帶的燃料有限，無法長時間使用。</text:p>
            <text:p>使用該武器進行的攻擊不能被格擋，對該近戰攻擊進行掩護時無視格擋計算傷害，該武器一劇本可以使用一次。</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重機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3" calcext:value-type="float">
            <text:p>-3</text:p>
          </table:table-cell>
          <table:table-cell table:style-name="ce45" office:value-type="float" office:value="12" calcext:value-type="float">
            <text:p>12</text:p>
          </table:table-cell>
          <table:table-cell table:style-name="ce45" office:value-type="string" calcext:value-type="string">
            <text:p>-</text:p>
          </table:table-cell>
          <table:table-cell table:style-name="ce45" office:value-type="string" calcext:value-type="string">
            <text:p>200m</text:p>
          </table:table-cell>
          <table:table-cell table:style-name="ce45" table:number-columns-repeated="3"/>
          <table:table-cell table:style-name="ce47" office:value-type="string" calcext:value-type="string">
            <text:p>24/18</text:p>
          </table:table-cell>
          <table:table-cell table:style-name="ce49" office:value-type="string" calcext:value-type="string">
            <text:p>以設置使用為前提的大型機關槍，套裝附帶射擊後坐力抑制裝置、彈藥箱和三腳架。</text:p>
            <text:p>搭載火器。至近不可。稀有道具。</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PDW</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9" calcext:value-type="float">
            <text:p>9</text:p>
          </table:table-cell>
          <table:table-cell table:style-name="ce45" office:value-type="string" calcext:value-type="string">
            <text:p>-</text:p>
          </table:table-cell>
          <table:table-cell table:style-name="ce45" office:value-type="string" calcext:value-type="string">
            <text:p>20m</text:p>
          </table:table-cell>
          <table:table-cell table:style-name="ce45" table:number-columns-repeated="3"/>
          <table:table-cell table:style-name="ce47" office:value-type="string" calcext:value-type="string">
            <text:p>30/20</text:p>
          </table:table-cell>
          <table:table-cell table:style-name="ce49" office:value-type="string" calcext:value-type="string">
            <text:p>同時擁有衝鋒槍便捷性和突擊步槍火力的槍械。</text:p>
            <text:p>次要動作使用，該主要階段間該武器進行的攻擊對象變為[對象：範圍（選擇）]，該效果一劇本可以使用一次。</text:p>
            <text:p>至近不可</text:p>
          </table:table-cell>
          <table:table-cell table:style-name="ce45" office:value-type="string" calcext:value-type="string">
            <text:p>IA P2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狙擊步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11" calcext:value-type="float">
            <text:p>11</text:p>
          </table:table-cell>
          <table:table-cell table:style-name="ce45" office:value-type="string" calcext:value-type="string">
            <text:p>-</text:p>
          </table:table-cell>
          <table:table-cell table:style-name="ce45" office:value-type="string" calcext:value-type="string">
            <text:p>200m</text:p>
          </table:table-cell>
          <table:table-cell table:style-name="ce45" table:number-columns-repeated="3"/>
          <table:table-cell table:style-name="ce47" office:value-type="string" calcext:value-type="string">
            <text:p>19/20</text:p>
          </table:table-cell>
          <table:table-cell table:style-name="ce49" office:value-type="string" calcext:value-type="string">
            <text:p>狙擊步槍，附帶瞄準鏡和槍架（雙腳），栓動式和自動式數據相同。</text:p>
            <text:p>至近不可。</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火箭發射器</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7" calcext:value-type="float">
            <text:p>-7</text:p>
          </table:table-cell>
          <table:table-cell table:style-name="ce45" office:value-type="float" office:value="12" calcext:value-type="float">
            <text:p>12</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25/20</text:p>
          </table:table-cell>
          <table:table-cell table:style-name="ce49" office:value-type="string" calcext:value-type="string">
            <text:p>RPG-7等知名攜帶式火箭筒，基本上是消耗品。</text:p>
            <text:p>使用該武器進行的攻擊的判定前使用，該攻擊無視對象裝甲值。該武器一劇本可以使用一次。雙手持握。至近不可。稀有道具。</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反器材步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20" calcext:value-type="float">
            <text:p>20</text:p>
          </table:table-cell>
          <table:table-cell table:style-name="ce45" office:value-type="string" calcext:value-type="string">
            <text:p>-</text:p>
          </table:table-cell>
          <table:table-cell table:style-name="ce45" office:value-type="string" calcext:value-type="string">
            <text:p>300m</text:p>
          </table:table-cell>
          <table:table-cell table:style-name="ce45" table:number-columns-repeated="3"/>
          <table:table-cell table:style-name="ce47" office:value-type="string" calcext:value-type="string">
            <text:p>35/24</text:p>
          </table:table-cell>
          <table:table-cell table:style-name="ce49" office:value-type="string" calcext:value-type="string">
            <text:p>使用大口徑子彈的步槍。</text:p>
            <text:p>使用該武器進行的射擊攻擊不能被格擋，對該攻擊進行掩護時無視格擋計算傷害。該武器一劇本可以使用一次。雙手持握。至近不可。</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大型榴彈炮</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4" calcext:value-type="float">
            <text:p>-4</text:p>
          </table:table-cell>
          <table:table-cell table:style-name="ce45" office:value-type="float" office:value="15" calcext:value-type="float">
            <text:p>15</text:p>
          </table:table-cell>
          <table:table-cell table:style-name="ce45" office:value-type="string" calcext:value-type="string">
            <text:p>-</text:p>
          </table:table-cell>
          <table:table-cell table:style-name="ce45" office:value-type="string" calcext:value-type="string">
            <text:p>50m</text:p>
          </table:table-cell>
          <table:table-cell table:style-name="ce45" table:number-columns-repeated="3"/>
          <table:table-cell table:style-name="ce47" office:value-type="string" calcext:value-type="string">
            <text:p>36/25</text:p>
          </table:table-cell>
          <table:table-cell table:style-name="ce49" office:value-type="string" calcext:value-type="string">
            <text:p>車輛搭載用手榴彈發射器，使用大型榴彈。</text:p>
            <text:p>次要動作使用，該主要階段間該武器進行的攻擊對象變為[對象：範圍]，該效果一劇本可以使用一次。搭載火器。至近不可。稀有道具。</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鏈式機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15" calcext:value-type="float">
            <text:p>15</text:p>
          </table:table-cell>
          <table:table-cell table:style-name="ce45" office:value-type="string" calcext:value-type="string">
            <text:p>-</text:p>
          </table:table-cell>
          <table:table-cell table:style-name="ce45" office:value-type="string" calcext:value-type="string">
            <text:p>100m</text:p>
          </table:table-cell>
          <table:table-cell table:style-name="ce45" table:number-columns-repeated="3"/>
          <table:table-cell table:style-name="ce47" office:value-type="string" calcext:value-type="string">
            <text:p>38/27</text:p>
          </table:table-cell>
          <table:table-cell table:style-name="ce49" office:value-type="string" calcext:value-type="string">
            <text:p>車載式機關炮，使用外部動力和鎖鏈驅動機關部分運動。</text:p>
            <text:p>搭載火器（【肉體】8以上的角色可以將該武器視為雙手持握而非搭載火器裝備）。至近不可。稀有道具。</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大口徑機關炮</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21" calcext:value-type="float">
            <text:p>21</text:p>
          </table:table-cell>
          <table:table-cell table:style-name="ce45" office:value-type="string" calcext:value-type="string">
            <text:p>-</text:p>
          </table:table-cell>
          <table:table-cell table:style-name="ce45" office:value-type="string" calcext:value-type="string">
            <text:p>350m</text:p>
          </table:table-cell>
          <table:table-cell table:style-name="ce45" table:number-columns-repeated="3"/>
          <table:table-cell table:style-name="ce47" office:value-type="string" calcext:value-type="string">
            <text:p>38/28</text:p>
          </table:table-cell>
          <table:table-cell table:style-name="ce49" office:value-type="string" calcext:value-type="string">
            <text:p>使用20mm~40mm大口徑彈全自動射擊的機關炮。</text:p>
            <text:p>使用該武器進行的攻擊不能被格擋，對集團敵人的攻擊傷害+2D10。搭載火器。至近不可。稀有道具。</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重迫擊炮</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4" calcext:value-type="float">
            <text:p>-4</text:p>
          </table:table-cell>
          <table:table-cell table:style-name="ce45" office:value-type="float" office:value="11" calcext:value-type="float">
            <text:p>11</text:p>
          </table:table-cell>
          <table:table-cell table:style-name="ce45" office:value-type="string" calcext:value-type="string">
            <text:p>-</text:p>
          </table:table-cell>
          <table:table-cell table:style-name="ce45" office:value-type="string" calcext:value-type="string">
            <text:p>1000m</text:p>
          </table:table-cell>
          <table:table-cell table:style-name="ce45" table:number-columns-repeated="3"/>
          <table:table-cell table:style-name="ce47" office:value-type="string" calcext:value-type="string">
            <text:p>購入不可/30</text:p>
          </table:table-cell>
          <table:table-cell table:style-name="ce49" office:value-type="string" calcext:value-type="string">
            <text:p>由步兵小隊或裝甲車運載使用的曲射炮。</text:p>
            <text:p>該武器進行的攻擊對象變為[對象：範圍]，不能攻擊你周圍100m內的敵人。搭載火器（【肉體】12以上的角色可以將該武器視為雙手持握而非搭載火器裝備）。稀有道具。</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迷你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7" calcext:value-type="float">
            <text:p>7</text:p>
          </table:table-cell>
          <table:table-cell table:style-name="ce45" office:value-type="string" calcext:value-type="string">
            <text:p>-</text:p>
          </table:table-cell>
          <table:table-cell table:style-name="ce45" office:value-type="string" calcext:value-type="string">
            <text:p>50m</text:p>
          </table:table-cell>
          <table:table-cell table:style-name="ce45" table:number-columns-repeated="3"/>
          <table:table-cell table:style-name="ce47" office:value-type="string" calcext:value-type="string">
            <text:p>40/30</text:p>
          </table:table-cell>
          <table:table-cell table:style-name="ce49" office:value-type="string" calcext:value-type="string">
            <text:p>使用5.56mm子彈的步兵加特林槍，預想由穿著動力鎧甲的士兵使用。</text:p>
            <text:p>搭載火器（【肉體】6以上的角色可以將該武器視為雙手持握而非搭載火器裝備）。至近不可。稀有道具。</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AR步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13" calcext:value-type="float">
            <text:p>13</text:p>
          </table:table-cell>
          <table:table-cell table:style-name="ce45" office:value-type="string" calcext:value-type="string">
            <text:p>-</text:p>
          </table:table-cell>
          <table:table-cell table:style-name="ce45" office:value-type="string" calcext:value-type="string">
            <text:p>200m</text:p>
          </table:table-cell>
          <table:table-cell table:style-name="ce45" table:number-columns-repeated="3"/>
          <table:table-cell table:style-name="ce47" office:value-type="string" calcext:value-type="string">
            <text:p>55/40</text:p>
          </table:table-cell>
          <table:table-cell table:style-name="ce49" office:value-type="string" calcext:value-type="string">
            <text:p>使用能抑制背教者活性的特殊子彈的狙擊步槍。</text:p>
            <text:p>使用該武器進行的攻擊給超越者角色造成至少1點HP傷害時，該回合間該角色進行的所有判定骰數-2個。該武器一劇本可以使用一次。至近不可。</text:p>
          </table:table-cell>
          <table:table-cell table:style-name="ce45" office:value-type="string" calcext:value-type="string">
            <text:p>IA P30</text:p>
          </table:table-cell>
          <table:table-cell table:style-name="ce51"/>
          <table:table-cell table:style-name="ce44" table:number-columns-repeated="12"/>
          <table:table-cell table:number-columns-repeated="998"/>
        </table:table-row>
        <table:table-row table:style-name="ro2">
          <table:table-cell table:style-name="ce41" office:value-type="string" calcext:value-type="string" table:number-columns-spanned="13" table:number-rows-spanned="1">
            <text:p>防具</text:p>
          </table:table-cell>
          <table:covered-table-cell table:number-columns-repeated="12"/>
          <table:table-cell table:style-name="ce51"/>
          <table:table-cell table:style-name="ce44" table:number-columns-repeated="12"/>
          <table:table-cell table:number-columns-repeated="998"/>
        </table:table-row>
        <table:table-row table:style-name="ro2">
          <table:table-cell table:style-name="ce42" office:value-type="string" calcext:value-type="string">
            <text:p>強化服</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1" calcext:value-type="float">
            <text:p>1</text:p>
          </table:table-cell>
          <table:table-cell table:style-name="ce47" office:value-type="string" calcext:value-type="string">
            <text:p>5/1</text:p>
          </table:table-cell>
          <table:table-cell table:style-name="ce49" office:value-type="string" calcext:value-type="string">
            <text:p>用不懼衝擊的纖維製作的衣服，看上去和普通衣服沒有差別，但是觸感很差。</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皮夾克</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2" calcext:value-type="float">
            <text:p>2</text:p>
          </table:table-cell>
          <table:table-cell table:style-name="ce47" office:value-type="string" calcext:value-type="string">
            <text:p>7/4</text:p>
          </table:table-cell>
          <table:table-cell table:style-name="ce49" office:value-type="string" calcext:value-type="string">
            <text:p>堅固皮革的夾克，疏於保養的話會難以維持形狀和觸感，也很適合時尚人士。</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強化保護服</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3" calcext:value-type="float">
            <text:p>3</text:p>
          </table:table-cell>
          <table:table-cell table:style-name="ce47" office:value-type="string" calcext:value-type="string">
            <text:p>10/5</text:p>
          </table:table-cell>
          <table:table-cell table:style-name="ce49" office:value-type="string" calcext:value-type="string">
            <text:p>在要害部位加裝陶瓷板的防護服，整套方便攜帶運輸，很多偵探、調查業者會裝備，又或是非常時期會作為裝備。</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防彈防刃夾克</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3" calcext:value-type="float">
            <text:p>3</text:p>
          </table:table-cell>
          <table:table-cell table:style-name="ce47" office:value-type="string" calcext:value-type="string">
            <text:p>10/6</text:p>
          </table:table-cell>
          <table:table-cell table:style-name="ce49" office:value-type="string" calcext:value-type="string">
            <text:p>穿在上衣下面的特殊馬甲衫，重量輕效果優秀的防具。同時使用防彈纖維和防刃纖維。</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研究服</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1" calcext:value-type="float">
            <text:p>1</text:p>
          </table:table-cell>
          <table:table-cell table:style-name="ce47" office:value-type="string" calcext:value-type="string">
            <text:p>13/8</text:p>
          </table:table-cell>
          <table:table-cell table:style-name="ce49" office:value-type="string" calcext:value-type="string">
            <text:p>帶有進行研究時各種必要道具的衣服不只是道具，穿著適合研究的衣服穿的人心情也會好。</text:p>
            <text:p>取得時選擇一項&lt;知識：●●&gt;技能，進行該判定時判定骰數+1個。</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噴氣套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2" calcext:value-type="float">
            <text:p>-2</text:p>
          </table:table-cell>
          <table:table-cell table:style-name="ce45" office:value-type="float" office:value="3" calcext:value-type="float">
            <text:p>3</text:p>
          </table:table-cell>
          <table:table-cell table:style-name="ce47" office:value-type="string" calcext:value-type="string">
            <text:p>14/8</text:p>
          </table:table-cell>
          <table:table-cell table:style-name="ce49" office:value-type="string" calcext:value-type="string">
            <text:p>背部帶有小型噴射裝置的套裝，可以像噴射機那樣飛行，但燃料較少不能飛太久。</text:p>
            <text:p>準備階段使用，該回合間你變為飛行狀態，該效果一劇本可以使用一次。</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舞臺衣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1" calcext:value-type="float">
            <text:p>1</text:p>
          </table:table-cell>
          <table:table-cell table:style-name="ce47" office:value-type="string" calcext:value-type="string">
            <text:p>15/8</text:p>
          </table:table-cell>
          <table:table-cell table:style-name="ce49" office:value-type="string" calcext:value-type="string">
            <text:p>藝術家為了在合適的舞臺上發揮自己藝術性而穿的衣服，自己準備的進行自我表現的裝飾能提升藝術性。</text:p>
            <text:p>取得時選擇一項&lt;藝術：●●&gt;技能，進行該判定時判定骰數+1個。</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騎手服</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2" calcext:value-type="float">
            <text:p>2</text:p>
          </table:table-cell>
          <table:table-cell table:style-name="ce47" office:value-type="string" calcext:value-type="string">
            <text:p>13/8</text:p>
          </table:table-cell>
          <table:table-cell table:style-name="ce49" office:value-type="string" calcext:value-type="string">
            <text:p>全身包裹的皮革緊身衣，能讓身體成為光滑的流線型，不會影響摩托車駕駛。</text:p>
            <text:p>你進行的&lt;駕駛：二輪&gt;判定骰數+1個。</text:p>
          </table:table-cell>
          <table:table-cell table:style-name="ce45" office:value-type="string" calcext:value-type="string">
            <text:p>IA P3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對低環境套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1" calcext:value-type="float">
            <text:p>-1</text:p>
          </table:table-cell>
          <table:table-cell table:style-name="ce45" office:value-type="float" office:value="4" calcext:value-type="float">
            <text:p>4</text:p>
          </table:table-cell>
          <table:table-cell table:style-name="ce47" office:value-type="string" calcext:value-type="string">
            <text:p>10/9</text:p>
          </table:table-cell>
          <table:table-cell table:style-name="ce49" office:value-type="string" calcext:value-type="string">
            <text:p>為了讓人類能夠在水中或宇宙空間中存活而製造的套裝，擁有氣壓維持和氧氣供應等各種各樣的裝備所以看起來比較笨重。</text:p>
            <text:p>你在水中或宇宙空間也不會受到減益。</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攔截裝甲</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7" office:value-type="string" calcext:value-type="string">
            <text:p>11/10</text:p>
          </table:table-cell>
          <table:table-cell table:style-name="ce49" office:value-type="string" calcext:value-type="string">
            <text:p>夾克內裝金屬板的防具，很重卻不會妨礙移動。</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納米套裝</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1" calcext:value-type="float">
            <text:p>1</text:p>
          </table:table-cell>
          <table:table-cell table:style-name="ce47" office:value-type="string" calcext:value-type="string">
            <text:p>18/10</text:p>
          </table:table-cell>
          <table:table-cell table:style-name="ce49" office:value-type="string" calcext:value-type="string">
            <text:p>緊貼裝備者皮膚的緊身衣，能夠使傷口再生。</text:p>
            <text:p>你使用《復蘇》時回復的HP額外+1D10點，並增加該效果回復數值的侵蝕率。稀有道具。</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回避斗篷</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7" office:value-type="string" calcext:value-type="string">
            <text:p>21/11</text:p>
          </table:table-cell>
          <table:table-cell table:style-name="ce49" office:value-type="string" calcext:value-type="string">
            <text:p>展開後能包裹全身的大斗篷，慣用者可以用來協助回避攻擊，但太大了會對行動造成妨礙。</text:p>
            <text:p>你進行的回避判定骰數+1個。</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對BC套裝</text:p>
          </table:table-cell>
          <table:table-cell table:style-name="ce45" office:value-type="string" calcext:value-type="string">
            <text:p>防具</text:p>
          </table:table-cell>
          <table:table-cell table:style-name="ce45" table:number-columns-repeated="5"/>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7" calcext:value-type="float">
            <text:p>7</text:p>
          </table:table-cell>
          <table:table-cell table:style-name="ce47" office:value-type="string" calcext:value-type="string">
            <text:p>9/12</text:p>
          </table:table-cell>
          <table:table-cell table:style-name="ce49" office:value-type="string" calcext:value-type="string">
            <text:p>對生化兵器用防護服，裝備有防毒面具、氧氣泵等裝備，非常沉重不便移動，但氣密性極佳。</text:p>
            <text:p>你不會受到非異能造成的不良狀態[邪毒]影響。</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強化商務套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3" calcext:value-type="float">
            <text:p>3</text:p>
          </table:table-cell>
          <table:table-cell table:style-name="ce47" office:value-type="string" calcext:value-type="string">
            <text:p>19/14</text:p>
          </table:table-cell>
          <table:table-cell table:style-name="ce49" office:value-type="string" calcext:value-type="string">
            <text:p>預想會在正式場合進行危險任務而強化防禦的套裝，看起來是非常帥氣的商務套裝因此有不少人喜歡穿。</text:p>
            <text:p>你進行的【社會】判定達成值+2。</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勝負服</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1" calcext:value-type="float">
            <text:p>1</text:p>
          </table:table-cell>
          <table:table-cell table:style-name="ce47" office:value-type="string" calcext:value-type="string">
            <text:p>20/14</text:p>
          </table:table-cell>
          <table:table-cell table:style-name="ce49" office:value-type="string" calcext:value-type="string">
            <text:p>最大化反應個人個性的服裝，從歐洲定制的全套禮服到暴走族的特攻服都可以，承載著穿戴者的氣概與靈魂，可以自由設定外觀。</text:p>
            <text:p>你進行的[意志]判定骰數+1個。</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三級身體裝甲</text:p>
          </table:table-cell>
          <table:table-cell table:style-name="ce45" office:value-type="string" calcext:value-type="string">
            <text:p>防具</text:p>
          </table:table-cell>
          <table:table-cell table:style-name="ce45" table:number-columns-repeated="5"/>
          <table:table-cell table:style-name="ce45" office:value-type="float" office:value="-2" calcext:value-type="float">
            <text:p>-2</text:p>
          </table:table-cell>
          <table:table-cell table:style-name="ce45" office:value-type="float" office:value="-1" calcext:value-type="float">
            <text:p>-1</text:p>
          </table:table-cell>
          <table:table-cell table:style-name="ce45" office:value-type="float" office:value="7" calcext:value-type="float">
            <text:p>7</text:p>
          </table:table-cell>
          <table:table-cell table:style-name="ce47" office:value-type="string" calcext:value-type="string">
            <text:p>15/14</text:p>
          </table:table-cell>
          <table:table-cell table:style-name="ce49" office:value-type="string" calcext:value-type="string">
            <text:p>提升防彈效果的裝甲，重量會妨礙行動。</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鎖子甲</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1" calcext:value-type="float">
            <text:p>-1</text:p>
          </table:table-cell>
          <table:table-cell table:style-name="ce45" office:value-type="float" office:value="8" calcext:value-type="float">
            <text:p>8</text:p>
          </table:table-cell>
          <table:table-cell table:style-name="ce47" office:value-type="string" calcext:value-type="string">
            <text:p>10/16</text:p>
          </table:table-cell>
          <table:table-cell table:style-name="ce49" office:value-type="string" calcext:value-type="string">
            <text:p>用鎖鏈編成的防具，在上面穿上別的衣服就不會引人注目。</text:p>
          </table:table-cell>
          <table:table-cell table:style-name="ce45" office:value-type="string" calcext:value-type="string">
            <text:p>IA P3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厲害服</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1" calcext:value-type="float">
            <text:p>1</text:p>
          </table:table-cell>
          <table:table-cell table:style-name="ce47" office:value-type="string" calcext:value-type="string">
            <text:p>10/16</text:p>
          </table:table-cell>
          <table:table-cell table:style-name="ce49" office:value-type="string" calcext:value-type="string">
            <text:p>誰見了都會說“厲害”的奇異服裝，穿著它能很容易引起他人注意。</text:p>
            <text:p>你進行的&lt;交涉&gt;判定達成值+2。</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隱蔽套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2" calcext:value-type="float">
            <text:p>2</text:p>
          </table:table-cell>
          <table:table-cell table:style-name="ce47" office:value-type="string" calcext:value-type="string">
            <text:p>10/16</text:p>
          </table:table-cell>
          <table:table-cell table:style-name="ce49" office:value-type="string" calcext:value-type="string">
            <text:p>能通過迷彩和消音機能強化隱蔽效果的套裝。</text:p>
            <text:p>你在隱蔽狀態下進行的判定骰數+1個。</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UGN身體裝甲</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8" calcext:value-type="float">
            <text:p>8</text:p>
          </table:table-cell>
          <table:table-cell table:style-name="ce47" office:value-type="string" calcext:value-type="string">
            <text:p>12/18</text:p>
          </table:table-cell>
          <table:table-cell table:style-name="ce49" office:value-type="string" calcext:value-type="string">
            <text:p>為經常接受戰鬥任務的特工開發的套裝，使用了多層耐衝擊布料，能夠減輕受到的傷害。</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運動套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0" calcext:value-type="float">
            <text:p>0</text:p>
          </table:table-cell>
          <table:table-cell table:style-name="ce45" office:value-type="float" office:value="1" calcext:value-type="float">
            <text:p>1</text:p>
          </table:table-cell>
          <table:table-cell table:style-name="ce47" office:value-type="string" calcext:value-type="string">
            <text:p>22/18</text:p>
          </table:table-cell>
          <table:table-cell table:style-name="ce49" office:value-type="string" calcext:value-type="string">
            <text:p>UGN以電影明星穿過的衣服為靈感開發的戰鬥服，在近身戰鬥中衣服不會妨礙動作。</text:p>
            <text:p>你進行的&lt;近戰&gt;判定骰數+1個。</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甲胄</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3" calcext:value-type="float">
            <text:p>-3</text:p>
          </table:table-cell>
          <table:table-cell table:style-name="ce45" office:value-type="float" office:value="10" calcext:value-type="float">
            <text:p>10</text:p>
          </table:table-cell>
          <table:table-cell table:style-name="ce47" office:value-type="string" calcext:value-type="string">
            <text:p>13/20</text:p>
          </table:table-cell>
          <table:table-cell table:style-name="ce49" office:value-type="string" calcext:value-type="string">
            <text:p>將金屬板接連，用鎖鏈加強的盔甲，也很有藝術性。</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射手夾克</text:p>
          </table:table-cell>
          <table:table-cell table:style-name="ce45" office:value-type="string" calcext:value-type="string">
            <text:p>防具</text:p>
          </table:table-cell>
          <table:table-cell table:style-name="ce45" table:number-columns-repeated="5"/>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7" office:value-type="string" calcext:value-type="string">
            <text:p>13/20</text:p>
          </table:table-cell>
          <table:table-cell table:style-name="ce49" office:value-type="string" calcext:value-type="string">
            <text:p>能夠輕鬆固定肩部和腕部的射擊用夾克，看起來像是裝有護肩的皮夾克。</text:p>
            <text:p>你進行的&lt;射擊&gt;判定骰數+1個。</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防爆套裝</text:p>
          </table:table-cell>
          <table:table-cell table:style-name="ce45" office:value-type="string" calcext:value-type="string">
            <text:p>防具</text:p>
          </table:table-cell>
          <table:table-cell table:style-name="ce45" table:number-columns-repeated="5"/>
          <table:table-cell table:style-name="ce45" office:value-type="float" office:value="-7" calcext:value-type="float">
            <text:p>-7</text:p>
          </table:table-cell>
          <table:table-cell table:style-name="ce45" office:value-type="float" office:value="-4" calcext:value-type="float">
            <text:p>-4</text:p>
          </table:table-cell>
          <table:table-cell table:style-name="ce45" office:value-type="float" office:value="15" calcext:value-type="float">
            <text:p>15</text:p>
          </table:table-cell>
          <table:table-cell table:style-name="ce47" office:value-type="string" calcext:value-type="string">
            <text:p>30/20</text:p>
          </table:table-cell>
          <table:table-cell table:style-name="ce49" office:value-type="string" calcext:value-type="string">
            <text:p>排爆人員穿著的防爆服，裝有陶瓷板極大地增強了防彈性能，但重量極高，需要有很強的力氣才能裝備。</text:p>
            <text:p>該防具只有【肉體】6以上的角色可以裝備。稀有道具。</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展開裝甲服</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3" calcext:value-type="float">
            <text:p>-3</text:p>
          </table:table-cell>
          <table:table-cell table:style-name="ce45" office:value-type="float" office:value="7" calcext:value-type="float">
            <text:p>7</text:p>
          </table:table-cell>
          <table:table-cell table:style-name="ce47" office:value-type="string" calcext:value-type="string">
            <text:p>35/20</text:p>
          </table:table-cell>
          <table:table-cell table:style-name="ce49" office:value-type="string" calcext:value-type="string">
            <text:p>對大範圍攻擊可以展開輔助裝甲增強防禦性能的戰鬥服。</text:p>
            <text:p>你受到[對象：範圍]、[對象：範圍（選擇）]、[對象：場景]、[對象：場景（選擇）]攻擊時使用，對該攻擊你的裝甲值+5，該效果一劇本可以使用三次。稀有道具。</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AI輔助套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1" calcext:value-type="float">
            <text:p>-1</text:p>
          </table:table-cell>
          <table:table-cell table:style-name="ce45" office:value-type="float" office:value="6" calcext:value-type="float">
            <text:p>6</text:p>
          </table:table-cell>
          <table:table-cell table:style-name="ce47" office:value-type="string" calcext:value-type="string">
            <text:p>36/22</text:p>
          </table:table-cell>
          <table:table-cell table:style-name="ce49" office:value-type="string" calcext:value-type="string">
            <text:p>為了暫時輔助裝備者而在各處安裝了AI，套裝自身會進行輔助，讓裝備者能做出最合適的動作。</text:p>
            <text:p>使用次要動作，該主要階段間你進行的主要動作判定骰數+3個，該效果一劇本可以使用一次。稀有道具。</text:p>
          </table:table-cell>
          <table:table-cell table:style-name="ce45" office:value-type="string" calcext:value-type="string">
            <text:p>IA P3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世界制服</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7" calcext:value-type="float">
            <text:p>7</text:p>
          </table:table-cell>
          <table:table-cell table:style-name="ce47" office:value-type="string" calcext:value-type="string">
            <text:p>35/22</text:p>
          </table:table-cell>
          <table:table-cell table:style-name="ce49" office:value-type="string" calcext:value-type="string">
            <text:p>以在某處進行秘密作戰中獲得的數據再開發得到的最新型UGN強化套裝，這次是學生服和水手服的設計。</text:p>
            <text:p>你進行的&lt;意志&gt;判定達成值+3。稀有道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戰鬥用玩偶裝</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1" calcext:value-type="float">
            <text:p>-1</text:p>
          </table:table-cell>
          <table:table-cell table:style-name="ce45" office:value-type="float" office:value="12" calcext:value-type="float">
            <text:p>12</text:p>
          </table:table-cell>
          <table:table-cell table:style-name="ce47" office:value-type="string" calcext:value-type="string">
            <text:p>34/24</text:p>
          </table:table-cell>
          <table:table-cell table:style-name="ce49" office:value-type="string" calcext:value-type="string">
            <text:p>對玩偶服進行戰鬥用改造後的防具，製作者的意圖不明，但為了強化戰鬥用途，甚至加了動作輔助機能，使得運動性進一步加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裝甲套裝</text:p>
          </table:table-cell>
          <table:table-cell table:style-name="ce45" office:value-type="string" calcext:value-type="string">
            <text:p>防具</text:p>
          </table:table-cell>
          <table:table-cell table:style-name="ce45" table:number-columns-repeated="5"/>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10" calcext:value-type="float">
            <text:p>10</text:p>
          </table:table-cell>
          <table:table-cell table:style-name="ce47" office:value-type="string" calcext:value-type="string">
            <text:p>35/25</text:p>
          </table:table-cell>
          <table:table-cell table:style-name="ce49" office:value-type="string" calcext:value-type="string">
            <text:p>組裝了人工肌肉的套裝裝甲，能夠輔助肉體運動，發揮出超越平時的能力。</text:p>
            <text:p>你進行的近戰攻擊的攻擊力+3。稀有道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保護裝甲</text:p>
          </table:table-cell>
          <table:table-cell table:style-name="ce45" office:value-type="string" calcext:value-type="string">
            <text:p>防具</text:p>
          </table:table-cell>
          <table:table-cell table:style-name="ce45" table:number-columns-repeated="5"/>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10" calcext:value-type="float">
            <text:p>10</text:p>
          </table:table-cell>
          <table:table-cell table:style-name="ce47" office:value-type="string" calcext:value-type="string">
            <text:p>40/25</text:p>
          </table:table-cell>
          <table:table-cell table:style-name="ce49" office:value-type="string" calcext:value-type="string">
            <text:p>使用組裝的人工肌肉強化所持武器的防禦力的裝甲。</text:p>
            <text:p>你進行格擋時使用，該格擋值+3，該效果一回合可以使用一次。</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第二世代型PA裝甲</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3" calcext:value-type="float">
            <text:p>-3</text:p>
          </table:table-cell>
          <table:table-cell table:style-name="ce45" office:value-type="float" office:value="12" calcext:value-type="float">
            <text:p>12</text:p>
          </table:table-cell>
          <table:table-cell table:style-name="ce47" office:value-type="string" calcext:value-type="string">
            <text:p>40/25</text:p>
          </table:table-cell>
          <table:table-cell table:style-name="ce49" office:value-type="string" calcext:value-type="string">
            <text:p>雖然是重裝甲但是比過於笨重的第一世代型要輕量化了不少，作戰持續時間也有所增加。</text:p>
            <text:p>你可以將搭載火器視為雙手持握進行裝備。稀有道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反背教者裝甲</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7" calcext:value-type="float">
            <text:p>7</text:p>
          </table:table-cell>
          <table:table-cell table:style-name="ce47" office:value-type="string" calcext:value-type="string">
            <text:p>47/29</text:p>
          </table:table-cell>
          <table:table-cell table:style-name="ce49" office:value-type="string" calcext:value-type="string">
            <text:p>對超越者使用的戰鬥服，能夠感應超越者的力量並發出能夠稍微削弱的電磁波。</text:p>
            <text:p>你進行的對異能的回應動作判定骰數+1個。稀有道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UGN戰鬥服</text:p>
          </table:table-cell>
          <table:table-cell table:style-name="ce45" office:value-type="string" calcext:value-type="string">
            <text:p>防具</text:p>
          </table:table-cell>
          <table:table-cell table:style-name="ce45" table:number-columns-repeated="5"/>
          <table:table-cell table:number-columns-repeated="2" table:style-name="ce45" office:value-type="float" office:value="-1" calcext:value-type="float">
            <text:p>-1</text:p>
          </table:table-cell>
          <table:table-cell table:style-name="ce45" office:value-type="float" office:value="7" calcext:value-type="float">
            <text:p>7</text:p>
          </table:table-cell>
          <table:table-cell table:style-name="ce47" office:value-type="string" calcext:value-type="string">
            <text:p>48/30</text:p>
          </table:table-cell>
          <table:table-cell table:style-name="ce49" office:value-type="string" calcext:value-type="string">
            <text:p>UGN特殊部隊使用的戰鬥西裝。</text:p>
            <text:p>你進行的&lt;RC&gt;判定骰數+1個。稀有道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黑雷”PA裝甲</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15" calcext:value-type="float">
            <text:p>15</text:p>
          </table:table-cell>
          <table:table-cell table:style-name="ce47" office:value-type="string" calcext:value-type="string">
            <text:p>購入不可/40</text:p>
          </table:table-cell>
          <table:table-cell table:style-name="ce49" office:value-type="string" calcext:value-type="string">
            <text:p>極限小型化的動力裝甲，僅允許特殊犯罪調查室下屬特殊部隊“黑雷”配備，外表充滿壓迫感，使用了超越UGN的技術，但出處不明。</text:p>
            <text:p>你可以將搭載火器視為雙手持握進行裝備。稀有道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背教者輔助器</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7" office:value-type="string" calcext:value-type="string">
            <text:p>55/32</text:p>
          </table:table-cell>
          <table:table-cell table:style-name="ce49" office:value-type="string" calcext:value-type="string">
            <text:p>UGN為了活性化背教者開發的戰鬥服，能增強裝備者的背教者之力。</text:p>
            <text:p>你進行的組合了異能的判定達成值+2。稀有道具。</text:p>
          </table:table-cell>
          <table:table-cell table:style-name="ce45" office:value-type="string" calcext:value-type="string">
            <text:p>IA P3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究極服</text:p>
          </table:table-cell>
          <table:table-cell table:style-name="ce45" office:value-type="string" calcext:value-type="string">
            <text:p>防具</text:p>
          </table:table-cell>
          <table:table-cell table:style-name="ce45" table:number-columns-repeated="5"/>
          <table:table-cell table:style-name="ce45" office:value-type="float" office:value="0" calcext:value-type="float">
            <text:p>0</text:p>
          </table:table-cell>
          <table:table-cell table:style-name="ce45" office:value-type="float" office:value="-3" calcext:value-type="float">
            <text:p>-3</text:p>
          </table:table-cell>
          <table:table-cell table:style-name="ce45" office:value-type="float" office:value="10" calcext:value-type="float">
            <text:p>10</text:p>
          </table:table-cell>
          <table:table-cell table:style-name="ce47" office:value-type="string" calcext:value-type="string">
            <text:p>50/33</text:p>
          </table:table-cell>
          <table:table-cell table:style-name="ce49" office:value-type="string" calcext:value-type="string">
            <text:p>以在某處進行秘密作戰中獲得的數據開發的最新型UGN強化套裝，但不知道為什麼看起來像女僕裝和執事服。</text:p>
            <text:p>你進行的&lt;RC&gt;判定達成值+3。稀有道具。</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動力裝甲</text:p>
          </table:table-cell>
          <table:table-cell table:style-name="ce45" office:value-type="string" calcext:value-type="string">
            <text:p>防具</text:p>
          </table:table-cell>
          <table:table-cell table:style-name="ce45" table:number-columns-repeated="5"/>
          <table:table-cell table:style-name="ce45" office:value-type="float" office:value="-10" calcext:value-type="float">
            <text:p>-10</text:p>
          </table:table-cell>
          <table:table-cell table:style-name="ce45" office:value-type="float" office:value="-5" calcext:value-type="float">
            <text:p>-5</text:p>
          </table:table-cell>
          <table:table-cell table:style-name="ce45" office:value-type="float" office:value="20" calcext:value-type="float">
            <text:p>20</text:p>
          </table:table-cell>
          <table:table-cell table:style-name="ce47" office:value-type="string" calcext:value-type="string">
            <text:p>60/37</text:p>
          </table:table-cell>
          <table:table-cell table:style-name="ce49" office:value-type="string" calcext:value-type="string">
            <text:p>硬化纖維制的強化服，穿上之後感覺宛如穿著機械一般，但由於動力問題無法長時間運作。</text:p>
            <text:p>你進行的【肉體】判定骰數+2個，近戰攻擊的攻擊力+5。你可以將搭載火器視為雙手持握進行裝備。你裝備該道具的場景結束時自動解除裝備，且在劇本結束前無法再次使用。稀有道具。</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裝甲面具</text:p>
          </table:table-cell>
          <table:table-cell table:style-name="ce45" office:value-type="string" calcext:value-type="string">
            <text:p>防具（輔助）</text:p>
          </table:table-cell>
          <table:table-cell table:style-name="ce45" table:number-columns-repeated="5"/>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1" calcext:value-type="float">
            <text:p>1</text:p>
          </table:table-cell>
          <table:table-cell table:style-name="ce47" office:value-type="string" calcext:value-type="string">
            <text:p>9/3</text:p>
          </table:table-cell>
          <table:table-cell table:style-name="ce49" office:value-type="string" calcext:value-type="string">
            <text:p>覆蓋整張臉的面具，使用了防彈防刃素材，確保了防禦能力但對視野有所阻礙。</text:p>
            <text:p>你進行的&lt;知覺&gt;判定骰數-1個。</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輪滑靴</text:p>
          </table:table-cell>
          <table:table-cell table:style-name="ce45" office:value-type="string" calcext:value-type="string">
            <text:p>防具（輔助）</text:p>
          </table:table-cell>
          <table:table-cell table:style-name="ce45" table:number-columns-repeated="5"/>
          <table:table-cell table:number-columns-repeated="2" table:style-name="ce45" office:value-type="float" office:value="-1" calcext:value-type="float">
            <text:p>-1</text:p>
          </table:table-cell>
          <table:table-cell table:style-name="ce45" office:value-type="float" office:value="0" calcext:value-type="float">
            <text:p>0</text:p>
          </table:table-cell>
          <table:table-cell table:style-name="ce47" office:value-type="string" calcext:value-type="string">
            <text:p>11/7</text:p>
          </table:table-cell>
          <table:table-cell table:style-name="ce49" office:value-type="string" calcext:value-type="string">
            <text:p>底部裝有滾輪和小型引擎的靴子，利用引擎的推進力增加移動能力。</text:p>
            <text:p>準備階段使用，該場景間你的戰鬥移動+5m，該效果一場景可以使用1次。</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堅硬外套</text:p>
          </table:table-cell>
          <table:table-cell table:style-name="ce45" office:value-type="string" calcext:value-type="string">
            <text:p>防具（輔助）</text:p>
          </table:table-cell>
          <table:table-cell table:style-name="ce45" table:number-columns-repeated="5"/>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2" calcext:value-type="float">
            <text:p>2</text:p>
          </table:table-cell>
          <table:table-cell table:style-name="ce47" office:value-type="string" calcext:value-type="string">
            <text:p>9/8</text:p>
          </table:table-cell>
          <table:table-cell table:style-name="ce49" office:value-type="string" calcext:value-type="string">
            <text:p>使用特殊纖維的防彈防刃長大衣，防禦力不強，但可以穿在其他防具外側。</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多功能頭帶</text:p>
          </table:table-cell>
          <table:table-cell table:style-name="ce45" office:value-type="string" calcext:value-type="string">
            <text:p>防具（輔助）</text:p>
          </table:table-cell>
          <table:table-cell table:style-name="ce45" table:number-columns-repeated="5"/>
          <table:table-cell table:style-name="ce45" office:value-type="float" office:value="-1" calcext:value-type="float">
            <text:p>-1</text:p>
          </table:table-cell>
          <table:table-cell table:style-name="ce45" office:value-type="float" office:value="0" calcext:value-type="float">
            <text:p>0</text:p>
          </table:table-cell>
          <table:table-cell table:style-name="ce45" office:value-type="float" office:value="1" calcext:value-type="float">
            <text:p>1</text:p>
          </table:table-cell>
          <table:table-cell table:style-name="ce47" office:value-type="string" calcext:value-type="string">
            <text:p>15/9</text:p>
          </table:table-cell>
          <table:table-cell table:style-name="ce49" office:value-type="string" calcext:value-type="string">
            <text:p>將周邊情報數據化共享給裝備者的頭帶，也能防護頭部，但是危急時刻也許會礙事。</text:p>
            <text:p>你進行的&lt;知覺&gt;判定骰數+1個。</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反應裝甲</text:p>
          </table:table-cell>
          <table:table-cell table:style-name="ce45" office:value-type="string" calcext:value-type="string">
            <text:p>防具（輔助）</text:p>
          </table:table-cell>
          <table:table-cell table:style-name="ce45" table:number-columns-repeated="5"/>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0" calcext:value-type="float">
            <text:p>0</text:p>
          </table:table-cell>
          <table:table-cell table:style-name="ce47" office:value-type="string" calcext:value-type="string">
            <text:p>24/11</text:p>
          </table:table-cell>
          <table:table-cell table:style-name="ce49" office:value-type="string" calcext:value-type="string">
            <text:p>對衝擊進行反應爆炸減輕傷害的防具，由於本身沒有裝甲所以只能作為底牌使用。</text:p>
            <text:p>你受到HP傷害前使用，你（預定）受到的HP傷害-3D10，使用該效果的HP傷害適用後該防具破壞。</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覺悟白巾</text:p>
          </table:table-cell>
          <table:table-cell table:style-name="ce45" office:value-type="string" calcext:value-type="string">
            <text:p>防具（輔助）</text:p>
          </table:table-cell>
          <table:table-cell table:style-name="ce45" table:number-columns-repeated="5"/>
          <table:table-cell table:number-columns-repeated="3" table:style-name="ce45" office:value-type="float" office:value="0" calcext:value-type="float">
            <text:p>0</text:p>
          </table:table-cell>
          <table:table-cell table:style-name="ce47" office:value-type="string" calcext:value-type="string">
            <text:p>30/20</text:p>
          </table:table-cell>
          <table:table-cell table:style-name="ce49" office:value-type="string" calcext:value-type="string">
            <text:p>下定決心之為了捨棄心中迷茫而纏上的白巾，心生迷茫時只要紮緊它就能恢復意志。</text:p>
            <text:p>你受到不良狀態[重壓]時使用，回復不良狀態[重壓]，該效果一劇本可以使用一次。稀有道具。</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反應外套</text:p>
          </table:table-cell>
          <table:table-cell table:style-name="ce45" office:value-type="string" calcext:value-type="string">
            <text:p>防具（輔助）</text:p>
          </table:table-cell>
          <table:table-cell table:style-name="ce45" table:number-columns-repeated="5"/>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6" calcext:value-type="float">
            <text:p>6</text:p>
          </table:table-cell>
          <table:table-cell table:style-name="ce47" office:value-type="string" calcext:value-type="string">
            <text:p>36/24</text:p>
          </table:table-cell>
          <table:table-cell table:style-name="ce49" office:value-type="string" calcext:value-type="string">
            <text:p>對衝擊進行反應硬化的大衣，能暫時獲得很高的防禦能力，但會壞掉是其缺點。</text:p>
            <text:p>你受到HP傷害前使用，你（預定）受到的HP傷害-3D10，使用該效果的HP傷害適用後該防具破壞。</text:p>
          </table:table-cell>
          <table:table-cell table:style-name="ce45" office:value-type="string" calcext:value-type="string">
            <text:p>IA P35</text:p>
          </table:table-cell>
          <table:table-cell table:style-name="ce51"/>
          <table:table-cell table:style-name="ce44" table:number-columns-repeated="12"/>
          <table:table-cell table:number-columns-repeated="998"/>
        </table:table-row>
        <table:table-row table:style-name="ro2">
          <table:table-cell table:style-name="ce41" office:value-type="string" calcext:value-type="string" table:number-columns-spanned="13" table:number-rows-spanned="1">
            <text:p>載具</text:p>
          </table:table-cell>
          <table:covered-table-cell table:number-columns-repeated="12"/>
          <table:table-cell table:style-name="ce51"/>
          <table:table-cell table:style-name="ce44" table:number-columns-repeated="12"/>
          <table:table-cell table:number-columns-repeated="998"/>
        </table:table-row>
        <table:table-row table:style-name="ro2">
          <table:table-cell table:style-name="ce42" office:value-type="string" calcext:value-type="string">
            <text:p>自行車</text:p>
          </table:table-cell>
          <table:table-cell table:style-name="ce45" office:value-type="string" calcext:value-type="string">
            <text:p>載具</text:p>
          </table:table-cell>
          <table:table-cell table:style-name="ce45" office:value-type="string" calcext:value-type="string">
            <text:p>&lt;駕駛：二輪&gt;</text:p>
          </table:table-cell>
          <table:table-cell table:style-name="ce45"/>
          <table:table-cell table:style-name="ce45" office:value-type="float" office:value="2" calcext:value-type="float">
            <text:p>2</text:p>
          </table:table-cell>
          <table:table-cell table:style-name="ce45" table:number-columns-repeated="3"/>
          <table:table-cell table:style-name="ce45" office:value-type="float" office:value="-1" calcext:value-type="float">
            <text:p>-1</text:p>
          </table:table-cell>
          <table:table-cell table:style-name="ce45" office:value-type="float" office:value="0" calcext:value-type="float">
            <text:p>0</text:p>
          </table:table-cell>
          <table:table-cell table:style-name="ce47" office:value-type="string" calcext:value-type="string">
            <text:p>5/1</text:p>
          </table:table-cell>
          <table:table-cell table:style-name="ce49" office:value-type="string" calcext:value-type="string">
            <text:p>從單車到山地車，受到全國人民的歡迎。全力移動：【肉體】+40m</text:p>
            <text:p>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電動車/小型摩托</text:p>
          </table:table-cell>
          <table:table-cell table:style-name="ce45" office:value-type="string" calcext:value-type="string">
            <text:p>載具</text:p>
          </table:table-cell>
          <table:table-cell table:style-name="ce45" office:value-type="string" calcext:value-type="string">
            <text:p>&lt;駕駛：二輪&gt;</text:p>
          </table:table-cell>
          <table:table-cell table:style-name="ce45"/>
          <table:table-cell table:style-name="ce45" office:value-type="float" office:value="2" calcext:value-type="float">
            <text:p>2</text:p>
          </table:table-cell>
          <table:table-cell table:style-name="ce45" table:number-columns-repeated="3"/>
          <table:table-cell table:style-name="ce45" office:value-type="float" office:value="-2" calcext:value-type="float">
            <text:p>-2</text:p>
          </table:table-cell>
          <table:table-cell table:style-name="ce45" office:value-type="float" office:value="0" calcext:value-type="float">
            <text:p>0</text:p>
          </table:table-cell>
          <table:table-cell table:style-name="ce47" office:value-type="string" calcext:value-type="string">
            <text:p>5/2</text:p>
          </table:table-cell>
          <table:table-cell table:style-name="ce49" office:value-type="string" calcext:value-type="string">
            <text:p>從50cc的電動車到125cc的小型摩托，在日常需要的高中生之間普及很多。全力移動：100m</text:p>
            <text:p>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水上摩托</text:p>
          </table:table-cell>
          <table:table-cell table:style-name="ce45" office:value-type="string" calcext:value-type="string">
            <text:p>載具</text:p>
          </table:table-cell>
          <table:table-cell table:style-name="ce45" office:value-type="string" calcext:value-type="string">
            <text:p>&lt;駕駛：船舶&gt;</text:p>
          </table:table-cell>
          <table:table-cell table:style-name="ce45"/>
          <table:table-cell table:style-name="ce45" office:value-type="float" office:value="6" calcext:value-type="float">
            <text:p>6</text:p>
          </table:table-cell>
          <table:table-cell table:style-name="ce45" table:number-columns-repeated="3"/>
          <table:table-cell table:style-name="ce45" office:value-type="float" office:value="-1" calcext:value-type="float">
            <text:p>-1</text:p>
          </table:table-cell>
          <table:table-cell table:style-name="ce45" office:value-type="float" office:value="0" calcext:value-type="float">
            <text:p>0</text:p>
          </table:table-cell>
          <table:table-cell table:style-name="ce47" office:value-type="string" calcext:value-type="string">
            <text:p>10/4</text:p>
          </table:table-cell>
          <table:table-cell table:style-name="ce49" office:value-type="string" calcext:value-type="string">
            <text:p>可以在水上使用的小艇，使用水下噴射推進獲得了水上高速航行性能。全力移動：200m</text:p>
            <text:p>只能在水上使用，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騎乘馬</text:p>
          </table:table-cell>
          <table:table-cell table:style-name="ce45" office:value-type="string" calcext:value-type="string">
            <text:p>載具</text:p>
          </table:table-cell>
          <table:table-cell table:style-name="ce45" office:value-type="string" calcext:value-type="string">
            <text:p>&lt;駕駛：馬&gt;</text:p>
          </table:table-cell>
          <table:table-cell table:style-name="ce45"/>
          <table:table-cell table:style-name="ce45" office:value-type="float" office:value="3" calcext:value-type="float">
            <text:p>3</text:p>
          </table:table-cell>
          <table:table-cell table:style-name="ce45" table:number-columns-repeated="3"/>
          <table:table-cell table:style-name="ce45" office:value-type="float" office:value="-2" calcext:value-type="float">
            <text:p>-2</text:p>
          </table:table-cell>
          <table:table-cell table:style-name="ce45" office:value-type="float" office:value="0" calcext:value-type="float">
            <text:p>0</text:p>
          </table:table-cell>
          <table:table-cell table:style-name="ce47" office:value-type="string" calcext:value-type="string">
            <text:p>12/5</text:p>
          </table:table-cell>
          <table:table-cell table:style-name="ce49" office:value-type="string" calcext:value-type="string">
            <text:p>戰馬或賽馬等專為人類騎乘訓練的馬，作為生物，想要操控需要相當好的技術。全力移動：100m</text:p>
            <text:p>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摩托</text:p>
          </table:table-cell>
          <table:table-cell table:style-name="ce45" office:value-type="string" calcext:value-type="string">
            <text:p>載具</text:p>
          </table:table-cell>
          <table:table-cell table:style-name="ce45" office:value-type="string" calcext:value-type="string">
            <text:p>&lt;駕駛：二輪&gt;</text:p>
          </table:table-cell>
          <table:table-cell table:style-name="ce45"/>
          <table:table-cell table:style-name="ce45" office:value-type="float" office:value="5" calcext:value-type="float">
            <text:p>5</text:p>
          </table:table-cell>
          <table:table-cell table:style-name="ce45" table:number-columns-repeated="3"/>
          <table:table-cell table:style-name="ce45" office:value-type="float" office:value="-3" calcext:value-type="float">
            <text:p>-3</text:p>
          </table:table-cell>
          <table:table-cell table:style-name="ce45" office:value-type="float" office:value="0" calcext:value-type="float">
            <text:p>0</text:p>
          </table:table-cell>
          <table:table-cell table:style-name="ce47" office:value-type="string" calcext:value-type="string">
            <text:p>12/5</text:p>
          </table:table-cell>
          <table:table-cell table:style-name="ce49" office:value-type="string" calcext:value-type="string">
            <text:p>125-400cc，也就是中型摩托車。搭乘時的數據如下。全力移動：200m</text:p>
            <text:p>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單人平衡車</text:p>
          </table:table-cell>
          <table:table-cell table:style-name="ce45" office:value-type="string" calcext:value-type="string">
            <text:p>載具</text:p>
          </table:table-cell>
          <table:table-cell table:style-name="ce45" office:value-type="string" calcext:value-type="string">
            <text:p>&lt;駕駛：二輪&gt;</text:p>
          </table:table-cell>
          <table:table-cell table:style-name="ce45"/>
          <table:table-cell table:style-name="ce45" office:value-type="float" office:value="0" calcext:value-type="float">
            <text:p>0</text:p>
          </table:table-cell>
          <table:table-cell table:style-name="ce45" table:number-columns-repeated="3"/>
          <table:table-cell table:number-columns-repeated="2" table:style-name="ce45" office:value-type="float" office:value="0" calcext:value-type="float">
            <text:p>0</text:p>
          </table:table-cell>
          <table:table-cell table:style-name="ce47" office:value-type="string" calcext:value-type="string">
            <text:p>10/5</text:p>
          </table:table-cell>
          <table:table-cell table:style-name="ce49" office:value-type="string" calcext:value-type="string">
            <text:p>以未來的低能耗載具為初衷開發的個人用移動機器，因為很小所以能在建築內部使用。全力移動：50m</text:p>
            <text:p>該載具無法同乘，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小汽車</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10" calcext:value-type="float">
            <text:p>10</text:p>
          </table:table-cell>
          <table:table-cell table:style-name="ce45" table:number-columns-repeated="3"/>
          <table:table-cell table:style-name="ce45" office:value-type="float" office:value="-4" calcext:value-type="float">
            <text:p>-4</text:p>
          </table:table-cell>
          <table:table-cell table:style-name="ce45" office:value-type="float" office:value="6" calcext:value-type="float">
            <text:p>6</text:p>
          </table:table-cell>
          <table:table-cell table:style-name="ce47" office:value-type="string" calcext:value-type="string">
            <text:p>22/8</text:p>
          </table:table-cell>
          <table:table-cell table:style-name="ce49" office:value-type="string" calcext:value-type="string">
            <text:p>典型的乘用轎車，如果不記下車號的話很難和其他車區分開。全力移動：200m</text:p>
            <text:p>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摩托艇</text:p>
          </table:table-cell>
          <table:table-cell table:style-name="ce45" office:value-type="string" calcext:value-type="string">
            <text:p>載具</text:p>
          </table:table-cell>
          <table:table-cell table:style-name="ce45" office:value-type="string" calcext:value-type="string">
            <text:p>&lt;駕駛：船舶&gt;</text:p>
          </table:table-cell>
          <table:table-cell table:style-name="ce45"/>
          <table:table-cell table:style-name="ce45" office:value-type="float" office:value="7" calcext:value-type="float">
            <text:p>7</text:p>
          </table:table-cell>
          <table:table-cell table:style-name="ce45" table:number-columns-repeated="3"/>
          <table:table-cell table:style-name="ce45" office:value-type="float" office:value="-1" calcext:value-type="float">
            <text:p>-1</text:p>
          </table:table-cell>
          <table:table-cell table:style-name="ce45" office:value-type="float" office:value="0" calcext:value-type="float">
            <text:p>0</text:p>
          </table:table-cell>
          <table:table-cell table:style-name="ce47" office:value-type="string" calcext:value-type="string">
            <text:p>22/8</text:p>
          </table:table-cell>
          <table:table-cell table:style-name="ce49" office:value-type="string" calcext:value-type="string">
            <text:p>搭載引擎的小艇。全力移動：100m</text:p>
            <text:p>只能在水上使用，無法裝備搭載火器。</text:p>
          </table:table-cell>
          <table:table-cell table:style-name="ce45" office:value-type="string" calcext:value-type="string">
            <text:p>IA P3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大型摩托</text:p>
          </table:table-cell>
          <table:table-cell table:style-name="ce45" office:value-type="string" calcext:value-type="string">
            <text:p>載具</text:p>
          </table:table-cell>
          <table:table-cell table:style-name="ce45" office:value-type="string" calcext:value-type="string">
            <text:p>&lt;駕駛：二輪&gt;</text:p>
          </table:table-cell>
          <table:table-cell table:style-name="ce45"/>
          <table:table-cell table:style-name="ce45" office:value-type="float" office:value="12" calcext:value-type="float">
            <text:p>12</text:p>
          </table:table-cell>
          <table:table-cell table:style-name="ce45" table:number-columns-repeated="3"/>
          <table:table-cell table:style-name="ce45" office:value-type="float" office:value="-5" calcext:value-type="float">
            <text:p>-5</text:p>
          </table:table-cell>
          <table:table-cell table:style-name="ce45" office:value-type="float" office:value="0" calcext:value-type="float">
            <text:p>0</text:p>
          </table:table-cell>
          <table:table-cell table:style-name="ce47" office:value-type="string" calcext:value-type="string">
            <text:p>25/15</text:p>
          </table:table-cell>
          <table:table-cell table:style-name="ce49" office:value-type="string" calcext:value-type="string">
            <text:p>超過400cc的摩托，燃料費很貴。全力移動：250m</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賽車</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10" calcext:value-type="float">
            <text:p>10</text:p>
          </table:table-cell>
          <table:table-cell table:style-name="ce45" table:number-columns-repeated="3"/>
          <table:table-cell table:style-name="ce45" office:value-type="float" office:value="-5" calcext:value-type="float">
            <text:p>-5</text:p>
          </table:table-cell>
          <table:table-cell table:style-name="ce45" office:value-type="float" office:value="4" calcext:value-type="float">
            <text:p>4</text:p>
          </table:table-cell>
          <table:table-cell table:style-name="ce47" office:value-type="string" calcext:value-type="string">
            <text:p>30/15</text:p>
          </table:table-cell>
          <table:table-cell table:style-name="ce49" office:value-type="string" calcext:value-type="string">
            <text:p>比普通車更注意速度與高速行駛時運動性能的汽車。全力移動：300m</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移動商店車</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6" calcext:value-type="float">
            <text:p>6</text:p>
          </table:table-cell>
          <table:table-cell table:style-name="ce45" table:number-columns-repeated="3"/>
          <table:table-cell table:style-name="ce45" office:value-type="float" office:value="-6" calcext:value-type="float">
            <text:p>-6</text:p>
          </table:table-cell>
          <table:table-cell table:style-name="ce45" office:value-type="float" office:value="5" calcext:value-type="float">
            <text:p>5</text:p>
          </table:table-cell>
          <table:table-cell table:style-name="ce47" office:value-type="string" calcext:value-type="string">
            <text:p>40/20</text:p>
          </table:table-cell>
          <table:table-cell table:style-name="ce49" office:value-type="string" calcext:value-type="string">
            <text:p>卡車或麵包車等改造後能用來當店鋪的車。全力移動：70m</text:p>
            <text:p>你進行的&lt;籌措&gt;&lt;情報：●●&gt;判定的達成值+1，即使你不處於搭乘狀態也能適用。</text:p>
            <text:p>無法裝備搭載火器。</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貨車</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12" calcext:value-type="float">
            <text:p>12</text:p>
          </table:table-cell>
          <table:table-cell table:style-name="ce45" table:number-columns-repeated="3"/>
          <table:table-cell table:style-name="ce45" office:value-type="float" office:value="-6" calcext:value-type="float">
            <text:p>-6</text:p>
          </table:table-cell>
          <table:table-cell table:style-name="ce45" office:value-type="float" office:value="6" calcext:value-type="float">
            <text:p>6</text:p>
          </table:table-cell>
          <table:table-cell table:style-name="ce47" office:value-type="string" calcext:value-type="string">
            <text:p>30/20</text:p>
          </table:table-cell>
          <table:table-cell table:style-name="ce49" office:value-type="string" calcext:value-type="string">
            <text:p>卡車，中型和大型需要專用駕照。全力移動：100m</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直升機</text:p>
          </table:table-cell>
          <table:table-cell table:style-name="ce45" office:value-type="string" calcext:value-type="string">
            <text:p>載具</text:p>
          </table:table-cell>
          <table:table-cell table:style-name="ce45" office:value-type="string" calcext:value-type="string">
            <text:p>&lt;駕駛：航空器&gt;</text:p>
          </table:table-cell>
          <table:table-cell table:style-name="ce45"/>
          <table:table-cell table:style-name="ce45" office:value-type="float" office:value="5" calcext:value-type="float">
            <text:p>5</text:p>
          </table:table-cell>
          <table:table-cell table:style-name="ce45" table:number-columns-repeated="3"/>
          <table:table-cell table:style-name="ce45" office:value-type="float" office:value="-3" calcext:value-type="float">
            <text:p>-3</text:p>
          </table:table-cell>
          <table:table-cell table:style-name="ce45" office:value-type="float" office:value="0" calcext:value-type="float">
            <text:p>0</text:p>
          </table:table-cell>
          <table:table-cell table:style-name="ce47" office:value-type="string" calcext:value-type="string">
            <text:p>35/20</text:p>
          </table:table-cell>
          <table:table-cell table:style-name="ce49" office:value-type="string" calcext:value-type="string">
            <text:p>民用直升機。全力移動：100m</text:p>
            <text:p>你和同乘者進入飛行狀態。</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SUV</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15" calcext:value-type="float">
            <text:p>15</text:p>
          </table:table-cell>
          <table:table-cell table:style-name="ce45" table:number-columns-repeated="3"/>
          <table:table-cell table:style-name="ce45" office:value-type="float" office:value="-5" calcext:value-type="float">
            <text:p>-5</text:p>
          </table:table-cell>
          <table:table-cell table:style-name="ce45" office:value-type="float" office:value="7" calcext:value-type="float">
            <text:p>7</text:p>
          </table:table-cell>
          <table:table-cell table:style-name="ce47" office:value-type="string" calcext:value-type="string">
            <text:p>36/24</text:p>
          </table:table-cell>
          <table:table-cell table:style-name="ce49" office:value-type="string" calcext:value-type="string">
            <text:p>能夠克服惡劣路況的高性能四輪驅動車，甚至可以行駛在沒有鋪路的地方。全力移動：80m</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軍用4WD</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10" calcext:value-type="float">
            <text:p>10</text:p>
          </table:table-cell>
          <table:table-cell table:style-name="ce45" table:number-columns-repeated="3"/>
          <table:table-cell table:style-name="ce45" office:value-type="float" office:value="-6" calcext:value-type="float">
            <text:p>-6</text:p>
          </table:table-cell>
          <table:table-cell table:style-name="ce45" office:value-type="float" office:value="10" calcext:value-type="float">
            <text:p>10</text:p>
          </table:table-cell>
          <table:table-cell table:style-name="ce47" office:value-type="string" calcext:value-type="string">
            <text:p>38/25</text:p>
          </table:table-cell>
          <table:table-cell table:style-name="ce49" office:value-type="string" calcext:value-type="string">
            <text:p>吉普車型四驅軍用通用汽車，可以用來在不平整的地面運輸，也可以搭載車載武器當做簡易裝甲車。全力移動：150m</text:p>
            <text:p>稀有道具。</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輕型飛機</text:p>
          </table:table-cell>
          <table:table-cell table:style-name="ce45" office:value-type="string" calcext:value-type="string">
            <text:p>載具</text:p>
          </table:table-cell>
          <table:table-cell table:style-name="ce45" office:value-type="string" calcext:value-type="string">
            <text:p>&lt;駕駛：航空器&gt;</text:p>
          </table:table-cell>
          <table:table-cell table:style-name="ce45"/>
          <table:table-cell table:style-name="ce45" office:value-type="float" office:value="5" calcext:value-type="float">
            <text:p>5</text:p>
          </table:table-cell>
          <table:table-cell table:style-name="ce45" table:number-columns-repeated="3"/>
          <table:table-cell table:style-name="ce45" office:value-type="float" office:value="-3" calcext:value-type="float">
            <text:p>-3</text:p>
          </table:table-cell>
          <table:table-cell table:style-name="ce45" office:value-type="float" office:value="0" calcext:value-type="float">
            <text:p>0</text:p>
          </table:table-cell>
          <table:table-cell table:style-name="ce47" office:value-type="string" calcext:value-type="string">
            <text:p>40/25</text:p>
          </table:table-cell>
          <table:table-cell table:style-name="ce49" office:value-type="string" calcext:value-type="string">
            <text:p>個人擁有的小型飛機。全力移動：300m</text:p>
            <text:p>你和同乘者進入飛行狀態。</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高級車</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10" calcext:value-type="float">
            <text:p>10</text:p>
          </table:table-cell>
          <table:table-cell table:style-name="ce45" table:number-columns-repeated="3"/>
          <table:table-cell table:style-name="ce45" office:value-type="float" office:value="-4" calcext:value-type="float">
            <text:p>-4</text:p>
          </table:table-cell>
          <table:table-cell table:style-name="ce45" office:value-type="float" office:value="8" calcext:value-type="float">
            <text:p>8</text:p>
          </table:table-cell>
          <table:table-cell table:style-name="ce47" office:value-type="string" calcext:value-type="string">
            <text:p>35/25</text:p>
          </table:table-cell>
          <table:table-cell table:style-name="ce49" office:value-type="string" calcext:value-type="string">
            <text:p>豪華轎車型的高級車輛。全力移動：150m</text:p>
            <text:p>稀有道具。</text:p>
          </table:table-cell>
          <table:table-cell table:style-name="ce45" office:value-type="string" calcext:value-type="string">
            <text:p>IA P3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步兵戰車</text:p>
          </table:table-cell>
          <table:table-cell table:style-name="ce45" office:value-type="string" calcext:value-type="string">
            <text:p>載具</text:p>
          </table:table-cell>
          <table:table-cell table:style-name="ce45" office:value-type="string" calcext:value-type="string">
            <text:p>&lt;駕駛：四輪&gt;</text:p>
          </table:table-cell>
          <table:table-cell table:style-name="ce45"/>
          <table:table-cell table:style-name="ce45" office:value-type="float" office:value="10" calcext:value-type="float">
            <text:p>10</text:p>
          </table:table-cell>
          <table:table-cell table:style-name="ce45" table:number-columns-repeated="3"/>
          <table:table-cell table:style-name="ce45" office:value-type="float" office:value="-6" calcext:value-type="float">
            <text:p>-6</text:p>
          </table:table-cell>
          <table:table-cell table:style-name="ce45" office:value-type="float" office:value="12" calcext:value-type="float">
            <text:p>12</text:p>
          </table:table-cell>
          <table:table-cell table:style-name="ce47" office:value-type="string" calcext:value-type="string">
            <text:p>45/28</text:p>
          </table:table-cell>
          <table:table-cell table:style-name="ce49" office:value-type="string" calcext:value-type="string">
            <text:p>運兵裝甲車，有履帶式和輪式，在日本由於常在路上跑所以輪式比較多，UGN的車輛大部分偽裝成安保公司。全力移動：75m</text:p>
            <text:p>稀有道具。</text:p>
          </table:table-cell>
          <table:table-cell table:style-name="ce45" office:value-type="string" calcext:value-type="string">
            <text:p>IA P3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潛水艇</text:p>
          </table:table-cell>
          <table:table-cell table:style-name="ce45" office:value-type="string" calcext:value-type="string">
            <text:p>載具</text:p>
          </table:table-cell>
          <table:table-cell table:style-name="ce45" office:value-type="string" calcext:value-type="string">
            <text:p>&lt;駕駛：船舶&gt;</text:p>
          </table:table-cell>
          <table:table-cell table:style-name="ce45"/>
          <table:table-cell table:style-name="ce45" office:value-type="float" office:value="5" calcext:value-type="float">
            <text:p>5</text:p>
          </table:table-cell>
          <table:table-cell table:style-name="ce45" table:number-columns-repeated="3"/>
          <table:table-cell table:style-name="ce45" office:value-type="float" office:value="-10" calcext:value-type="float">
            <text:p>-10</text:p>
          </table:table-cell>
          <table:table-cell table:style-name="ce45" office:value-type="float" office:value="10" calcext:value-type="float">
            <text:p>10</text:p>
          </table:table-cell>
          <table:table-cell table:style-name="ce47" office:value-type="string" calcext:value-type="string">
            <text:p>50/33</text:p>
          </table:table-cell>
          <table:table-cell table:style-name="ce49" office:value-type="string" calcext:value-type="string">
            <text:p>可以在水中活動的民用潛艇。全力移動：80m</text:p>
            <text:p>只能在水中使用，你和同乘者在水中也不會受到減益。稀有道具。</text:p>
          </table:table-cell>
          <table:table-cell table:style-name="ce45" office:value-type="string" calcext:value-type="string">
            <text:p>IA P38</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宇宙飛船</text:p>
          </table:table-cell>
          <table:table-cell table:style-name="ce45" office:value-type="string" calcext:value-type="string">
            <text:p>載具</text:p>
          </table:table-cell>
          <table:table-cell table:style-name="ce45" office:value-type="string" calcext:value-type="string">
            <text:p>&lt;駕駛：宇宙飛船&gt;</text:p>
          </table:table-cell>
          <table:table-cell table:style-name="ce45"/>
          <table:table-cell table:style-name="ce45" office:value-type="float" office:value="10" calcext:value-type="float">
            <text:p>10</text:p>
          </table:table-cell>
          <table:table-cell table:style-name="ce45" table:number-columns-repeated="3"/>
          <table:table-cell table:style-name="ce45" office:value-type="float" office:value="-8" calcext:value-type="float">
            <text:p>-8</text:p>
          </table:table-cell>
          <table:table-cell table:style-name="ce45" office:value-type="float" office:value="15" calcext:value-type="float">
            <text:p>15</text:p>
          </table:table-cell>
          <table:table-cell table:style-name="ce47" office:value-type="string" calcext:value-type="string">
            <text:p>67/42</text:p>
          </table:table-cell>
          <table:table-cell table:style-name="ce49" office:value-type="string" calcext:value-type="string">
            <text:p>擁有突入大氣層能力的小型航天器。全力移動：400m</text:p>
            <text:p>只能在宇宙空間使用，你和同乘者在宇宙空間也不會受到減益。稀有道具。</text:p>
          </table:table-cell>
          <table:table-cell table:style-name="ce45" office:value-type="string" calcext:value-type="string">
            <text:p>IA P38</text:p>
          </table:table-cell>
          <table:table-cell table:style-name="ce51"/>
          <table:table-cell table:style-name="ce44" table:number-columns-repeated="12"/>
          <table:table-cell table:number-columns-repeated="998"/>
        </table:table-row>
        <table:table-row table:style-name="ro2">
          <table:table-cell table:style-name="ce41" office:value-type="string" calcext:value-type="string" table:number-columns-spanned="13" table:number-rows-spanned="1">
            <text:p>關聯</text:p>
          </table:table-cell>
          <table:covered-table-cell table:number-columns-repeated="12"/>
          <table:table-cell table:style-name="ce51"/>
          <table:table-cell table:style-name="ce44" table:number-columns-repeated="12"/>
          <table:table-cell table:number-columns-repeated="998"/>
        </table:table-row>
        <table:table-row table:style-name="ro2">
          <table:table-cell table:style-name="ce42" office:value-type="string" calcext:value-type="string">
            <text:p>關聯：UGN幹部</text:p>
          </table:table-cell>
          <table:table-cell table:style-name="ce45" office:value-type="string" calcext:value-type="string">
            <text:p>關聯</text:p>
          </table:table-cell>
          <table:table-cell table:style-name="ce45" office:value-type="string" calcext:value-type="string">
            <text:p>&lt;情報：UGN&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通曉情報的 UGN 幹部。</text:p>
            <text:p>你進行&lt;情報：UGN&gt;判定前使用，該判定骰數+2個。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喜歡流言的朋友</text:p>
          </table:table-cell>
          <table:table-cell table:style-name="ce45" office:value-type="string" calcext:value-type="string">
            <text:p>關聯</text:p>
          </table:table-cell>
          <table:table-cell table:style-name="ce45" office:value-type="string" calcext:value-type="string">
            <text:p>&lt;情報：流言&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能將流言轉達給自己的朋友。</text:p>
            <text:p>你進行&lt;情報：流言&gt;判定前使用，該判定骰數+2個。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警察</text:p>
          </table:table-cell>
          <table:table-cell table:style-name="ce45" office:value-type="string" calcext:value-type="string">
            <text:p>關聯</text:p>
          </table:table-cell>
          <table:table-cell table:style-name="ce45" office:value-type="string" calcext:value-type="string">
            <text:p>&lt;情報：警察&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在局內吃得開的警察。</text:p>
            <text:p>你進行&lt;情報：警察&gt;判定前使用，該判定骰數+2個。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研究員</text:p>
          </table:table-cell>
          <table:table-cell table:style-name="ce45" office:value-type="string" calcext:value-type="string">
            <text:p>關聯</text:p>
          </table:table-cell>
          <table:table-cell table:style-name="ce45" office:value-type="string" calcext:value-type="string">
            <text:p>&lt;情報：學問&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以博識聞名的研究者。</text:p>
            <text:p>你進行&lt;情報：學問&gt;判定前使用，該判定骰數+2個。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企業</text:p>
          </table:table-cell>
          <table:table-cell table:style-name="ce45" office:value-type="string" calcext:value-type="string">
            <text:p>關聯</text:p>
          </table:table-cell>
          <table:table-cell table:style-name="ce45" office:value-type="string" calcext:value-type="string">
            <text:p>&lt;情報：商業&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熟悉經濟界的人物。</text:p>
            <text:p>你進行&lt;情報：商業&gt;判定前使用，該判定骰數+2個。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情報屋</text:p>
          </table:table-cell>
          <table:table-cell table:style-name="ce45" office:value-type="string" calcext:value-type="string">
            <text:p>關聯</text:p>
          </table:table-cell>
          <table:table-cell table:style-name="ce45" office:value-type="string" calcext:value-type="string">
            <text:p>&lt;情報：黑社會&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敏銳察覺地下情報的情報商人。</text:p>
            <text:p>你進行&lt;情報：黑社會&gt;判定前使用，該判定骰數+2個。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專家</text:p>
          </table:table-cell>
          <table:table-cell table:style-name="ce45" office:value-type="string" calcext:value-type="string">
            <text:p>關聯</text:p>
          </table:table-cell>
          <table:table-cell table:style-name="ce45" office:value-type="string" calcext:value-type="string">
            <text:p>參照解說</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擁有某種知識的專家。</text:p>
            <text:p>取得時選擇&lt;知識：●●&gt;中的一項，你使用選擇的技能進行的判定骰數+2個。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不法中介</text:p>
          </table:table-cell>
          <table:table-cell table:style-name="ce45" office:value-type="string" calcext:value-type="string">
            <text:p>關聯</text:p>
          </table:table-cell>
          <table:table-cell table:style-name="ce45" office:value-type="string" calcext:value-type="string">
            <text:p>&lt;籌措&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擅長籌備物資的違法商人。</text:p>
            <text:p>你進行&lt;籌措&gt;判定前使用，該判定骰數+3個，該效果一劇本可以使用一次。稀有道具。</text:p>
          </table:table-cell>
          <table:table-cell table:style-name="ce45" office:value-type="string" calcext:value-type="string">
            <text:p>IA P39</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黑客</text:p>
          </table:table-cell>
          <table:table-cell table:style-name="ce45" office:value-type="string" calcext:value-type="string">
            <text:p>關聯</text:p>
          </table:table-cell>
          <table:table-cell table:style-name="ce45" office:value-type="string" calcext:value-type="string">
            <text:p>&lt;情報：網絡&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能夠突破防火牆的專家。</text:p>
            <text:p>你進行&lt;情報：網絡&gt;判定前使用，該判定骰數+2個。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大眾媒體</text:p>
          </table:table-cell>
          <table:table-cell table:style-name="ce45" office:value-type="string" calcext:value-type="string">
            <text:p>關聯</text:p>
          </table:table-cell>
          <table:table-cell table:style-name="ce45" office:value-type="string" calcext:value-type="string">
            <text:p>&lt;情報：媒體&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採訪報道界的情報高手。</text:p>
            <text:p>你進行&lt;情報：媒體&gt;判定前使用，該判定骰數+2個。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對要人的恩情</text:p>
          </table:table-cell>
          <table:table-cell table:style-name="ce45" office:value-type="string" calcext:value-type="string">
            <text:p>關聯</text:p>
          </table:table-cell>
          <table:table-cell table:style-name="ce45" office:value-type="string" calcext:value-type="string">
            <text:p>&lt;情報：●●&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政府機關或官僚貴人欠了你人情。</text:p>
            <text:p>你進行任意&lt;情報：●●&gt;判定前使用，該判定骰數+3個，該效果一劇本可以使用一次。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傭兵</text:p>
          </table:table-cell>
          <table:table-cell table:style-name="ce45" office:value-type="string" calcext:value-type="string">
            <text:p>關聯</text:p>
          </table:table-cell>
          <table:table-cell table:style-name="ce45" office:value-type="string" calcext:value-type="string">
            <text:p>&lt;情報：軍事&gt;</text:p>
          </table:table-cell>
          <table:table-cell table:style-name="ce45" table:number-columns-repeated="7"/>
          <table:table-cell table:style-name="ce47" office:value-type="string" calcext:value-type="string">
            <text:p>購入不可/1</text:p>
          </table:table-cell>
          <table:table-cell table:style-name="ce49" office:value-type="string" calcext:value-type="string">
            <text:p>一名收集軍事情報的傭兵。</text:p>
            <text:p>你進行&lt;情報：軍事&gt;判定前使用，該判定骰數+2個。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情報收集小組</text:p>
          </table:table-cell>
          <table:table-cell table:style-name="ce45" office:value-type="string" calcext:value-type="string">
            <text:p>關聯</text:p>
          </table:table-cell>
          <table:table-cell table:style-name="ce45" office:value-type="string" calcext:value-type="string">
            <text:p>&lt;情報：●●&gt;</text:p>
          </table:table-cell>
          <table:table-cell table:style-name="ce45" table:number-columns-repeated="7"/>
          <table:table-cell table:style-name="ce47" office:value-type="string" calcext:value-type="string">
            <text:p>購入不可/2</text:p>
          </table:table-cell>
          <table:table-cell table:style-name="ce49" office:value-type="string" calcext:value-type="string">
            <text:p>一支你帶領的部下或擁護者等組成的為你服務的小組。</text:p>
            <text:p>你進行&lt;情報：●●&gt;判定前使用，該判定達成值+2，該效果一劇本可以使用三次。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熱心粉絲</text:p>
          </table:table-cell>
          <table:table-cell table:style-name="ce45" office:value-type="string" calcext:value-type="string">
            <text:p>關聯</text:p>
          </table:table-cell>
          <table:table-cell table:style-name="ce45" office:value-type="string" calcext:value-type="string">
            <text:p>參照解說</text:p>
          </table:table-cell>
          <table:table-cell table:style-name="ce45" table:number-columns-repeated="7"/>
          <table:table-cell table:style-name="ce47" office:value-type="string" calcext:value-type="string">
            <text:p>購入不可/2</text:p>
          </table:table-cell>
          <table:table-cell table:style-name="ce49" office:value-type="string" calcext:value-type="string">
            <text:p>一名對你的歌唱或繪畫等藝術活動狂熱的粉絲，有粉絲應援你的藝術水平也有所增長。</text:p>
            <text:p>取得時選擇&lt;藝術：●●&gt;中的一項，你使用選擇的技能進行判定前使用，該判定骰數+3個，該效果一劇本可以使用一次。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UGN諜報部</text:p>
          </table:table-cell>
          <table:table-cell table:style-name="ce45" office:value-type="string" calcext:value-type="string">
            <text:p>關聯</text:p>
          </table:table-cell>
          <table:table-cell table:style-name="ce45" office:value-type="string" calcext:value-type="string">
            <text:p>&lt;情報：UGN&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支UGN負責情報收集的小組。</text:p>
            <text:p>你進行&lt;情報：UGN&gt;判定後使用，重骰判定並且必須接受重骰結果，該效果一場景可以使用一次。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警察OB</text:p>
          </table:table-cell>
          <table:table-cell table:style-name="ce45" office:value-type="string" calcext:value-type="string">
            <text:p>關聯</text:p>
          </table:table-cell>
          <table:table-cell table:style-name="ce45" office:value-type="string" calcext:value-type="string">
            <text:p>&lt;情報：警察&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名和現役警官有聯繫的退休警官。</text:p>
            <text:p>你進行&lt;情報：警察&gt;判定後使用，重骰判定並且必須接受重骰結果，該效果一場景可以使用一次。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經濟顧問</text:p>
          </table:table-cell>
          <table:table-cell table:style-name="ce45" office:value-type="string" calcext:value-type="string">
            <text:p>關聯</text:p>
          </table:table-cell>
          <table:table-cell table:style-name="ce45" office:value-type="string" calcext:value-type="string">
            <text:p>&lt;情報：商業&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名瞭解經濟界實情的顧問。</text:p>
            <text:p>你進行&lt;情報：商業&gt;判定後使用，重骰判定並且必須接受重骰結果，該效果一場景可以使用一次。稀有道具。</text:p>
          </table:table-cell>
          <table:table-cell table:style-name="ce45" office:value-type="string" calcext:value-type="string">
            <text:p>IA P40</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情報揭示板</text:p>
          </table:table-cell>
          <table:table-cell table:style-name="ce45" office:value-type="string" calcext:value-type="string">
            <text:p>關聯</text:p>
          </table:table-cell>
          <table:table-cell table:style-name="ce45" office:value-type="string" calcext:value-type="string">
            <text:p>&lt;情報：流言&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塊寫有各種流言的網頁揭示板。</text:p>
            <text:p>你進行&lt;情報：流言&gt;判定後使用，重骰判定並且必須接受重骰結果，該效果一場景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非法佔有者</text:p>
          </table:table-cell>
          <table:table-cell table:style-name="ce45" office:value-type="string" calcext:value-type="string">
            <text:p>關聯</text:p>
          </table:table-cell>
          <table:table-cell table:style-name="ce45" office:value-type="string" calcext:value-type="string">
            <text:p>&lt;情報：黑社會&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名生活在小巷裡的非法佔有者。</text:p>
            <text:p>你進行&lt;情報：黑社會&gt;判定後使用，重骰判定並且必須接受重骰結果，該效果一場景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大學教授</text:p>
          </table:table-cell>
          <table:table-cell table:style-name="ce45" office:value-type="string" calcext:value-type="string">
            <text:p>關聯</text:p>
          </table:table-cell>
          <table:table-cell table:style-name="ce45" office:value-type="string" calcext:value-type="string">
            <text:p>&lt;情報：學問&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名在大學執教的教授。</text:p>
            <text:p>你進行&lt;情報：學問&gt;判定後使用，重骰判定並且必須接受重骰結果，該效果一場景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自由記者</text:p>
          </table:table-cell>
          <table:table-cell table:style-name="ce45" office:value-type="string" calcext:value-type="string">
            <text:p>關聯</text:p>
          </table:table-cell>
          <table:table-cell table:style-name="ce45" office:value-type="string" calcext:value-type="string">
            <text:p>&lt;情報：媒體&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名混跡大眾媒體的自由記者。</text:p>
            <text:p>你進行&lt;情報：媒體&gt;判定後使用，重骰判定並且必須接受重骰結果，該效果一場景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博主</text:p>
          </table:table-cell>
          <table:table-cell table:style-name="ce45" office:value-type="string" calcext:value-type="string">
            <text:p>關聯</text:p>
          </table:table-cell>
          <table:table-cell table:style-name="ce45" office:value-type="string" calcext:value-type="string">
            <text:p>&lt;情報：網絡&gt;</text:p>
          </table:table-cell>
          <table:table-cell table:style-name="ce45" table:number-columns-repeated="7"/>
          <table:table-cell table:style-name="ce47" office:value-type="string" calcext:value-type="string">
            <text:p>購入不可/3</text:p>
          </table:table-cell>
          <table:table-cell table:style-name="ce49" office:value-type="string" calcext:value-type="string">
            <text:p>一名在網上很火的博主。</text:p>
            <text:p>你進行&lt;情報：網絡&gt;判定後使用，重骰判定並且必須接受重骰結果，該效果一場景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網紅</text:p>
          </table:table-cell>
          <table:table-cell table:style-name="ce45" office:value-type="string" calcext:value-type="string">
            <text:p>關聯</text:p>
          </table:table-cell>
          <table:table-cell table:style-name="ce45" office:value-type="string" calcext:value-type="string">
            <text:p>參照解說</text:p>
          </table:table-cell>
          <table:table-cell table:style-name="ce45" table:number-columns-repeated="7"/>
          <table:table-cell table:style-name="ce47" office:value-type="string" calcext:value-type="string">
            <text:p>購入不可/4</text:p>
          </table:table-cell>
          <table:table-cell table:style-name="ce49" office:value-type="string" calcext:value-type="string">
            <text:p>一名通過視頻或聊天軟件收集情報的網紅。</text:p>
            <text:p>你進行非戰鬥或回避的【社會】判定前使用，該判定骰數+2個，該效果一劇本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助手</text:p>
          </table:table-cell>
          <table:table-cell table:style-name="ce45" office:value-type="string" calcext:value-type="string">
            <text:p>關聯</text:p>
          </table:table-cell>
          <table:table-cell table:style-name="ce45" office:value-type="string" calcext:value-type="string">
            <text:p>參照解說</text:p>
          </table:table-cell>
          <table:table-cell table:style-name="ce45" table:number-columns-repeated="7"/>
          <table:table-cell table:style-name="ce47" office:value-type="string" calcext:value-type="string">
            <text:p>購入不可/4</text:p>
          </table:table-cell>
          <table:table-cell table:style-name="ce49" office:value-type="string" calcext:value-type="string">
            <text:p>一名幫助你思考或創作的助手。</text:p>
            <text:p>有他幫忙你能集中在自己的活動上，你進行非戰鬥或回避的【精神】判定前使用，該判定骰數+2個，該效果一劇本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運動教練</text:p>
          </table:table-cell>
          <table:table-cell table:style-name="ce45" office:value-type="string" calcext:value-type="string">
            <text:p>關聯</text:p>
          </table:table-cell>
          <table:table-cell table:style-name="ce45" office:value-type="string" calcext:value-type="string">
            <text:p>參照解說</text:p>
          </table:table-cell>
          <table:table-cell table:style-name="ce45" table:number-columns-repeated="7"/>
          <table:table-cell table:style-name="ce47" office:value-type="string" calcext:value-type="string">
            <text:p>購入不可/4</text:p>
          </table:table-cell>
          <table:table-cell table:style-name="ce49" office:value-type="string" calcext:value-type="string">
            <text:p>一名運動教練或武術師傅。</text:p>
            <text:p>能夠成為你在運動中的指導，你進行非戰鬥或回避的【肉體】判定前使用，該判定骰數+2個，該效果一劇本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關聯：同好之士</text:p>
          </table:table-cell>
          <table:table-cell table:style-name="ce45" office:value-type="string" calcext:value-type="string">
            <text:p>關聯</text:p>
          </table:table-cell>
          <table:table-cell table:style-name="ce45" office:value-type="string" calcext:value-type="string">
            <text:p>參照解說</text:p>
          </table:table-cell>
          <table:table-cell table:style-name="ce45" table:number-columns-repeated="7"/>
          <table:table-cell table:style-name="ce47" office:value-type="string" calcext:value-type="string">
            <text:p>購入不可/4</text:p>
          </table:table-cell>
          <table:table-cell table:style-name="ce49" office:value-type="string" calcext:value-type="string">
            <text:p>一名在音樂或繪畫中與你興趣相投的同好。</text:p>
            <text:p>你進行非戰鬥或回避的【感覺】判定前使用，該判定骰數+2個，該效果一劇本可以使用一次。稀有道具。</text:p>
          </table:table-cell>
          <table:table-cell table:style-name="ce45" office:value-type="string" calcext:value-type="string">
            <text:p>IA P41</text:p>
          </table:table-cell>
          <table:table-cell table:style-name="ce51"/>
          <table:table-cell table:style-name="ce44" table:number-columns-repeated="12"/>
          <table:table-cell table:number-columns-repeated="998"/>
        </table:table-row>
        <table:table-row table:style-name="ro2">
          <table:table-cell table:style-name="ce41" office:value-type="string" calcext:value-type="string" table:number-columns-spanned="13" table:number-rows-spanned="1">
            <text:p>一般道具</text:p>
          </table:table-cell>
          <table:covered-table-cell table:number-columns-repeated="12"/>
          <table:table-cell table:style-name="ce51"/>
          <table:table-cell table:style-name="ce44" table:number-columns-repeated="12"/>
          <table:table-cell table:number-columns-repeated="998"/>
        </table:table-row>
        <table:table-row table:style-name="ro2">
          <table:table-cell table:style-name="ce42" office:value-type="string" calcext:value-type="string">
            <text:p>休閒裝</text:p>
          </table:table-cell>
          <table:table-cell table:style-name="ce45" office:value-type="string" calcext:value-type="string">
            <text:p>一般</text:p>
          </table:table-cell>
          <table:table-cell table:style-name="ce45" table:number-columns-repeated="8"/>
          <table:table-cell table:style-name="ce47" office:value-type="string" calcext:value-type="string">
            <text:p>2/0</text:p>
          </table:table-cell>
          <table:table-cell table:style-name="ce49" office:value-type="string" calcext:value-type="string">
            <text:p>能夠在街頭買到的衣服。運動服、T 恤、牛仔褲等。</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手機</text:p>
          </table:table-cell>
          <table:table-cell table:style-name="ce45" office:value-type="string" calcext:value-type="string">
            <text:p>一般</text:p>
          </table:table-cell>
          <table:table-cell table:style-name="ce45" table:number-columns-repeated="8"/>
          <table:table-cell table:style-name="ce47" office:value-type="string" calcext:value-type="string">
            <text:p>3/0</text:p>
          </table:table-cell>
          <table:table-cell table:style-name="ce49" office:value-type="string" calcext:value-type="string">
            <text:p>手機或智能電話，有的功能簡易，有的功能繁多。</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裝飾品</text:p>
          </table:table-cell>
          <table:table-cell table:style-name="ce45" office:value-type="string" calcext:value-type="string">
            <text:p>一般</text:p>
          </table:table-cell>
          <table:table-cell table:style-name="ce45" table:number-columns-repeated="8"/>
          <table:table-cell table:style-name="ce47" office:value-type="string" calcext:value-type="string">
            <text:p>3/0</text:p>
          </table:table-cell>
          <table:table-cell table:style-name="ce49" office:value-type="string" calcext:value-type="string">
            <text:p>太陽鏡、手錶、戒指、項鍊等，不是很大的裝飾品。</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制服</text:p>
          </table:table-cell>
          <table:table-cell table:style-name="ce45" office:value-type="string" calcext:value-type="string">
            <text:p>一般</text:p>
          </table:table-cell>
          <table:table-cell table:style-name="ce45" table:number-columns-repeated="8"/>
          <table:table-cell table:style-name="ce47" office:value-type="string" calcext:value-type="string">
            <text:p>7/0</text:p>
          </table:table-cell>
          <table:table-cell table:style-name="ce49" office:value-type="string" calcext:value-type="string">
            <text:p>各種制服。大部分時候組織都會進行提供，常備化只是因為個人愛好。</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禮服</text:p>
          </table:table-cell>
          <table:table-cell table:style-name="ce45" office:value-type="string" calcext:value-type="string">
            <text:p>一般</text:p>
          </table:table-cell>
          <table:table-cell table:style-name="ce45" table:number-columns-repeated="8"/>
          <table:table-cell table:style-name="ce47" office:value-type="string" calcext:value-type="string">
            <text:p>5/0</text:p>
          </table:table-cell>
          <table:table-cell table:style-name="ce49" office:value-type="string" calcext:value-type="string">
            <text:p>高級商場或裁縫店的正裝。西裝或晚禮服等。</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武器箱</text:p>
          </table:table-cell>
          <table:table-cell table:style-name="ce45" office:value-type="string" calcext:value-type="string">
            <text:p>一般</text:p>
          </table:table-cell>
          <table:table-cell table:style-name="ce45" table:number-columns-repeated="8"/>
          <table:table-cell table:style-name="ce47" office:value-type="string" calcext:value-type="string">
            <text:p>18/1</text:p>
          </table:table-cell>
          <table:table-cell table:style-name="ce49" office:value-type="string" calcext:value-type="string">
            <text:p>UGN 製作的道具箱，能夠放進一件武器或防具。</text:p>
            <text:p>獲得時選擇一件你擁有的武器，隨時可以使用，裝備你選擇的武器。</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回憶之物</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2</text:p>
          </table:table-cell>
          <table:table-cell table:style-name="ce49" office:value-type="string" calcext:value-type="string">
            <text:p>留作紀念的打火機、前輩的第 2 顆紐扣等。</text:p>
            <text:p>你進行的&lt;意志&gt;判定達成值+1。</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藝術道具</text:p>
          </table:table-cell>
          <table:table-cell table:style-name="ce45" office:value-type="string" calcext:value-type="string">
            <text:p>一般</text:p>
          </table:table-cell>
          <table:table-cell table:style-name="ce45" table:number-columns-repeated="8"/>
          <table:table-cell table:style-name="ce47" office:value-type="string" calcext:value-type="string">
            <text:p>10+/2</text:p>
          </table:table-cell>
          <table:table-cell table:style-name="ce49" office:value-type="string" calcext:value-type="string">
            <text:p>繪畫用的畫筆或畫板，演奏音樂的樂器，用於雕刻的鑿子等，藝術作品專用道具。</text:p>
            <text:p>取得時選擇&lt;藝術：●●&gt;中的一項，記作[藝術道具：●●]，你進行的該判定達成值+1，不同技能的[藝術道具：●●]視為不同的道具。</text:p>
          </table:table-cell>
          <table:table-cell table:style-name="ce45" office:value-type="string" calcext:value-type="string">
            <text:p>IA P42</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搜索雷達</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2</text:p>
          </table:table-cell>
          <table:table-cell table:style-name="ce49" office:value-type="string" calcext:value-type="string">
            <text:p>使用電磁波探測周圍的裝置，大小只有手機那麼大。</text:p>
            <text:p>你進行的&lt;知覺&gt;判定達成值+1。</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自動巡迴軟件</text:p>
          </table:table-cell>
          <table:table-cell table:style-name="ce45" office:value-type="string" calcext:value-type="string">
            <text:p>一般</text:p>
          </table:table-cell>
          <table:table-cell table:style-name="ce45" table:number-columns-repeated="8"/>
          <table:table-cell table:style-name="ce47" office:value-type="string" calcext:value-type="string">
            <text:p>5/2</text:p>
          </table:table-cell>
          <table:table-cell table:style-name="ce49" office:value-type="string" calcext:value-type="string">
            <text:p>自動收集情報的軟件。</text:p>
            <text:p>你進行&lt;情報：網絡&gt;&lt;情報：流言&gt;判定前使用，該判定骰數+1個。</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專業書</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2</text:p>
          </table:table-cell>
          <table:table-cell table:style-name="ce49" office:value-type="string" calcext:value-type="string">
            <text:p>關於某個專業知識的專業書。</text:p>
            <text:p>取得時選擇&lt;知識：●●&gt;中的一項，記作[專業書：●●]，你進行的該判定達成值+1，不同技能的[專業書：●●]視為不同的道具。</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寵物</text:p>
          </table:table-cell>
          <table:table-cell table:style-name="ce45" office:value-type="string" calcext:value-type="string">
            <text:p>一般</text:p>
          </table:table-cell>
          <table:table-cell table:style-name="ce45" table:number-columns-repeated="8"/>
          <table:table-cell table:style-name="ce47" office:value-type="string" calcext:value-type="string">
            <text:p>12/2</text:p>
          </table:table-cell>
          <table:table-cell table:style-name="ce49" office:value-type="string" calcext:value-type="string">
            <text:p>你養的寵物（臨時演員），取得時可以決定如貓、狗或鸚鵡等寵物種類。</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聲音轉換器</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2</text:p>
          </table:table-cell>
          <table:table-cell table:style-name="ce49" office:value-type="string" calcext:value-type="string">
            <text:p>貼在喉嚨處改變聲色的小型裝置，發出對方覺得好聽的聲音，能讓對話或議論向有利的方向進行。</text:p>
            <text:p>你進行的&lt;交涉&gt;判定達成值+1。</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便攜式PC</text:p>
          </table:table-cell>
          <table:table-cell table:style-name="ce45" office:value-type="string" calcext:value-type="string">
            <text:p>一般</text:p>
          </table:table-cell>
          <table:table-cell table:style-name="ce45" table:number-columns-repeated="8"/>
          <table:table-cell table:style-name="ce47" office:value-type="string" calcext:value-type="string">
            <text:p>8/2</text:p>
          </table:table-cell>
          <table:table-cell table:style-name="ce49" office:value-type="string" calcext:value-type="string">
            <text:p>攜帶性能優秀的電腦，是成功商務人士的有力道具。</text:p>
            <text:p>你進行的&lt;情報：網絡&gt;判定骰數+1個。</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傭人</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3</text:p>
          </table:table-cell>
          <table:table-cell table:style-name="ce49" office:value-type="string" calcext:value-type="string">
            <text:p>你的專屬臨時演員，該臨時演員可以是你的部下、交往對象、執事等，其關係在取得時決定。</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衝刺滑輪</text:p>
          </table:table-cell>
          <table:table-cell table:style-name="ce45" office:value-type="string" calcext:value-type="string">
            <text:p>一般</text:p>
          </table:table-cell>
          <table:table-cell table:style-name="ce45" table:number-columns-repeated="8"/>
          <table:table-cell table:style-name="ce47" office:value-type="string" calcext:value-type="string">
            <text:p>26/3</text:p>
          </table:table-cell>
          <table:table-cell table:style-name="ce49" office:value-type="string" calcext:value-type="string">
            <text:p>動力裝甲腳部搭載的使用無芯電機轉動的車輪可以急加速也可以制動。</text:p>
            <text:p>裝備名字中帶有[動力裝甲]或[PA裝甲]的防具時你的戰鬥移動+10m。</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能力訓練</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3</text:p>
          </table:table-cell>
          <table:table-cell table:style-name="ce49" office:value-type="string" calcext:value-type="string">
            <text:p>為了應對各種情況而進行的訓練。</text:p>
            <text:p>取得時選擇能力值中的一項，記作[能力訓練：●●]，你使用該能力值進行判定前使用，該判定達成值+1，該效果一場景可以使用1次，不同能力值的[能力訓練：●●]視為不同的道具，該道具各能力值只能常備一種，且只有你能使用。</text:p>
          </table:table-cell>
          <table:table-cell table:style-name="ce45" office:value-type="string" calcext:value-type="string">
            <text:p>IA P43</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格鬥撞角</text:p>
          </table:table-cell>
          <table:table-cell table:style-name="ce45" office:value-type="string" calcext:value-type="string">
            <text:p>一般</text:p>
          </table:table-cell>
          <table:table-cell table:style-name="ce45" table:number-columns-repeated="8"/>
          <table:table-cell table:style-name="ce47" office:value-type="string" calcext:value-type="string">
            <text:p>30/4</text:p>
          </table:table-cell>
          <table:table-cell table:style-name="ce49" office:value-type="string" calcext:value-type="string">
            <text:p>動力裝甲腕部安裝的打擊裝備，保護脆弱的機械腕並用作毆打武器，利用火藥和氣動裝置增強破壞力。</text:p>
            <text:p>裝備名字中帶有[動力裝甲]或[PA裝甲]的防具時你的空手攻擊力+【肉體】。</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高性能治療箱</text:p>
          </table:table-cell>
          <table:table-cell table:style-name="ce45" office:value-type="string" calcext:value-type="string">
            <text:p>一般</text:p>
          </table:table-cell>
          <table:table-cell table:style-name="ce45" table:number-columns-repeated="8"/>
          <table:table-cell table:style-name="ce47" office:value-type="string" calcext:value-type="string">
            <text:p>9/4</text:p>
          </table:table-cell>
          <table:table-cell table:style-name="ce49" office:value-type="string" calcext:value-type="string">
            <text:p>包含提高再生能力的安瓿的急救箱，使用了從超越者處提取的的治療成分，已確認普通人也能安全使用。</text:p>
            <text:p>主要動作使用，你的HP回復3D10，不能在戰鬥中使用，該效果一劇本可以使用一次。</text:p>
          </table:table-cell>
          <table:table-cell table:style-name="ce45" office:value-type="string" calcext:value-type="string">
            <text:p>IA P44</text:p>
          </table:table-cell>
          <table:table-cell table:style-name="ce51" office:value-type="string" calcext:value-type="string">
            <text:p>存在官方將“消耗品”錯誤分到“一般”類別可能性，敬請注意</text:p>
          </table:table-cell>
          <table:table-cell table:style-name="ce44" table:number-columns-repeated="12"/>
          <table:table-cell table:number-columns-repeated="998"/>
        </table:table-row>
        <table:table-row table:style-name="ro2">
          <table:table-cell table:style-name="ce42" office:value-type="string" calcext:value-type="string">
            <text:p>夜視目鏡</text:p>
          </table:table-cell>
          <table:table-cell table:style-name="ce45" office:value-type="string" calcext:value-type="string">
            <text:p>一般</text:p>
          </table:table-cell>
          <table:table-cell table:style-name="ce45" table:number-columns-repeated="8"/>
          <table:table-cell table:style-name="ce47" office:value-type="string" calcext:value-type="string">
            <text:p>11/5</text:p>
          </table:table-cell>
          <table:table-cell table:style-name="ce49" office:value-type="string" calcext:value-type="string">
            <text:p>增加光量的目鏡。</text:p>
            <text:p>你在黑暗中進行判定時不會受到減益。</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瞄準器</text:p>
          </table:table-cell>
          <table:table-cell table:style-name="ce45" office:value-type="string" calcext:value-type="string">
            <text:p>一般</text:p>
          </table:table-cell>
          <table:table-cell table:style-name="ce45" table:number-columns-repeated="8"/>
          <table:table-cell table:style-name="ce47" office:value-type="string" calcext:value-type="string">
            <text:p>15/5</text:p>
          </table:table-cell>
          <table:table-cell table:style-name="ce49" office:value-type="string" calcext:value-type="string">
            <text:p>光學瞄準鏡或激光瞄準器等裝在射擊武器上提升命中率的瞄準器。</text:p>
            <text:p>取得時選擇你擁有的一件[種類：射擊]武器，使用該武器進行的判定達成值+1。</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強化素材</text:p>
          </table:table-cell>
          <table:table-cell table:style-name="ce45" office:value-type="string" calcext:value-type="string">
            <text:p>一般</text:p>
          </table:table-cell>
          <table:table-cell table:style-name="ce45" table:number-columns-repeated="8"/>
          <table:table-cell table:style-name="ce47" office:value-type="string" calcext:value-type="string">
            <text:p>15/5</text:p>
          </table:table-cell>
          <table:table-cell table:style-name="ce49" office:value-type="string" calcext:value-type="string">
            <text:p>開發出來強化近戰武器強度的新素材。</text:p>
            <text:p>取得時選擇你擁有的一件[種類：近戰]武器，該武器的攻擊力或格擋值+1，該道具的效果無法疊加。</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對結界化面罩</text:p>
          </table:table-cell>
          <table:table-cell table:style-name="ce45" office:value-type="string" calcext:value-type="string">
            <text:p>一般</text:p>
          </table:table-cell>
          <table:table-cell table:style-name="ce45" table:number-columns-repeated="8"/>
          <table:table-cell table:style-name="ce47" office:value-type="string" calcext:value-type="string">
            <text:p>15/5</text:p>
          </table:table-cell>
          <table:table-cell table:style-name="ce49" office:value-type="string" calcext:value-type="string">
            <text:p>無效結界化的面罩。</text:p>
            <text:p>即使不是超越者，擁有這個道具就可以無視&lt;結界化&gt;效果。</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醫療支援</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5</text:p>
          </table:table-cell>
          <table:table-cell table:style-name="ce49" office:value-type="string" calcext:value-type="string">
            <text:p>顯示傷口最合適治療方式的裝置。</text:p>
            <text:p>與使用主要動作回復HP的道具一起使用，該道具的回復的HP+5，該效果一場景可以使用一次。</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黑卡</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8</text:p>
          </table:table-cell>
          <table:table-cell table:style-name="ce49" office:value-type="string" calcext:value-type="string">
            <text:p>只有被選中者才能擁有的最高等級貴賓卡。</text:p>
            <text:p>你進行購入判定時使用，該判定的判定骰數+2個，該效果一劇本可以使用三次。</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醫療箱</text:p>
          </table:table-cell>
          <table:table-cell table:style-name="ce45" office:value-type="string" calcext:value-type="string">
            <text:p>一般</text:p>
          </table:table-cell>
          <table:table-cell table:style-name="ce45" table:number-columns-repeated="8"/>
          <table:table-cell table:style-name="ce47" office:value-type="string" calcext:value-type="string">
            <text:p>20/10</text:p>
          </table:table-cell>
          <table:table-cell table:style-name="ce49" office:value-type="string" calcext:value-type="string">
            <text:p>裝入醫療器械和藥品的大箱子，與急救箱不同雖然使用需要時間但可以重複使用。</text:p>
            <text:p>主要動作使用，你的HP回復2D10，不能在戰鬥中使用，該效果一場景可以使用一次。</text:p>
          </table:table-cell>
          <table:table-cell table:style-name="ce45" office:value-type="string" calcext:value-type="string">
            <text:p>IA P44</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槍械穩定器</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10</text:p>
          </table:table-cell>
          <table:table-cell table:style-name="ce49" office:value-type="string" calcext:value-type="string">
            <text:p>將大型槍械與身體或地面固定使其安定的裝置。</text:p>
            <text:p>導入階段選擇你擁有的[種類：射擊]且帶有雙手持握詞條的一件武器，該武器命中+1（最大0），但裝備該武器期間你的行動值-1。該道具可以重複取得但是不能對同一武器重複使用。</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導航系統</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10</text:p>
          </table:table-cell>
          <table:table-cell table:style-name="ce49" office:value-type="string" calcext:value-type="string">
            <text:p>設置在汽車裡輔助駕駛的裝置。</text:p>
            <text:p>取得時選擇你常備化的一件載具，你駕駛該載具進行的&lt;駕駛：●●&gt;判定骰數+1個。</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載具尖刺</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12</text:p>
          </table:table-cell>
          <table:table-cell table:style-name="ce49" office:value-type="string" calcext:value-type="string">
            <text:p>將使用車輛碰撞時的破壞力強化的撞角等部件，安裝後重量增加所以操縱性能低下。</text:p>
            <text:p>取得時選擇你常備化的一件載具，該載具攻擊力+3，行動值-3。</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追加裝甲</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12</text:p>
          </table:table-cell>
          <table:table-cell table:style-name="ce49" office:value-type="string" calcext:value-type="string">
            <text:p>使載具重裝甲化的部件，因為獲得了裝甲而使操縱性能低下。</text:p>
            <text:p>取得時選擇你常備化的一件載具，該載具行動值-3，裝甲值+3，該效果對[裝甲值：0]的載具無效。</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信用數據</text:p>
          </table:table-cell>
          <table:table-cell table:style-name="ce45" office:value-type="string" calcext:value-type="string">
            <text:p>一般</text:p>
          </table:table-cell>
          <table:table-cell table:style-name="ce45" table:number-columns-repeated="8"/>
          <table:table-cell table:style-name="ce47" office:value-type="string" calcext:value-type="string">
            <text:p>購入不可/不可</text:p>
          </table:table-cell>
          <table:table-cell table:style-name="ce49" office:value-type="string" calcext:value-type="string">
            <text:p>電子化的錢，以合理手段取得的話就能夠使用。</text:p>
            <text:p>主要動作使用，你的財富點數+5，增加的財富點數會在劇本結束時消失。</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炸裂穿甲彈</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8/1</text:p>
          </table:table-cell>
          <table:table-cell table:style-name="ce49" office:value-type="string" calcext:value-type="string">
            <text:p>由對原菌部隊特別使用的特殊穿甲彈，能在對方體內爆炸，一直破壞到無法再生為止。</text:p>
            <text:p>次要動作使用，該主要階段中使用名字中帶有[機關][步槍][霰彈槍][擲彈炮][榴彈發射器]的武器進行的射擊攻擊傷害+1D10。</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色帶</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2/2</text:p>
          </table:table-cell>
          <table:table-cell table:style-name="ce49" office:value-type="string" calcext:value-type="string">
            <text:p>記錄作戰中行動的記錄媒體，能夠更有效地收集情報，色帶是這些道具的統稱。</text:p>
            <text:p>你使用[種類：關聯]效果進行判定前使用，該判定骰數+2個。</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解毒劑</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6/2</text:p>
          </table:table-cell>
          <table:table-cell table:style-name="ce49" office:value-type="string" calcext:value-type="string">
            <text:p>使毒藥失效的藥劑。</text:p>
            <text:p>主要動作使用，解除你受到的不良狀態[邪毒]。</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預備彈夾</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0/2</text:p>
          </table:table-cell>
          <table:table-cell table:style-name="ce49" office:value-type="string" calcext:value-type="string">
            <text:p>各種步槍、榴彈炮的預備彈夾。</text:p>
            <text:p>次要動作使用，回復一件裝備中的以下道具的使用次數：PDW、反物質步槍、AR步槍、榴彈發射器、大型擲彈炮、火焰噴射器。</text:p>
          </table:table-cell>
          <table:table-cell table:style-name="ce45" office:value-type="string" calcext:value-type="string">
            <text:p>IA P45</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急救箱</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8/3</text:p>
          </table:table-cell>
          <table:table-cell table:style-name="ce49" office:value-type="string" calcext:value-type="string">
            <text:p>急救箱。</text:p>
            <text:p>主要動作使用，你的HP回復2D10，不能在戰鬥中使用。</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穿甲彈</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0/3</text:p>
          </table:table-cell>
          <table:table-cell table:style-name="ce49" office:value-type="string" calcext:value-type="string">
            <text:p>使用鎢或貧鈾等比重較大的材料製作的子彈。</text:p>
            <text:p>次要動作使用，該主要階段間你使用[種類：射擊]武器進行的攻擊計算傷害時視為裝甲值-5（最低0）。</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中空彈</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0/3</text:p>
          </table:table-cell>
          <table:table-cell table:style-name="ce49" office:value-type="string" calcext:value-type="string">
            <text:p>加工彈頭以更加有效的破壞人體內部的子彈。</text:p>
            <text:p>次要動作使用，該主要階段間你使用[種類：射擊]武器進行攻擊的攻擊力+3。</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霎那的護身符</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購入不可/4</text:p>
          </table:table-cell>
          <table:table-cell table:style-name="ce49" office:value-type="string" calcext:value-type="string">
            <text:p>放在口袋裡或帶在身上的小東西，受傷時它會保護你。</text:p>
            <text:p>受到HP傷害前使用，你（預定）受到的HP傷害-3。稀有道具。</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反背教者子彈</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3/5</text:p>
          </table:table-cell>
          <table:table-cell table:style-name="ce49" office:value-type="string" calcext:value-type="string">
            <text:p>內部包含能使背教者活性鎮靜化藥物的子彈，有著對應各種武器的不同版本。</text:p>
            <text:p>次要動作使用，該主要階段間你使用[種類：射擊]武器進行的攻擊命中時，對象該回合進行的所有判定骰數-2個，該效果只在超越者角色作為對象時生效。</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簡易手術包</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8/8</text:p>
          </table:table-cell>
          <table:table-cell table:style-name="ce49" office:value-type="string" calcext:value-type="string">
            <text:p>帶有應對重傷用的攜帶型手術器具，裝滿了認真應對傷口的用具。</text:p>
            <text:p>主要動作使用，你的HP回復4D10，不能在戰鬥中使用。</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安全屋</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5/10</text:p>
          </table:table-cell>
          <table:table-cell table:style-name="ce49" office:value-type="string" calcext:value-type="string">
            <text:p>也稱為隱藏住所。</text:p>
            <text:p>情報收集場景中你進行的&lt;情報：●●&gt;判定達成值+1。稀有道具。</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背教者檢測儀</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6/11</text:p>
          </table:table-cell>
          <table:table-cell table:style-name="ce49" office:value-type="string" calcext:value-type="string">
            <text:p>太陽鏡型的超越者檢測器。</text:p>
            <text:p>場景中登場的角色在使用《結界化》後，你可以自動動作使用，立刻得到使用《結界化》的超越者的血統和症候情報。</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氮氣系統</text:p>
          </table:table-cell>
          <table:table-cell table:style-name="ce45" table:number-columns-repeated="9"/>
          <table:table-cell table:style-name="ce47" office:value-type="string" calcext:value-type="string">
            <text:p>購入不可/15</text:p>
          </table:table-cell>
          <table:table-cell table:style-name="ce49" office:value-type="string" calcext:value-type="string">
            <text:p>將引擎內的氣體噴出暫時獲得強大爆發力的改造。</text:p>
            <text:p>取得時選擇你常備化的一件載具，先制階段使用，該回合間你搭乘該載具時你的戰鬥移動+20m。</text:p>
          </table:table-cell>
          <table:table-cell table:style-name="ce45" office:value-type="string" calcext:value-type="string">
            <text:p>IA P46</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抗背教者彈</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2/17</text:p>
          </table:table-cell>
          <table:table-cell table:style-name="ce49" office:value-type="string" calcext:value-type="string">
            <text:p>內部包有抗背教者藥物的子彈。</text:p>
            <text:p>次要動作使用，該主要階段間你使用[種類：射擊]武器進行的攻擊命中時，對象該回合進行的所有判定骰數-1個，該效果只在超越者角色作為對象時生效。</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銀之鐵錘</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0/17</text:p>
          </table:table-cell>
          <table:table-cell table:style-name="ce49" office:value-type="string" calcext:value-type="string">
            <text:p>強化肌肉力量的藥物。</text:p>
            <text:p>次要動作使用，該主要階段間你的近戰攻擊力+5，使用後你的侵蝕率+5。</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紫之惑魔</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0/17</text:p>
          </table:table-cell>
          <table:table-cell table:style-name="ce49" office:value-type="string" calcext:value-type="string">
            <text:p>作用於背教者促進傷口癒合的藥物。</text:p>
            <text:p>次要動作使用，你回復10HP，使用後你的侵蝕率+3。</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銅之禁制</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0/17</text:p>
          </table:table-cell>
          <table:table-cell table:style-name="ce49" office:value-type="string" calcext:value-type="string">
            <text:p>通過限制自身思考消除氣息的藥物。</text:p>
            <text:p>你在隱蔽狀態下進行判定前使用，該判定骰數+3個，使用後你的侵蝕率+5。</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黑之深淵</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0/17</text:p>
          </table:table-cell>
          <table:table-cell table:style-name="ce49" office:value-type="string" calcext:value-type="string">
            <text:p>使背教者活性化的藥物。</text:p>
            <text:p>次要動作使用，該回合間你進行的判定骰數+2個，使用後你的侵蝕率+10。</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藍之颶風</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0/17</text:p>
          </table:table-cell>
          <table:table-cell table:style-name="ce49" office:value-type="string" calcext:value-type="string">
            <text:p>增強反射速度的藥物。</text:p>
            <text:p>準備階段使用，該回合間你的行動值+5，使用後你的侵蝕率+5。</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白之奇跡</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0/17</text:p>
          </table:table-cell>
          <table:table-cell table:style-name="ce49" office:value-type="string" calcext:value-type="string">
            <text:p>使興奮的大腦立刻冷靜下來的鎮定藥物，雖然效果很好但因為副作用無法連續使用。</text:p>
            <text:p>準備階段使用，回復你受到的不良狀態[憎惡]，使用後你的侵蝕率+5。稀有道具。</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黃之射線</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20/18</text:p>
          </table:table-cell>
          <table:table-cell table:style-name="ce49" office:value-type="string" calcext:value-type="string">
            <text:p>強化視覺聽覺增強射擊精度的藥物。</text:p>
            <text:p>次要動作使用，該回合間你進行的射擊判定達成值+2，使用後你的侵蝕率+3。</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office:value-type="string" calcext:value-type="string">
            <text:p>白色藥草</text:p>
          </table:table-cell>
          <table:table-cell table:style-name="ce45" office:value-type="string" calcext:value-type="string">
            <text:p>消耗品</text:p>
          </table:table-cell>
          <table:table-cell table:style-name="ce45" table:number-columns-repeated="8"/>
          <table:table-cell table:style-name="ce47" office:value-type="string" calcext:value-type="string">
            <text:p>18/不可</text:p>
          </table:table-cell>
          <table:table-cell table:style-name="ce49" office:value-type="string" calcext:value-type="string">
            <text:p>解析幻象惑星異能製作的增強肉體自愈能力的香料，對集團有效但是為了保證質量無法安定供給。</text:p>
            <text:p>主要動作使用，你指定的與你在同一接戰範圍內的角色回復2D10HP。</text:p>
          </table:table-cell>
          <table:table-cell table:style-name="ce45" office:value-type="string" calcext:value-type="string">
            <text:p>IA P47</text:p>
          </table:table-cell>
          <table:table-cell table:style-name="ce51"/>
          <table:table-cell table:style-name="ce44" table:number-columns-repeated="12"/>
          <table:table-cell table:number-columns-repeated="998"/>
        </table:table-row>
        <table:table-row table:style-name="ro2">
          <table:table-cell table:style-name="ce42"/>
          <table:table-cell table:style-name="ce45" table:number-columns-repeated="9"/>
          <table:table-cell table:style-name="ce47"/>
          <table:table-cell table:style-name="ce49"/>
          <table:table-cell table:style-name="ce50"/>
          <table:table-cell table:style-name="ce44" table:number-columns-repeated="13"/>
          <table:table-cell table:number-columns-repeated="998"/>
        </table:table-row>
        <table:table-row table:style-name="ro2">
          <table:table-cell table:style-name="ce42"/>
          <table:table-cell table:style-name="ce45" table:number-columns-repeated="9"/>
          <table:table-cell table:style-name="ce47"/>
          <table:table-cell table:style-name="ce49"/>
          <table:table-cell table:style-name="ce50"/>
          <table:table-cell table:style-name="ce44" table:number-columns-repeated="13"/>
          <table:table-cell table:number-columns-repeated="998"/>
        </table:table-row>
        <table:table-row table:style-name="ro2">
          <table:table-cell table:style-name="ce42"/>
          <table:table-cell table:style-name="ce45" table:number-columns-repeated="9"/>
          <table:table-cell table:style-name="ce47"/>
          <table:table-cell table:style-name="ce49"/>
          <table:table-cell table:style-name="ce45" table:number-columns-repeated="8"/>
          <table:table-cell table:style-name="ce47"/>
          <table:table-cell table:style-name="ce49"/>
          <table:table-cell table:style-name="ce45"/>
          <table:table-cell table:style-name="ce44" table:number-columns-repeated="3"/>
          <table:table-cell table:number-columns-repeated="998"/>
        </table:table-row>
        <table:table-row table:style-name="ro2">
          <table:table-cell table:style-name="ce42"/>
          <table:table-cell table:style-name="ce45" table:number-columns-repeated="9"/>
          <table:table-cell table:style-name="ce47"/>
          <table:table-cell table:style-name="ce49"/>
          <table:table-cell table:style-name="ce50"/>
          <table:table-cell table:style-name="ce44" table:number-columns-repeated="13"/>
          <table:table-cell table:number-columns-repeated="998"/>
        </table:table-row>
        <table:table-row table:style-name="ro2" table:number-rows-repeated="196">
          <table:table-cell table:style-name="ce42"/>
          <table:table-cell table:style-name="ce45" table:number-columns-repeated="9"/>
          <table:table-cell table:style-name="ce47"/>
          <table:table-cell table:style-name="ce49"/>
          <table:table-cell table:style-name="ce50"/>
          <table:table-cell table:style-name="ce44" table:number-columns-repeated="13"/>
          <table:table-cell table:number-columns-repeated="998"/>
        </table:table-row>
        <table:table-row table:style-name="ro2" table:number-rows-repeated="571">
          <table:table-cell table:style-name="ce44" table:number-columns-repeated="10"/>
          <table:table-cell table:style-name="ce48"/>
          <table:table-cell table:style-name="ce44"/>
          <table:table-cell table:style-name="ce50"/>
          <table:table-cell table:style-name="ce44" table:number-columns-repeated="13"/>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FH道具" table:style-name="ta3">
        <table:table-column table:style-name="co6" table:default-cell-style-name="Default"/>
        <table:table-column table:style-name="co15" table:default-cell-style-name="Default"/>
        <table:table-column table:style-name="co16" table:default-cell-style-name="Default"/>
        <table:table-column table:style-name="co9" table:default-cell-style-name="Default"/>
        <table:table-column table:style-name="co10" table:number-columns-repeated="2" table:default-cell-style-name="Default"/>
        <table:table-column table:style-name="co17" table:default-cell-style-name="Default"/>
        <table:table-column table:style-name="co9" table:number-columns-repeated="2" table:default-cell-style-name="Default"/>
        <table:table-column table:style-name="co10" table:default-cell-style-name="Default"/>
        <table:table-column table:style-name="co18" table:default-cell-style-name="Default"/>
        <table:table-column table:style-name="co19" table:default-cell-style-name="Default"/>
        <table:table-column table:style-name="co5" table:number-columns-repeated="1012" table:default-cell-style-name="Default"/>
        <table:table-row table:style-name="ro2">
          <table:table-cell table:style-name="ce52" office:value-type="string" calcext:value-type="string">
            <text:p>名稱</text:p>
          </table:table-cell>
          <table:table-cell table:style-name="ce52" office:value-type="string" calcext:value-type="string">
            <text:p>種類</text:p>
          </table:table-cell>
          <table:table-cell table:style-name="ce52" office:value-type="string" calcext:value-type="string">
            <text:p>技能</text:p>
          </table:table-cell>
          <table:table-cell table:style-name="ce52" office:value-type="string" calcext:value-type="string">
            <text:p>命中</text:p>
          </table:table-cell>
          <table:table-cell table:style-name="ce52" office:value-type="string" calcext:value-type="string">
            <text:p>攻擊力</text:p>
          </table:table-cell>
          <table:table-cell table:style-name="ce52" office:value-type="string" calcext:value-type="string">
            <text:p>格擋值</text:p>
          </table:table-cell>
          <table:table-cell table:style-name="ce52" office:value-type="string" calcext:value-type="string">
            <text:p>射程</text:p>
          </table:table-cell>
          <table:table-cell table:style-name="ce52" office:value-type="string" calcext:value-type="string">
            <text:p>閃避</text:p>
          </table:table-cell>
          <table:table-cell table:style-name="ce52" office:value-type="string" calcext:value-type="string">
            <text:p>行動</text:p>
          </table:table-cell>
          <table:table-cell table:style-name="ce52" office:value-type="string" calcext:value-type="string">
            <text:p>裝甲值</text:p>
          </table:table-cell>
          <table:table-cell table:style-name="ce56" office:value-type="string" calcext:value-type="string">
            <text:p>購入難度/常備化</text:p>
          </table:table-cell>
          <table:table-cell table:style-name="ce40" office:value-type="string" calcext:value-type="string">
            <text:p>解說</text:p>
          </table:table-cell>
          <table:table-cell table:style-name="ce52" office:value-type="string" calcext:value-type="string">
            <text:p>參照</text:p>
          </table:table-cell>
          <table:table-cell table:style-name="ce53" table:number-columns-repeated="13"/>
          <table:table-cell table:number-columns-repeated="998"/>
        </table:table-row>
        <table:table-row table:style-name="ro2">
          <table:table-cell table:style-name="ce42" office:value-type="string" calcext:value-type="string">
            <text:p>鋒利匕首</text:p>
          </table:table-cell>
          <table:table-cell table:style-name="ce54" office:value-type="string" calcext:value-type="string">
            <text:p>近戰/射擊</text:p>
          </table:table-cell>
          <table:table-cell table:style-name="ce54" office:value-type="string" calcext:value-type="string">
            <text:p>&lt;近戰&gt;/&lt;射擊&gt;</text:p>
          </table:table-cell>
          <table:table-cell table:style-name="ce54" office:value-type="float" office:value="0" calcext:value-type="float">
            <text:p>0</text:p>
          </table:table-cell>
          <table:table-cell table:style-name="ce54" office:value-type="float" office:value="5" calcext:value-type="float">
            <text:p>5</text:p>
          </table:table-cell>
          <table:table-cell table:style-name="ce54" office:value-type="float" office:value="1" calcext:value-type="float">
            <text:p>1</text:p>
          </table:table-cell>
          <table:table-cell table:style-name="ce54" office:value-type="string" calcext:value-type="string">
            <text:p>至近/10m</text:p>
          </table:table-cell>
          <table:table-cell table:style-name="ce54" table:number-columns-repeated="3"/>
          <table:table-cell table:style-name="ce55" office:value-type="string" calcext:value-type="string">
            <text:p>購入不可/5</text:p>
          </table:table-cell>
          <table:table-cell table:style-name="ce49" office:value-type="string" calcext:value-type="string">
            <text:p>擁有驚人的銳利度的FH制戰鬥匕首。</text:p>
            <text:p>以[種類：射擊]使用時數據參照右側，使用此武器進行的攻擊計算傷害時視為對象裝甲值-5（最低0）。</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鋒利匕首二型</text:p>
          </table:table-cell>
          <table:table-cell table:style-name="ce54" office:value-type="string" calcext:value-type="string">
            <text:p>近戰/射擊</text:p>
          </table:table-cell>
          <table:table-cell table:style-name="ce54" office:value-type="string" calcext:value-type="string">
            <text:p>&lt;近戰&gt;/&lt;射擊&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1" calcext:value-type="float">
            <text:p>1</text:p>
          </table:table-cell>
          <table:table-cell table:style-name="ce54" office:value-type="string" calcext:value-type="string">
            <text:p>至近/10m</text:p>
          </table:table-cell>
          <table:table-cell table:style-name="ce54" table:number-columns-repeated="3"/>
          <table:table-cell table:style-name="ce55" office:value-type="string" calcext:value-type="string">
            <text:p>購入不可/7</text:p>
          </table:table-cell>
          <table:table-cell table:style-name="ce49" office:value-type="string" calcext:value-type="string">
            <text:p>改進型的鋒利匕首，切斷能力進一步增強。</text:p>
            <text:p>以[種類：射擊]使用時數據參照右側，使用此武器進行的攻擊計算傷害時視為對象裝甲值-5（最低0）。</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十字穿刺</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10" calcext:value-type="float">
            <text:p>10</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5</text:p>
          </table:table-cell>
          <table:table-cell table:style-name="ce49" office:value-type="string" calcext:value-type="string">
            <text:p>FH製作的長槍，平時偽裝成一米左右的棒，按下開關就能展開成接近兩米的長槍.</text:p>
            <text:p>使用該武器進行攻擊的對象回應動作判定骰數-1個。雙手持握。</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屠殺獵鷹</text:p>
          </table:table-cell>
          <table:table-cell table:style-name="ce54" office:value-type="string" calcext:value-type="string">
            <text:p>近戰/射擊</text:p>
          </table:table-cell>
          <table:table-cell table:style-name="ce54" office:value-type="string" calcext:value-type="string">
            <text:p>&lt;近戰&gt;/&lt;射擊&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0" calcext:value-type="float">
            <text:p>0</text:p>
          </table:table-cell>
          <table:table-cell table:style-name="ce54" office:value-type="string" calcext:value-type="string">
            <text:p>至近/30m</text:p>
          </table:table-cell>
          <table:table-cell table:style-name="ce54" table:number-columns-repeated="3"/>
          <table:table-cell table:style-name="ce55" office:value-type="string" calcext:value-type="string">
            <text:p>購入不可/10</text:p>
          </table:table-cell>
          <table:table-cell table:style-name="ce49" office:value-type="string" calcext:value-type="string">
            <text:p>帶有自動追蹤功能的小型回旋鏢，能利用命中時的衝擊飛向其他目標。</text:p>
            <text:p>以[種類：射擊]使用時數據參照右側，使用該武器進行的攻擊命中2體以上時該攻擊的攻擊力+5。</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搖擺狂怒</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4" calcext:value-type="float">
            <text:p>-4</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10</text:p>
          </table:table-cell>
          <table:table-cell table:style-name="ce49" office:value-type="string" calcext:value-type="string">
            <text:p>FH製作的將鎖鏈與帶刺鐵球組合的武器。</text:p>
            <text:p>次要動作使用，該主要階段間該武器進行攻擊的攻擊力+5。雙手持握。</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劇毒穿針</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8" calcext:value-type="float">
            <text:p>8</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15</text:p>
          </table:table-cell>
          <table:table-cell table:style-name="ce49" office:value-type="string" calcext:value-type="string">
            <text:p>像是將刺劍與騎槍組合的武器，攻擊時能夠對敵人注射毒素。</text:p>
            <text:p>使用該武器進行的攻擊給對象造成至少1點傷害時，給予[不良狀態：邪毒 2]，該攻擊組合了施加[不良狀態：邪毒]的異能時，效果變更為使施加的邪毒等級+1。</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無罪之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8" calcext:value-type="float">
            <text:p>8</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18</text:p>
          </table:table-cell>
          <table:table-cell table:style-name="ce49" office:value-type="string" calcext:value-type="string">
            <text:p>使用容易受背教者影響的材質製作的特殊的劍。</text:p>
            <text:p>使用該武器進行的攻擊判定組合了異能時，判定骰數+2個。</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十束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5" calcext:value-type="float">
            <text:p>-5</text:p>
          </table:table-cell>
          <table:table-cell table:style-name="ce54" office:value-type="float" office:value="16" calcext:value-type="float">
            <text:p>16</text:p>
          </table:table-cell>
          <table:table-cell table:style-name="ce54" office:value-type="float" office:value="8" calcext:value-type="float">
            <text:p>8</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40</text:p>
          </table:table-cell>
          <table:table-cell table:style-name="ce49" office:value-type="string" calcext:value-type="string">
            <text:p>要五個人才能勉強舉起的巨大劍。</text:p>
            <text:p>你的行動值-5，使用該武器進行近戰攻擊判定前使用，該攻擊的攻擊力+【肉體】，使用該效果時你的侵蝕率+2。雙手持握。</text:p>
          </table:table-cell>
          <table:table-cell table:style-name="ce54" office:value-type="string" calcext:value-type="string">
            <text:p>IA P122</text:p>
          </table:table-cell>
          <table:table-cell table:style-name="ce53" table:number-columns-repeated="13"/>
          <table:table-cell table:number-columns-repeated="998"/>
        </table:table-row>
        <table:table-row table:style-name="ro2">
          <table:table-cell table:style-name="ce42" office:value-type="string" calcext:value-type="string">
            <text:p>巴拉基勒</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style-name="ce54" office:value-type="float" office:value="9" calcext:value-type="float">
            <text:p>9</text:p>
          </table:table-cell>
          <table:table-cell table:style-name="ce54" office:value-type="float" office:value="10" calcext:value-type="float">
            <text:p>10</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40</text:p>
          </table:table-cell>
          <table:table-cell table:style-name="ce49" office:value-type="string" calcext:value-type="string">
            <text:p>宛如骨頭材質的被EX背教者感染的蛇型劍，據說其異樣的外觀是因為使用了死去原菌作為原材料。</text:p>
            <text:p>使用該武器進行的攻擊給對象造成至少1點傷害時，你回復【肉體】點HP，使用該效果時你的侵蝕率+2。雙手持握。</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防衛之盾</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6" calcext:value-type="float">
            <text:p>6</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8</text:p>
          </table:table-cell>
          <table:table-cell table:style-name="ce49" office:value-type="string" calcext:value-type="string">
            <text:p>不會阻礙持有者的運動，能夠進行防禦的盾。</text:p>
            <text:p>你進行格擋時使用，該武器的格擋值+5，該效果一回合可以使用一次。</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崇高之盾</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4" calcext:value-type="float">
            <text:p>-4</text:p>
          </table:table-cell>
          <table:table-cell table:style-name="ce54" office:value-type="float" office:value="2" calcext:value-type="float">
            <text:p>2</text:p>
          </table:table-cell>
          <table:table-cell table:style-name="ce54" office:value-type="float" office:value="5" calcext:value-type="float">
            <text:p>5</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15</text:p>
          </table:table-cell>
          <table:table-cell table:style-name="ce49" office:value-type="string" calcext:value-type="string">
            <text:p>大型盾牌，內部裝有能與使用者激昂的情感共鳴展開特殊力場的裝置。</text:p>
            <text:p>使用該武器組合異能進行格擋時使用，該武器格擋值+10，使用該武器進行格擋時你的侵蝕率+2。</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STALKER</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4" calcext:value-type="float">
            <text:p>4</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5" office:value-type="string" calcext:value-type="string">
            <text:p>購入不可/5</text:p>
          </table:table-cell>
          <table:table-cell table:style-name="ce49" office:value-type="string" calcext:value-type="string">
            <text:p>面向施加了特殊精神強化的特工開發的手槍，能利用肉體反射自動進行瞄準補正。</text:p>
            <text:p>使用該武器進行射擊攻擊的攻擊力+[你擁有的“精神強化手術”數量x2]（最大+6）。</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FHG-666</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6" calcext:value-type="float">
            <text:p>6</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5" office:value-type="string" calcext:value-type="string">
            <text:p>購入不可/6</text:p>
          </table:table-cell>
          <table:table-cell table:style-name="ce49" office:value-type="string" calcext:value-type="string">
            <text:p>FH開發的隱匿性、威力和命中都相當優秀的手槍，在表面業界的手槍沒有使用過這種技術。</text:p>
            <text:p>使用該武器進行的&lt;射擊&gt;判定骰數+1個。</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極速火力</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50m</text:p>
          </table:table-cell>
          <table:table-cell table:style-name="ce54" table:number-columns-repeated="3"/>
          <table:table-cell table:style-name="ce55" office:value-type="string" calcext:value-type="string">
            <text:p>購入不可/10</text:p>
          </table:table-cell>
          <table:table-cell table:style-name="ce49" office:value-type="string" calcext:value-type="string">
            <text:p>使用特殊彈頭的突擊步槍，對人對物都有強大的破壞力。</text:p>
            <text:p>使用該武器進行攻擊決定對象前使用，該攻擊變為[對象：範圍（選擇）]，該武器的對象優先級大於組合異能的對象，該效果一場景可以使用一次。雙手持握。至近不可。</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激光步槍</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8" calcext:value-type="float">
            <text:p>8</text:p>
          </table:table-cell>
          <table:table-cell table:style-name="ce54" office:value-type="string" calcext:value-type="string">
            <text:p>-</text:p>
          </table:table-cell>
          <table:table-cell table:style-name="ce54" office:value-type="string" calcext:value-type="string">
            <text:p>200m</text:p>
          </table:table-cell>
          <table:table-cell table:style-name="ce54" table:number-columns-repeated="3"/>
          <table:table-cell table:style-name="ce55" office:value-type="string" calcext:value-type="string">
            <text:p>購入不可/12</text:p>
          </table:table-cell>
          <table:table-cell table:style-name="ce49" office:value-type="string" calcext:value-type="string">
            <text:p>能射出激光的步槍，擁有複雜的構造，使用者需要相當高的知識。</text:p>
            <text:p>裝備該武器需要&lt;知識：機械工學&gt;LV4以上。使用該武器進行的射擊攻擊無視對象裝甲值計算傷害。該武器一劇本可以使用三次。雙手持握。至近不可。稀有道具。</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寂靜探求者</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10" calcext:value-type="float">
            <text:p>10</text:p>
          </table:table-cell>
          <table:table-cell table:style-name="ce54" office:value-type="string" calcext:value-type="string">
            <text:p>-</text:p>
          </table:table-cell>
          <table:table-cell table:style-name="ce54" office:value-type="string" calcext:value-type="string">
            <text:p>15m</text:p>
          </table:table-cell>
          <table:table-cell table:style-name="ce54" table:number-columns-repeated="3"/>
          <table:table-cell table:style-name="ce55" office:value-type="string" calcext:value-type="string">
            <text:p>購入不可/20</text:p>
          </table:table-cell>
          <table:table-cell table:style-name="ce49" office:value-type="string" calcext:value-type="string">
            <text:p>擁有適合襲擊的便攜性與靜音性的衝鋒槍，有效射程短但殺傷力高。</text:p>
            <text:p>你處於隱蔽狀態下使用該武器進行攻擊時，傷害+2D10。</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R加農炮</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3" calcext:value-type="float">
            <text:p>-3</text:p>
          </table:table-cell>
          <table:table-cell table:style-name="ce54" office:value-type="float" office:value="8" calcext:value-type="float">
            <text:p>8</text:p>
          </table:table-cell>
          <table:table-cell table:style-name="ce54" office:value-type="string" calcext:value-type="string">
            <text:p>-</text:p>
          </table:table-cell>
          <table:table-cell table:style-name="ce54" office:value-type="string" calcext:value-type="string">
            <text:p>100m</text:p>
          </table:table-cell>
          <table:table-cell table:style-name="ce54" table:number-columns-repeated="3"/>
          <table:table-cell table:style-name="ce55" office:value-type="string" calcext:value-type="string">
            <text:p>購入不可/25</text:p>
          </table:table-cell>
          <table:table-cell table:style-name="ce49" office:value-type="string" calcext:value-type="string">
            <text:p>被EX背教者感染的步槍，搭載了能夠反應出使用者的集中力增幅能量的裝置。</text:p>
            <text:p>使用該武器進行攻擊判定前使用，該攻擊的攻擊力+【感覺】，該效果一場景可以使用一次。</text:p>
          </table:table-cell>
          <table:table-cell table:style-name="ce54" office:value-type="string" calcext:value-type="string">
            <text:p>IA P123</text:p>
          </table:table-cell>
          <table:table-cell table:style-name="ce53" table:number-columns-repeated="13"/>
          <table:table-cell table:number-columns-repeated="998"/>
        </table:table-row>
        <table:table-row table:style-name="ro2">
          <table:table-cell table:style-name="ce42" office:value-type="string" calcext:value-type="string">
            <text:p>惡魔之槍</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10" calcext:value-type="float">
            <text:p>10</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5" office:value-type="string" calcext:value-type="string">
            <text:p>購入不可/30</text:p>
          </table:table-cell>
          <table:table-cell table:style-name="ce49" office:value-type="string" calcext:value-type="string">
            <text:p>被EX背教者感染的手槍，槍中寄宿的病毒會侵蝕使用者和攻擊對象。</text:p>
            <text:p>使用該武器進行的射擊攻擊命中時對象侵蝕率+5，使用該武器攻擊時你的侵蝕率+3。至近不可。</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載具用軌道炮</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3" calcext:value-type="float">
            <text:p>-3</text:p>
          </table:table-cell>
          <table:table-cell table:style-name="ce54" office:value-type="float" office:value="20" calcext:value-type="float">
            <text:p>20</text:p>
          </table:table-cell>
          <table:table-cell table:style-name="ce54" office:value-type="string" calcext:value-type="string">
            <text:p>-</text:p>
          </table:table-cell>
          <table:table-cell table:style-name="ce54" office:value-type="string" calcext:value-type="string">
            <text:p>1000m</text:p>
          </table:table-cell>
          <table:table-cell table:style-name="ce54" table:number-columns-repeated="3"/>
          <table:table-cell table:style-name="ce55" office:value-type="string" calcext:value-type="string">
            <text:p>購入不可/50</text:p>
          </table:table-cell>
          <table:table-cell table:style-name="ce49" office:value-type="string" calcext:value-type="string">
            <text:p>FH開發的巨大電磁炮。</text:p>
            <text:p>搭載火器。至近不可。稀有道具。</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FH防護背心</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5" calcext:value-type="float">
            <text:p>5</text:p>
          </table:table-cell>
          <table:table-cell table:style-name="ce55" office:value-type="string" calcext:value-type="string">
            <text:p>購入不可/8</text:p>
          </table:table-cell>
          <table:table-cell table:style-name="ce49" office:value-type="string" calcext:value-type="string">
            <text:p>FH戰鬥部隊主要使用的防具，擁有應對強烈衝擊的構造。</text:p>
            <text:p>你受到[不良狀態：硬直]後使用，回復該不良狀態，該效果一劇本可以使用一次。</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FH截擊者</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8" calcext:value-type="float">
            <text:p>8</text:p>
          </table:table-cell>
          <table:table-cell table:style-name="ce55" office:value-type="string" calcext:value-type="string">
            <text:p>購入不可/15</text:p>
          </table:table-cell>
          <table:table-cell table:style-name="ce49" office:value-type="string" calcext:value-type="string">
            <text:p>適合襲擊的特殊戰鬥服，內部裝有雷達機器，可以在配套的目鏡上實時報告周邊情況。</text:p>
            <text:p>你進行的回避判定達成值與你的行動值+[你擁有的“精神強化手術”數量]（最大+3）。</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FH戰鬥服</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10" calcext:value-type="float">
            <text:p>10</text:p>
          </table:table-cell>
          <table:table-cell table:style-name="ce55" office:value-type="string" calcext:value-type="string">
            <text:p>購入不可/20</text:p>
          </table:table-cell>
          <table:table-cell table:style-name="ce49" office:value-type="string" calcext:value-type="string">
            <text:p>FH為超越者特工開發的戰鬥服。</text:p>
            <text:p>你組合了異能的判定骰數+1個。</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FH戰鬥裝甲</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5" calcext:value-type="float">
            <text:p>-5</text:p>
          </table:table-cell>
          <table:table-cell table:style-name="ce54" office:value-type="float" office:value="15" calcext:value-type="float">
            <text:p>15</text:p>
          </table:table-cell>
          <table:table-cell table:style-name="ce55" office:value-type="string" calcext:value-type="string">
            <text:p>購入不可/40</text:p>
          </table:table-cell>
          <table:table-cell table:style-name="ce49" office:value-type="string" calcext:value-type="string">
            <text:p>FH開發的對超越者用動力套裝，超越者也可以穿。</text:p>
            <text:p>你受到組合了異能的攻擊時，該攻擊造成的HP傷害-5。</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塔爾塔羅斯</text:p>
          </table:table-cell>
          <table:table-cell table:style-name="ce54" office:value-type="string" calcext:value-type="string">
            <text:p>防具</text:p>
          </table:table-cell>
          <table:table-cell table:style-name="ce54" table:number-columns-repeated="5"/>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15" calcext:value-type="float">
            <text:p>15</text:p>
          </table:table-cell>
          <table:table-cell table:style-name="ce55" office:value-type="string" calcext:value-type="string">
            <text:p>購入不可/40</text:p>
          </table:table-cell>
          <table:table-cell table:style-name="ce49" office:value-type="string" calcext:value-type="string">
            <text:p>機密開發的動力套裝，使用了被認為是來自超越者的生體部件，沒有受過特殊訓練的人類無法使用。</text:p>
            <text:p>你可以裝備搭載火器。該防具只有取得了2件以上“精神強化手術”的角色才能裝備。稀有道具。</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FH戰鬥外套</text:p>
          </table:table-cell>
          <table:table-cell table:style-name="ce54" office:value-type="string" calcext:value-type="string">
            <text:p>防具（輔助）</text:p>
          </table:table-cell>
          <table:table-cell table:style-name="ce54" table:number-columns-repeated="5"/>
          <table:table-cell table:style-name="ce54" office:value-type="float" office:value="0" calcext:value-type="float">
            <text:p>0</text:p>
          </table:table-cell>
          <table:table-cell table:style-name="ce54" office:value-type="float" office:value="-3" calcext:value-type="float">
            <text:p>-3</text:p>
          </table:table-cell>
          <table:table-cell table:style-name="ce54" office:value-type="float" office:value="5" calcext:value-type="float">
            <text:p>5</text:p>
          </table:table-cell>
          <table:table-cell table:style-name="ce55" office:value-type="string" calcext:value-type="string">
            <text:p>購入不可/15</text:p>
          </table:table-cell>
          <table:table-cell table:style-name="ce49" office:value-type="string" calcext:value-type="string">
            <text:p>FH為了補強裝甲開發的大衣，擁有對異能的特殊防禦效果</text:p>
            <text:p>對組合了異能的攻擊進行回應動作時使用，你（預定）受到的HP傷害-5，該效果一場景可以使用1次</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空之子</text:p>
          </table:table-cell>
          <table:table-cell table:style-name="ce54" office:value-type="string" calcext:value-type="string">
            <text:p>載具</text:p>
          </table:table-cell>
          <table:table-cell table:style-name="ce54" office:value-type="string" calcext:value-type="string">
            <text:p>&lt;知識：機械操作&gt;</text:p>
          </table:table-cell>
          <table:table-cell table:style-name="ce54"/>
          <table:table-cell table:style-name="ce54" office:value-type="float" office:value="0" calcext:value-type="float">
            <text:p>0</text:p>
          </table:table-cell>
          <table:table-cell table:style-name="ce54" table:number-columns-repeated="3"/>
          <table:table-cell table:number-columns-repeated="2" table:style-name="ce54" office:value-type="float" office:value="0" calcext:value-type="float">
            <text:p>0</text:p>
          </table:table-cell>
          <table:table-cell table:style-name="ce55" office:value-type="string" calcext:value-type="string">
            <text:p>購入不可/5</text:p>
          </table:table-cell>
          <table:table-cell table:style-name="ce49" office:value-type="string" calcext:value-type="string">
            <text:p>FH開發的個人用噴氣背包，精密運用需要專業知識，全力移動：參照解說。</text:p>
            <text:p>你進入飛行狀態，該載具的全力移動與你的全力移動速度相同。你的戰鬥移動+5m。該載具無法同乘。搭載火器不可。</text:p>
          </table:table-cell>
          <table:table-cell table:style-name="ce54" office:value-type="string" calcext:value-type="string">
            <text:p>IA P124</text:p>
          </table:table-cell>
          <table:table-cell table:style-name="ce53" table:number-columns-repeated="13"/>
          <table:table-cell table:number-columns-repeated="998"/>
        </table:table-row>
        <table:table-row table:style-name="ro2">
          <table:table-cell table:style-name="ce42" office:value-type="string" calcext:value-type="string">
            <text:p>FH刀鋒摩托</text:p>
          </table:table-cell>
          <table:table-cell table:style-name="ce54" office:value-type="string" calcext:value-type="string">
            <text:p>載具</text:p>
          </table:table-cell>
          <table:table-cell table:style-name="ce54" office:value-type="string" calcext:value-type="string">
            <text:p>&lt;駕駛：二輪&gt;</text:p>
          </table:table-cell>
          <table:table-cell table:style-name="ce54"/>
          <table:table-cell table:style-name="ce54" office:value-type="float" office:value="12" calcext:value-type="float">
            <text:p>12</text:p>
          </table:table-cell>
          <table:table-cell table:style-name="ce54" table:number-columns-repeated="3"/>
          <table:table-cell table:style-name="ce54" office:value-type="float" office:value="-1" calcext:value-type="float">
            <text:p>-1</text:p>
          </table:table-cell>
          <table:table-cell table:style-name="ce54" office:value-type="float" office:value="0" calcext:value-type="float">
            <text:p>0</text:p>
          </table:table-cell>
          <table:table-cell table:style-name="ce55" office:value-type="string" calcext:value-type="string">
            <text:p>購入不可/8</text:p>
          </table:table-cell>
          <table:table-cell table:style-name="ce49" office:value-type="string" calcext:value-type="string">
            <text:p>FH開發的以車身狹窄為特徵的摩托，重視使用方便，全力移動：200m。</text:p>
            <text:p>你的戰鬥移動距離+10m。</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FH輕型貨車</text:p>
          </table:table-cell>
          <table:table-cell table:style-name="ce54" office:value-type="string" calcext:value-type="string">
            <text:p>載具</text:p>
          </table:table-cell>
          <table:table-cell table:style-name="ce54" office:value-type="string" calcext:value-type="string">
            <text:p>&lt;駕駛：四輪&gt;</text:p>
          </table:table-cell>
          <table:table-cell table:style-name="ce54"/>
          <table:table-cell table:style-name="ce54" office:value-type="float" office:value="8" calcext:value-type="float">
            <text:p>8</text:p>
          </table:table-cell>
          <table:table-cell table:style-name="ce54" table:number-columns-repeated="3"/>
          <table:table-cell table:style-name="ce54" office:value-type="float" office:value="-5" calcext:value-type="float">
            <text:p>-5</text:p>
          </table:table-cell>
          <table:table-cell table:style-name="ce54" office:value-type="float" office:value="10" calcext:value-type="float">
            <text:p>10</text:p>
          </table:table-cell>
          <table:table-cell table:style-name="ce55" office:value-type="string" calcext:value-type="string">
            <text:p>購入不可/10</text:p>
          </table:table-cell>
          <table:table-cell table:style-name="ce49" office:value-type="string" calcext:value-type="string">
            <text:p>FH開發的貨用汽車，擁有捲入槍戰也能承受的防禦力，全力移動：120m。</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俄耳托斯</text:p>
          </table:table-cell>
          <table:table-cell table:style-name="ce54" office:value-type="string" calcext:value-type="string">
            <text:p>載具</text:p>
          </table:table-cell>
          <table:table-cell table:style-name="ce54" office:value-type="string" calcext:value-type="string">
            <text:p>&lt;駕駛：多腳戰車&gt;</text:p>
          </table:table-cell>
          <table:table-cell table:style-name="ce54"/>
          <table:table-cell table:style-name="ce54" office:value-type="float" office:value="20" calcext:value-type="float">
            <text:p>20</text:p>
          </table:table-cell>
          <table:table-cell table:style-name="ce54" table:number-columns-repeated="3"/>
          <table:table-cell table:style-name="ce54" office:value-type="float" office:value="-5" calcext:value-type="float">
            <text:p>-5</text:p>
          </table:table-cell>
          <table:table-cell table:style-name="ce54" office:value-type="float" office:value="15" calcext:value-type="float">
            <text:p>15</text:p>
          </table:table-cell>
          <table:table-cell table:style-name="ce55" office:value-type="string" calcext:value-type="string">
            <text:p>購入不可/40</text:p>
          </table:table-cell>
          <table:table-cell table:style-name="ce49" office:value-type="string" calcext:value-type="string">
            <text:p>強化超越者用試作多腳戰車，全力移動：120m。</text:p>
            <text:p>你使用&lt;RC&gt;進行的攻擊判定達成值+10，該載具只有取得了3件“精神強化手術”的角色才能使用。</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鋼鐵巨獸</text:p>
          </table:table-cell>
          <table:table-cell table:style-name="ce54" office:value-type="string" calcext:value-type="string">
            <text:p>載具</text:p>
          </table:table-cell>
          <table:table-cell table:style-name="ce54" office:value-type="string" calcext:value-type="string">
            <text:p>&lt;駕駛：多腳戰車&gt;</text:p>
          </table:table-cell>
          <table:table-cell table:style-name="ce54"/>
          <table:table-cell table:style-name="ce54" office:value-type="float" office:value="20" calcext:value-type="float">
            <text:p>20</text:p>
          </table:table-cell>
          <table:table-cell table:style-name="ce54" table:number-columns-repeated="3"/>
          <table:table-cell table:style-name="ce54" office:value-type="float" office:value="-10" calcext:value-type="float">
            <text:p>-10</text:p>
          </table:table-cell>
          <table:table-cell table:style-name="ce54" office:value-type="float" office:value="20" calcext:value-type="float">
            <text:p>20</text:p>
          </table:table-cell>
          <table:table-cell table:style-name="ce55" office:value-type="string" calcext:value-type="string">
            <text:p>購入不可/50</text:p>
          </table:table-cell>
          <table:table-cell table:style-name="ce49" office:value-type="string" calcext:value-type="string">
            <text:p>FH開發的全長超過20米的多腳戰車，全力移動：120m。</text:p>
            <text:p>你只能將該載具或搭載火器作為武器使用。稀有道具。</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FH幹部</text:p>
          </table:table-cell>
          <table:table-cell table:style-name="ce54" office:value-type="string" calcext:value-type="string">
            <text:p>關聯</text:p>
          </table:table-cell>
          <table:table-cell table:style-name="ce54" office:value-type="string" calcext:value-type="string">
            <text:p>&lt;情報：FH&gt;</text:p>
          </table:table-cell>
          <table:table-cell table:style-name="ce54" table:number-columns-repeated="7"/>
          <table:table-cell table:style-name="ce55" office:value-type="string" calcext:value-type="string">
            <text:p>購入不可/1</text:p>
          </table:table-cell>
          <table:table-cell table:style-name="ce49" office:value-type="string" calcext:value-type="string">
            <text:p>對於FH的活動收集了大量情報的FH幹部。</text:p>
            <text:p>你進行的&lt;情報：FH&gt;判定骰數+2個。</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支援工作人員</text:p>
          </table:table-cell>
          <table:table-cell table:style-name="ce54" office:value-type="string" calcext:value-type="string">
            <text:p>關聯</text:p>
          </table:table-cell>
          <table:table-cell table:style-name="ce54" table:number-columns-repeated="8"/>
          <table:table-cell table:style-name="ce55" office:value-type="string" calcext:value-type="string">
            <text:p>購入不可/5</text:p>
          </table:table-cell>
          <table:table-cell table:style-name="ce49" office:value-type="string" calcext:value-type="string">
            <text:p>收集情報，對你進行支援的優秀工作員們。</text:p>
            <text:p>取得時選擇一項能力（肉體/感覺/精神/社會），使用該能力進行判定後使用，該判定達成值+2，該效果一劇本可以使用三次。稀有道具。</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呼叫系統</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1</text:p>
          </table:table-cell>
          <table:table-cell table:style-name="ce49" office:value-type="string" calcext:value-type="string">
            <text:p>可以呼叫特定載具的裝置。</text:p>
            <text:p>取得時選擇你擁有的一件[種類：載具]，準備階段時使用，呼叫你選擇的載具並進入搭乘狀態。</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單元部隊：突襲</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5</text:p>
          </table:table-cell>
          <table:table-cell table:style-name="ce49" office:value-type="string" calcext:value-type="string">
            <text:p>對你進行支援的單元部隊，擅長襲擊任務，會進行火力支援。</text:p>
            <text:p>你進行攻擊判定前使用，該攻擊的攻擊力+3，該效果一場景可以使用一次。</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單元部隊：護衛</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5</text:p>
          </table:table-cell>
          <table:table-cell table:style-name="ce49" office:value-type="string" calcext:value-type="string">
            <text:p>對你進行支援的單元部隊，擅長護衛任務，會挺身護衛你。</text:p>
            <text:p>你受到的攻擊傷害-2，重複取得該道具時，效果最多累加3次。</text:p>
          </table:table-cell>
          <table:table-cell table:style-name="ce54" office:value-type="string" calcext:value-type="string">
            <text:p>IA P125</text:p>
          </table:table-cell>
          <table:table-cell table:style-name="ce53" table:number-columns-repeated="13"/>
          <table:table-cell table:number-columns-repeated="998"/>
        </table:table-row>
        <table:table-row table:style-name="ro2">
          <table:table-cell table:style-name="ce42" office:value-type="string" calcext:value-type="string">
            <text:p>精神強化手術</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6</text:p>
          </table:table-cell>
          <table:table-cell table:style-name="ce49" office:value-type="string" calcext:value-type="string">
            <text:p>為了使用各種兵器而進行的精神強化手術，能擴張認知和反射能力，增強攻擊性。</text:p>
            <text:p>你的行動值+1，你進行的&lt;意志&gt;判定達成值-1，重複取得該道具時，效果最多累加3次。</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異能爆發裝置</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10</text:p>
          </table:table-cell>
          <table:table-cell table:style-name="ce49" office:value-type="string" calcext:value-type="string">
            <text:p>強化&lt;RC&gt;效果的裝置，大多為手錶型、胸章型等與身體密切接觸的樣式，操作需要精密性。</text:p>
            <text:p>你使用&lt;RC&gt;進行攻擊判定前使用，該攻擊的攻擊力+【精神】，使用該效果時你的侵蝕率+3，該效果一場景可以使用一次。</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隱形力場</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10</text:p>
          </table:table-cell>
          <table:table-cell table:style-name="ce49" office:value-type="string" calcext:value-type="string">
            <text:p>施加光學與紅外迷彩的小型裝置，大多為手錶型或護目鏡型。</text:p>
            <text:p>次要動作使用，你進入隱蔽狀態，該隱蔽狀態期間你進行的所有判定骰數-2個，該效果一場景可以使用一次。</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肉體改造</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10</text:p>
          </table:table-cell>
          <table:table-cell table:style-name="ce49" office:value-type="string" calcext:value-type="string">
            <text:p>接受了力量增強手術，聽說是讓肌肉纖維被背教者侵蝕的手術。</text:p>
            <text:p>準備階段使用，該場景中你的空手攻擊力與格擋值+3，使用後你的侵蝕率+3。</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聯絡卿紋章</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10</text:p>
          </table:table-cell>
          <table:table-cell table:style-name="ce49" office:value-type="string" calcext:value-type="string">
            <text:p>表示你是特定聯絡卿下屬的紋章，只要展現忠誠，持有者就會擁有被視為聯絡卿所有物的豐厚待遇。</text:p>
            <text:p>你進行的【社會】判定骰數+2個。</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樹脂皮膚</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10</text:p>
          </table:table-cell>
          <table:table-cell table:style-name="ce49" office:value-type="string" calcext:value-type="string">
            <text:p>將皮膚換為合成樹脂制人工皮膚的手術，增強防彈防刃性能的同時外觀和普通皮膚一樣，不會阻礙代謝。</text:p>
            <text:p>你的裝甲值合計+5。</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跟蹤無人機</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15</text:p>
          </table:table-cell>
          <table:table-cell table:style-name="ce49" office:value-type="string" calcext:value-type="string">
            <text:p>能夠自動追蹤持有者的附帶終端的無人機，能根據持有者的指示進行情報處理、周邊探知、精神狀態檢查等工作來協助持有者。</text:p>
            <text:p>你進行【感覺】【精神】判定前使用，判定骰數+2個，該效果一劇本可以使用三次。</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MASKed</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20</text:p>
          </table:table-cell>
          <table:table-cell table:style-name="ce49" office:value-type="string" calcext:value-type="string">
            <text:p>覆蓋在臉上，能讓你變成希望的人的樣子的面具。</text:p>
            <text:p>主要動作使用，變成你希望的人的樣子，有人想要識破時需要與你進行&lt;知覺&gt;對抗。任何時候都可以變回原形，但是再次變化需要使用主要動作。</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人造脊椎</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20</text:p>
          </table:table-cell>
          <table:table-cell table:style-name="ce49" office:value-type="string" calcext:value-type="string">
            <text:p>將脊椎置換為人造物的手術，能在物理層面上變得更加強韌，也能強化姿勢控制能力。</text:p>
            <text:p>你的HP最大值+10。你受到[不良狀態：硬直]後使用，回復該不良狀態，該效果一場景可以使用一次。</text:p>
          </table:table-cell>
          <table:table-cell table:style-name="ce54" office:value-type="string" calcext:value-type="string">
            <text:p>IA P126</text:p>
          </table:table-cell>
          <table:table-cell table:style-name="ce53" table:number-columns-repeated="13"/>
          <table:table-cell table:number-columns-repeated="998"/>
        </table:table-row>
        <table:table-row table:style-name="ro2">
          <table:table-cell table:style-name="ce42" office:value-type="string" calcext:value-type="string">
            <text:p>死神的手套</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25</text:p>
          </table:table-cell>
          <table:table-cell table:style-name="ce49" office:value-type="string" calcext:value-type="string">
            <text:p>被EX背教者感染的黑色手套，能夠與異能產生反應並增幅。</text:p>
            <text:p>使用空手進行攻擊判定前使用，該攻擊的攻擊力+10，但該攻擊必須組合異能，使用該效果時你的侵蝕率+3，該效果一劇本可以使用三次。</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AIDA</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40</text:p>
          </table:table-cell>
          <table:table-cell table:style-name="ce49" office:value-type="string" calcext:value-type="string">
            <text:p>戰術支援用AI，正確來說並非人工智能，而是超越者或背教者生命體精神的殘渣，其自我已經十分稀薄，裝備或者直接植入自己腦內使用。</text:p>
            <text:p>取得時選擇兩項能力值（肉體/感覺/精神/社會），使用該能力值進行的判定，骰數+3個。你使用其他道具時視為擁有3件“精神強化手術”。</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CR彈</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1</text:p>
          </table:table-cell>
          <table:table-cell table:style-name="ce49" office:value-type="string" calcext:value-type="string">
            <text:p>破壞背教者（CrushRenegade）彈，據說是研究對抗種後製作出來的。</text:p>
            <text:p>使用[種類：射擊]武器進行攻擊前使用，該攻擊的攻擊力+3，該效果僅對超越者角色有效。</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灰之獻祭</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5</text:p>
          </table:table-cell>
          <table:table-cell table:style-name="ce49" office:value-type="string" calcext:value-type="string">
            <text:p>服用後會進入假死狀態的藥物。</text:p>
            <text:p>次要動作使用，該場景中你被視作死亡，場景結束時死亡狀態解除，但是死亡期間依然會正常受到傷害，因傷害而死亡時無法復活。想要發現該道具的死亡狀態需要進行難度為15的&lt;知覺&gt;判定。</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金之野獸</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5</text:p>
          </table:table-cell>
          <table:table-cell table:style-name="ce49" office:value-type="string" calcext:value-type="string">
            <text:p>服用後會暫時失去人性並取回獸性的藥物。</text:p>
            <text:p>次要動作使用，該場景中你使用空手進行的近戰攻擊判定骰數+3個，同時你受到[不良狀態：暴走]。</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虹之才能</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5</text:p>
          </table:table-cell>
          <table:table-cell table:style-name="ce49" office:value-type="string" calcext:value-type="string">
            <text:p>服用後會犧牲生命力強化能力的藥物。</text:p>
            <text:p>取得時選擇一項能力值（肉體/感覺/精神/社會），次要動作使用，該場景中使用該能力值進行的判定骰數+2個，使用該道具的主要階段結束時你失去5HP。</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磁場發生裝置</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7</text:p>
          </table:table-cell>
          <table:table-cell table:style-name="ce49" office:value-type="string" calcext:value-type="string">
            <text:p>放出強力的磁場防禦攻擊的裝置，不知為何只有超越者能夠使用。</text:p>
            <text:p>你受到HP傷害前使用，你（預定）受到的HP傷害-10，使用時你的侵蝕率+3。</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TSB</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10</text:p>
          </table:table-cell>
          <table:table-cell table:style-name="ce49" office:value-type="string" calcext:value-type="string">
            <text:p>時間停止彈，在EX背教者的作用下擁有能將敵人的動作減緩的效果。</text:p>
            <text:p>使用[種類：射擊]武器進行攻擊前使用，該攻擊給對象造成至少1點傷害時，該回合間對象行動值-1D10。</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堇之異能</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10</text:p>
          </table:table-cell>
          <table:table-cell table:style-name="ce49" office:value-type="string" calcext:value-type="string">
            <text:p>服用後能讓背教者病毒與身體同調發揮更強大異能的藥品。</text:p>
            <text:p>次要動作使用，該場景中使用&lt;RC&gt;進行的攻擊傷害+1D10，但是使用時你的侵蝕率+3。</text:p>
          </table:table-cell>
          <table:table-cell table:style-name="ce54" office:value-type="string" calcext:value-type="string">
            <text:p>IA P127</text:p>
          </table:table-cell>
          <table:table-cell table:style-name="ce53" table:number-columns-repeated="13"/>
          <table:table-cell table:number-columns-repeated="998"/>
        </table:table-row>
        <table:table-row table:style-name="ro2">
          <table:table-cell table:style-name="ce42" office:value-type="string" calcext:value-type="string">
            <text:p>毀滅之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5" office:value-type="string" calcext:value-type="string">
            <text:p>0/-2</text:p>
          </table:table-cell>
          <table:table-cell table:style-name="ce55" office:value-type="string" calcext:value-type="string">
            <text:p>10/20</text:p>
          </table:table-cell>
          <table:table-cell table:style-name="ce55" office:value-type="string" calcext:value-type="string">
            <text:p>6/9</text:p>
          </table:table-cell>
          <table:table-cell table:style-name="ce54" office:value-type="string" calcext:value-type="string">
            <text:p>至近</text:p>
          </table:table-cell>
          <table:table-cell table:style-name="ce54" table:number-columns-repeated="3"/>
          <table:table-cell table:style-name="ce55" office:value-type="string" calcext:value-type="string">
            <text:p>購入不可/50</text:p>
          </table:table-cell>
          <table:table-cell table:style-name="ce49" office:value-type="string" calcext:value-type="string">
            <text:p>被大量EX背教者感染的日本刀，雖然是正常情況下只是非常銳利的武器，隨著持有者的侵蝕率高漲也能取回原本的威力，同時刀刃也會變成類似怪物爪子的形狀。</text:p>
            <text:p>使用該武器進行攻擊的主要階段結束時你的侵蝕率+2，你的侵蝕率超過100%時數據參照右側。稀有道具。</text:p>
          </table:table-cell>
          <table:table-cell table:style-name="ce54" office:value-type="string" calcext:value-type="string">
            <text:p>IA P128</text:p>
          </table:table-cell>
          <table:table-cell table:style-name="ce53" table:number-columns-repeated="13"/>
          <table:table-cell table:number-columns-repeated="998"/>
        </table:table-row>
        <table:table-row table:style-name="ro2">
          <table:table-cell table:style-name="ce42" office:value-type="string" calcext:value-type="string">
            <text:p>天雷之槍</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300m</text:p>
          </table:table-cell>
          <table:table-cell table:style-name="ce54" table:number-columns-repeated="3"/>
          <table:table-cell table:style-name="ce55" office:value-type="string" calcext:value-type="string">
            <text:p>購入不可/60</text:p>
          </table:table-cell>
          <table:table-cell table:style-name="ce49" office:value-type="string" calcext:value-type="string">
            <text:p>必定奪走目標性命的詛咒之槍，雖然其子彈會如受到命運引導般命中目標的致命處，但同時也有奪走使用者性命的危險性。</text:p>
            <text:p>使用該武器進行射擊攻擊的攻擊判定前使用，你消費30以下任意數值HP，該判定的達成值+[你消費的HP值]，不能因該效果將HP消耗到0以下，使用該效果後你的侵蝕率+4。稀有道具。</text:p>
          </table:table-cell>
          <table:table-cell table:style-name="ce54" office:value-type="string" calcext:value-type="string">
            <text:p>IA P128</text:p>
          </table:table-cell>
          <table:table-cell table:style-name="ce53" table:number-columns-repeated="13"/>
          <table:table-cell table:number-columns-repeated="998"/>
        </table:table-row>
        <table:table-row table:style-name="ro2">
          <table:table-cell table:style-name="ce42" office:value-type="string" calcext:value-type="string">
            <text:p>演進裝甲</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20" calcext:value-type="float">
            <text:p>20</text:p>
          </table:table-cell>
          <table:table-cell table:style-name="ce55" office:value-type="string" calcext:value-type="string">
            <text:p>購入不可/80</text:p>
          </table:table-cell>
          <table:table-cell table:style-name="ce49" office:value-type="string" calcext:value-type="string">
            <text:p>FH開發的能夠進化的動力裝甲，搭載了高性能AI，能夠為了盡可能發揮穿戴者的力量而變形成最合適的樣子。</text:p>
            <text:p>取得該道具時選擇一項能力值（肉體/感覺/精神/社會）。你進行判定前使用，該判定的達成值+[選擇的能力值]，該效果一劇本可以使用三次。稀有道具。</text:p>
          </table:table-cell>
          <table:table-cell table:style-name="ce54" office:value-type="string" calcext:value-type="string">
            <text:p>IA P128</text:p>
          </table:table-cell>
          <table:table-cell table:style-name="ce53" table:number-columns-repeated="13"/>
          <table:table-cell table:number-columns-repeated="998"/>
        </table:table-row>
        <table:table-row table:style-name="ro2">
          <table:table-cell table:style-name="ce42" office:value-type="string" calcext:value-type="string">
            <text:p>真理之花</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80</text:p>
          </table:table-cell>
          <table:table-cell table:style-name="ce49" office:value-type="string" calcext:value-type="string">
            <text:p>盛開著銀色花朵的耳墜，銀色花朵有能使裝備者與背教者病毒同調的效果。</text:p>
            <text:p>你進行使用&lt;RC&gt;的攻擊判定前使用，該攻擊的攻擊力+10，如果對象以格擋回應該攻擊，則在攻擊之後，該場景間用來格擋的武器格擋值-10，因該效果使武器的格擋值變為0以下時，該武器被破壞，該效果一場景可以使用一次，使用該效果時你的侵蝕率+3。稀有道具。</text:p>
          </table:table-cell>
          <table:table-cell table:style-name="ce54" office:value-type="string" calcext:value-type="string">
            <text:p>IA P128</text:p>
          </table:table-cell>
          <table:table-cell table:style-name="ce53" table:number-columns-repeated="13"/>
          <table:table-cell table:number-columns-repeated="998"/>
        </table:table-row>
        <table:table-row table:style-name="ro2">
          <table:table-cell table:style-name="ce42" office:value-type="string" calcext:value-type="string">
            <text:p>洗腦裝置</text:p>
          </table:table-cell>
          <table:table-cell table:style-name="ce54" office:value-type="string" calcext:value-type="string">
            <text:p>一般</text:p>
          </table:table-cell>
          <table:table-cell table:style-name="ce54" table:number-columns-repeated="8"/>
          <table:table-cell table:style-name="ce55" office:value-type="string" calcext:value-type="string">
            <text:p>購入不可/200</text:p>
          </table:table-cell>
          <table:table-cell table:style-name="ce49" office:value-type="string" calcext:value-type="string">
            <text:p>FH開發的洗腦用裝置，對超越者無效。</text:p>
            <text:p>主要動作使用，與你處於同一接戰區域的一名非超越者角色被你洗腦，被洗腦的角色行動由你決定，對象不能違背你的命令。你可以在任意時機解除該效果，如果該道具因為任何原因被破壞時也會失效。該道具一劇本可以使用一次。</text:p>
          </table:table-cell>
          <table:table-cell table:style-name="ce54" office:value-type="string" calcext:value-type="string">
            <text:p>IA P128</text:p>
          </table:table-cell>
          <table:table-cell table:style-name="ce53" table:number-columns-repeated="13"/>
          <table:table-cell table:number-columns-repeated="998"/>
        </table:table-row>
        <table:table-row table:style-name="ro2">
          <table:table-cell table:style-name="ce42" office:value-type="string" calcext:value-type="string">
            <text:p>α幻越</text:p>
          </table:table-cell>
          <table:table-cell table:style-name="ce54" office:value-type="string" calcext:value-type="string">
            <text:p>消耗品</text:p>
          </table:table-cell>
          <table:table-cell table:style-name="ce54" table:number-columns-repeated="8"/>
          <table:table-cell table:style-name="ce55" office:value-type="string" calcext:value-type="string">
            <text:p>購入不可/100</text:p>
          </table:table-cell>
          <table:table-cell table:style-name="ce49" office:value-type="string" calcext:value-type="string">
            <text:p>能讓服用者變成超越者的藥物，超越者服用時能夠暫時獲得新的異能。</text:p>
            <text:p>取得時選擇一項[時機：常時]以外的[限制：-]異能。次要動作使用，該場景中你可以使用選擇的異能，該異能的LV視為1，不會因為使用使你的侵蝕率上升。使用該道具時你的侵蝕率+2D10。</text:p>
          </table:table-cell>
          <table:table-cell table:style-name="ce54" office:value-type="string" calcext:value-type="string">
            <text:p>IA P128</text:p>
          </table:table-cell>
          <table:table-cell table:style-name="ce53" table:number-columns-repeated="13"/>
          <table:table-cell table:number-columns-repeated="998"/>
        </table:table-row>
        <table:table-row table:style-name="ro2" table:number-rows-repeated="940">
          <table:table-cell table:style-name="ce53" table:number-columns-repeated="26"/>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症候專用獨特道具" table:style-name="ta4">
        <table:table-column table:style-name="co6" table:default-cell-style-name="Default"/>
        <table:table-column table:style-name="co20" table:default-cell-style-name="Default"/>
        <table:table-column table:style-name="co16" table:default-cell-style-name="Default"/>
        <table:table-column table:style-name="co9" table:default-cell-style-name="Default"/>
        <table:table-column table:style-name="co10" table:number-columns-repeated="2" table:default-cell-style-name="Default"/>
        <table:table-column table:style-name="co17" table:default-cell-style-name="Default"/>
        <table:table-column table:style-name="co9" table:number-columns-repeated="2" table:default-cell-style-name="Default"/>
        <table:table-column table:style-name="co10" table:default-cell-style-name="Default"/>
        <table:table-column table:style-name="co21" table:default-cell-style-name="Default"/>
        <table:table-column table:style-name="co22" table:default-cell-style-name="Default"/>
        <table:table-column table:style-name="co4" table:default-cell-style-name="Default"/>
        <table:table-column table:style-name="co5" table:number-columns-repeated="1011" table:default-cell-style-name="Default"/>
        <table:table-row table:style-name="ro2">
          <table:table-cell table:style-name="ce52" office:value-type="string" calcext:value-type="string">
            <text:p>名稱</text:p>
          </table:table-cell>
          <table:table-cell table:style-name="ce52" office:value-type="string" calcext:value-type="string">
            <text:p>種類</text:p>
          </table:table-cell>
          <table:table-cell table:style-name="ce52" office:value-type="string" calcext:value-type="string">
            <text:p>技能</text:p>
          </table:table-cell>
          <table:table-cell table:style-name="ce52" office:value-type="string" calcext:value-type="string">
            <text:p>命中</text:p>
          </table:table-cell>
          <table:table-cell table:style-name="ce52" office:value-type="string" calcext:value-type="string">
            <text:p>攻擊力</text:p>
          </table:table-cell>
          <table:table-cell table:style-name="ce52" office:value-type="string" calcext:value-type="string">
            <text:p>格擋值</text:p>
          </table:table-cell>
          <table:table-cell table:style-name="ce52" office:value-type="string" calcext:value-type="string">
            <text:p>射程</text:p>
          </table:table-cell>
          <table:table-cell table:style-name="ce52" office:value-type="string" calcext:value-type="string">
            <text:p>閃避</text:p>
          </table:table-cell>
          <table:table-cell table:style-name="ce52" office:value-type="string" calcext:value-type="string">
            <text:p>行動</text:p>
          </table:table-cell>
          <table:table-cell table:style-name="ce52" office:value-type="string" calcext:value-type="string">
            <text:p>裝甲值</text:p>
          </table:table-cell>
          <table:table-cell table:style-name="ce52" office:value-type="string" calcext:value-type="string">
            <text:p>必要經驗值</text:p>
          </table:table-cell>
          <table:table-cell table:style-name="ce52" office:value-type="string" calcext:value-type="string">
            <text:p>解說</text:p>
          </table:table-cell>
          <table:table-cell table:style-name="ce52" office:value-type="string" calcext:value-type="string">
            <text:p>參照</text:p>
          </table:table-cell>
          <table:table-cell table:style-name="ce53" table:number-columns-repeated="13"/>
          <table:table-cell table:number-columns-repeated="998"/>
        </table:table-row>
        <table:table-row table:style-name="ro2">
          <table:table-cell table:style-name="ce52" office:value-type="string" calcext:value-type="string">
            <text:p>天使光環專用道具</text:p>
          </table:table-cell>
          <table:table-cell table:style-name="ce57" office:value-type="string" calcext:value-type="string" table:number-columns-spanned="12" table:number-rows-spanned="1">
            <text:p>只有症候為天使光環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棱鏡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8" calcext:value-type="float">
            <text:p>8</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作為操縱天使光環異能的媒介製作的短劍。</text:p>
            <text:p>你在主要動作中組合天使光環異能時選擇其中一個異能使其等級+1，可以超過等級上限，但不增加使用次數，使用該效果時你的侵蝕率+2。</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食光者</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10" calcext:value-type="float">
            <text:p>10</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通過光學迷彩使劍刃消失的軍用劍，光學迷彩的精度需要使用者的異能調整。</text:p>
            <text:p>使用該武器進行組合了天使光環異能的近戰攻擊判定骰數+3個。</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鏡反之盾</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3" calcext:value-type="float">
            <text:p>3</text:p>
          </table:table-cell>
          <table:table-cell table:style-name="ce54" office:value-type="float" office:value="5" calcext:value-type="float">
            <text:p>5</text:p>
          </table:table-cell>
          <table:table-cell table:style-name="ce54" office:value-type="string" calcext:value-type="string">
            <text:p>至近</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將被EX背教者侵蝕的鏡子加工成盾，由天使光環症候的超越者使用的話可以反彈異能。</text:p>
            <text:p>你進行閃避判定前使用，該判定達成值+[&lt;近戰&gt;等級]，該效果一回合可以使用一次。</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輝光弓</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為了提高《光之弓》的命中精度而製作的特殊弓，當做普通武器使用時就只是普通的弓。</text:p>
            <text:p>你進行的組合《光之弓》的判定骰數+4個。雙手持握。至近不可。</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地獄狙擊手</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14" calcext:value-type="float">
            <text:p>14</text:p>
          </table:table-cell>
          <table:table-cell table:style-name="ce54" office:value-type="string" calcext:value-type="string">
            <text:p>-</text:p>
          </table:table-cell>
          <table:table-cell table:style-name="ce54" office:value-type="string" calcext:value-type="string">
            <text:p>200m</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能與天使光環擁有的超感知力同調的最新銳狙擊槍。</text:p>
            <text:p>次要動作使用，該主要階段間&lt;射擊&gt;判定達成值+5。雙手持握。至近不可。</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天鵝絨披風</text:p>
          </table:table-cell>
          <table:table-cell table:style-name="ce54" office:value-type="string" calcext:value-type="string">
            <text:p>防具（輔助）</text:p>
          </table:table-cell>
          <table:table-cell table:style-name="ce54" table:number-columns-repeated="5"/>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25" calcext:value-type="float">
            <text:p>25</text:p>
          </table:table-cell>
          <table:table-cell table:style-name="ce49" office:value-type="string" calcext:value-type="string">
            <text:p>豔麗的黑色斗篷，使用吸收光線的素材製作，能讓使用者融入黑暗。</text:p>
            <text:p>你在隱蔽狀態下的判定骰數+3個。</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感覺指向性護目鏡</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搭載了能排除多餘的情報並為天使光環強化過的感覺賦予指向性的裝置的護目鏡。</text:p>
            <text:p>次要動作使用，該場景間你進行【感覺】判定骰數+2個，該效果無法用於閃避判定，使用後你的侵蝕率+1。</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虹之瞳</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根據光線變為不同顏色的小球，可以增幅使用者的感覺，使之能進行短時間的預測未來。</text:p>
            <text:p>你使用《戰鬥的預感》的回合間進行的判定骰數+4個。</text:p>
          </table:table-cell>
          <table:table-cell table:style-name="ce54" office:value-type="string" calcext:value-type="string">
            <text:p>IA P72</text:p>
          </table:table-cell>
          <table:table-cell table:style-name="ce53" table:number-columns-repeated="13"/>
          <table:table-cell table:number-columns-repeated="998"/>
        </table:table-row>
        <table:table-row table:style-name="ro2">
          <table:table-cell table:style-name="ce42" office:value-type="string" calcext:value-type="string">
            <text:p>全視</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能讓你利用能力折射光線一次把握全方位的裝置。</text:p>
            <text:p>次要動作使用，該場景間你進行的回避判定骰數+3個。</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黎明使者</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使用天使光環變成超高出力光線的手槍，雖然有槍的形狀但其實不會射出子彈。</text:p>
            <text:p>你使用《光之槍》製作的武器變為[攻擊力：《光之槍》LV×4+4]，《光之槍》侵蝕率額外+2。</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神秘之眼</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能強化天使光環超知覺能力的鏡面鍍層太陽鏡，強化知覺的副作用是對神經有巨大的負荷。</text:p>
            <text:p>準備階段使用，該回合間你進行的【感覺】【精神】判定骰數+3個，使用該效果時你的HP-3。</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海市蜃樓屋</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在持有者身邊自動展開、帶有鏡子般外裝的小型無人機，使用天使光環讓光線亂反射能讓人無法預測攻擊軌跡。</text:p>
            <text:p>你以[技能：RC]進行天使光環異能的攻擊，對象為[對象：範圍]、[對象：範圍（選擇）]、[對象：場景]、[對象：場景（選擇）]時，該攻擊的對象進行的回應動作判定骰數-3個。</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幻像師</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在袖子或胸口的特殊口袋，能根據你的意志隱藏衣服或道具的一部分。</text:p>
            <text:p>即便你不處於隱蔽狀態也能使用效果中帶有[你處於隱蔽狀態才能使用]的天使光環異能，使用組合了天使光環異能進行的判定時，你的侵蝕率+1。</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淨化之瞳</text:p>
          </table:table-cell>
          <table:table-cell table:style-name="ce54" office:value-type="string" calcext:value-type="string">
            <text:p>一般</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能將你操縱的光最大限度集中變換為強力一擊的裝置。</text:p>
            <text:p>你進行組合天使光環異能的攻擊傷害+10D10，該攻擊必須是[對象：單體]，該效果一劇本可以使用一次。</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天使閃光</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將天使光環製造的光增幅成大閃光的裝置，瞬間照亮周圍的光芒讓所有的不合理無處遁藏。</text:p>
            <text:p>你進行閃避判定前使用，該判定不受骰數減少效果影響。</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極光魔方</text:p>
          </table:table-cell>
          <table:table-cell table:style-name="ce54" office:value-type="string" calcext:value-type="string">
            <text:p>消耗品</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能創造比《終極閃光》更強力的光輝的被EX背教者侵蝕的水晶箱。</text:p>
            <text:p>你進行組合《終極閃光》的判定前使用，該判定骰數+10個。</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42" office:value-type="string" calcext:value-type="string">
            <text:p>光線服務器</text:p>
          </table:table-cell>
          <table:table-cell table:style-name="ce54" office:value-type="string" calcext:value-type="string">
            <text:p>消耗品</text:p>
          </table:table-cell>
          <table:table-cell table:style-name="ce54" table:number-columns-repeated="8"/>
          <table:table-cell table:style-name="ce54" office:value-type="float" office:value="40" calcext:value-type="float">
            <text:p>40</text:p>
          </table:table-cell>
          <table:table-cell table:style-name="ce49" office:value-type="string" calcext:value-type="string">
            <text:p>使用了被EX背教者侵蝕的水晶的光增幅器，能使用水晶的力量收束並增幅光，但因為耐久性問題無法多次使用。</text:p>
            <text:p>你進行使用&lt;RC&gt;的攻擊判定前使用，該判定達成值+20。</text:p>
          </table:table-cell>
          <table:table-cell table:style-name="ce54" office:value-type="string" calcext:value-type="string">
            <text:p>IA P73</text:p>
          </table:table-cell>
          <table:table-cell table:style-name="ce53" table:number-columns-repeated="13"/>
          <table:table-cell table:number-columns-repeated="998"/>
        </table:table-row>
        <table:table-row table:style-name="ro2">
          <table:table-cell table:style-name="ce52" office:value-type="string" calcext:value-type="string">
            <text:p>重力魔眼專用道具</text:p>
          </table:table-cell>
          <table:table-cell table:style-name="ce57" office:value-type="string" calcext:value-type="string" table:number-columns-spanned="12" table:number-rows-spanned="1">
            <text:p>只有症候為重力魔眼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隕鐵刀</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7" calcext:value-type="float">
            <text:p>7</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10" calcext:value-type="float">
            <text:p>10</text:p>
          </table:table-cell>
          <table:table-cell table:style-name="ce49" office:value-type="string" calcext:value-type="string">
            <text:p>使用被EX背教者侵蝕的隕鐵製作的刀，重力魔眼症候能讓其鋒利度改變。</text:p>
            <text:p>攻擊時攻擊力+[組合的重力魔眼異能數]（最大+5）。</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重力吸收者</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2" calcext:value-type="float">
            <text:p>2</text:p>
          </table:table-cell>
          <table:table-cell table:style-name="ce54" office:value-type="float" office:value="5" calcext:value-type="float">
            <text:p>5</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表面裝有特殊液體金屬的盾，這種對重力有特殊感應的液體金屬能將衝擊擴散、吸收。</text:p>
            <text:p>被無法進行格擋的攻擊命中後使用，從該攻擊中（預定）受到的HP傷害-3D10，該效果一回合可以使用一次。</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魔翼</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12" calcext:value-type="float">
            <text:p>12</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擁有可以展開的傘狀部分的雙手長槍，展開後能夠通過重力操作輔助滑翔，進行立體機動戰鬥。</text:p>
            <text:p>你進入過飛行狀態的主要階段間，使用該武器進行的攻擊判定骰數+2個。雙手持握。</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暗鬼之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14" calcext:value-type="float">
            <text:p>14</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刀身中埋入黑色寶珠的日本刀，寶珠與魔眼一體化後可以從刀身放出重力魔眼異能。</text:p>
            <text:p>使用該武器進行的近戰攻擊視為空手並可適用於《漆黑之拳》，使用該效果時你的侵蝕率+1。</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星群</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15" calcext:value-type="float">
            <text:p>15</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沒有握柄，十二把為一套的匕首，通過重力魔眼的魔眼操縱重力才能使用。</text:p>
            <text:p>裝備的該武器不計入已裝備武器數量，可以與雙手持握武器同時裝備。該武器只能裝備一件。使用該武器攻擊或格擋時你的侵蝕率+1。</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重力弓</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5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被調整為能將《瞬速之刃》加速箭矢的能力最大化的弓。</text:p>
            <text:p>使用該武器組合《瞬速之刃》進行的攻擊判定骰數+2個。雙手持握。至近不可。</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暗黑爆能槍</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18" calcext:value-type="float">
            <text:p>18</text:p>
          </table:table-cell>
          <table:table-cell table:style-name="ce54" office:value-type="string" calcext:value-type="string">
            <text:p>-</text:p>
          </table:table-cell>
          <table:table-cell table:style-name="ce54" office:value-type="string" calcext:value-type="string">
            <text:p>100m</text:p>
          </table:table-cell>
          <table:table-cell table:style-name="ce54" table:number-columns-repeated="3"/>
          <table:table-cell table:style-name="ce54" office:value-type="float" office:value="40" calcext:value-type="float">
            <text:p>40</text:p>
          </table:table-cell>
          <table:table-cell table:style-name="ce49" office:value-type="string" calcext:value-type="string">
            <text:p>將魔眼作為子彈發射的特殊兵裝，擊中時會在對象周圍引發強大重力。</text:p>
            <text:p>使用該武器進行的攻擊命中時對象受到[不良狀態：硬直]。雙手持握。至近不可。</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PA裝甲“GRV”</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35" calcext:value-type="float">
            <text:p>35</text:p>
          </table:table-cell>
          <table:table-cell table:style-name="ce54" office:value-type="float" office:value="100" calcext:value-type="float">
            <text:p>100</text:p>
          </table:table-cell>
          <table:table-cell table:style-name="ce49" office:value-type="string" calcext:value-type="string">
            <text:p>擁有堅固裝甲和身體能力輔助機能的試做型動力裝甲，但其重量過高穿著者往往無法行動，因此只有通過重力魔眼的重力操縱能力才能使用。</text:p>
            <text:p>你可以裝備搭載火器。組合了重力魔眼異能的攻擊的攻擊力+10。</text:p>
          </table:table-cell>
          <table:table-cell table:style-name="ce54" office:value-type="string" calcext:value-type="string">
            <text:p>IA P74</text:p>
          </table:table-cell>
          <table:table-cell table:style-name="ce53" table:number-columns-repeated="13"/>
          <table:table-cell table:number-columns-repeated="998"/>
        </table:table-row>
        <table:table-row table:style-name="ro2">
          <table:table-cell table:style-name="ce42" office:value-type="string" calcext:value-type="string">
            <text:p>死神裹布</text:p>
          </table:table-cell>
          <table:table-cell table:style-name="ce54" office:value-type="string" calcext:value-type="string">
            <text:p>防具（輔助）</text:p>
          </table:table-cell>
          <table:table-cell table:style-name="ce54" table:number-columns-repeated="5"/>
          <table:table-cell table:number-columns-repeated="2"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15" calcext:value-type="float">
            <text:p>15</text:p>
          </table:table-cell>
          <table:table-cell table:style-name="ce49" office:value-type="string" calcext:value-type="string">
            <text:p>如同死神般的破爛黑色斗篷，能增幅重力魔眼的異能，減輕使用者受到的重力。</text:p>
            <text:p>你進行的【肉體】判定骰數+2個，該效果只有在你受到重力魔眼異能效果期間生效。</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黑色鑽石</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能引發奇妙結界的傳說鑽石。</text:p>
            <text:p>與《結界化》同時使用，可以停止臨時演員和周圍物體的時間，在停止的時間中被破壞的物體會在《結界化》解除時復原，臨時演員不會因為超越者帶有殺意的行動以外的原因死亡（不會被捲入戰鬥），細節由GM決定。</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繁星球</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魔眼包覆的重力增幅裝置，擁有改變《虛無的城壁》製造的光重力場盾形狀的機能，變化成守護夥伴而非你的形狀。</text:p>
            <text:p>你使用的《虛無的城壁》變更為[對象：單體]。</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黑色球體</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由重力魔眼症候超越者使用能增強重力操縱能力，形狀近似魔眼的球形金屬塊。</text:p>
            <text:p>準備階段使用，該回合間你進行的組合重力魔眼異能的判定骰數+3個，使用後你的侵蝕率+2。</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彗星環</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將隕石加工而成的手環，能感應異能根據重力產生力場。</text:p>
            <text:p>你進行的使用了《重力防護》的格擋值+10，該效果一場景可以使用一次。</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黑之中心核</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嵌入魔眼後能將異能強化至超越極限的謎之結晶。</text:p>
            <text:p>次要動作使用，該場景間你進行的組合重力魔眼異能的攻擊傷害+1D10，進行攻擊的主要階段結束時失去3HP，最多可以同時使用3個（失去HP效果也會疊加）。</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彗星投彈手</text:p>
          </table:table-cell>
          <table:table-cell table:style-name="ce54" office:value-type="string" calcext:value-type="string">
            <text:p>消耗品</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被EX背教者侵蝕的小石子大小的隕石，與異能反應後能產生爆發般的力場。</text:p>
            <text:p>與組合重力魔眼異能的&lt;RC&gt;攻擊同時使用，該攻擊傷害+3D10。稀有道具。</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黑星盤</text:p>
          </table:table-cell>
          <table:table-cell table:style-name="ce54" office:value-type="string" calcext:value-type="string">
            <text:p>消耗品</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侵蝕的漆黑圓盤，將其插入魔眼後能將暴走增強。</text:p>
            <text:p>你使用《黑星粉碎》造成的HP傷害+20。</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42" office:value-type="string" calcext:value-type="string">
            <text:p>時之沙漏</text:p>
          </table:table-cell>
          <table:table-cell table:style-name="ce54" office:value-type="string" calcext:value-type="string">
            <text:p>消耗品</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沙子全部都是魔眼，不操縱重力甚至無法拿起的沙漏。</text:p>
            <text:p>場景內角色使用[時機：自動動作]異能後使用，該異能效果無效，[限制：-]和敵人專用異能無法無效，無效的異能需要達成值的情況下達成值變為0。稀有道具。</text:p>
          </table:table-cell>
          <table:table-cell table:style-name="ce54" office:value-type="string" calcext:value-type="string">
            <text:p>IA P75</text:p>
          </table:table-cell>
          <table:table-cell table:style-name="ce53" table:number-columns-repeated="13"/>
          <table:table-cell table:number-columns-repeated="998"/>
        </table:table-row>
        <table:table-row table:style-name="ro2">
          <table:table-cell table:style-name="ce52" office:value-type="string" calcext:value-type="string">
            <text:p>雷擊黑犬專用道具</text:p>
          </table:table-cell>
          <table:table-cell table:style-name="ce57" office:value-type="string" calcext:value-type="string" table:number-columns-spanned="12" table:number-rows-spanned="1">
            <text:p>只有症候為雷擊黑犬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邊緣行者</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8" calcext:value-type="float">
            <text:p>8</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裝在《機械腿》中的刀刃，會在使用者加速時纏繞雷電。</text:p>
            <text:p>需要取得《機械腿》才能取得。裝備的該武器不計入已裝備武器數量，可以與雙手持握武器同時裝備。該武器只能裝備一件。你進行移動的主要階段間使用該武器進行攻擊的攻擊力+3。</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雷霆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10" calcext:value-type="float">
            <text:p>10</text:p>
          </table:table-cell>
          <table:table-cell table:style-name="ce54" office:value-type="float" office:value="6" calcext:value-type="float">
            <text:p>6</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使用了與雷擊黑犬異能相性極佳的金屬的棍子，能夠誘導異能的雷電。</text:p>
            <text:p>你進行組合了雷擊黑犬異能的攻擊判定骰數+3個。雙手持握。</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閃電手槍</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5" office:value-type="string" calcext:value-type="string">
            <text:p>3/11</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能射出帶著電擊的子彈的自動手槍，因為是充電式所以攻擊需要充能。</text:p>
            <text:p>次要動作使用，該主要階段間攻擊力使用右側數值，裝備複數“閃電手槍”時可以在一個次要動作中變更全部“閃電手槍”的攻擊力。</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晴天霹靂</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8" calcext:value-type="float">
            <text:p>8</text:p>
          </table:table-cell>
          <table:table-cell table:style-name="ce54" office:value-type="string" calcext:value-type="string">
            <text:p>-</text:p>
          </table:table-cell>
          <table:table-cell table:style-name="ce54" office:value-type="string" calcext:value-type="string">
            <text:p>50m</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搭載戰鬥輔助AI的突擊步槍。</text:p>
            <text:p>使用該武器組合《攻擊程序》進行的攻擊判定骰數+3個。至近不可。</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軌道炮</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4" calcext:value-type="float">
            <text:p>-4</text:p>
          </table:table-cell>
          <table:table-cell table:style-name="ce54" office:value-type="float" office:value="20" calcext:value-type="float">
            <text:p>20</text:p>
          </table:table-cell>
          <table:table-cell table:style-name="ce54" office:value-type="string" calcext:value-type="string">
            <text:p>-</text:p>
          </table:table-cell>
          <table:table-cell table:style-name="ce54" office:value-type="string" calcext:value-type="string">
            <text:p>100m</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使用雷擊黑犬症候的力量進行供電的小型電磁加速軌道炮，如此速度連超越者也難以應對。</text:p>
            <text:p>無法對使用該武器進行的攻擊進行格擋，該武器一場景可以使用一次。</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磁懸浮載具</text:p>
          </table:table-cell>
          <table:table-cell table:style-name="ce54" office:value-type="string" calcext:value-type="string">
            <text:p>載具</text:p>
          </table:table-cell>
          <table:table-cell table:style-name="ce54" office:value-type="string" calcext:value-type="string">
            <text:p>&lt;RC&gt;/&lt;駕駛：四輪&gt;</text:p>
          </table:table-cell>
          <table:table-cell table:style-name="ce54"/>
          <table:table-cell table:style-name="ce54" office:value-type="float" office:value="10" calcext:value-type="float">
            <text:p>10</text:p>
          </table:table-cell>
          <table:table-cell table:style-name="ce54" table:number-columns-repeated="3"/>
          <table:table-cell table:style-name="ce54" office:value-type="float" office:value="-2" calcext:value-type="float">
            <text:p>-2</text:p>
          </table:table-cell>
          <table:table-cell table:style-name="ce54" office:value-type="float" office:value="3" calcext:value-type="float">
            <text:p>3</text:p>
          </table:table-cell>
          <table:table-cell table:style-name="ce54" office:value-type="float" office:value="15" calcext:value-type="float">
            <text:p>15</text:p>
          </table:table-cell>
          <table:table-cell table:style-name="ce49" office:value-type="string" calcext:value-type="string">
            <text:p>組裝了使用雷擊黑犬能力發電工作的磁懸浮馬達的載具，能將搭乘者的思考變換為電信號來操縱，全力移動：250m。</text:p>
            <text:p>你進行的戰鬥移動+5m。</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柔軟武裝</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將賽博義手素材更換為衝擊吸收性能的武裝。</text:p>
            <text:p>需要取得《機械手》才能取得，你使用空手進行的格擋值+1D10。</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義體強化：型號B</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在完全義體中搭載防護罩增幅裝置。</text:p>
            <text:p>取得前需要“完全義體”，你使用的《電磁防護罩》效果可以使HP傷害額外-1D10。</text:p>
          </table:table-cell>
          <table:table-cell table:style-name="ce54" office:value-type="string" calcext:value-type="string">
            <text:p>IA P76</text:p>
          </table:table-cell>
          <table:table-cell table:style-name="ce53" table:number-columns-repeated="13"/>
          <table:table-cell table:number-columns-repeated="998"/>
        </table:table-row>
        <table:table-row table:style-name="ro2">
          <table:table-cell table:style-name="ce42" office:value-type="string" calcext:value-type="string">
            <text:p>義體強化：型號R</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完全義體調整為異能特化型。</text:p>
            <text:p>取得前需要“完全義體”，你進行的組合了雷擊黑犬異能攻擊的攻擊力+7，行動值-3，無法與其他[義體強化：●●]同時取得。</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義體強化：型號V</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完全義體調整為駕駛機能特化。</text:p>
            <text:p>取得前需要“完全義體”，你進行的&lt;駕駛：●●&gt;判定骰數+3個。</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奧丁之眼</text:p>
          </table:table-cell>
          <table:table-cell table:style-name="ce54" office:value-type="string" calcext:value-type="string">
            <text:p>一般</text:p>
          </table:table-cell>
          <table:table-cell table:style-name="ce54" table:number-columns-repeated="8"/>
          <table:table-cell table:style-name="ce54" office:value-type="float" office:value="35" calcext:value-type="float">
            <text:p>35</text:p>
          </table:table-cell>
          <table:table-cell table:style-name="ce49" office:value-type="string" calcext:value-type="string">
            <text:p>雷擊黑犬超越者專用的同調戰術分析義眼。</text:p>
            <text:p>次要動作使用，選擇一項技能，該場景間使用該技能進行的判定骰數+4個，使用該效果時你的侵蝕率+4，效果持續時可以使用次要動作更換選擇的技能。</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第二大腦</text:p>
          </table:table-cell>
          <table:table-cell table:style-name="ce54" office:value-type="string" calcext:value-type="string">
            <text:p>一般</text:p>
          </table:table-cell>
          <table:table-cell table:style-name="ce54" table:number-columns-repeated="8"/>
          <table:table-cell table:style-name="ce54" office:value-type="float" office:value="45" calcext:value-type="float">
            <text:p>45</text:p>
          </table:table-cell>
          <table:table-cell table:style-name="ce49" office:value-type="string" calcext:value-type="string">
            <text:p>與大腦直接連接大幅強化使用者思考能力的賽博道具，只有與機械親和性高的雷擊黑犬可以使用。</text:p>
            <text:p>你進行的【精神】判定骰數+5個，你的基本侵蝕率+5。</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完全義體</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將大腦以外全部改造為義體，使用雷擊黑犬能力供能。</text:p>
            <text:p>如果想看穿你本體為機械，需要對你進行&lt;知覺&gt;對決並成功。</text:p>
            <text:p>持有該道具時你的裝甲值+10，空手數據變更如下：</text:p>
            <text:p>種類：近戰  技能：近戰  命中：-2  攻擊力：8  格擋值：6  射程：至近</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最後一次</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增幅《自爆裝置》的出力，能將大範圍捲入爆炸的裝置。</text:p>
            <text:p>你使用的《自爆裝置》變更為[對象：場景][射程：視野]，該效果優先級大於組合異能的對象和射程。</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RG彈倉</text:p>
          </table:table-cell>
          <table:table-cell table:style-name="ce54" office:value-type="string" calcext:value-type="string">
            <text:p>消耗品</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軌道炮”專用追加彈倉與交換用槍身套裝。</text:p>
            <text:p>次要動作使用，你持有的一件“軌道炮”使用次數+1，該道具最多可以常備化3個。</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爆發處理器</text:p>
          </table:table-cell>
          <table:table-cell table:style-name="ce54" office:value-type="string" calcext:value-type="string">
            <text:p>一般</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搭載試做型高性能演算機能的背教者控制終端，工作需要雷擊黑犬的能力供給電力。</text:p>
            <text:p>你進行的&lt;RC&gt;判定骰數+10個，你使用&lt;RC&gt;進行攻擊的攻擊力+5。</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42" office:value-type="string" calcext:value-type="string">
            <text:p>雷蟲</text:p>
          </table:table-cell>
          <table:table-cell table:style-name="ce54" office:value-type="string" calcext:value-type="string">
            <text:p>消耗品</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在體內寄生，能夠改變宿主生物電流向的寄生蟲。</text:p>
            <text:p>任何時候都可以使用，該主要階段間你使用的一個[技能：RC]異能LV+1，使用複數異能時從中選擇一個，可以超過LV上限，但不能增加限制使用次數的異能的使用次數。稀有道具。</text:p>
          </table:table-cell>
          <table:table-cell table:style-name="ce54" office:value-type="string" calcext:value-type="string">
            <text:p>IA P77</text:p>
          </table:table-cell>
          <table:table-cell table:style-name="ce53" table:number-columns-repeated="13"/>
          <table:table-cell table:number-columns-repeated="998"/>
        </table:table-row>
        <table:table-row table:style-name="ro2">
          <table:table-cell table:style-name="ce52" office:value-type="string" calcext:value-type="string">
            <text:p>鮮血真祖專用道具</text:p>
          </table:table-cell>
          <table:table-cell table:style-name="ce57" office:value-type="string" calcext:value-type="string" table:number-columns-spanned="12" table:number-rows-spanned="1">
            <text:p>只有症候為鮮血真祖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鮮血之杖</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被EX背教者侵蝕的錫杖，能強化持有者操縱血液的能力。</text:p>
            <text:p>你進行的組合了鮮血真祖異能的&lt;RC&gt;攻擊的攻擊力+7，每次使用該攻擊你失去3點HP。</text:p>
          </table:table-cell>
          <table:table-cell table:style-name="ce54" office:value-type="string" calcext:value-type="string">
            <text:p>IA P78</text:p>
          </table:table-cell>
          <table:table-cell table:style-name="ce54" table:number-columns-repeated="2"/>
          <table:table-cell table:style-name="ce53" table:number-columns-repeated="11"/>
          <table:table-cell table:number-columns-repeated="998"/>
        </table:table-row>
        <table:table-row table:style-name="ro2">
          <table:table-cell table:style-name="ce42" office:value-type="string" calcext:value-type="string">
            <text:p>屠殺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14" calcext:value-type="float">
            <text:p>14</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吸血後刀刃會巨大化的大鐮刀，該刀刃砍殺大量敵人時才能發揮其真正的價值。</text:p>
            <text:p>使用該武器進行攻擊的攻擊力+6，該效果只能在與《血之宴》組合期間使用。雙手持握。</text:p>
          </table:table-cell>
          <table:table-cell table:style-name="ce54" office:value-type="string" calcext:value-type="string">
            <text:p>IA P78</text:p>
          </table:table-cell>
          <table:table-cell table:style-name="ce53" table:number-columns-repeated="13"/>
          <table:table-cell table:number-columns-repeated="998"/>
        </table:table-row>
        <table:table-row table:style-name="ro2">
          <table:table-cell table:style-name="ce42" office:value-type="string" calcext:value-type="string">
            <text:p>腥紅烙印</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style-name="ce54" office:value-type="string" calcext:value-type="string">
            <text:p>13/20</text:p>
          </table:table-cell>
          <table:table-cell table:style-name="ce55" office:value-type="string" calcext:value-type="string">
            <text:p>5/10</text:p>
          </table:table-cell>
          <table:table-cell table:style-name="ce54" office:value-type="string" calcext:value-type="string">
            <text:p>至近</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被EX背教者侵蝕的鮮紅雙手劍，吸血能夠使其成長。</text:p>
            <text:p>使用組合了鮮血真祖異能進行的近戰攻擊給對象造成至少1點傷害時，該場景間攻擊力與格擋值使用右側數值。雙手持握。</text:p>
          </table:table-cell>
          <table:table-cell table:style-name="ce54" office:value-type="string" calcext:value-type="string">
            <text:p>IA P78</text:p>
          </table:table-cell>
          <table:table-cell table:style-name="ce53" table:number-columns-repeated="13"/>
          <table:table-cell table:number-columns-repeated="998"/>
        </table:table-row>
        <table:table-row table:style-name="ro2">
          <table:table-cell table:style-name="ce42" office:value-type="string" calcext:value-type="string">
            <text:p>染血斗篷</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2" calcext:value-type="float">
            <text:p>-2</text:p>
          </table:table-cell>
          <table:table-cell table:style-name="ce54" office:value-type="float" office:value="5" calcext:value-type="float">
            <text:p>5</text:p>
          </table:table-cell>
          <table:table-cell table:style-name="ce54" office:value-type="float" office:value="20" calcext:value-type="float">
            <text:p>20</text:p>
          </table:table-cell>
          <table:table-cell table:style-name="ce49" office:value-type="string" calcext:value-type="string">
            <text:p>宛如被血染過一樣赤紅的斗篷，能夠吸取失去的血液補充給持有者。</text:p>
            <text:p>你因鮮血真祖異能回復你的HP時，額外回復7點HP。</text:p>
          </table:table-cell>
          <table:table-cell table:style-name="ce54" office:value-type="string" calcext:value-type="string">
            <text:p>IA P78</text:p>
          </table:table-cell>
          <table:table-cell table:style-name="ce53" table:number-columns-repeated="13"/>
          <table:table-cell table:number-columns-repeated="998"/>
        </table:table-row>
        <table:table-row table:style-name="ro2">
          <table:table-cell table:style-name="ce42" office:value-type="string" calcext:value-type="string">
            <text:p>貴人的禮裝</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1" calcext:value-type="float">
            <text:p>-1</text:p>
          </table:table-cell>
          <table:table-cell table:style-name="ce54" office:value-type="float" office:value="10" calcext:value-type="float">
            <text:p>10</text:p>
          </table:table-cell>
          <table:table-cell table:style-name="ce54" office:value-type="float" office:value="30" calcext:value-type="float">
            <text:p>30</text:p>
          </table:table-cell>
          <table:table-cell table:style-name="ce49" office:value-type="string" calcext:value-type="string">
            <text:p>被EX背教者感染的貴族服裝，當你的血沾染上去時能夠暫時強化身心機能。</text:p>
            <text:p>你進行判定前使用，該判定達成值+5，使用該效果時你失去5HP，該效果一劇本可以使用三次，可以在一次判定中重複使用。</text:p>
          </table:table-cell>
          <table:table-cell table:style-name="ce54" office:value-type="string" calcext:value-type="string">
            <text:p>IA P78</text:p>
          </table:table-cell>
          <table:table-cell table:style-name="ce53" table:number-columns-repeated="13"/>
          <table:table-cell table:number-columns-repeated="998"/>
        </table:table-row>
        <table:table-row table:style-name="ro2">
          <table:table-cell table:style-name="ce42" office:value-type="string" calcext:value-type="string">
            <text:p>斑紋的戒指</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使用鮮紅金屬與漆黑寶石製作的戒指，金屬沐浴過大量超越者的鮮血，通過寶石中嵌入的小碎片控制能力。</text:p>
            <text:p>該效果只有在你和你的從者處於同一接戰區域時可以使用，先攻階段使用，你進行戰鬥移動或脫離，該移動距離+10m，該效果一劇本可以使用一次。</text:p>
          </table:table-cell>
          <table:table-cell table:style-name="ce54" office:value-type="string" calcext:value-type="string">
            <text:p>IA P78</text:p>
          </table:table-cell>
          <table:table-cell table:style-name="ce53" table:number-columns-repeated="13"/>
          <table:table-cell table:number-columns-repeated="998"/>
        </table:table-row>
        <table:table-row table:style-name="ro2">
          <table:table-cell table:style-name="ce42" office:value-type="string" calcext:value-type="string">
            <text:p>豐染</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吸取穿著者的血液並更效率變換為異能的荊棘手環。</text:p>
            <text:p>你使用帶有[消費任意點HP]的鮮血真祖異能時，按照實際使用的HP+5進行計算。</text:p>
          </table:table-cell>
          <table:table-cell table:style-name="ce54" office:value-type="string" calcext:value-type="string">
            <text:p>IA P78</text:p>
          </table:table-cell>
          <table:table-cell table:style-name="ce53" table:number-columns-repeated="13"/>
          <table:table-cell table:number-columns-repeated="998"/>
        </table:table-row>
        <table:table-row table:style-name="ro2">
          <table:table-cell table:style-name="ce42" office:value-type="string" calcext:value-type="string">
            <text:p>生命的戒指</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使用正體不明生物的骨頭製作的戒指。</text:p>
            <text:p>與《生命吸收》或《從者吸收》同時使用，使用的異能視作[限制：-]，該效果一劇本可以使用一次。</text:p>
          </table:table-cell>
          <table:table-cell table:style-name="ce54" office:value-type="string" calcext:value-type="string">
            <text:p>IA P78</text:p>
          </table:table-cell>
          <table:table-cell table:style-name="ce53" table:number-columns-repeated="13"/>
          <table:table-cell table:number-columns-repeated="998"/>
        </table:table-row>
        <table:table-row table:style-name="ro2">
          <table:table-cell table:style-name="ce42" office:value-type="string" calcext:value-type="string">
            <text:p>貴人禮贊</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只對鮮血真祖超越者有效的古老裝飾品，能夠讓他人產生攜帶者是高貴的存在的印象。</text:p>
            <text:p>次要動作使用，該主要階段間你進行的【社會】判定骰數+3個，該效果一場景可以使用一次。</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赤河的紅玉</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閃爍著不祥光輝的紅寶石，沐浴大量超越者的血液能讓其光輝增加。</text:p>
            <text:p>你使用《赤河支配者》時傷害額外-2D10。</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薔薇之棺</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纏繞著不朽的薔薇花瓣的被EX背教者感染的棺材，能夠淨化在其中休息的鮮血真祖超越者的血液並放鬆身心。</text:p>
            <text:p>主要動作使用，你的HP回復到最大值，該道具無法在戰鬥中使用，你在下一個場景中無法登場，該效果一劇本可以使用一次。</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鮮血十字</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侵蝕變紅的金屬制十字架飾品，能與從者進行更深的同調。</text:p>
            <text:p>你進行的組合了《交錯攻擊》的攻擊判定骰數+3個，攻擊力+5。</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夜魔的假面</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能讓《夜魔的領域》進行的血液操縱變得更加完美的假面。</text:p>
            <text:p>與《夜魔的領域》同時使用，你在《夜魔的領域》效果中的主要階段進行的主要動作判定骰數+5個。</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紅絨毯</text:p>
          </table:table-cell>
          <table:table-cell table:style-name="ce54" office:value-type="string" calcext:value-type="string">
            <text:p>一般</text:p>
          </table:table-cell>
          <table:table-cell table:style-name="ce54" table:number-columns-repeated="8"/>
          <table:table-cell table:style-name="ce54" office:value-type="float" office:value="35" calcext:value-type="float">
            <text:p>35</text:p>
          </table:table-cell>
          <table:table-cell table:style-name="ce49" office:value-type="string" calcext:value-type="string">
            <text:p>被EX背教者侵蝕的鮮紅絨毯，坐在上面能與所有從者同調。</text:p>
            <text:p>主要動作使用，你所有從者進行的判定骰數+5個，該效果持續到場景結束或你進行移動為止。</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渴望之爪</text:p>
          </table:table-cell>
          <table:table-cell table:style-name="ce54" office:value-type="string" calcext:value-type="string">
            <text:p>一般</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正體不明生物的手，獻上鮮血真祖超越者的血後能暫時取回力量。</text:p>
            <text:p>你進行的組合了有消耗HP效果的鮮血真祖異能的攻擊且消耗了至少1HP時使用，你回復[本次攻擊造成的HP傷害量]的HP，該效果一劇本可以使用一次。</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造血劑</text:p>
          </table:table-cell>
          <table:table-cell table:style-name="ce54" office:value-type="string" calcext:value-type="string">
            <text:p>消耗品</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使用最先端醫療技術進行特殊調整的造血劑，普通來說只有促進血液生成的效果，但鮮血真祖超越者服用後能立刻在體內生成血液。</text:p>
            <text:p>使用會失去HP的鮮血真祖異能前使用，你不會因為該異能失去HP，組合複數異能時選擇其中一個。</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42" office:value-type="string" calcext:value-type="string">
            <text:p>血槽</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用特殊保存容器裝入鮮血真祖血液，能暫時將更多血液用於異能。</text:p>
            <text:p>準備階段使用，你使用的帶有[消費任意點HP]的鮮血真祖異能消費的HP-2（最低1），該效果持續到回合結束。</text:p>
          </table:table-cell>
          <table:table-cell table:style-name="ce54" office:value-type="string" calcext:value-type="string">
            <text:p>IA P79</text:p>
          </table:table-cell>
          <table:table-cell table:style-name="ce53" table:number-columns-repeated="13"/>
          <table:table-cell table:number-columns-repeated="998"/>
        </table:table-row>
        <table:table-row table:style-name="ro2">
          <table:table-cell table:style-name="ce52" office:value-type="string" calcext:value-type="string">
            <text:p>變異魔獸專用道具</text:p>
          </table:table-cell>
          <table:table-cell table:style-name="ce57" office:value-type="string" calcext:value-type="string" table:number-columns-spanned="12" table:number-rows-spanned="1">
            <text:p>只有症候為變異魔獸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質量效應</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5" calcext:value-type="float">
            <text:p>-5</text:p>
          </table:table-cell>
          <table:table-cell table:style-name="ce54" office:value-type="float" office:value="15" calcext:value-type="float">
            <text:p>15</text:p>
          </table:table-cell>
          <table:table-cell table:style-name="ce54" office:value-type="string" calcext:value-type="string">
            <text:p>-</text:p>
          </table:table-cell>
          <table:table-cell table:style-name="ce54" office:value-type="string" calcext:value-type="string">
            <text:p>至近</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被EX背教者感染的擁有異常巨大形狀與重量的棍棒。</text:p>
            <text:p>使用該武器組合《獸之力》進行的近戰攻擊前使用，該攻擊變為[對象：範圍（選擇）]，該效果的對象優先級大於組合異能的對象，該效果一場景可以使用一次。雙手持握。</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野獸鎖鏈</text:p>
          </table:table-cell>
          <table:table-cell table:style-name="ce54" office:value-type="string" calcext:value-type="string">
            <text:p>防具</text:p>
          </table:table-cell>
          <table:table-cell table:style-name="ce54"/>
          <table:table-cell table:style-name="ce53" table:number-columns-repeated="4"/>
          <table:table-cell table:style-name="ce55" office:value-type="string" calcext:value-type="string">
            <text:p>-2/0</text:p>
          </table:table-cell>
          <table:table-cell table:style-name="ce54" office:value-type="float" office:value="0" calcext:value-type="float">
            <text:p>0</text:p>
          </table:table-cell>
          <table:table-cell table:style-name="ce54" office:value-type="float" office:value="7" calcext:value-type="float">
            <text:p>7</text:p>
          </table:table-cell>
          <table:table-cell table:style-name="ce54" office:value-type="float" office:value="10" calcext:value-type="float">
            <text:p>10</text:p>
          </table:table-cell>
          <table:table-cell table:style-name="ce49" office:value-type="string" calcext:value-type="string">
            <text:p>UGN開發的變異魔獸專用鏈甲，完全定制所以即使使用者獸化後也能擁有鎧甲的機能，但在人類狀態下有點礙事。</text:p>
            <text:p>該防具可以在《完全獸化》效果中裝備。你處於《完全獸化》效果中時閃避使用右側數據。</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適應裝甲</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1" calcext:value-type="float">
            <text:p>-1</text:p>
          </table:table-cell>
          <table:table-cell table:style-name="ce54" office:value-type="float" office:value="5" calcext:value-type="float">
            <text:p>5</text:p>
          </table:table-cell>
          <table:table-cell table:style-name="ce54" office:value-type="float" office:value="25" calcext:value-type="float">
            <text:p>25</text:p>
          </table:table-cell>
          <table:table-cell table:style-name="ce49" office:value-type="string" calcext:value-type="string">
            <text:p>使用變異魔獸異能進行肉體變化後也能自適應變化的套裝，變成非人型後因為套裝會變柔軟所以作為防具的能力不算高。</text:p>
            <text:p>你進行近戰攻擊的攻擊力+3。該防具可以在《完全獸化》效果中裝備。</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貪婪羽毛</text:p>
          </table:table-cell>
          <table:table-cell table:style-name="ce54" office:value-type="string" calcext:value-type="string">
            <text:p>防具（輔助）</text:p>
          </table:table-cell>
          <table:table-cell table:style-name="ce54"/>
          <table:table-cell table:style-name="ce53" table:number-columns-repeated="3"/>
          <table:table-cell table:style-name="ce5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15" calcext:value-type="float">
            <text:p>15</text:p>
          </table:table-cell>
          <table:table-cell table:style-name="ce49" office:value-type="string" calcext:value-type="string">
            <text:p>使用在空中自由飛翔的動物超越者的羽毛編織的斗篷。</text:p>
            <text:p>你處於飛行狀態期間攻擊與閃避判定骰數+3個。</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霸王甲</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與超越者結成共生關係的黃金甲蟲，能與變異魔獸的獸化同調賦予共生者黃金色的光芒。</text:p>
            <text:p>該道具可以在《完全獸化》效果中使用。在你使用《完全獸化》之後使用，你接下來進行攻擊的攻擊力+10，每次使用該效果你的侵蝕率+2。</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剃刀鰭</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寄宿遠古背教者的古代鯊魚化石，能夠生長出更加銳利的牙與鰭，但對肉體的副作用很大。</text:p>
            <text:p>你受到《破壞之爪》效果影響期間，空手攻擊力額外+5，使用該效果時每次空手攻擊後失去3HP。</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獸心戒指</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引發你體內背教者中寄宿的變異魔獸症候的鬥爭本能，強化身體能力的戒指。</text:p>
            <text:p>次要動作使用，該場景間你進行的【肉體】判定骰數+2個。該道具可以在《完全獸化》效果中使用。</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大石塊</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常人無法舉起的巨石，變異魔獸可以投出或當做盾牌。</text:p>
            <text:p>你進行格擋的格擋值+5。你進行組合了《飛礫》的攻擊前使用，該攻擊的攻擊力+10，使用該效果後該道具破壞。</text:p>
          </table:table-cell>
          <table:table-cell table:style-name="ce54" office:value-type="string" calcext:value-type="string">
            <text:p>IA P80</text:p>
          </table:table-cell>
          <table:table-cell table:style-name="ce53" table:number-columns-repeated="13"/>
          <table:table-cell table:number-columns-repeated="998"/>
        </table:table-row>
        <table:table-row table:style-name="ro2">
          <table:table-cell table:style-name="ce42" office:value-type="string" calcext:value-type="string">
            <text:p>狩獵皮革</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在狩獵中活躍的動物超越者毛皮。</text:p>
            <text:p>你使用《狩獵姿態》的主要階段中進行近戰攻擊的攻擊力+5。該道具可以在《完全獸化》效果中使用。</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嚎叫之石</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寄宿厭惡束縛熱愛自由的野獸之心的白色石頭，持有者的鬥爭心激昂之時會響起野獸咆哮般的聲音。</text:p>
            <text:p>你進行的使用《復仇之刃》的攻擊的攻擊力+5。</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神獸之牙</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使用被EX背教者侵蝕的獸牙製作的首飾。</text:p>
            <text:p>與《神獸擊》同時使用，該《神獸擊》的效果不會使你的《完全獸化》狀態解除，該效果一劇本可以使用一次。該道具可以在《完全獸化》效果中使用。</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凶獸骨</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感染的野獸骨。</text:p>
            <text:p>你受到《究極獸化》效果期間生效，你進行攻擊造成傷害時使用，該傷害+5D10，使用該效果後你受到[不良狀態：暴走]，該效果一劇本可以使用一次。該道具可以在《完全獸化》效果中使用。</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龍心</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使用被EX背教者侵蝕的輝石製成的項圈，輝石會跟著你的心跳閃爍。</text:p>
            <text:p>你使用《龍鱗》時按照LV+2計算，該效果可以超過最大LV。該道具可以在《完全獸化》效果中使用。</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貝希摩斯之骨</text:p>
          </table:table-cell>
          <table:table-cell table:style-name="ce54" office:value-type="string" calcext:value-type="string">
            <text:p>一般</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將古代巨獸化石加工成籠手，與變異魔獸症候反應後能暫時與使用者同化。</text:p>
            <text:p>你使用《破壞之爪》效果中，你的空手攻擊力+20，使用後你的侵蝕率+10，該效果一劇本可以使用一次。該道具可以在《完全獸化》效果中使用。</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X基因結晶</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感染EX背教者的不可思議結晶，雖然是散發柔和光芒的透明結晶，但被變異魔獸症候的人吞下後會使其皮膚結晶化為水晶狀的物質，味道相當苦。</text:p>
            <text:p>你使用[時機：次要動作]的變異魔獸異能之前使用，該場景間你的裝甲值+5，該效果無法疊加。</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倍增肉</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含有能促進變異魔獸再生能力的特殊成分的人工肉。</text:p>
            <text:p>次要動作使用，你可以立刻使用《鋼之肉體》。該道具可以在《完全獸化》效果中使用。</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42" office:value-type="string" calcext:value-type="string">
            <text:p>災厄的樹果</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被EX背教者感染的特殊植物結出的奇妙果實，被變異魔獸症候的人吞下後能獲得令人畏懼的力量，味道很甜。</text:p>
            <text:p>你使用[時機：次要動作]的變異魔獸異能之前使用，該場景間你使用空手攻擊的攻擊力+5，該效果無法疊加。</text:p>
          </table:table-cell>
          <table:table-cell table:style-name="ce54" office:value-type="string" calcext:value-type="string">
            <text:p>IA P81</text:p>
          </table:table-cell>
          <table:table-cell table:style-name="ce53" table:number-columns-repeated="13"/>
          <table:table-cell table:number-columns-repeated="998"/>
        </table:table-row>
        <table:table-row table:style-name="ro2">
          <table:table-cell table:style-name="ce52" office:value-type="string" calcext:value-type="string">
            <text:p>流亡畸體專用道具</text:p>
          </table:table-cell>
          <table:table-cell table:style-name="ce57" office:value-type="string" calcext:value-type="string" table:number-columns-spanned="12" table:number-rows-spanned="1">
            <text:p>只有症候為流亡畸體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無限鞭</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5" calcext:value-type="float">
            <text:p>5</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10" calcext:value-type="float">
            <text:p>10</text:p>
          </table:table-cell>
          <table:table-cell table:style-name="ce49" office:value-type="string" calcext:value-type="string">
            <text:p>以《伸縮腕》為攻擊前提製作的鞭子。</text:p>
            <text:p>使用該武器組合《伸縮腕》進行的攻擊傷害+1D10。</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幻惑的外套</text:p>
          </table:table-cell>
          <table:table-cell table:style-name="ce54" office:value-type="string" calcext:value-type="string">
            <text:p>防具（輔助）</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5" calcext:value-type="float">
            <text:p>5</text:p>
          </table:table-cell>
          <table:table-cell table:style-name="ce54" office:value-type="float" office:value="15" calcext:value-type="float">
            <text:p>15</text:p>
          </table:table-cell>
          <table:table-cell table:style-name="ce49" office:value-type="string" calcext:value-type="string">
            <text:p>隱藏身體輪廓的外套，流亡畸體症候超越者披上以後能夠隱藏要害。</text:p>
            <text:p>你進行的閃避判定骰數+2個。</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九生足</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與超越者結成共生關係、有九條腿的塔藍圖拉毒蛛。能賦予流亡畸體不死身般的生命力。</text:p>
            <text:p>你因為任何效果從戰鬥不能狀態回復時使用，你回復10HP，使用該效果後你的侵蝕率+1。</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剛毅之骨</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將你的骨骼改造為耐受攻擊的形狀。</text:p>
            <text:p>你的裝甲值+5，該效果只在你受到《形狀變化：剛》的效果影響期間生效。</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秘密之眼</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在你身體某處植入的義眼，能如同正常眼睛一樣視物。</text:p>
            <text:p>你進行的&lt;知覺&gt;&lt;閃避&gt;判定骰數+1。</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死毒袋</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埋在體內生成毒素的人工臟器，能使你對所有的毒素耐性提高。</text:p>
            <text:p>你造成的[不良狀態：邪毒]等級+1，你不會受到[不良狀態：邪毒]的傷害。</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無形之骨</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將你的骨骼改造為自由變化的形狀。</text:p>
            <text:p>你進行的近戰攻擊判定骰數+2個，該效果只在你受到《形狀變化：柔》的效果影響期間生效。</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惡食之珍饈</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擁有促進人體回復效果的某種食物，但是消化效率很差，沒有流亡畸體的消化能力的話效果很弱。</text:p>
            <text:p>次要動作使用，你回復2D10HP，該效果一劇本可以使用三次。</text:p>
          </table:table-cell>
          <table:table-cell table:style-name="ce54" office:value-type="string" calcext:value-type="string">
            <text:p>IA P82</text:p>
          </table:table-cell>
          <table:table-cell table:style-name="ce53" table:number-columns-repeated="13"/>
          <table:table-cell table:number-columns-repeated="998"/>
        </table:table-row>
        <table:table-row table:style-name="ro2">
          <table:table-cell table:style-name="ce42" office:value-type="string" calcext:value-type="string">
            <text:p>再生細胞</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體內埋入了能迅速回復《細胞侵蝕》消耗的細胞的特殊器官。</text:p>
            <text:p>與《細胞侵蝕》同時使用，回復一次《細胞侵蝕》的使用次數，該效果一劇本可以使用一次。</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死神的鋼絲</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為流亡畸體使用而開發的非常強韌的特殊纖維繩，能擋住各種攻擊，平時可以偽裝成髮絲。</text:p>
            <text:p>你使用的《魔鬼之網》額外-7HP傷害。</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金屬骨骼</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使用手術將你體內的骨骼替換為金屬制，對能將骨頭作為武器的流亡畸體症候來說雖然能獲得更強的武器但是也會傷到自己。</text:p>
            <text:p>你使用《骨之劍》《骨之銃》製作的武器進行攻擊時，攻擊力+5，但你使用《骨之劍》《骨之銃》時失去3HP。</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獻祭的石假面</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戴上後能與肉體融合並大幅強化生命力的破裂石假面，據說會吞噬使用者的理性。</text:p>
            <text:p>準備階段使用，你的HP最大值和當前值+20，該效果持續到場景結束，使用時你的侵蝕率+5，該效果一劇本可以使用一次。</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蠱毒之壺</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使用遙遠過去傳承的咒術手法製成的猛毒，流亡畸體症候的人攝入體內後能使血液帶毒。</text:p>
            <text:p>你使用空手攻擊造成至少1HP傷害時，作為傷害的替代可以改為造成[不良狀態：邪毒3]，也可以不造成該效果而正常造成傷害。</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螺旋驅動體</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如同獨自旋轉的陀螺般的石頭，推測為被EX背教者感染的物體，能讓流亡畸體身體變化產生螺旋狀的高速回轉。</text:p>
            <text:p>你進行的組合流亡畸體異能的攻擊使對象格擋值-10，使用該效果後你的侵蝕率+1。</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真實之身</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在體內準備了預備身體，並非《另一個自我》那樣是複製體，而是真正的本體。</text:p>
            <text:p>與《另一個自我》同時使用，你回復30HP，該效果一劇本可以使用一次。</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黃金骨</text:p>
          </table:table-cell>
          <table:table-cell table:style-name="ce54" office:value-type="string" calcext:value-type="string">
            <text:p>一般</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在體內埋入被EX背教者侵蝕的骨頭，這塊骨頭散發著黃金色的光輝，比鋼鐵更堅硬，又能如液體般自由變形。</text:p>
            <text:p>你使用《骨之劍》《骨之銃》製作的武器攻擊力+10，使用該效果製作的武器進行的攻擊無視對象裝甲值。</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42" office:value-type="string" calcext:value-type="string">
            <text:p>預備心臟</text:p>
          </table:table-cell>
          <table:table-cell table:style-name="ce54" office:value-type="string" calcext:value-type="string">
            <text:p>消耗品</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使用被EX背教者感染的樹果作為核心製作的第二顆心臟，目前只有流亡畸體的人適合。</text:p>
            <text:p>你陷入戰鬥不能狀態時使用，你從戰鬥不能狀態回復並回復至1HP，使用該效果時你的侵蝕率+1D10。稀有道具。</text:p>
          </table:table-cell>
          <table:table-cell table:style-name="ce54" office:value-type="string" calcext:value-type="string">
            <text:p>IA P83</text:p>
          </table:table-cell>
          <table:table-cell table:style-name="ce53" table:number-columns-repeated="13"/>
          <table:table-cell table:number-columns-repeated="998"/>
        </table:table-row>
        <table:table-row table:style-name="ro2">
          <table:table-cell table:style-name="ce52" office:value-type="string" calcext:value-type="string">
            <text:p>疾速靈猿專用道具</text:p>
          </table:table-cell>
          <table:table-cell table:style-name="ce57" office:value-type="string" calcext:value-type="string" table:number-columns-spanned="12" table:number-rows-spanned="1">
            <text:p>只有症候為疾速靈猿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音波</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4" calcext:value-type="float">
            <text:p>-4</text:p>
          </table:table-cell>
          <table:table-cell table:style-name="ce54" office:value-type="float" office:value="6" calcext:value-type="float">
            <text:p>6</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10" calcext:value-type="float">
            <text:p>10</text:p>
          </table:table-cell>
          <table:table-cell table:style-name="ce49" office:value-type="string" calcext:value-type="string">
            <text:p>被EX背教者侵蝕的吉他或小號等樂器。</text:p>
            <text:p>次要動作使用，主要動作進行的&lt;RC&gt;判定和疾速靈猿簡易異能判定骰數+2個。</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烈風鉤鐮</text:p>
          </table:table-cell>
          <table:table-cell table:style-name="ce54" office:value-type="string" calcext:value-type="string">
            <text:p>近戰/射擊</text:p>
          </table:table-cell>
          <table:table-cell table:style-name="ce54" office:value-type="string" calcext:value-type="string">
            <text:p>&lt;近戰&gt;/&lt;射擊&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2" calcext:value-type="float">
            <text:p>2</text:p>
          </table:table-cell>
          <table:table-cell table:style-name="ce54" office:value-type="string" calcext:value-type="string">
            <text:p>至近/2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攻擊速度越快就越鋒利的單手鐮，可以投擲且投出後會回到手裡。</text:p>
            <text:p>以[種類：射擊]使用時使用右側數據，使用該武器進行組合疾速靈猿異能攻擊的攻擊力+5。</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風蝕之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將強腐蝕性的氣體使用疾速靈猿操縱振動的能力構成劍型的武器，可以將各種物質用腐蝕氣體溶解切斷。</text:p>
            <text:p>次要動作使用，該場景間可以作為武器使用。使用該武器進行的攻擊無視對象裝甲值。</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防禦刀鋒</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特化切開對方攻擊的匕首。</text:p>
            <text:p>你進行組合《切落》的判定骰數+3個。</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亂舞之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12" calcext:value-type="float">
            <text:p>12</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能將使用者的速度暫時超加速的日本刀。</text:p>
            <text:p>使用該武器進行組合《獅子奮迅》的近戰攻擊判定前使用，該攻擊變為[對象：場景（選擇）][射程：視野]，該效果的對象與射程優先級大於組合異能的對象與射程，該效果一劇本可以使用一次。</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風斬絲</text:p>
          </table:table-cell>
          <table:table-cell table:style-name="ce54" office:value-type="string" calcext:value-type="string">
            <text:p>近戰</text:p>
          </table:table-cell>
          <table:table-cell table:style-name="ce54" office:value-type="string" calcext:value-type="string">
            <text:p>&lt;近戰&gt;</text:p>
          </table:table-cell>
          <table:table-cell table:style-name="ce55" office:value-type="string" calcext:value-type="string">
            <text:p>-5/0</text:p>
          </table:table-cell>
          <table:table-cell table:style-name="ce54" office:value-type="float" office:value="16" calcext:value-type="float">
            <text:p>16</text:p>
          </table:table-cell>
          <table:table-cell table:style-name="ce54" office:value-type="float" office:value="0" calcext:value-type="float">
            <text:p>0</text:p>
          </table:table-cell>
          <table:table-cell table:style-name="ce54" office:value-type="string" calcext:value-type="string">
            <text:p>15m</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將非常強韌又銳利的納米碳纖維繩用疾速靈猿異能操縱的武器，看起來就像是無數絲線被風操控。</text:p>
            <text:p>使用該武器組合兩個以上疾速靈猿異能時，命中使用右側數據。</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凪之太刀</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style-name="ce55" office:value-type="string" calcext:value-type="string">
            <text:p>10/30</text:p>
          </table:table-cell>
          <table:table-cell table:style-name="ce54" office:value-type="float" office:value="4" calcext:value-type="float">
            <text:p>4</text:p>
          </table:table-cell>
          <table:table-cell table:style-name="ce54" office:value-type="string" calcext:value-type="string">
            <text:p>至近</text:p>
          </table:table-cell>
          <table:table-cell table:style-name="ce54" table:number-columns-repeated="3"/>
          <table:table-cell table:style-name="ce54" office:value-type="float" office:value="100" calcext:value-type="float">
            <text:p>100</text:p>
          </table:table-cell>
          <table:table-cell table:style-name="ce49" office:value-type="string" calcext:value-type="string">
            <text:p>銳利的一揮連風都能切斷的太刀。</text:p>
            <text:p>使用該武器進行的攻擊判定骰數+2個，你的行動值在20以上時，攻擊力使用右側數據。</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聲波裝甲</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5" calcext:value-type="float">
            <text:p>-5</text:p>
          </table:table-cell>
          <table:table-cell table:style-name="ce54" office:value-type="float" office:value="3" calcext:value-type="float">
            <text:p>3</text:p>
          </table:table-cell>
          <table:table-cell table:style-name="ce54" office:value-type="float" office:value="15" calcext:value-type="float">
            <text:p>15</text:p>
          </table:table-cell>
          <table:table-cell table:style-name="ce49" office:value-type="string" calcext:value-type="string">
            <text:p>各處裝有小型音響的特殊防護服，由可以操控音波的疾速靈猿使用時能使用音壓擋開敵人的攻擊，但音響阻礙行動是一大缺點。</text:p>
            <text:p>你進行的回應動作，達成值+5。</text:p>
          </table:table-cell>
          <table:table-cell table:style-name="ce54" office:value-type="string" calcext:value-type="string">
            <text:p>IA P84</text:p>
          </table:table-cell>
          <table:table-cell table:style-name="ce53" table:number-columns-repeated="13"/>
          <table:table-cell table:number-columns-repeated="998"/>
        </table:table-row>
        <table:table-row table:style-name="ro2">
          <table:table-cell table:style-name="ce42" office:value-type="string" calcext:value-type="string">
            <text:p>波紋之衣</text:p>
          </table:table-cell>
          <table:table-cell table:style-name="ce54" office:value-type="string" calcext:value-type="string">
            <text:p>防具（輔助）</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20" calcext:value-type="float">
            <text:p>20</text:p>
          </table:table-cell>
          <table:table-cell table:style-name="ce49" office:value-type="string" calcext:value-type="string">
            <text:p>內藏能增幅你放出波動裝置的羽衣，可以穿在衣服外面。</text:p>
            <text:p>你使用《波紋的方陣》額外-2D10傷害。</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踏風之靴</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最適合疾速靈猿超越者奔跑的運動鞋。</text:p>
            <text:p>你進行的閃避判定骰數+2個，每次閃避時你的侵蝕率+1。</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永恆節拍</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讓你的戰鬥力提高的音源及其演奏裝置。</text:p>
            <text:p>你受到《戰鬥節拍》效果期間進行的攻擊傷害+1D10。</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音波顯示器</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疾速靈猿超越者放出的超聲波在護目鏡中可視化的頭盔，可以借此獲得將對方直到內部都看得一乾二淨的優勢。</text:p>
            <text:p>你使用主要動作進行判定前使用，該判定骰數+2個，該效果一劇本可以使用三次。</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喚風的小瓶</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被稱為風精的背教者生命體封入其中的小瓶子，它能聽從你的意志輔助異能。</text:p>
            <text:p>你使用《援護之風》前使用，該《援護之風》生效的判定骰數額外+5個，該效果一劇本可以使用一次。</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七裡靴</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曾經由一名跑的很快的超越者使用的被EX背教者感染的鞋，七裡的距離都能在一瞬間跨越。</text:p>
            <text:p>你的行動值+5，你可以使用戰鬥移動脫離接戰區。</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暴風的小瓶</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被稱為風精的背教者生命體封入其中的小瓶子，它異常狂暴，從瓶中放出後會掀起狂風。</text:p>
            <text:p>你使用組合疾速靈猿異能的&lt;RC&gt;攻擊時使用，該攻擊的攻擊力+10，該效果一劇本可以使用一次。</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心跳的碎片</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與《神速的鼓動》相反應，寄宿著特殊聲音的金屬片，能發出表示擁有者心之所向的聲音。</text:p>
            <text:p>你組合《神速的鼓動》進行的判定骰數+5個，使用後你受到[不良狀態：暴走]。</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42" office:value-type="string" calcext:value-type="string">
            <text:p>音速播放器</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將音波與振動強化後放出的播放器。</text:p>
            <text:p>你使用疾速靈猿異能製作的武器攻擊力+5。</text:p>
          </table:table-cell>
          <table:table-cell table:style-name="ce54" office:value-type="string" calcext:value-type="string">
            <text:p>IA P85</text:p>
          </table:table-cell>
          <table:table-cell table:style-name="ce53" table:number-columns-repeated="13"/>
          <table:table-cell table:number-columns-repeated="998"/>
        </table:table-row>
        <table:table-row table:style-name="ro2">
          <table:table-cell table:style-name="ce52" office:value-type="string" calcext:value-type="string">
            <text:p>煉金化形專用道具</text:p>
          </table:table-cell>
          <table:table-cell table:style-name="ce57" office:value-type="string" calcext:value-type="string" table:number-columns-spanned="12" table:number-rows-spanned="1">
            <text:p>只有症候為煉金化形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治癒之杖</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1" calcext:value-type="float">
            <text:p>1</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被EX背教者侵蝕的杖，上面有蛇的紋飾。</text:p>
            <text:p>你使用的《治癒》額外回復對象2D10HP。</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砂塵之杖</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某煉金化形症候超越者用煉成的石頭製作的杖，能增幅操縱沙子的異能。</text:p>
            <text:p>你進行的組合《砂之刃》的攻擊判定骰數+2個，攻擊力+3。雙手持握。</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封魔之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string" calcext:value-type="string">
            <text:p>0/16</text:p>
          </table:table-cell>
          <table:table-cell table:style-name="ce54" office:value-type="float" office:value="5" calcext:value-type="float">
            <text:p>5</text:p>
          </table:table-cell>
          <table:table-cell table:style-name="ce54" office:value-type="string" calcext:value-type="string">
            <text:p>至近</text:p>
          </table:table-cell>
          <table:table-cell table:style-name="ce54" table:number-columns-repeated="3"/>
          <table:table-cell table:style-name="ce54" office:value-type="float" office:value="40" calcext:value-type="float">
            <text:p>40</text:p>
          </table:table-cell>
          <table:table-cell table:style-name="ce49" office:value-type="string" calcext:value-type="string">
            <text:p>使用古舊的布鞘封印的雙手劍，可以用煉金化形異能解除封印，布鞘也會化為使用者的斗篷。</text:p>
            <text:p>次要動作使用，該場景間攻擊力使用右側數值，你的裝甲值+7，使用該效果後你的侵蝕率+5。雙手持握。</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贗作王的秘本</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記錄了仿造各種道具的煉金化形煉成秘訣的書。</text:p>
            <text:p>取得時選擇煉金化形專用道具以外的一件症候專用獨特道具，你取得該道具並可以使用，取得所需的經驗值需要額外支付。該道具最多可以取得3個。</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巨匠的秘本</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記述了展示道具本質的睿智的書籍。</text:p>
            <text:p>取得時選擇一項技能，你取得的《巨匠的記憶》可以與該技能組合使用，但不能用於攻擊和閃避判定。</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煉金秘本</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中世紀的煉金術師們將其秘密儀式遺留後世的書籍，擁有變換物質之力的煉金化形閱讀此書後不會再受金錢問題困擾，但有精神墮落的可能性。</text:p>
            <text:p>你使用《黃金煉成》得到的常備化點數變為[+[LV×15]]，取得該道具時你的基本侵蝕率+2。</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變化無常板</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複數板塊組成的圓盤與將其固定在手腕上的手環為一套的組合，能與使用者的《盾牌創造》反應展開板塊，變成各種形狀的盾。</text:p>
            <text:p>你使用《盾牌創造》製作的武器格擋值+5。</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水晶箱</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能將煉金化形症候的力量增幅並傳向對象武器的小箱子。</text:p>
            <text:p>與《水晶之劍》同時使用，該《水晶之劍》效果生效期間使用對象武器進行的攻擊判定骰數+2個。</text:p>
          </table:table-cell>
          <table:table-cell table:style-name="ce54" office:value-type="string" calcext:value-type="string">
            <text:p>IA P86</text:p>
          </table:table-cell>
          <table:table-cell table:style-name="ce53" table:number-columns-repeated="13"/>
          <table:table-cell table:number-columns-repeated="998"/>
        </table:table-row>
        <table:table-row table:style-name="ro2">
          <table:table-cell table:style-name="ce42" office:value-type="string" calcext:value-type="string">
            <text:p>獨眼巨人之手</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侵蝕的漆黑手套，擁有能將《巨型轉換》製作的物質精度提升的能力。</text:p>
            <text:p>與《巨型轉換》同時使用，與《巨型轉換》組合的判定達成值+20，使用後你受到[不良狀態：暴走]，該效果一劇本可以使用一次。</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結晶彈</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使用異能製作的箭矢或子彈，能從命中處將目標結晶化並粉碎，但使用的武器也會同樣粉碎。</text:p>
            <text:p>次要動作使用，該主要階段間使用[種類：射擊]武器進行攻擊的攻擊力+10，判定後你裝備的武器全部破壞。該道具最多可以常備化3個。</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鋼鐵砂塵</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增強煉金化形症候力量的黑色沙子。</text:p>
            <text:p>與製作武器、載具的煉金化形異能同時使用，製作的道具攻擊力+3。</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劍星的星砂</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據說是從空中降下的星星碎片，這種沙子與煉金化形異能的親和性非常高。</text:p>
            <text:p>準備階段使用，你立刻組合使用最多3個[時機：次要動作]的煉金化形異能，使用該效果後你的侵蝕率+2。</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白銀砂塵</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將煉金化形症候的防具硬度增強的白色沙子。</text:p>
            <text:p>與製作武器、防具、載具的煉金化形異能同時使用，武器的格擋值+3，防具、載具的裝甲值+5。</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虹色之砂</text:p>
          </table:table-cell>
          <table:table-cell table:style-name="ce54" office:value-type="string" calcext:value-type="string">
            <text:p>消耗品</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能將煉金化形症候的力量瞬間集中、帶有不可思議色彩的沙子，被認為是EX背教者的粉末。</text:p>
            <text:p>你使用煉金化形異能之前使用，組合的所有煉金化形異能全部侵蝕值-1（最低0），該效果不會讓你的侵蝕率減少。稀有道具。</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毀滅的結晶</text:p>
          </table:table-cell>
          <table:table-cell table:style-name="ce54" office:value-type="string" calcext:value-type="string">
            <text:p>消耗品</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將煉金化形症候的力量發揮到超越極限的結晶。</text:p>
            <text:p>與你組合煉金化形異能進行的攻擊同時使用，該攻擊傷害+3D10，你失去20HP。稀有道具。</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夢幻的心臟</text:p>
          </table:table-cell>
          <table:table-cell table:style-name="ce54" office:value-type="string" calcext:value-type="string">
            <text:p>消耗品</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暫時將背教者之力強化的不可思議物體，有像水晶一樣的結晶體，也有果實或玩偶等形態。</text:p>
            <text:p>你使用[時機：次要動作]的煉金化形異能前使用，該場景間該異能的LV+2，可以超過LV上限，組合複數異能時從中選擇其中一個。稀有道具。</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42" office:value-type="string" calcext:value-type="string">
            <text:p>原初的混沌</text:p>
          </table:table-cell>
          <table:table-cell table:style-name="ce54" office:value-type="string" calcext:value-type="string">
            <text:p>消耗品</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被EX背教者感染的不定型粘體，在煉金化形超越者手中能夠給予其渴望的物品形狀，但會很快毀壞。</text:p>
            <text:p>任何時候都可以使用，你獲得任意獨特道具，此時你可以獲得你沒有的症候的獨特道具並使用，該道具在場景結束時（戰鬥中為回合結束時）破壞。稀有道具。</text:p>
          </table:table-cell>
          <table:table-cell table:style-name="ce54" office:value-type="string" calcext:value-type="string">
            <text:p>IA P87</text:p>
          </table:table-cell>
          <table:table-cell table:style-name="ce53" table:number-columns-repeated="13"/>
          <table:table-cell table:number-columns-repeated="998"/>
        </table:table-row>
        <table:table-row table:style-name="ro2">
          <table:table-cell table:style-name="ce52" office:value-type="string" calcext:value-type="string">
            <text:p>神腦演算專用道具</text:p>
          </table:table-cell>
          <table:table-cell table:style-name="ce57" office:value-type="string" calcext:value-type="string" table:number-columns-spanned="12" table:number-rows-spanned="1">
            <text:p>只有症候為神腦演算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腦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被EX背教者感染的格鬥匕首，可以將情報分析、狀況預測直接傳入使用者的大腦，但因為情報量過大只有精神強韌的持有者才能使用。</text:p>
            <text:p>該武器只能在組合《思考陣列》進行攻擊時使用，該判定骰數+4個。</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閃電反擊</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3" calcext:value-type="float">
            <text:p>3</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組裝能與神腦演算超越者的超高速演算反應的程序的手槍，可以瞄準對方攻過來時露出破綻的瞬間。</text:p>
            <text:p>使用該武器組合《反擊》的攻擊命中時無視對象裝甲值計算傷害。</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射手座</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14" calcext:value-type="float">
            <text:p>14</text:p>
          </table:table-cell>
          <table:table-cell table:style-name="ce54" office:value-type="string" calcext:value-type="string">
            <text:p>-</text:p>
          </table:table-cell>
          <table:table-cell table:style-name="ce54" office:value-type="string" calcext:value-type="string">
            <text:p>200m</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可以同時標記複數目標的高智能步槍。</text:p>
            <text:p>你使用《鎖定》時，該主要階段間使用該武器進行的攻擊變為[對象：3體]，該武器的對象優先級大於組合異能的對象，該效果一劇本可以使用一次。至近不可。</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塌毀</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25" calcext:value-type="float">
            <text:p>25</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100" calcext:value-type="float">
            <text:p>100</text:p>
          </table:table-cell>
          <table:table-cell table:style-name="ce49" office:value-type="string" calcext:value-type="string">
            <text:p>使用高度演算貫穿各種防禦的手槍。</text:p>
            <text:p>次要動作使用，使用該武器進行的攻擊無法被格擋，該效果一場景可以使用一次。</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關聯：戰神的軍師</text:p>
          </table:table-cell>
          <table:table-cell table:style-name="ce54" office:value-type="string" calcext:value-type="string">
            <text:p>關聯</text:p>
          </table:table-cell>
          <table:table-cell table:style-name="ce54" office:value-type="string" calcext:value-type="string">
            <text:p>參照解說</text:p>
          </table:table-cell>
          <table:table-cell table:style-name="ce54" table:number-columns-repeated="7"/>
          <table:table-cell table:style-name="ce54" office:value-type="float" office:value="30" calcext:value-type="float">
            <text:p>30</text:p>
          </table:table-cell>
          <table:table-cell table:style-name="ce49" office:value-type="string" calcext:value-type="string">
            <text:p>利用神腦演算的網絡追擊一人。</text:p>
            <text:p>與《戰神的祝福》同時使用，該攻擊不消耗《戰神的祝福》使用次數，該效果只用於[對象：單體]攻擊。</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暗中資產</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最大限度利用神腦演算的頭腦獲得大量財產。</text:p>
            <text:p>《黑市》獲得的常備化點數變為[+LV×10+10]，取得該道具時你的基本侵蝕率+2。</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弱點製造者</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為了確實瞄準敵人弱點製作的戰術AI及其演算終端。</text:p>
            <text:p>你使用《弱點看破》時對象的攻擊力額外+5，使用該效果時你的侵蝕率+1。</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雙槽</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搭載了與使用者同等思考能力但擁有不同判斷基準的人工智能的終端，可以從複數視角尋找現狀的解決辦法，多數是觸摸平板或小型無人機型，啟動時可以按照你的狀況進行設定。</text:p>
            <text:p>次要動作使用，該場景間你進行的【精神】判定骰數+2個。</text:p>
          </table:table-cell>
          <table:table-cell table:style-name="ce54" office:value-type="string" calcext:value-type="string">
            <text:p>IA P88</text:p>
          </table:table-cell>
          <table:table-cell table:style-name="ce53" table:number-columns-repeated="13"/>
          <table:table-cell table:number-columns-repeated="998"/>
        </table:table-row>
        <table:table-row table:style-name="ro2">
          <table:table-cell table:style-name="ce42" office:value-type="string" calcext:value-type="string">
            <text:p>先進護目鏡</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連接UGN數據中心的AR護目鏡，能獲得視野中所有物體的大量情報，神腦演算以外的超越者根本無法處理，也不能在戰鬥中用作數據分析。</text:p>
            <text:p>你在戰鬥之外使用主要動作進行的判定骰數+2個。</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干擾無人機</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根據你的指示對敵人進行干擾的無人機，想要使用需要神腦演算症候強化思考能力。</text:p>
            <text:p>於你進行組合神腦演算異能的攻擊時使用，對該判定進行的回應動作骰數-5個，該效果一劇本可以使用一次。</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戰術無人機</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根據你的指示對隊友進行支援的無人機，想要使用需要神腦演算症候強化思考能力。</text:p>
            <text:p>你將《支援射擊》應用于攻擊判定時使用，該攻擊的攻擊力+7，該效果一劇本可以使用三次。</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戰鬥偵察兵</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連接網絡的分析用單眼鏡，能夠推測對方行動並提示出能封印對方各種行動的計劃。</text:p>
            <text:p>次要動作使用，選擇一名場景中登場的角色，該場景間對象行動值-5，該效果一場景可以使用一次。</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技能專家</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為了將《技能集中》特化的技術能更有效率地運用的戰術和訓練。</text:p>
            <text:p>你進行的組合《技能集中》的判定達成值+5，該判定為攻擊判定時攻擊力再+5。</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詩聖之書</text:p>
          </table:table-cell>
          <table:table-cell table:style-name="ce54" office:value-type="string" calcext:value-type="string">
            <text:p>一般</text:p>
          </table:table-cell>
          <table:table-cell table:style-name="ce54" table:number-columns-repeated="8"/>
          <table:table-cell table:style-name="ce54" office:value-type="float" office:value="35" calcext:value-type="float">
            <text:p>35</text:p>
          </table:table-cell>
          <table:table-cell table:style-name="ce49" office:value-type="string" calcext:value-type="string">
            <text:p>被稱為瘋狂天才的詩人留下的未出版作品集，聽到就會使精神被破壞，閱讀的人也會分心。</text:p>
            <text:p>你進行的組合[技能：交涉]異能的射擊攻擊的攻擊力+7，使用該效果時你的侵蝕率+1。</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死神之書</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只有和擁有神腦演算症候的持有者共鳴後才能翻開的神秘漆黑書籍，被在上面寫下名字的人會被致命的命運束縛。</text:p>
            <text:p>準備階段使用，場景內的一名對象在該場景間受到的傷害+10，該效果一劇本可以使用一次。</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支援系統</text:p>
          </table:table-cell>
          <table:table-cell table:style-name="ce54" office:value-type="string" calcext:value-type="string">
            <text:p>消耗品</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沒有神腦領域的超天才頭腦就無法控制，非常強大的行動支援用電腦程序。</text:p>
            <text:p>你進行&lt;駕駛：●●&gt;&lt;藝術：●●&gt;&lt;知識：●●&gt;&lt;情報：●●&gt;判定前使用，該判定骰數+2個。</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42" office:value-type="string" calcext:value-type="string">
            <text:p>死神</text:p>
          </table:table-cell>
          <table:table-cell table:style-name="ce54" office:value-type="string" calcext:value-type="string">
            <text:p>消耗品</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預測戰場發揮十成威力的子彈，使用弓的話就是箭，使用小刀的話就是速效毒藥，可以根據你的武器設定。</text:p>
            <text:p>你使用[對象：單體]射擊武器進行的攻擊前使用，該攻擊的攻擊力+10。稀有道具。</text:p>
          </table:table-cell>
          <table:table-cell table:style-name="ce54" office:value-type="string" calcext:value-type="string">
            <text:p>IA P89</text:p>
          </table:table-cell>
          <table:table-cell table:style-name="ce53" table:number-columns-repeated="13"/>
          <table:table-cell table:number-columns-repeated="998"/>
        </table:table-row>
        <table:table-row table:style-name="ro2">
          <table:table-cell table:style-name="ce52" office:value-type="string" calcext:value-type="string">
            <text:p>冥府領域專用道具</text:p>
          </table:table-cell>
          <table:table-cell table:style-name="ce57" office:value-type="string" calcext:value-type="string" table:number-columns-spanned="12" table:number-rows-spanned="1">
            <text:p>只有症候為冥府領域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黃金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8" calcext:value-type="float">
            <text:p>8</text:p>
          </table:table-cell>
          <table:table-cell table:style-name="ce54" office:value-type="float" office:value="4" calcext:value-type="float">
            <text:p>4</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帶有豪華裝飾的長劍，使用被EX背教者侵蝕的黃金和寶石做裝飾，能將你對領域的支配力轉換成威力。</text:p>
            <text:p>使用該武器進行的攻擊判定骰數+[該攻擊組合的冥府領域異能數]個。</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統治外套</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1" calcext:value-type="float">
            <text:p>-1</text:p>
          </table:table-cell>
          <table:table-cell table:style-name="ce54" office:value-type="float" office:value="6" calcext:value-type="float">
            <text:p>6</text:p>
          </table:table-cell>
          <table:table-cell table:style-name="ce54" office:value-type="float" office:value="20" calcext:value-type="float">
            <text:p>20</text:p>
          </table:table-cell>
          <table:table-cell table:style-name="ce49" office:value-type="string" calcext:value-type="string">
            <text:p>調整為適應你製作的領域環境的外套，可以根據領域的情況增幅你的力量。</text:p>
            <text:p>不能與[種類：防具（輔助）]同時裝備，你使用《奈落的法則》的回合間進行的&lt;RC&gt;判定骰數+4個。</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牽絆的愛馬</text:p>
          </table:table-cell>
          <table:table-cell table:style-name="ce54" office:value-type="string" calcext:value-type="string">
            <text:p>載具</text:p>
          </table:table-cell>
          <table:table-cell table:style-name="ce54" office:value-type="string" calcext:value-type="string">
            <text:p>&lt;駕駛：馬&gt;</text:p>
          </table:table-cell>
          <table:table-cell table:style-name="ce54"/>
          <table:table-cell table:style-name="ce54" office:value-type="float" office:value="4" calcext:value-type="float">
            <text:p>4</text:p>
          </table:table-cell>
          <table:table-cell table:style-name="ce54" table:number-columns-repeated="3"/>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float" office:value="20" calcext:value-type="float">
            <text:p>20</text:p>
          </table:table-cell>
          <table:table-cell table:style-name="ce49" office:value-type="string" calcext:value-type="string">
            <text:p>被EX背教者感染，與冥府領域症候的主人間的感應被提高至極的超越者馬，全力移動：100m。</text:p>
            <text:p>你組合冥府領域異能進行的判定骰數+2個。</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米密爾的記錄</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記錄了知識之泉的守護者擁有的所有知識的古書，全部頁面都是白紙，只有注入冥府領域的因子才會顯現出文字。</text:p>
            <text:p>你進行情報收集判定前使用，選擇[種類：關聯]中的一個，不能選擇取得或常備化有限制的關聯，該場景間該道具擁有該關聯相同的效果，該效果一劇本可以使用一次。</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靈魂夥伴</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被你進行過特殊訓練的動物，這獨一無二的搭檔能更準確地支援你的行動。</text:p>
            <text:p>取得時選擇一項技能，你可以組合《動物馴服》進行該技能判定，該獨特道具無法複數取得。</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領域終端</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對你的冥府領域領域進行分析管理的數據中心終端，你能利用它獲得各種社會活動的恩惠。</text:p>
            <text:p>次要動作使用，該場景間你下一次進行的【社會】判定骰數+3個，該效果一場景可以使用一次。</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監管者區域</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封閉了曾被稱為聖地的地點的植物的種子，能與冥府領域異能產生反應化為擊退侵入的敵人的武器。</text:p>
            <text:p>你使用《綠之鞭》製作的武器攻擊力+7，格擋值+4，你可以使用《綠之鞭》同時製作兩件武器。</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歪曲王國</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注入某人因子的西洋風城池模型，能與冥府領域症候的主人感應，將其對領域的支配能力強化至極限。</text:p>
            <text:p>你組合冥府領域異能進行攻擊的攻擊力+5。稀有道具。</text:p>
          </table:table-cell>
          <table:table-cell table:style-name="ce54" office:value-type="string" calcext:value-type="string">
            <text:p>IA P90</text:p>
          </table:table-cell>
          <table:table-cell table:style-name="ce53" table:number-columns-repeated="13"/>
          <table:table-cell table:number-columns-repeated="998"/>
        </table:table-row>
        <table:table-row table:style-name="ro2">
          <table:table-cell table:style-name="ce42" office:value-type="string" calcext:value-type="string">
            <text:p>支配者的王笏</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象徵支配的王笏。</text:p>
            <text:p>你對自己以外的對象使用不會造成傷害的冥府領域異能前使用，該異能LV+1，可以超過LV上限，但不能增加有使用次數限制的異能的使用次數，組合複數異能時選擇其中一個，使用該效果時你的侵蝕率+3，該效果一回合可以使用一次。</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馴獸師的鈴鐺</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被EX背教者侵蝕的鈴鐺，能通過《駕馭》更加精密地操縱動物。</text:p>
            <text:p>你使用的《駕馭》可以對&lt;知覺&gt;以外的判定達成值生效，該《駕馭》侵蝕值+2。</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命運石</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被稱為冥府領域操縱因子的物質結晶化後形成的寶石，能夠使你干涉領域內的各種事象。</text:p>
            <text:p>場景中登場的一名角色進行判定後使用，你選擇該判定達成值+20或-20，使用後你的侵蝕率+10，該效果一劇本可以使用一次。</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華美的花朵</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能作為《引導之花》的素材的被EX背教者侵蝕的植物種子，能使《引導之花》生成的植物帶有攻擊性。</text:p>
            <text:p>你使用《引導之花》的同時使用，該《引導之花》的對象下個主要動作進行攻擊的攻擊力+5。</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優美的果實</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能作為《引導之花》的素材的被EX背教者侵蝕的植物種子，能使《引導之花》生成的植物帶有治癒性。</text:p>
            <text:p>你使用《引導之花》的同時使用，該《引導之花》的對象回復2D10HP。</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大地之根</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受到冥府領域異能效果後成長的特殊植物的根，能與領域反應強化對大地的干涉。</text:p>
            <text:p>次要動作使用，該場景間與《大地之牙》或《破碎之顎》組合的攻擊的攻擊力+5。</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妖精樹之種</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擁有增幅領域操縱能力作用的特殊植物種子。</text:p>
            <text:p>次要動作使用，你取得的一個[限制：-]異能使用次數+1，使用該效果後你的侵蝕率+4，該道具最多可以取得3個。</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詛咒的種子</text:p>
          </table:table-cell>
          <table:table-cell table:style-name="ce54" office:value-type="string" calcext:value-type="string">
            <text:p>消耗品</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因EX背教者而寄宿了憤怒悲傷等負面感情的種子，能讓《事象固定化》使對象衰弱。</text:p>
            <text:p>與《事項固定化》同時使用，組合的攻擊命中時賦予[不良狀態：邪毒5]，使用後你受到[不良狀態：暴走]。稀有道具。</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42" office:value-type="string" calcext:value-type="string">
            <text:p>死刻印</text:p>
          </table:table-cell>
          <table:table-cell table:style-name="ce54" office:value-type="string" calcext:value-type="string">
            <text:p>消耗品</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刻印著代表死亡的紋章的石頭，解放刻印的力量能通過領域為敵人帶來死亡的命運。</text:p>
            <text:p>場景內一名角色進行攻擊的傷害擲骰前使用，該攻擊的攻擊力+30。稀有道具。</text:p>
          </table:table-cell>
          <table:table-cell table:style-name="ce54" office:value-type="string" calcext:value-type="string">
            <text:p>IA P91</text:p>
          </table:table-cell>
          <table:table-cell table:style-name="ce53" table:number-columns-repeated="13"/>
          <table:table-cell table:number-columns-repeated="998"/>
        </table:table-row>
        <table:table-row table:style-name="ro2">
          <table:table-cell table:style-name="ce52" office:value-type="string" calcext:value-type="string">
            <text:p>冰炎奇蜥專用道具</text:p>
          </table:table-cell>
          <table:table-cell table:style-name="ce57" office:value-type="string" calcext:value-type="string" table:number-columns-spanned="12" table:number-rows-spanned="1">
            <text:p>只有症候為冰炎奇蜥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冰上滑行者</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5" calcext:value-type="float">
            <text:p>5</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10" calcext:value-type="float">
            <text:p>10</text:p>
          </table:table-cell>
          <table:table-cell table:style-name="ce49" office:value-type="string" calcext:value-type="string">
            <text:p>在《冰之回廊》製作的冰之落腳點上如滑行般移動的滑冰鞋，鞋底的刀刃可收納，也能作為武器。</text:p>
            <text:p>你使用《冰之回廊》的主要階段使用的【肉體】判定骰數+2個，該主要階段進行攻擊的攻擊力+5。</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絕冰刀</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6" calcext:value-type="float">
            <text:p>6</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將冰削出刀刃製成的刀，只有冰炎奇蜥症候的超越者能將其完美保存。</text:p>
            <text:p>準備階段使用，該回合間該武器的攻擊力+【肉體】，使用該效果後你的侵蝕率+2。</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火炬旗幟</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7" calcext:value-type="float">
            <text:p>7</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不會燃盡的火把，能夠吸收《先陣之火》的火焰用於攻擊，吸收火焰後會猛烈燃燒宛如一面展開的旗幟。</text:p>
            <text:p>你使用了《先陣之火》的場景間，你組合冰炎奇蜥異能進行的攻擊判定骰數+2個，攻擊力+3。</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龍息斧</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style-name="ce54" office:value-type="float" office:value="15" calcext:value-type="float">
            <text:p>15</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刃部寄宿烈焰的大斧，能與點燃的熱情產生反應，更猛烈地燃燒。</text:p>
            <text:p>該武器只能在組合了《炎神之怒》進行的攻擊中使用，組合的判定骰數+2個。雙手持握。</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蒸汽城壁</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6" calcext:value-type="float">
            <text:p>6</text:p>
          </table:table-cell>
          <table:table-cell table:style-name="ce54" office:value-type="float" office:value="17" calcext:value-type="float">
            <text:p>17</text:p>
          </table:table-cell>
          <table:table-cell table:style-name="ce54" office:value-type="string" calcext:value-type="string">
            <text:p>至近</text:p>
          </table:table-cell>
          <table:table-cell table:style-name="ce54" table:number-columns-repeated="3"/>
          <table:table-cell table:style-name="ce54" office:value-type="float" office:value="50" calcext:value-type="float">
            <text:p>50</text:p>
          </table:table-cell>
          <table:table-cell table:style-name="ce49" office:value-type="string" calcext:value-type="string">
            <text:p>用超高熱高壓的蒸汽彈開攻擊的不可視之盾，能從本體附屬的水箱中供水啟動，只有能操縱熱量的冰炎奇蜥症候持有者才能操縱，平時使用金屬提箱偽裝成日用品，使用時才會展開。</text:p>
            <text:p>該武器的格擋值不會因為異能效果減少。</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極光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35" calcext:value-type="float">
            <text:p>35</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100" calcext:value-type="float">
            <text:p>100</text:p>
          </table:table-cell>
          <table:table-cell table:style-name="ce49" office:value-type="string" calcext:value-type="string">
            <text:p>使用冰炎奇蜥純粹的能量製作出刀身的劍。</text:p>
            <text:p>使用該武器組合冰炎奇蜥異能進行的攻擊無視對象裝甲值計算傷害。</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狐火弓</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30m</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能將放出的箭矢變為火焰的被EX背教者感染的弓。</text:p>
            <text:p>使用該武器進行的攻擊可以以[種類：射擊]與《火舌》組合，此時該武器攻擊力+5。雙手持握。至近不可。</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冰凍射手</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12" calcext:value-type="float">
            <text:p>12</text:p>
          </table:table-cell>
          <table:table-cell table:style-name="ce54" office:value-type="string" calcext:value-type="string">
            <text:p>-</text:p>
          </table:table-cell>
          <table:table-cell table:style-name="ce54" office:value-type="string" calcext:value-type="string">
            <text:p>30m</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將冷氣變為光線放出的槍，絕不動搖的感情能讓槍的光線更冷更銳利。</text:p>
            <text:p>該武器只能與《冰神之悲》組合使用，組合的攻擊判定達成值+5。至近不可。</text:p>
          </table:table-cell>
          <table:table-cell table:style-name="ce54" office:value-type="string" calcext:value-type="string">
            <text:p>IA P92</text:p>
          </table:table-cell>
          <table:table-cell table:style-name="ce53" table:number-columns-repeated="13"/>
          <table:table-cell table:number-columns-repeated="998"/>
        </table:table-row>
        <table:table-row table:style-name="ro2">
          <table:table-cell table:style-name="ce42" office:value-type="string" calcext:value-type="string">
            <text:p>永恆紋章</text:p>
          </table:table-cell>
          <table:table-cell table:style-name="ce54" office:value-type="string" calcext:value-type="string">
            <text:p>防具</text:p>
          </table:table-cell>
          <table:table-cell table:style-name="ce54" table:number-columns-repeated="5"/>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float" office:value="8" calcext:value-type="float">
            <text:p>8</text:p>
          </table:table-cell>
          <table:table-cell table:style-name="ce54" office:value-type="float" office:value="25" calcext:value-type="float">
            <text:p>25</text:p>
          </table:table-cell>
          <table:table-cell table:style-name="ce49" office:value-type="string" calcext:value-type="string">
            <text:p>用不溶冰製作的胸甲，可以讓接觸的物體與冷氣反應受到凍傷。</text:p>
            <text:p>你使用的《能量精通》按照LV+3計算效果，可以超過LV上限。</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完全熱光學迷彩服</text:p>
          </table:table-cell>
          <table:table-cell table:style-name="ce54" office:value-type="string" calcext:value-type="string">
            <text:p>防具</text:p>
          </table:table-cell>
          <table:table-cell table:style-name="ce54" table:number-columns-repeated="5"/>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30" calcext:value-type="float">
            <text:p>30</text:p>
          </table:table-cell>
          <table:table-cell table:style-name="ce49" office:value-type="string" calcext:value-type="string">
            <text:p>現在開發中的熱光學迷彩服的最新型，雖然有很強的隱藏能力，但因為隔絕熱量交換而無法散熱，只有冰炎奇蜥症候的擁有者才能使用。</text:p>
            <text:p>次要動作使用，你進入隱蔽狀態，即使與敵人在同一接戰區域也能進入隱蔽狀態，你應對為了發現你而進行的&lt;知覺&gt;對決判定時，骰數+4個。</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炎冰球</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與你操縱的異能結合發生冰與炎的球體裝置，只有棒球大小但內部藏有很多精密機構。</text:p>
            <text:p>次要動作使用，你組合冰炎奇蜥異能進行的&lt;RC&gt;判定骰數+4個，該效果一場景可以使用一次。</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麥克斯韋程序</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觀察周圍分子運動並數據化的程序，自由操縱熱量的冰炎奇蜥症候持有者可以活用於自由操縱能量的流動。</text:p>
            <text:p>與你處於同一接戰區域的對象進行判定前使用，你選擇該判定骰數+3個或-3個，該效果一劇本可以使用三次。</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悠久的冰石</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用冰雪製成的耳飾，因為常溫下會融化所以需要冰炎奇蜥的能力來維持形狀。</text:p>
            <text:p>你使用的《冰雪的守護》額外-1D10傷害。</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冰之蛇</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擁有冰之身體的蛇型生物，能讀取你的意志冰凍靠近的敵人。</text:p>
            <text:p>與《蒼之惡魔》同時使用，額外給予攻擊角色[不良狀態：硬直]，該效果一劇本可以使用一次。</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炎之鷹</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擁有炎之身體的鷹型生物，能讀取你的意志共同攻擊敵人。</text:p>
            <text:p>與《焦熱的子彈》同時使用，該攻擊的攻擊力+7，但不能將對象變更為單體以外，使用該效果時你的侵蝕率+2。</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構造變質藥</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利用構造和溫度變化使物體的構造變脆的特殊化學藥品，只能在冰炎奇蜥症候生成的劇烈溫差下生效。</text:p>
            <text:p>你組合《交錯爆裂》的攻擊命中後使用，該攻擊視作對象裝甲值為0計算傷害，該效果一場景可以使用一次。</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42" office:value-type="string" calcext:value-type="string">
            <text:p>狂想的火種</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寄宿著不斷變換顏色的熾火的火種，可以被冰炎奇蜥的力量增幅，帶有通過精神污染讓人陷入瘋狂的性質。</text:p>
            <text:p>你使用《極大消滅波》造成的HP傷害+5D10，使用該效果後你陷入[不良狀態：暴走]。</text:p>
          </table:table-cell>
          <table:table-cell table:style-name="ce54" office:value-type="string" calcext:value-type="string">
            <text:p>IA P93</text:p>
          </table:table-cell>
          <table:table-cell table:style-name="ce53" table:number-columns-repeated="13"/>
          <table:table-cell table:number-columns-repeated="998"/>
        </table:table-row>
        <table:table-row table:style-name="ro2">
          <table:table-cell table:style-name="ce52" office:value-type="string" calcext:value-type="string">
            <text:p>幻象惑星專用道具</text:p>
          </table:table-cell>
          <table:table-cell table:style-name="ce57" office:value-type="string" calcext:value-type="string" table:number-columns-spanned="12" table:number-rows-spanned="1">
            <text:p>只有症候為幻象惑星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誤導衣裝</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50" calcext:value-type="float">
            <text:p>50</text:p>
          </table:table-cell>
          <table:table-cell table:style-name="ce49" office:value-type="string" calcext:value-type="string">
            <text:p>被設計為能操作對方印象的衣裝，幻象惑星穿上後能自由引導對方的認知。</text:p>
            <text:p>對你進行的【感覺】【社會】判定進行的回應動作判定暴擊值+1。</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防毒</text:p>
          </table:table-cell>
          <table:table-cell table:style-name="ce54" office:value-type="string" calcext:value-type="string">
            <text:p>防具（輔助）</text:p>
          </table:table-cell>
          <table:table-cell table:style-name="ce54" table:number-columns-repeated="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1" calcext:value-type="float">
            <text:p>1</text:p>
          </table:table-cell>
          <table:table-cell table:style-name="ce54" office:value-type="float" office:value="15" calcext:value-type="float">
            <text:p>15</text:p>
          </table:table-cell>
          <table:table-cell table:style-name="ce49" office:value-type="string" calcext:value-type="string">
            <text:p>連異能毒素也能防禦的特製防毒面具，幻象惑星的物質生成能力可以對應各種毒，無需更換濾材。</text:p>
            <text:p>你不會受到3級以下的[不良狀態：邪毒]。</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恐怖的心臟</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增幅恐懼的漆黑寶石，擁有增幅持有者幻象惑星能力效果，是被EX背教者侵蝕的物品。</text:p>
            <text:p>你組合《絕對的恐怖》進行攻擊的攻擊力+5。</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戰士之杯</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以高純度服用異能製作出的物質的杯子。</text:p>
            <text:p>你組合《腎上腺素》進行的近戰攻擊的攻擊力+3，此攻擊使用空手時攻擊力額外+3。</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秘藏靈酒</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藏在某修道院倉庫中的能讓生命力活性化的藥酒。</text:p>
            <text:p>你使用《療愈之水》或《力之靈水》的同時使用，該異能效果+1D10，該效果一劇本可以使用三次。</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彩虹藥瓶</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被EX背教者侵蝕的玻璃燒瓶，能根據周圍的藥品成分和人類感情改變顏色，根據顏色可以採取更合適的對應手段。</text:p>
            <text:p>次要動作使用，該場景間你下一次使用的幻象惑星異能侵蝕值-1（最低1），組合複數異能時對全部異能生效，該效果一場景可以使用一次。</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英魂</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戰乙女的引導》生成的物質進行效果增幅的液體，其成分接近酒精。</text:p>
            <text:p>你使用的《戰乙女的引導》的攻擊力修正額外+5。</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突觸助推器</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將全身神經與肌肉增強到極限的藥品，其副作用很大，只有能控制腦內物質消除痛覺的幻象惑星症候的持有者才能使用。</text:p>
            <text:p>準備階段使用，該回合間你進行的【肉體】【精神】判定骰數+2個，使用該效果時你失去3HP，該效果一場景可以使用一次。</text:p>
          </table:table-cell>
          <table:table-cell table:style-name="ce54" office:value-type="string" calcext:value-type="string">
            <text:p>IA P94</text:p>
          </table:table-cell>
          <table:table-cell table:style-name="ce53" table:number-columns-repeated="13"/>
          <table:table-cell table:number-columns-repeated="998"/>
        </table:table-row>
        <table:table-row table:style-name="ro2">
          <table:table-cell table:style-name="ce42" office:value-type="string" calcext:value-type="string">
            <text:p>黑蝕火藥</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侵蝕的特殊火藥，使用時需要精細的成分調整所以只有幻象惑星超越者能使用。</text:p>
            <text:p>你組合幻象惑星異能使用&lt;RC&gt;的攻擊的攻擊力+7，使用該效果時你的侵蝕率+1。</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無之香爐</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使人無法感知到異能製作的物質的香爐。</text:p>
            <text:p>你組合幻象惑星異能進行攻擊的同時使用，對象無法對該攻擊進行回應，對該攻擊掩護時，不計算格擋值。該效果一劇本可以使用一次。</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妖之酒</text:p>
          </table:table-cell>
          <table:table-cell table:style-name="ce54" office:value-type="string" calcext:value-type="string">
            <text:p>一般</text:p>
          </table:table-cell>
          <table:table-cell table:style-name="ce54" table:number-columns-repeated="8"/>
          <table:table-cell table:style-name="ce54" office:value-type="float" office:value="35" calcext:value-type="float">
            <text:p>35</text:p>
          </table:table-cell>
          <table:table-cell table:style-name="ce49" office:value-type="string" calcext:value-type="string">
            <text:p>含有背教者生命體生成的未知成分的液體，可以瞬間獲得強大的力量，雖然叫酒但是不含酒精。</text:p>
            <text:p>你使用《無盡之力》的同時使用，該《無盡之力》的對象下次主要動作進行的判定暴擊值-1（下限6），該效果一劇本可以使用三次。</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哈梅爾的笛子</text:p>
          </table:table-cell>
          <table:table-cell table:style-name="ce54" office:value-type="string" calcext:value-type="string">
            <text:p>一般</text:p>
          </table:table-cell>
          <table:table-cell table:style-name="ce54" table:number-columns-repeated="8"/>
          <table:table-cell table:style-name="ce54" office:value-type="float" office:value="40" calcext:value-type="float">
            <text:p>40</text:p>
          </table:table-cell>
          <table:table-cell table:style-name="ce49" office:value-type="string" calcext:value-type="string">
            <text:p>能產生讓人們生病的奇妙結界現象的傳說之笛。</text:p>
            <text:p>你使用《結界化》的同時使用，賦予場景內任意角色疾病，該場景間感染疾病的角色進行的回避判定暴擊值+1，對於超越者，場景結束時病症會痊癒，此外的情況則由使用者自行決定。</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死毒之粉</text:p>
          </table:table-cell>
          <table:table-cell table:style-name="ce54" office:value-type="string" calcext:value-type="string">
            <text:p>一般</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增強異能作用的特殊藥品，能讓目標接下來受到的攻擊變得致命。</text:p>
            <text:p>準備階段使用，該場景間對象下一次受到的傷害+10D10，該效果一劇本可以使用一次。稀有道具。</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肌肉助推器</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在體內生成並合成物質增強身體能力的藥，是對身體負擔很重的猛藥。</text:p>
            <text:p>次要動作使用，該主要階段間你進行的近戰攻擊傷害+2D10，你受到[不良狀態：邪毒3]。稀有道具</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ST-MAX</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特殊調和的力量增強劑，因為要調整成適合自己身體的成分，對幻象惑星以外幾乎無效。</text:p>
            <text:p>次要動作使用，該場景間你的【肉體】+3，該效果不會重新計算副能力值，使用時你的侵蝕率+1D10。</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驚奇香水</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聞到的人精神均衡會崩潰、對痛覺過敏的香水，可以與幻象惑星在體內生成的物質反應。</text:p>
            <text:p>你組合幻象惑星異能進行的攻擊命中後使用，該攻擊的攻擊力+5。</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42" office:value-type="string" calcext:value-type="string">
            <text:p>生命之滴</text:p>
          </table:table-cell>
          <table:table-cell table:style-name="ce54" office:value-type="string" calcext:value-type="string">
            <text:p>消耗品</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侵蝕的水滴形寶石，能將《生命獻祭》製作的液體效果進一步純化。</text:p>
            <text:p>與《生命獻祭》同時使用，該效果的對象從戰鬥不能狀態回復並回復所有不良狀態，戰鬥不能狀態下先回復到1HP再受到《生命獻祭》的回復值。</text:p>
          </table:table-cell>
          <table:table-cell table:style-name="ce54" office:value-type="string" calcext:value-type="string">
            <text:p>IA P95</text:p>
          </table:table-cell>
          <table:table-cell table:style-name="ce53" table:number-columns-repeated="13"/>
          <table:table-cell table:number-columns-repeated="998"/>
        </table:table-row>
        <table:table-row table:style-name="ro2">
          <table:table-cell table:style-name="ce52" office:value-type="string" calcext:value-type="string">
            <text:p>噬身影蛇專用道具</text:p>
          </table:table-cell>
          <table:table-cell table:style-name="ce57" office:value-type="string" calcext:value-type="string" table:number-columns-spanned="12" table:number-rows-spanned="1">
            <text:p>只有症候為噬身影蛇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影蛇之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7" calcext:value-type="float">
            <text:p>7</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將你的影子作為刀刃的劍，影子可以像蛇一樣自由行動捕捉敵人。</text:p>
            <text:p>使用該武器組合噬身影蛇異能所進行的攻擊變為[射程：視野]，該效果的射程優先級大於組合異能的射程。</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餓獸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7" calcext:value-type="float">
            <text:p>7</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被高濃度EX背教者感染的刀劍，帶有如果不用噬身影蛇的能力持續吸收就會立刻原菌化的大量背教者。</text:p>
            <text:p>使用該武器進行的攻擊給對象造成至少1點傷害時，額外給予[不良狀態：邪毒3]，主要階段結束時你的侵蝕率+2。</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影斷之槍</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7" calcext:value-type="float">
            <text:p>7</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10" calcext:value-type="float">
            <text:p>10</text:p>
          </table:table-cell>
          <table:table-cell table:style-name="ce49" office:value-type="string" calcext:value-type="string">
            <text:p>被EX背教者侵蝕的左輪手槍，這把槍射出的子彈能夠追蹤敵人的影子，有極高的命中精度。</text:p>
            <text:p>使用該武器進行的攻擊，對象閃避判定骰數-1個。</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詛咒骸骨</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封印並支配了惡靈、也就是低位背教者生命體的骷髏戒指，被封印的惡靈會吞噬你的衝動化為子彈射出。</text:p>
            <text:p>你解除[不良狀態：暴走]時，該場景間你使用該武器進行的攻擊傷害+2D10。使用該武器攻擊時你的侵蝕率+1。</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蛇皮</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4" calcext:value-type="float">
            <text:p>4</text:p>
          </table:table-cell>
          <table:table-cell table:style-name="ce54" office:value-type="float" office:value="10" calcext:value-type="float">
            <text:p>10</text:p>
          </table:table-cell>
          <table:table-cell table:style-name="ce49" office:value-type="string" calcext:value-type="string">
            <text:p>看起來像是蛇蛻的背教者生命體遺物，能與使用者的肉體同化、在體表產生硬化蛇鱗並提高生命力。</text:p>
            <text:p>任何時候都可以用自由動作裝備。取得該防具時你的最大HP+10，侵蝕率基本值+2。</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陰影衣裝</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1" calcext:value-type="float">
            <text:p>-1</text:p>
          </table:table-cell>
          <table:table-cell table:style-name="ce55" office:value-type="string" calcext:value-type="string">
            <text:p>4/10</text:p>
          </table:table-cell>
          <table:table-cell table:style-name="ce54" office:value-type="float" office:value="15" calcext:value-type="float">
            <text:p>15</text:p>
          </table:table-cell>
          <table:table-cell table:style-name="ce49" office:value-type="string" calcext:value-type="string">
            <text:p>吞噬敵人的背教者進化的強化服。</text:p>
            <text:p>你受到組合異能的攻擊造成至少1點HP傷害時使用，該場景間裝甲值使用右側數據，因該HP傷害陷入戰鬥不能狀態時無法使用該效果。</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宵闇外套</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8" calcext:value-type="float">
            <text:p>8</text:p>
          </table:table-cell>
          <table:table-cell table:style-name="ce54" office:value-type="float" office:value="30" calcext:value-type="float">
            <text:p>30</text:p>
          </table:table-cell>
          <table:table-cell table:style-name="ce49" office:value-type="string" calcext:value-type="string">
            <text:p>將影子本身在空間上固定而成的漆黑斗篷，其顏色比黑暗還要黑，擁有天鵝絨般不可思議的手感，受到衝擊時又有鋼鐵般的強度。</text:p>
            <text:p>你進行格擋前使用，該格擋值+5，使用該效果時你的侵蝕率+2</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原初的薔薇</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與噬身影蛇症候超越者共鳴的無色薔薇。</text:p>
            <text:p>只有在你只取得了一種《原初之●》時可以取得，你再獲得一個同名的《原初之●》並指定不同的異能。你不能取得其他《原初之●》。</text:p>
          </table:table-cell>
          <table:table-cell table:style-name="ce54" office:value-type="string" calcext:value-type="string">
            <text:p>IA P96</text:p>
          </table:table-cell>
          <table:table-cell table:style-name="ce53" table:number-columns-repeated="13"/>
          <table:table-cell table:number-columns-repeated="998"/>
        </table:table-row>
        <table:table-row table:style-name="ro2">
          <table:table-cell table:style-name="ce42" office:value-type="string" calcext:value-type="string">
            <text:p>無色魔鏡</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被EX背教者感染的小鏡子，能夠放出虹色的光輝，即使是在完全的黑暗中也能造出影子束縛敵人。</text:p>
            <text:p>你組合噬身影蛇異能進行射擊攻擊前使用，該攻擊造成至少1點傷害時給予對象[不良狀態：硬直]，使用該效果後你失去4HP，該效果一劇本可以使用三次。</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影之獸</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聽從你的指令、只存在影子中的兇猛野獸，你越聰明它就越強大，平時藏在你的影子裡。</text:p>
            <text:p>你組合《饑餓之影》進行的攻擊傷害+【精神】。</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影子模仿</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在噬身影蛇的影子中共生的小型影子狀背教者生命體，喜歡惡作劇，有時也會對共生者表現出反抗的態度。</text:p>
            <text:p>你的《無形之影》一回合可以使用2次。每次使用《無形之影》時失去3HP。</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象徵卡片</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經由無數偶然後被噬身影蛇能力者獲得的古舊卡片，能通過上面的暗示將持有者操縱的影子改變姿態，發揮出特異的能力。</text:p>
            <text:p>準備階段使用，該場景間，使用[技能：RC]噬身影蛇異能進行的判定骰數+1個，如果該判定是攻擊判定，攻擊力+3。稀有道具。</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獻祭的心臟</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吸收背教者增強光芒的寶石，活性化後產生的能量會成為持有者的力量。</text:p>
            <text:p>《被吞噬的祭品》效果中，你進行的攻擊判定骰數+3個。你使用的《被吞噬的祭品》侵蝕值+1。</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破滅的圓環</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侵蝕的銀圓盤，能增強所有者干涉背教者的能力。</text:p>
            <text:p>你使用《背叛的真名》同時使用，該《背叛的真名》變為[對象：單體]，傷害+5D10</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真影的戒指</text:p>
          </table:table-cell>
          <table:table-cell table:style-name="ce54" office:value-type="string" calcext:value-type="string">
            <text:p>一般</text:p>
          </table:table-cell>
          <table:table-cell table:style-name="ce54" table:number-columns-repeated="8"/>
          <table:table-cell table:style-name="ce54" office:value-type="float" office:value="35" calcext:value-type="float">
            <text:p>35</text:p>
          </table:table-cell>
          <table:table-cell table:style-name="ce49" office:value-type="string" calcext:value-type="string">
            <text:p>能增幅噬身影蛇異能的銀戒指，能讓你用《影之武具》製作的武器比原版更強。</text:p>
            <text:p>取得時選擇攻擊力、格擋值或裝甲值中的一項，你使用《影之武具》取得的創造武器的對應數值+6。</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影喰的手環</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被《散滅之腕》消除的異能會被吞噬並變換為生命力的手環。</text:p>
            <text:p>《散滅之腕》解除1個以上異能時你立刻回復30HP，一次《散滅之腕》解除複數異能時效果不會疊加。</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42" office:value-type="string" calcext:value-type="string">
            <text:p>世界之卵</text:p>
          </table:table-cell>
          <table:table-cell table:style-name="ce54" office:value-type="string" calcext:value-type="string">
            <text:p>消耗品</text:p>
          </table:table-cell>
          <table:table-cell table:style-name="ce54" table:number-columns-repeated="8"/>
          <table:table-cell table:style-name="ce54" office:value-type="float" office:value="80" calcext:value-type="float">
            <text:p>80</text:p>
          </table:table-cell>
          <table:table-cell table:style-name="ce49" office:value-type="string" calcext:value-type="string">
            <text:p>分不清是有機體還是無機體的卵狀物質，噬身影蛇能力者將其放入體內後能吸收內部的背教者並引發有指向性的結界。</text:p>
            <text:p>你使用《結界化》時使用，到場景結束或結界解除為止，場景內的任意超越者全員進行的判定骰數-1個，對象為背教者生命體時，骰數額外-1個。</text:p>
          </table:table-cell>
          <table:table-cell table:style-name="ce54" office:value-type="string" calcext:value-type="string">
            <text:p>IA P97</text:p>
          </table:table-cell>
          <table:table-cell table:style-name="ce53" table:number-columns-repeated="13"/>
          <table:table-cell table:number-columns-repeated="998"/>
        </table:table-row>
        <table:table-row table:style-name="ro2">
          <table:table-cell table:style-name="ce52" office:value-type="string" calcext:value-type="string">
            <text:p>長青魔劍專用道具</text:p>
          </table:table-cell>
          <table:table-cell table:style-name="ce57" office:value-type="string" calcext:value-type="string" table:number-columns-spanned="12" table:number-rows-spanned="1">
            <text:p>只有症候為長青魔劍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夜之匕首</text:p>
            <text:p>（ナハトダガー）</text:p>
          </table:table-cell>
          <table:table-cell table:style-name="ce54" office:value-type="string" calcext:value-type="string">
            <text:p>近戰</text:p>
          </table:table-cell>
          <table:table-cell table:style-name="ce54" office:value-type="string" calcext:value-type="string">
            <text:p>&lt;近戰&gt;/&lt;射擊&gt;</text:p>
          </table:table-cell>
          <table:table-cell table:style-name="ce54" office:value-type="float" office:value="0" calcext:value-type="float">
            <text:p>0</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string" calcext:value-type="string">
            <text:p>至近/1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UGN或FH等研究機構研究、開發出的用與元型親和的特殊素材製作的短劍。</text:p>
            <text:p>「類別：射擊」時，技能、射程參照斜杠右側。裝備“元型：●●”的防具或載具時，此武器視為「命中：3」。</text:p>
          </table:table-cell>
          <table:table-cell table:style-name="ce54" office:value-type="string" calcext:value-type="string">
            <text:p>SSS6 P46</text:p>
          </table:table-cell>
          <table:table-cell table:style-name="ce53" table:number-columns-repeated="13"/>
          <table:table-cell table:number-columns-repeated="998"/>
        </table:table-row>
        <table:table-row table:style-name="ro2">
          <table:table-cell table:style-name="ce42" office:value-type="string" calcext:value-type="string">
            <text:p>夜之劍</text:p>
            <text:p>（ナハトブレード）</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UGN或FH等研究機構研究、開發出的用與元型親和的特殊素材製作的長劍。會與造出的元型發生反應，增加銳利程度。</text:p>
            <text:p>裝備“元型：●●”的防具或載具時，此武器視為「攻擊力：12」。</text:p>
          </table:table-cell>
          <table:table-cell table:style-name="ce54" office:value-type="string" calcext:value-type="string">
            <text:p>SSS6 P46</text:p>
          </table:table-cell>
          <table:table-cell table:style-name="ce53" table:number-columns-repeated="13"/>
          <table:table-cell table:number-columns-repeated="998"/>
        </table:table-row>
        <table:table-row table:style-name="ro2">
          <table:table-cell table:style-name="ce42" office:value-type="string" calcext:value-type="string">
            <text:p>夜之長槍</text:p>
            <text:p>（ナハトスピア）</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UGN或FH等研究機構研究、開發出的用與元型親和的特殊素材製作的長槍。會與造出的元型發生反應，自由伸縮。</text:p>
            <text:p>裝備“元型：●●”的防具或載具時，此武器視為「射程：20m」。</text:p>
          </table:table-cell>
          <table:table-cell table:style-name="ce54" office:value-type="string" calcext:value-type="string">
            <text:p>SSS6 P46</text:p>
          </table:table-cell>
          <table:table-cell table:style-name="ce53" table:number-columns-repeated="13"/>
          <table:table-cell table:number-columns-repeated="998"/>
        </table:table-row>
        <table:table-row table:style-name="ro2">
          <table:table-cell table:style-name="ce42" office:value-type="string" calcext:value-type="string">
            <text:p>夜之盾</text:p>
            <text:p>（ナハトシールド）</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0" calcext:value-type="float">
            <text:p>0</text:p>
          </table:table-cell>
          <table:table-cell table:style-name="ce54" office:value-type="float" office:value="15" calcext:value-type="float">
            <text:p>15</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UGN或FH等研究機構研究、開發出的用與元型親和的特殊素材製作的盾牌。會與造出的元型發生反應，變為攻擊性的形狀。</text:p>
            <text:p>裝備“元型：●●”的防具或載具時，你進行的近戰攻擊的攻擊力+5。</text:p>
          </table:table-cell>
          <table:table-cell table:style-name="ce54" office:value-type="string" calcext:value-type="string">
            <text:p>SSS6 P46</text:p>
          </table:table-cell>
          <table:table-cell table:style-name="ce53" table:number-columns-repeated="13"/>
          <table:table-cell table:number-columns-repeated="998"/>
        </table:table-row>
        <table:table-row table:style-name="ro2">
          <table:table-cell table:style-name="ce42" office:value-type="string" calcext:value-type="string">
            <text:p>夜之手槍</text:p>
            <text:p>（ナハトピストル）</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5" calcext:value-type="float">
            <text:p>5</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UGN或FH等研究機構研究、開發出的用與元型親和的特殊素材製作的手槍。會與造出的元型發生反應，與裝備者一體化。</text:p>
            <text:p>裝備“元型：●●”的防具或載具時，使用此武器的攻擊的命中判定骰+2個。</text:p>
          </table:table-cell>
          <table:table-cell table:style-name="ce54" office:value-type="string" calcext:value-type="string">
            <text:p>SSS6 P46</text:p>
          </table:table-cell>
          <table:table-cell table:style-name="ce53" table:number-columns-repeated="13"/>
          <table:table-cell table:number-columns-repeated="998"/>
        </table:table-row>
        <table:table-row table:style-name="ro2">
          <table:table-cell table:style-name="ce42" office:value-type="string" calcext:value-type="string">
            <text:p>夜之步槍</text:p>
            <text:p>（ナハトライフル）</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10" calcext:value-type="float">
            <text:p>10</text:p>
          </table:table-cell>
          <table:table-cell table:style-name="ce54" office:value-type="string" calcext:value-type="string">
            <text:p>-</text:p>
          </table:table-cell>
          <table:table-cell table:style-name="ce54" office:value-type="string" calcext:value-type="string">
            <text:p>100m</text:p>
          </table:table-cell>
          <table:table-cell table:style-name="ce54" table:number-columns-repeated="2"/>
          <table:table-cell table:style-name="ce55"/>
          <table:table-cell table:style-name="ce54" office:value-type="float" office:value="30" calcext:value-type="float">
            <text:p>30</text:p>
          </table:table-cell>
          <table:table-cell table:style-name="ce49" office:value-type="string" calcext:value-type="string">
            <text:p>UGN或FH等研究機構研究、開發出的用與元型親和的特殊素材製作的步槍。會與造出的元型發生反應，增加貫穿力。</text:p>
            <text:p>裝備“元型：●●”的防具或載具時，使用此武器的攻擊的對象在計算傷害時視為裝甲值-5（最低0）。不可以至近的角色為對象。</text:p>
          </table:table-cell>
          <table:table-cell table:style-name="ce54" office:value-type="string" calcext:value-type="string">
            <text:p>SSS6 P46</text:p>
          </table:table-cell>
          <table:table-cell table:style-name="ce53" table:number-columns-repeated="13"/>
          <table:table-cell table:number-columns-repeated="998"/>
        </table:table-row>
        <table:table-row table:style-name="ro2">
          <table:table-cell table:style-name="ce42" office:value-type="string" calcext:value-type="string">
            <text:p>夜之外套</text:p>
            <text:p>（ナハトコート）</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4" calcext:value-type="float">
            <text:p>4</text:p>
          </table:table-cell>
          <table:table-cell table:style-name="ce54" office:value-type="float" office:value="25" calcext:value-type="float">
            <text:p>25</text:p>
          </table:table-cell>
          <table:table-cell table:style-name="ce49" office:value-type="string" calcext:value-type="string">
            <text:p>用與元型親和的特殊素材製作的外套。看起來只是一件厚外套，但可以隨著元型的出現而自行活動，保護使用者不受攻擊。</text:p>
            <text:p>裝備“元型：●●”的武器或載具時，此防具視為「閃避：4」。</text:p>
          </table:table-cell>
          <table:table-cell table:style-name="ce54" office:value-type="string" calcext:value-type="string">
            <text:p>SSS6</text:p>
          </table:table-cell>
          <table:table-cell table:style-name="ce53" table:number-columns-repeated="13"/>
          <table:table-cell table:number-columns-repeated="998"/>
        </table:table-row>
        <table:table-row table:style-name="ro2">
          <table:table-cell table:style-name="ce42" office:value-type="string" calcext:value-type="string">
            <text:p>夜之護具</text:p>
            <text:p>（ナハトプロテクター）</text:p>
          </table:table-cell>
          <table:table-cell table:style-name="ce54" office:value-type="string" calcext:value-type="string">
            <text:p>防具</text:p>
          </table:table-cell>
          <table:table-cell table:style-name="ce54" table:number-columns-repeated="5"/>
          <table:table-cell table:style-name="ce54" office:value-type="float" office:value="-1" calcext:value-type="float">
            <text:p>-1</text:p>
          </table:table-cell>
          <table:table-cell table:style-name="ce54" office:value-type="float" office:value="-5" calcext:value-type="float">
            <text:p>-5</text:p>
          </table:table-cell>
          <table:table-cell table:style-name="ce54" office:value-type="float" office:value="7" calcext:value-type="float">
            <text:p>7</text:p>
          </table:table-cell>
          <table:table-cell table:style-name="ce54" office:value-type="float" office:value="30" calcext:value-type="float">
            <text:p>30</text:p>
          </table:table-cell>
          <table:table-cell table:style-name="ce49" office:value-type="string" calcext:value-type="string">
            <text:p>用與元型親和的特殊素材製作的面具。看起來只是樹脂製成的防護面罩，但可以隨著元型的出現而變形成頭盔，提高使用者的反射神經。</text:p>
            <text:p>裝備「類別：元型」的武器或載具時，此防具視為「裝甲值：15」。</text:p>
          </table:table-cell>
          <table:table-cell table:style-name="ce54" office:value-type="string" calcext:value-type="string">
            <text:p>DFP20</text:p>
          </table:table-cell>
          <table:table-cell table:style-name="ce53" table:number-columns-repeated="13"/>
          <table:table-cell table:number-columns-repeated="998"/>
        </table:table-row>
        <table:table-row table:style-name="ro2">
          <table:table-cell table:style-name="ce42" office:value-type="string" calcext:value-type="string">
            <text:p>鉤爪斗篷</text:p>
          </table:table-cell>
          <table:table-cell table:style-name="ce54" office:value-type="string" calcext:value-type="string">
            <text:p>防具（輔助）</text:p>
          </table:table-cell>
          <table:table-cell table:style-name="ce54" table:number-columns-repeated="5"/>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2" calcext:value-type="float">
            <text:p>2</text:p>
          </table:table-cell>
          <table:table-cell table:style-name="ce54" office:value-type="float" office:value="15" calcext:value-type="float">
            <text:p>15</text:p>
          </table:table-cell>
          <table:table-cell table:style-name="ce49" office:value-type="string" calcext:value-type="string">
            <text:p>如同有意志一般、可以活動的斗篷。“元型：格鬥”的攻擊命中時，攻擊的對象受到硬直狀態。</text:p>
          </table:table-cell>
          <table:table-cell table:style-name="ce54" office:value-type="string" calcext:value-type="string">
            <text:p>SSS6</text:p>
          </table:table-cell>
          <table:table-cell table:style-name="ce53" table:number-columns-repeated="13"/>
          <table:table-cell table:number-columns-repeated="998"/>
        </table:table-row>
        <table:table-row table:style-name="ro2">
          <table:table-cell table:style-name="ce42" office:value-type="string" calcext:value-type="string">
            <text:p>神根的手甲</text:p>
          </table:table-cell>
          <table:table-cell table:style-name="ce54" office:value-type="string" calcext:value-type="string">
            <text:p>防具（輔助）</text:p>
          </table:table-cell>
          <table:table-cell table:style-name="ce54" table:number-columns-repeated="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3" calcext:value-type="float">
            <text:p>3</text:p>
          </table:table-cell>
          <table:table-cell table:style-name="ce54" office:value-type="float" office:value="20" calcext:value-type="float">
            <text:p>20</text:p>
          </table:table-cell>
          <table:table-cell table:style-name="ce49" office:value-type="string" calcext:value-type="string">
            <text:p>用植物的根形成的手甲。能夠為裝備者帶來揮舞武器的臂力。</text:p>
            <text:p>你組合《神樹之根》的攻擊傷害+1D。</text:p>
          </table:table-cell>
          <table:table-cell table:style-name="ce54" office:value-type="string" calcext:value-type="string">
            <text:p>SSS6</text:p>
          </table:table-cell>
          <table:table-cell table:style-name="ce53" table:number-columns-repeated="13"/>
          <table:table-cell table:number-columns-repeated="998"/>
        </table:table-row>
        <table:table-row table:style-name="ro2">
          <table:table-cell table:style-name="ce42" office:value-type="string" calcext:value-type="string">
            <text:p>夜之假面</text:p>
            <text:p>（ナハトマスク）</text:p>
          </table:table-cell>
          <table:table-cell table:style-name="ce54" office:value-type="string" calcext:value-type="string">
            <text:p>防具（輔助）</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20" calcext:value-type="float">
            <text:p>20</text:p>
          </table:table-cell>
          <table:table-cell table:style-name="ce49" office:value-type="string" calcext:value-type="string">
            <text:p>用與元型親和的特殊素材製作的面具。看起來只是樹脂製成的防護面罩，但可以隨著元型的出現而變形成頭盔，提高使用者的反射神經。</text:p>
            <text:p>裝備“元型：●●”的武器或載具時，此防具視為「行動：3」。</text:p>
          </table:table-cell>
          <table:table-cell table:style-name="ce54" office:value-type="string" calcext:value-type="string">
            <text:p>SSS6</text:p>
          </table:table-cell>
          <table:table-cell table:style-name="ce53" table:number-columns-repeated="13"/>
          <table:table-cell table:number-columns-repeated="998"/>
        </table:table-row>
        <table:table-row table:style-name="ro2">
          <table:table-cell table:style-name="ce42" office:value-type="string" calcext:value-type="string">
            <text:p>根之韁繩</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可以與元型組合的操作結構。統稱為韁繩，實際上也可以是方向盤或者杆狀。</text:p>
            <text:p>使用《弑神之刃》製作「類別：載具」的元型時使用，元型的「行動」+4。</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弑神之劍柄</text:p>
            <text:p>（神殺しのヒルト）</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與元型融合的護手。能夠提高持有者的防禦力。</text:p>
            <text:p>裝備“元型：●●”時，你進行格擋的格擋值+5。</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槲寄生之鞘</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沒有對應的劍的劍鞘。與長青魔劍生出的元型形狀一致，能夠增強元型的再生能力。也確認到了同樣效果的槍套與箭筒。</text:p>
            <text:p>使用“元型：●●”的道具時使用，取消掉破壞效果，該效果一劇本可以使用一次。</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綠葉手環</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用綠色的金屬製成的手環，可以消除裝備者的氣息。</text:p>
            <text:p>隱密狀態中，你使用“元型：投擲武器”“元型：近戰武器”“元型：手槍”的攻擊傷害+7。</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神樹液</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你的元型分泌的特殊液體，擁有治癒能力。</text:p>
            <text:p>只有你裝備「類別：防具」的元型時有效。在結算階段使用，你的HP回復20點，該效果一劇本可以使用一次。稀有道具。</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力之根</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連接起使用者的肉體與元型的纜線。通過纜線，使用者的背教者可以流入元型之中。</text:p>
            <text:p>你進行的“元型：光線槍”的攻擊可以和「技能：RC」的異能力組合使用。</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變形琥珀</text:p>
            <text:p>（ヴァリアブルアンバー）</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能夠讓元型變形的寶石。</text:p>
            <text:p>裝備“元型：●●”中，與格擋同時使用。這次格擋的格擋值+[元型的裝甲值]。該效果一場景可以使用一次。</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綠之徽章</text:p>
            <text:p>（グリーンクレスト）</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與元型融合的裝飾品。能夠將元型變為適合保護同伴的形狀。</text:p>
            <text:p>裝備“元型：盾”時，在你進行掩護的同時使用。這次掩護可以對距離你20m的角色使用。該效果一場景可以使用一次。</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魔像控制器</text:p>
            <text:p>（ゴーレムコントローラ）</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能夠遠距離操作長青魔劍生出的魔像的裝置。</text:p>
            <text:p>你所裝備的“元型：魔像”的距離變為「射程：20m」。</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弑神之鐵</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有著與元型的親和性的小塊金屬。能夠提升元型作為武器的特性。</text:p>
            <text:p>與使用「類別：近戰」「類別：射擊」的武器的攻擊同時使用，攻擊傷害+2D，該效果一劇本可以使用三次。</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理念左輪</text:p>
            <text:p>（イデアリボルバー）</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輪盤狀的迷之裝備。能夠與元型融合，讓理念炸裂並變為破壞力。</text:p>
            <text:p>次要動作使用。使用時最多選擇5個「理念持有者專屬道具」。在這一主要階段間，“元型：●●”的武器攻擊的攻擊力+[所選的道具數量×5]。主要階段結束後，所選的道具會被破壞。</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破裂的種子</text:p>
          </table:table-cell>
          <table:table-cell table:style-name="ce54" office:value-type="string" calcext:value-type="string">
            <text:p>消耗品</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使用了能夠提升元型威力的結晶製作的槍彈。</text:p>
            <text:p>使用「類別：射擊」的元型攻擊時使用。這一次攻擊可以無視不能攻擊至近距離的限制。攻擊後，失去1D點HP。</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神聖鑄模</text:p>
            <text:p>（ディヴァインモールド）</text:p>
          </table:table-cell>
          <table:table-cell table:style-name="ce54" office:value-type="string" calcext:value-type="string">
            <text:p>消耗品</text:p>
          </table:table-cell>
          <table:table-cell table:style-name="ce54" table:number-columns-repeated="8"/>
          <table:table-cell table:style-name="ce54" office:value-type="float" office:value="45" calcext:value-type="float">
            <text:p>45</text:p>
          </table:table-cell>
          <table:table-cell table:style-name="ce49" office:value-type="string" calcext:value-type="string">
            <text:p>以元型為原型的掛件。據說那形狀被刻入了其中。</text:p>
            <text:p>準備階段使用，在這一場景中，你所使用的《弑神之刃》的侵蝕值-5（最低1）。稀有道具。</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碎裂之枝</text:p>
          </table:table-cell>
          <table:table-cell table:style-name="ce54" office:value-type="string" calcext:value-type="string">
            <text:p>消耗品</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不知是誰的元型碎裂後的結晶片。在與偽神天鎖的戰鬥中敗北的它，能夠讓其他長青魔劍活性化。</text:p>
            <text:p>與《弑神之刃》同時使用，你使用元型進行的攻擊傷害+4D。此效果會持續一場景。</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42" office:value-type="string" calcext:value-type="string">
            <text:p>神花之蕾</text:p>
          </table:table-cell>
          <table:table-cell table:style-name="ce54" office:value-type="string" calcext:value-type="string">
            <text:p>消耗品</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小花蕾形狀的結晶。花開時，會給予持有者活力。</text:p>
            <text:p>與《弑神之刃》同時使用，這一場景中你的最大HP+100。你的HP回復100點，侵蝕值+6D10。</text:p>
          </table:table-cell>
          <table:table-cell table:style-name="ce54" office:value-type="string" calcext:value-type="string">
            <text:p>SSS6 P48</text:p>
          </table:table-cell>
          <table:table-cell table:style-name="ce53" table:number-columns-repeated="13"/>
          <table:table-cell table:number-columns-repeated="998"/>
        </table:table-row>
        <table:table-row table:style-name="ro2">
          <table:table-cell table:style-name="ce52" office:value-type="string" calcext:value-type="string">
            <text:p>偽神天鎖專用道具</text:p>
          </table:table-cell>
          <table:table-cell table:style-name="ce57" office:value-type="string" calcext:value-type="string" table:number-columns-spanned="12" table:number-rows-spanned="1">
            <text:p>只有症候為偽神天鎖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縛獸之繩</text:p>
          </table:table-cell>
          <table:table-cell table:style-name="ce54" office:value-type="string" calcext:value-type="string">
            <text:p>近戰</text:p>
          </table:table-cell>
          <table:table-cell table:style-name="ce54" office:value-type="string" calcext:value-type="string">
            <text:p>&lt;近戰&gt;</text:p>
          </table:table-cell>
          <table:table-cell table:style-name="ce45" office:value-type="float" office:value="-2" calcext:value-type="float">
            <text:p>-2</text:p>
          </table:table-cell>
          <table:table-cell table:style-name="ce45" office:value-type="float" office:value="7" calcext:value-type="float">
            <text:p>7</text:p>
          </table:table-cell>
          <table:table-cell table:style-name="ce45" office:value-type="float" office:value="1" calcext:value-type="float">
            <text:p>1</text:p>
          </table:table-cell>
          <table:table-cell table:style-name="ce54" office:value-type="string" calcext:value-type="string">
            <text:p>1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足以束縛大型野獸的繩鏈。也可以作為鞭子使用。 </text:p>
            <text:p>當使用該武器進行攻擊命中時，對象在該回合間判定骰數-2個。</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2">
          <table:table-cell table:style-name="ce42" office:value-type="string" calcext:value-type="string">
            <text:p>告死者之槍</text:p>
          </table:table-cell>
          <table:table-cell table:style-name="ce54" office:value-type="string" calcext:value-type="string">
            <text:p>近戰</text:p>
          </table:table-cell>
          <table:table-cell table:style-name="ce54" office:value-type="string" calcext:value-type="string">
            <text:p>&lt;近戰&gt;</text:p>
          </table:table-cell>
          <table:table-cell table:style-name="ce45" office:value-type="float" office:value="-2" calcext:value-type="float">
            <text:p>-2</text:p>
          </table:table-cell>
          <table:table-cell table:style-name="ce45" office:value-type="float" office:value="19" calcext:value-type="float">
            <text:p>19</text:p>
          </table:table-cell>
          <table:table-cell table:style-name="ce45"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45" calcext:value-type="float">
            <text:p>45</text:p>
          </table:table-cell>
          <table:table-cell table:style-name="ce49" office:value-type="string" calcext:value-type="string">
            <text:p>一把外表鏽跡斑斑的長槍，纏繞著無數鎖鏈。鏈條會自動纏繞在長槍刺穿的目標上。</text:p>
            <text:p>使用該武器與《告死之鎖》組合的攻擊，對象將無法回避，每次使用該效果時侵蝕率+2。雙手持握。</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2">
          <table:table-cell table:style-name="ce42" office:value-type="string" calcext:value-type="string">
            <text:p>環之石</text:p>
          </table:table-cell>
          <table:table-cell table:style-name="ce54" office:value-type="string" calcext:value-type="string">
            <text:p>射擊</text:p>
          </table:table-cell>
          <table:table-cell table:style-name="ce54" office:value-type="string" calcext:value-type="string">
            <text:p>&lt;射擊&gt;</text:p>
          </table:table-cell>
          <table:table-cell table:style-name="ce45" office:value-type="float" office:value="-1" calcext:value-type="float">
            <text:p>-1</text:p>
          </table:table-cell>
          <table:table-cell table:style-name="ce45" office:value-type="float" office:value="6" calcext:value-type="float">
            <text:p>6</text:p>
          </table:table-cell>
          <table:table-cell table:style-name="ce45"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對背教者產生反應，環狀浮現的無數原石。可以根據持有者的意志像子彈一樣發射，使用後也會回到手邊。</text:p>
            <text:p>在受到次要動作中使用的偽神天鎖異能效果的影響期間，這個武器的攻擊力+3。</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2">
          <table:table-cell table:style-name="ce42" office:value-type="string" calcext:value-type="string">
            <text:p>縛鎖銃</text:p>
          </table:table-cell>
          <table:table-cell table:style-name="ce54" office:value-type="string" calcext:value-type="string">
            <text:p>射擊</text:p>
          </table:table-cell>
          <table:table-cell table:style-name="ce54" office:value-type="string" calcext:value-type="string">
            <text:p>&lt;射擊&gt;</text:p>
          </table:table-cell>
          <table:table-cell table:style-name="ce45" office:value-type="float" office:value="-2" calcext:value-type="float">
            <text:p>-2</text:p>
          </table:table-cell>
          <table:table-cell table:style-name="ce45" office:value-type="float" office:value="18" calcext:value-type="float">
            <text:p>18</text:p>
          </table:table-cell>
          <table:table-cell table:style-name="ce45" office:value-type="string" calcext:value-type="string">
            <text:p>—</text:p>
          </table:table-cell>
          <table:table-cell table:style-name="ce54" office:value-type="string" calcext:value-type="string">
            <text:p>50m</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整個槍身都被鎖鏈覆蓋的巨大手槍。鎖鏈侵蝕槍後放大了它的火力和後座力。</text:p>
            <text:p>雙手持握。使用了該武器的主要階段結束時，你失去3點HP。</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2">
          <table:table-cell table:style-name="ce42" office:value-type="string" calcext:value-type="string">
            <text:p>環之衣裝</text:p>
          </table:table-cell>
          <table:table-cell table:style-name="ce54" office:value-type="string" calcext:value-type="string">
            <text:p>防具</text:p>
          </table:table-cell>
          <table:table-cell table:style-name="ce54" table:number-columns-repeated="5"/>
          <table:table-cell table:style-name="ce54" office:value-type="float" office:value="-2" calcext:value-type="float">
            <text:p>-2</text:p>
          </table:table-cell>
          <table:table-cell table:style-name="ce54" office:value-type="float" office:value="-4" calcext:value-type="float">
            <text:p>-4</text:p>
          </table:table-cell>
          <table:table-cell table:style-name="ce54" office:value-type="float" office:value="8" calcext:value-type="float">
            <text:p>8</text:p>
          </table:table-cell>
          <table:table-cell table:style-name="ce54" office:value-type="float" office:value="20" calcext:value-type="float">
            <text:p>20</text:p>
          </table:table-cell>
          <table:table-cell table:style-name="ce49" office:value-type="string" calcext:value-type="string">
            <text:p>雙臂袖子連接的拘束衣形狀的衣服。據說環的形狀會強化偽神天鎖的異能。</text:p>
            <text:p>使用【精神】並組合了偽神天鎖異能的判定骰數+2個。</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2">
          <table:table-cell table:style-name="ce42" office:value-type="string" calcext:value-type="string">
            <text:p>上位者之衣</text:p>
          </table:table-cell>
          <table:table-cell table:style-name="ce54" office:value-type="string" calcext:value-type="string">
            <text:p>防具</text:p>
          </table:table-cell>
          <table:table-cell table:style-name="ce54" table:number-columns-repeated="5"/>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float" office:value="6" calcext:value-type="float">
            <text:p>6</text:p>
          </table:table-cell>
          <table:table-cell table:style-name="ce54" office:value-type="float" office:value="25" calcext:value-type="float">
            <text:p>25</text:p>
          </table:table-cell>
          <table:table-cell table:style-name="ce49" office:value-type="string" calcext:value-type="string">
            <text:p>一件帶有奢華裝飾的紅色斗篷，有增強自身本源力量的效果。</text:p>
            <text:p>裝備時，將你使用的《起源：●●》按照技能LV+2來計算效果。</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2">
          <table:table-cell table:style-name="ce42" office:value-type="string" calcext:value-type="string">
            <text:p>渦之戒指</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被偽神天鎖症狀侵蝕的戒指，擁有纏繞和偏離他人能力的效果。</text:p>
            <text:p>你進行的針對"組合了異能的攻擊"的閃避判定骰數+2個。</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2">
          <table:table-cell table:style-name="ce42" office:value-type="string" calcext:value-type="string">
            <text:p>恐懼之石</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被EX背教者感染的特殊石頭，用於構成《環之石》。它被恐懼的衝動所侵蝕，它帶來的威壓感讓敵人畏縮不前。</text:p>
            <text:p>需要先取得《環之石》。使用《環之石》進行射擊攻擊時，對象的閃避判定骰數-2個。</text:p>
          </table:table-cell>
          <table:table-cell table:style-name="ce54" office:value-type="string" calcext:value-type="string">
            <text:p>UA P86</text:p>
          </table:table-cell>
          <table:table-cell table:style-name="ce53" table:number-columns-repeated="13"/>
          <table:table-cell table:number-columns-repeated="998"/>
        </table:table-row>
        <table:table-row table:style-name="ro7">
          <table:table-cell table:style-name="ce42" office:value-type="string" calcext:value-type="string">
            <text:p>殺戮之石</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被EX背教者感染的特殊石頭，用於構成《環之石》。它被殺戮的衝動所侵蝕，它能更精准的擊中要害。</text:p>
            <text:p>需要先取得《環之石》。使用《環之石》進行的射擊攻擊給予的傷害+1D10，此效果適用時，侵蝕率+1。</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鬪爭之石</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被EX背教者感染的特殊石頭，用於構成《環之石》。它被鬪爭的衝動所侵蝕，會自動抵擋周圍對持有者的攻擊。</text:p>
            <text:p>需要先取得《環之石》。 裝備《環之石》時，你受到的傷害-1D10。</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灰色之鎖</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抑制背教者的神秘鎖鏈。它會奪取所接觸超越者的力量並阻礙其移動。</text:p>
            <text:p>你使用的《提線木偶》每回合最多可使用兩次。</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列石戒指</text:p>
          </table:table-cell>
          <table:table-cell table:style-name="ce54" office:value-type="string" calcext:value-type="string">
            <text:p>一般</text:p>
          </table:table-cell>
          <table:table-cell table:style-name="ce54" table:number-columns-repeated="7"/>
          <table:table-cell table:style-name="ce55"/>
          <table:table-cell table:style-name="ce54" office:value-type="float" office:value="15" calcext:value-type="float">
            <text:p>15</text:p>
          </table:table-cell>
          <table:table-cell table:style-name="ce49" office:value-type="string" calcext:value-type="string">
            <text:p>與你的背教者發生共鳴的不可思議戒指。當你具現鎖鏈時，戒指會成為其一部分。</text:p>
            <text:p>你組合了偽神天鎖異能的〈RC〉判定骰數+2個。</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黃金之鎖</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封印著強大背教者力量的金色鎖鏈，其蘊藏著爆炸性的能量。</text:p>
            <text:p>你使用《神之鐵錘》《裁決之礫》造成的傷害+2D10，每次使用該效果時侵蝕率+2。</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覺醒之冠</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給那些已經理解到全新真理之人的小巧王冠。</text:p>
            <text:p>你可以將《超越者的鼓動》的效果適用於回應動作中。但請注意，即使因為此道具的效果而處於暴走狀態，仍然無法進行回應動作。</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黎明戒指</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一枚古老而小巧的石制戒指。當你使用能力時，它會如太陽般閃耀。</text:p>
            <text:p>你使用的《勝利的車輪》，除了原本的效果外，主要動作的判定骰數再+5個。該效果適用後此道具被破壞。</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暗黑之冠</text:p>
          </table:table-cell>
          <table:table-cell table:style-name="ce54" office:value-type="string" calcext:value-type="string">
            <text:p>一般</text:p>
          </table:table-cell>
          <table:table-cell table:style-name="ce54" table:number-columns-repeated="8"/>
          <table:table-cell table:style-name="ce54" office:value-type="float" office:value="100" calcext:value-type="float">
            <text:p>100</text:p>
          </table:table-cell>
          <table:table-cell table:style-name="ce49" office:value-type="string" calcext:value-type="string">
            <text:p>一頂昏暗閃爍的漆黑王冠，能蠶食觀看者的精神並奪去其理智。</text:p>
            <text:p>你使用《墮落之鎖》時，目標進行的〈意志〉判定的判定骰數-10個。此效果適用後道具被破壞。</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終末音樂盒</text:p>
          </table:table-cell>
          <table:table-cell table:style-name="ce54" office:value-type="string" calcext:value-type="string">
            <text:p>一般</text:p>
          </table:table-cell>
          <table:table-cell table:style-name="ce54" table:number-columns-repeated="8"/>
          <table:table-cell table:style-name="ce54" office:value-type="float" office:value="150" calcext:value-type="float">
            <text:p>150</text:p>
          </table:table-cell>
          <table:table-cell table:style-name="ce49" office:value-type="string" calcext:value-type="string">
            <text:p>發出陌生旋律的音樂盒。</text:p>
            <text:p>你使用《破滅的鎖冠》時同時使用。該回合內，你進行的主要動作和回應動作的判定骰數+10個。一劇本可以使用一次。</text:p>
          </table:table-cell>
          <table:table-cell table:style-name="ce54" office:value-type="string" calcext:value-type="string">
            <text:p>UA P87</text:p>
          </table:table-cell>
          <table:table-cell table:style-name="ce53" table:number-columns-repeated="13"/>
          <table:table-cell table:number-columns-repeated="998"/>
        </table:table-row>
        <table:table-row table:style-name="ro2">
          <table:table-cell table:style-name="ce42" office:value-type="string" calcext:value-type="string">
            <text:p>吊墜冰石</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具有宛如瞳孔般紋樣的白色水晶球。與鎖鏈連接後，會成為具備視覺的感覺器官，能將鎖鏈延伸至遠處或狹窄空間進行探索。</text:p>
            <text:p>你進行的〈知覺〉、〈情報〉判定，其達成值+2。</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42" office:value-type="string" calcext:value-type="string">
            <text:p>血染棘頸環</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套在背教者生命頸部、無法取下的帶刺項圈。你所生成的鎖鏈會纏繞於自身肉體，並與皮膚同化。</text:p>
            <text:p>你使用《起源：動物》效果期間，你的裝甲值+10。此道具在《起源：動物》效果持續期間也可以使用。</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42" office:value-type="string" calcext:value-type="string">
            <text:p>鎖狀腫瘤</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在背教者生命體內生成的腫瘤。你的鎖鏈會滴落濃稠的黑色毒液。</text:p>
            <text:p>你使用《起源：群集》效果期間，當你進行的攻擊命中時，目標受到「異常狀態：邪毒」。邪毒等級為2。</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42" office:value-type="string" calcext:value-type="string">
            <text:p>黑色迴路</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浮現在背教者生命體表面的電路板狀紋樣。你的鎖鏈化為在迴路上奔流的路徑，或於無形掃描線上疾走的光流，大幅提升你的思考速度。</text:p>
            <text:p>你使用《起源：網路》效果期間，你的【行動值】＋10。</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42" office:value-type="string" calcext:value-type="string">
            <text:p>罪之鐵枷</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套在背教者生命的手腕或腳踝上、無法卸除的金屬枷鎖。你所生成的一切鎖鏈皆與此枷鎖相連。</text:p>
            <text:p>你使用《起源：人類》時，從技能中選擇一項。在該次《起源：人類》的效果期間，你進行所選技能的判定，其達成值+4。</text:p>
            <text:p>每次使用《起源：人類》時，可重新選擇技能。</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42" office:value-type="string" calcext:value-type="string">
            <text:p>漆黑之芽</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在背教者生命肉體某處生成的黑色芽體。你所生成的鎖鏈會化為漆黑藤蔓，或是詭異相連、遭蟲蛀般的樹葉，展現出變化多端的動作。</text:p>
            <text:p>你使用《起源：植物》效果期間，對你進行的攻擊，其閃避判定骰數-2D。</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42" office:value-type="string" calcext:value-type="string">
            <text:p>黑鎖礦</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在背教者生命體內生成、表面浮現鎖鏈狀紋樣的漆黑礦物。你的鎖鏈自此礦物中生成，具有結晶般的光澤與強度。</text:p>
            <text:p>你使用《起源：礦物》效果期間，由你以異能生成的異能道具，其攻擊力與裝甲值+4。</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42" office:value-type="string" calcext:value-type="string">
            <text:p>黑之頁</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帶有被撕除痕跡的純黑紙片。你所生成的鎖鏈會化為草寫文字列，或宛如文字般的紋樣群，將你包覆其中。</text:p>
            <text:p>你使用《起源：傳說》效果期間，你進行的閃避，其達成值+10。</text:p>
          </table:table-cell>
          <table:table-cell table:style-name="ce54" office:value-type="string" calcext:value-type="string">
            <text:p>DF P23</text:p>
          </table:table-cell>
          <table:table-cell table:style-name="ce53" table:number-columns-repeated="13"/>
          <table:table-cell table:number-columns-repeated="998"/>
        </table:table-row>
        <table:table-row table:style-name="ro2">
          <table:table-cell table:style-name="ce52" office:value-type="string" calcext:value-type="string">
            <text:p>混沌原核專用道具</text:p>
          </table:table-cell>
          <table:table-cell table:style-name="ce57" office:value-type="string" calcext:value-type="string" table:number-columns-spanned="12" table:number-rows-spanned="1">
            <text:p>只有症候為混沌原核的角色可以裝備，其他角色就算持有也沒有效果</text:p>
          </table:table-cell>
          <table:covered-table-cell table:number-columns-repeated="11"/>
          <table:table-cell table:style-name="ce53" table:number-columns-repeated="13"/>
          <table:table-cell table:number-columns-repeated="998"/>
        </table:table-row>
        <table:table-row table:style-name="ro2">
          <table:table-cell table:style-name="ce42" office:value-type="string" calcext:value-type="string">
            <text:p>黑石短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string" calcext:value-type="string">
            <text:p>至近</text:p>
          </table:table-cell>
          <table:table-cell table:style-name="ce54" table:number-columns-repeated="3"/>
          <table:table-cell table:style-name="ce54" office:value-type="string" calcext:value-type="string">
            <text:p>20點</text:p>
          </table:table-cell>
          <table:table-cell table:style-name="ce59" office:value-type="string" calcext:value-type="string">
            <text:p>米-戈們所尋求的〈黑石〉所制的短劍，能夠對不來自此3次元空間對象的次元連續構造造成致命傷害，此特性亦作用於你所用的異能之上。</text:p>
            <text:p>你進行的攻擊，對象為［神話生物］、［神性］，亦或是阿撒托斯症狀的持有者時，傷害+2D10。</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table-cell table:style-name="ce42" office:value-type="string" calcext:value-type="string">
            <text:p>風暴之矛</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number-columns-repeated="2" table:style-name="ce54" office:value-type="float" office:value="7" calcext:value-type="float">
            <text:p>7</text:p>
          </table:table-cell>
          <table:table-cell table:style-name="ce54" office:value-type="string" calcext:value-type="string">
            <text:p>至近</text:p>
          </table:table-cell>
          <table:table-cell table:style-name="ce54" table:number-columns-repeated="3"/>
          <table:table-cell table:style-name="ce54" office:value-type="string" calcext:value-type="string">
            <text:p>10點</text:p>
          </table:table-cell>
          <table:table-cell table:style-name="ce59" office:value-type="string" calcext:value-type="string">
            <text:p>纏繞著哈斯塔不潔惡風的長矛，</text:p>
            <text:p>裝備中，【HP最大值】和HP-5（解除裝備則恢復5點HP），【行動值】+10。此效果不會疊加。</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table-cell table:style-name="ce42" office:value-type="string" calcext:value-type="string">
            <text:p>炎之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12" calcext:value-type="float">
            <text:p>12</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string" calcext:value-type="string">
            <text:p>25點</text:p>
          </table:table-cell>
          <table:table-cell table:style-name="ce59" office:value-type="string" calcext:value-type="string">
            <text:p>傳說為克圖格亞為了消滅奈亞拉托提普所鍛，</text:p>
            <text:p>裝備中，【行動值】-5。與風暴之矛一同用於《複數武器》時，這件武器的攻擊力+10。此效果無法疊加。</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table-cell table:style-name="ce42" office:value-type="string" calcext:value-type="string">
            <text:p>冰炎之雙銃</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3" calcext:value-type="float">
            <text:p>-3</text:p>
          </table:table-cell>
          <table:table-cell table:style-name="ce54" office:value-type="float" office:value="10" calcext:value-type="float">
            <text:p>10</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string" calcext:value-type="string">
            <text:p>30點</text:p>
          </table:table-cell>
          <table:table-cell table:style-name="ce59" office:value-type="string" calcext:value-type="string">
            <text:p>以該武器進行的攻擊對象為［神格］、［神話生物］、［不死］其中之一時，無視對象的裝甲值。</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table-cell table:style-name="ce42" office:value-type="string" calcext:value-type="string">
            <text:p>熵覆</text:p>
            <text:p>（エントロピーブレイカー）</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5" calcext:value-type="float">
            <text:p>-5</text:p>
          </table:table-cell>
          <table:table-cell table:style-name="ce54" office:value-type="float" office:value="20" calcext:value-type="float">
            <text:p>20</text:p>
          </table:table-cell>
          <table:table-cell table:style-name="ce54" office:value-type="string" calcext:value-type="string">
            <text:p>—</text:p>
          </table:table-cell>
          <table:table-cell table:style-name="ce54" office:value-type="string" calcext:value-type="string">
            <text:p>10m</text:p>
          </table:table-cell>
          <table:table-cell table:style-name="ce54" table:number-columns-repeated="3"/>
          <table:table-cell table:style-name="ce54" office:value-type="string" calcext:value-type="string">
            <text:p>60點</text:p>
          </table:table-cell>
          <table:table-cell table:style-name="ce59" office:value-type="string" calcext:value-type="string">
            <text:p>無法對以該武器發起的攻擊進行格擋或掩護，且無論何等手段均不能減輕其傷害。這件武器1個劇本中只能使用1次。</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table-cell table:style-name="ce42" office:value-type="string" calcext:value-type="string">
            <text:p>希柏里爾法袍</text:p>
          </table:table-cell>
          <table:table-cell table:style-name="ce54" office:value-type="string" calcext:value-type="string">
            <text:p>防具</text:p>
          </table:table-cell>
          <table:table-cell table:style-name="ce54" table:number-columns-repeated="6"/>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string" calcext:value-type="string">
            <text:p>15點</text:p>
          </table:table-cell>
          <table:table-cell table:style-name="ce59" office:value-type="string" calcext:value-type="string">
            <text:p>裝備期間，你的［魔法擲骰］+1D。</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table-cell table:style-name="ce42" office:value-type="string" calcext:value-type="string">
            <text:p>仿生裝甲</text:p>
          </table:table-cell>
          <table:table-cell table:style-name="ce54" office:value-type="string" calcext:value-type="string">
            <text:p>防具</text:p>
          </table:table-cell>
          <table:table-cell table:style-name="ce54" table:number-columns-repeated="6"/>
          <table:table-cell table:style-name="ce54" office:value-type="float" office:value="-2" calcext:value-type="float">
            <text:p>-2</text:p>
          </table:table-cell>
          <table:table-cell table:style-name="ce54" office:value-type="float" office:value="27" calcext:value-type="float">
            <text:p>27</text:p>
          </table:table-cell>
          <table:table-cell table:style-name="ce54" office:value-type="string" calcext:value-type="string">
            <text:p>60點</text:p>
          </table:table-cell>
          <table:table-cell table:style-name="ce59" office:value-type="string" calcext:value-type="string">
            <text:p>裝備期間，你的空手攻擊力和格擋值+[你的【精神】]。但每當於裝備期間進行攻擊或是格擋時，侵蝕率+2。</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table-cell table:style-name="ce42" office:value-type="string" calcext:value-type="string">
            <text:p>古老者的水晶</text:p>
          </table:table-cell>
          <table:table-cell table:style-name="ce54" office:value-type="string" calcext:value-type="string">
            <text:p>消耗品</text:p>
          </table:table-cell>
          <table:table-cell table:style-name="ce58" table:number-columns-repeated="5"/>
          <table:table-cell table:style-name="ce53" table:number-columns-repeated="3"/>
          <table:table-cell table:style-name="ce54" office:value-type="string" calcext:value-type="string">
            <text:p>15點</text:p>
          </table:table-cell>
          <table:table-cell table:style-name="ce59" office:value-type="string" calcext:value-type="string">
            <text:p>於場景內的角色造成［魔法暴走］時使用，你可以選擇其結果。該道具只能常備化一個，且1個劇本中只能使用1次。</text:p>
          </table:table-cell>
          <table:table-cell table:style-name="ce54" office:value-type="string" calcext:value-type="string">
            <text:p>NC P111</text:p>
          </table:table-cell>
          <table:table-cell table:style-name="ce53" table:number-columns-repeated="13"/>
          <table:table-cell table:number-columns-repeated="998"/>
        </table:table-row>
        <table:table-row table:style-name="ro2" table:number-rows-repeated="711">
          <table:table-cell table:style-name="ce53" table:number-columns-repeated="26"/>
          <table:table-cell table:number-columns-repeated="998"/>
        </table:table-row>
        <table:table-row table:style-name="ro4" table:number-rows-repeated="1047567">
          <table:table-cell table:number-columns-repeated="1024"/>
        </table:table-row>
        <table:table-row table:style-name="ro4">
          <table:table-cell table:number-columns-repeated="1024"/>
        </table:table-row>
      </table:table>
      <table:table table:name="獨特道具" table:style-name="ta5">
        <table:table-column table:style-name="co6" table:default-cell-style-name="Default"/>
        <table:table-column table:style-name="co21" table:default-cell-style-name="Default"/>
        <table:table-column table:style-name="co8" table:default-cell-style-name="Default"/>
        <table:table-column table:style-name="co9" table:default-cell-style-name="Default"/>
        <table:table-column table:style-name="co23" table:default-cell-style-name="Default"/>
        <table:table-column table:style-name="co24" table:default-cell-style-name="Default"/>
        <table:table-column table:style-name="co11" table:default-cell-style-name="Default"/>
        <table:table-column table:style-name="co9" table:number-columns-repeated="2" table:default-cell-style-name="Default"/>
        <table:table-column table:style-name="co10" table:default-cell-style-name="Default"/>
        <table:table-column table:style-name="co25" table:default-cell-style-name="Default"/>
        <table:table-column table:style-name="co22" table:default-cell-style-name="Default"/>
        <table:table-column table:style-name="co4" table:default-cell-style-name="Default"/>
        <table:table-column table:style-name="co5" table:number-columns-repeated="1011" table:default-cell-style-name="Default"/>
        <table:table-row table:style-name="ro2">
          <table:table-cell table:style-name="ce52" office:value-type="string" calcext:value-type="string">
            <text:p>名稱</text:p>
          </table:table-cell>
          <table:table-cell table:style-name="ce52" office:value-type="string" calcext:value-type="string">
            <text:p>種類</text:p>
          </table:table-cell>
          <table:table-cell table:style-name="ce52" office:value-type="string" calcext:value-type="string">
            <text:p>技能</text:p>
          </table:table-cell>
          <table:table-cell table:style-name="ce52" office:value-type="string" calcext:value-type="string">
            <text:p>命中</text:p>
          </table:table-cell>
          <table:table-cell table:style-name="ce52" office:value-type="string" calcext:value-type="string">
            <text:p>攻擊力</text:p>
          </table:table-cell>
          <table:table-cell table:style-name="ce52" office:value-type="string" calcext:value-type="string">
            <text:p>格擋值</text:p>
          </table:table-cell>
          <table:table-cell table:style-name="ce52" office:value-type="string" calcext:value-type="string">
            <text:p>射程</text:p>
          </table:table-cell>
          <table:table-cell table:style-name="ce52" office:value-type="string" calcext:value-type="string">
            <text:p>閃避</text:p>
          </table:table-cell>
          <table:table-cell table:style-name="ce52" office:value-type="string" calcext:value-type="string">
            <text:p>行動</text:p>
          </table:table-cell>
          <table:table-cell table:style-name="ce52" office:value-type="string" calcext:value-type="string">
            <text:p>裝甲值</text:p>
          </table:table-cell>
          <table:table-cell table:style-name="ce52" office:value-type="string" calcext:value-type="string">
            <text:p>必要經驗值</text:p>
          </table:table-cell>
          <table:table-cell table:style-name="ce52" office:value-type="string" calcext:value-type="string">
            <text:p>解說</text:p>
          </table:table-cell>
          <table:table-cell table:style-name="ce52" office:value-type="string" calcext:value-type="string">
            <text:p>參照</text:p>
          </table:table-cell>
          <table:table-cell table:style-name="ce53" table:number-columns-repeated="13"/>
          <table:table-cell table:number-columns-repeated="998"/>
        </table:table-row>
        <table:table-row table:style-name="ro2">
          <table:table-cell table:style-name="ce57" office:value-type="string" calcext:value-type="string" table:number-columns-spanned="13" table:number-rows-spanned="1">
            <text:p>武器</text:p>
          </table:table-cell>
          <table:covered-table-cell table:number-columns-repeated="12"/>
          <table:table-cell table:style-name="ce53" table:number-columns-repeated="13"/>
          <table:table-cell table:number-columns-repeated="998"/>
        </table:table-row>
        <table:table-row table:style-name="ro2">
          <table:table-cell table:style-name="ce42" office:value-type="string" calcext:value-type="string">
            <text:p>決鬥者之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7" calcext:value-type="float">
            <text:p>7</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string" calcext:value-type="string">
            <text:p>15</text:p>
          </table:table-cell>
          <table:table-cell table:style-name="ce49" office:value-type="string" calcext:value-type="string">
            <text:p>以一對一作戰為考量製作的長劍能夠提高對目標的集中力。</text:p>
            <text:p>該武器進行[對象：單體]的近戰攻擊的攻擊力+4。</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STRIDER</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某流亡畸體研究者開發的特殊皮革素材製成的帶腿甲戰靴，同時擁有堅固性和舒適性。</text:p>
            <text:p>你的戰鬥移動+5m。</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神樹的圓木</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4" calcext:value-type="float">
            <text:p>-4</text:p>
          </table:table-cell>
          <table:table-cell table:style-name="ce54" office:value-type="float" office:value="5" calcext:value-type="float">
            <text:p>5</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從上百年樹齡的神樹上切割出的圓木，雖然只是圓木但是帶有神樹中寄宿的EX背教者，能發揮其質量以上的粉碎力。</text:p>
            <text:p>若該回合間你沒有移動，使用該武器進行攻擊的攻擊力+10。雙手持握。</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混沌者之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12" calcext:value-type="float">
            <text:p>12</text:p>
          </table:table-cell>
          <table:table-cell table:style-name="ce54" office:value-type="float" office:value="4" calcext:value-type="float">
            <text:p>4</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被EX背教者感染而形狀變化的長槍，能夠與複數症候的異能組合的攻擊發生強大的反應。</text:p>
            <text:p>該武器進行的攻擊判定中組合了兩種以上症候的異能（一般異能除外）時判定骰數+3個。雙手持握。</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蛇腹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8" calcext:value-type="float">
            <text:p>8</text:p>
          </table:table-cell>
          <table:table-cell table:style-name="ce54" office:value-type="float" office:value="3" calcext:value-type="float">
            <text:p>3</text:p>
          </table:table-cell>
          <table:table-cell table:style-name="ce54" office:value-type="string" calcext:value-type="string">
            <text:p>至近/15m</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將分割成數段的劍身中間用纖維繩連接的西洋劍，按下劍柄的開關就能分開連接變成長射程的鞭子。</text:p>
            <text:p>次要動作之前使用，射程變為15m，此時使用該武器進行的攻擊判定骰數-1個，該效果隨時可以解除。</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戰鬥守護者</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float" office:value="4" calcext:value-type="float">
            <text:p>4</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劍柄兩端都有刃的長劍，能與背教者反應的謎之刀身能夠做出攻防一體的動作。</text:p>
            <text:p>使用該武器與異能組合進行的近戰攻擊，攻擊力+4。使用該武器進行的格擋受到你使用的異能效果影響時，格擋值+4。</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膽小鬼的短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0" calcext:value-type="float">
            <text:p>0</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據說給了手上受傷的為政者最後一擊的短劍。</text:p>
            <text:p>準備階段使用，若你在該回合中沒有受到1點以上HP傷害，回合結束前使用該武器進行的攻擊傷害+2D10。</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妖刀</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10" calcext:value-type="float">
            <text:p>10</text:p>
          </table:table-cell>
          <table:table-cell table:style-name="ce54" office:value-type="float" office:value="4" calcext:value-type="float">
            <text:p>4</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近代之前熟練劍客使用的據說吸收了數人鮮血的日本刀，受到使用者情感侵染，臨近戰鬥時會發出刀鍔自鳴表達欣喜，因為感染了EX背教者所以擁有超越普通刀劍的破壞力。</text:p>
            <text:p>你的侵蝕率超過100%時攻擊力+2。</text:p>
          </table:table-cell>
          <table:table-cell table:style-name="ce54" office:value-type="string" calcext:value-type="string">
            <text:p>IA P56</text:p>
          </table:table-cell>
          <table:table-cell table:style-name="ce53" table:number-columns-repeated="13"/>
          <table:table-cell table:number-columns-repeated="998"/>
        </table:table-row>
        <table:table-row table:style-name="ro2">
          <table:table-cell table:style-name="ce42" office:value-type="string" calcext:value-type="string">
            <text:p>生命之環</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number-columns-repeated="2" table:style-name="ce54" office:value-type="float" office:value="5" calcext:value-type="float">
            <text:p>5</text:p>
          </table:table-cell>
          <table:table-cell table:style-name="ce54" office:value-type="string" calcext:value-type="string">
            <text:p>至近</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使用剛性極強的金屬製作的環狀打擊武器，按壓的話會變軟，寄宿有通過運動增強使用者的生命力的不可思議能力。</text:p>
            <text:p>次要動作使用，你回復3D10HP，使用該效果時你的侵蝕率+2。</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鏈鋸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style-name="ce54" office:value-type="float" office:value="16" calcext:value-type="float">
            <text:p>16</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使用特殊鋼材製作刀刃的戰鬥用鏈鋸，據說是由結社的犯罪者為了製造恐懼而開發，雖然從實戰武器角度來說一言難盡，但只說攻擊力的話是夠格的。</text:p>
            <text:p>次要動作使用，該場景間可以將該道具作為武器使用。雙手持握。</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堅兵戰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12" calcext:value-type="float">
            <text:p>12</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使用能與異能反應的特殊合金製作的劍，背教者越活性化劍就越鋒利。</text:p>
            <text:p>次要動作使用，該場景間該武器攻擊力+3，每次使用該效果你的侵蝕率+2，該效果最多可以疊加3次。</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閃光之刃</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5" calcext:value-type="float">
            <text:p>5</text:p>
          </table:table-cell>
          <table:table-cell table:style-name="ce54" office:value-type="float" office:value="2" calcext:value-type="float">
            <text:p>2</text:p>
          </table:table-cell>
          <table:table-cell table:style-name="ce54" office:value-type="string" calcext:value-type="string">
            <text:p>至近</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從刀身放出光的古老刀具，可以暫時將刀身變成巨大的光刃進行大範圍揮砍。</text:p>
            <text:p>次要動作使用，該主要階段間使用該武器進行的近戰攻擊變為[對象：範圍（選擇）]，該效果優先級大於組合異能的對象，該效果一場景可以使用一次。</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液態劍</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number-columns-repeated="2" table:style-name="ce54" office:value-type="string" calcext:value-type="string">
            <text:p>參照解說</text:p>
          </table:table-cell>
          <table:table-cell table:style-name="ce54" office:value-type="string" calcext:value-type="string">
            <text:p>至近</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使用被EX背教者生命體感染的液態金屬製作的劍，可以根據使用者的嗜好變成最合適的形態。</text:p>
            <text:p>取得時可以將該武器的攻擊力和格擋值在總計12點範圍內自由分配，雙方最低需要分配1點，可以使用主要動作變更分配數值。</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切裂之剪</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14" calcext:value-type="float">
            <text:p>14</text:p>
          </table:table-cell>
          <table:table-cell table:style-name="ce54" office:value-type="float" office:value="0" calcext:value-type="float">
            <text:p>0</text:p>
          </table:table-cell>
          <table:table-cell table:style-name="ce54" office:value-type="string" calcext:value-type="string">
            <text:p>至近</text:p>
          </table:table-cell>
          <table:table-cell table:style-name="ce54" table:number-columns-repeated="3"/>
          <table:table-cell table:style-name="ce54" office:value-type="float" office:value="40" calcext:value-type="float">
            <text:p>40</text:p>
          </table:table-cell>
          <table:table-cell table:style-name="ce49" office:value-type="string" calcext:value-type="string">
            <text:p>切斷特化單刃劍，其獨特的握柄看起來像是剪刀柄。</text:p>
            <text:p>使用該武器進行攻擊時無視對方裝甲值，若對象裝備多個防具，則防具提供的裝甲值只無視最高的一件。</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雲罅</text:p>
          </table:table-cell>
          <table:table-cell table:style-name="ce54" office:value-type="string" calcext:value-type="string">
            <text:p>近戰/射擊</text:p>
          </table:table-cell>
          <table:table-cell table:style-name="ce54" office:value-type="string" calcext:value-type="string">
            <text:p>&lt;近戰&gt;/&lt;射擊&gt;</text:p>
          </table:table-cell>
          <table:table-cell table:style-name="ce54" office:value-type="float" office:value="0" calcext:value-type="float">
            <text:p>0</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string" calcext:value-type="string">
            <text:p>至近/10m</text:p>
          </table:table-cell>
          <table:table-cell table:style-name="ce54" table:number-columns-repeated="3"/>
          <table:table-cell table:style-name="ce54" office:value-type="float" office:value="45" calcext:value-type="float">
            <text:p>45</text:p>
          </table:table-cell>
          <table:table-cell table:style-name="ce49" office:value-type="string" calcext:value-type="string">
            <text:p>擁有俊足之力的EX背教者苦無，其速度據說能卷起疾風切斷天空中的雲。</text:p>
            <text:p>以[種類：射擊]使用時，技能與射程數據參照右側。準備階段使用，該回合間你的行動值+10，該效果一場景可以使用一次。</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腥風</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3" calcext:value-type="float">
            <text:p>-3</text:p>
          </table:table-cell>
          <table:table-cell table:style-name="ce54" office:value-type="float" office:value="17" calcext:value-type="float">
            <text:p>17</text:p>
          </table:table-cell>
          <table:table-cell table:style-name="ce54" office:value-type="float" office:value="4" calcext:value-type="float">
            <text:p>4</text:p>
          </table:table-cell>
          <table:table-cell table:style-name="ce54" office:value-type="string" calcext:value-type="string">
            <text:p>至近</text:p>
          </table:table-cell>
          <table:table-cell table:style-name="ce54" table:number-columns-repeated="3"/>
          <table:table-cell table:style-name="ce54" office:value-type="float" office:value="60" calcext:value-type="float">
            <text:p>60</text:p>
          </table:table-cell>
          <table:table-cell table:style-name="ce49" office:value-type="string" calcext:value-type="string">
            <text:p>揮舞就能引起風暴的大戰斧，面對大軍才能發揮威力。</text:p>
            <text:p>使用該武器進行攻擊判定前使用，該攻擊若非[對象：單體]則傷害+3D10，使用該效果時你的侵蝕率+3。雙手持握。</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哀慟薔薇</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2" calcext:value-type="float">
            <text:p>-2</text:p>
          </table:table-cell>
          <table:table-cell table:style-name="ce54" office:value-type="float" office:value="21" calcext:value-type="float">
            <text:p>21</text:p>
          </table:table-cell>
          <table:table-cell table:style-name="ce54" office:value-type="float" office:value="0" calcext:value-type="float">
            <text:p>0</text:p>
          </table:table-cell>
          <table:table-cell table:style-name="ce54" office:value-type="string" calcext:value-type="string">
            <text:p>20m</text:p>
          </table:table-cell>
          <table:table-cell table:style-name="ce54" table:number-columns-repeated="3"/>
          <table:table-cell table:style-name="ce54" office:value-type="float" office:value="65" calcext:value-type="float">
            <text:p>65</text:p>
          </table:table-cell>
          <table:table-cell table:style-name="ce49" office:value-type="string" calcext:value-type="string">
            <text:p>據說是某壓迫者使用的如血般赤紅的鞭子，被上面的荊棘撕裂的人會感到胸口被撕開一樣的悲痛。</text:p>
            <text:p>使用該武器攻擊受到傷害的對象該回合間判定達成值-5。</text:p>
          </table:table-cell>
          <table:table-cell table:style-name="ce54" office:value-type="string" calcext:value-type="string">
            <text:p>IA P57</text:p>
          </table:table-cell>
          <table:table-cell table:style-name="ce53" table:number-columns-repeated="13"/>
          <table:table-cell table:number-columns-repeated="998"/>
        </table:table-row>
        <table:table-row table:style-name="ro2">
          <table:table-cell table:style-name="ce42" office:value-type="string" calcext:value-type="string">
            <text:p>骸骨王座</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23" calcext:value-type="float">
            <text:p>23</text:p>
          </table:table-cell>
          <table:table-cell table:style-name="ce54" office:value-type="float" office:value="18" calcext:value-type="float">
            <text:p>18</text:p>
          </table:table-cell>
          <table:table-cell table:style-name="ce54" office:value-type="string" calcext:value-type="string">
            <text:p>至近</text:p>
          </table:table-cell>
          <table:table-cell table:style-name="ce54" table:number-columns-repeated="3"/>
          <table:table-cell table:style-name="ce54" office:value-type="float" office:value="70" calcext:value-type="float">
            <text:p>70</text:p>
          </table:table-cell>
          <table:table-cell table:style-name="ce49" office:value-type="string" calcext:value-type="string">
            <text:p>嵌有某人骷髏的鐵手套，會根據使用者的器量與沉重的罪業相反應給予力量。</text:p>
            <text:p>只有侵蝕率在100%以上間可以使用該武器。該武器視為空手。</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悲哀之楔</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17" calcext:value-type="float">
            <text:p>17</text:p>
          </table:table-cell>
          <table:table-cell table:style-name="ce54" office:value-type="float" office:value="7" calcext:value-type="float">
            <text:p>7</text:p>
          </table:table-cell>
          <table:table-cell table:style-name="ce54" office:value-type="string" calcext:value-type="string">
            <text:p>至近</text:p>
          </table:table-cell>
          <table:table-cell table:style-name="ce54" table:number-columns-repeated="3"/>
          <table:table-cell table:style-name="ce54" office:value-type="float" office:value="70" calcext:value-type="float">
            <text:p>70</text:p>
          </table:table-cell>
          <table:table-cell table:style-name="ce49" office:value-type="string" calcext:value-type="string">
            <text:p>刺向心底深藏的負面情感將其增幅的不祥長槍。</text:p>
            <text:p>使用該武器進行的近戰攻擊命中處於不良狀態[暴走]的對象時，該主要階段結束時該對象侵蝕率+1D10。雙手持握。</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方陣</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1" calcext:value-type="float">
            <text:p>-1</text:p>
          </table:table-cell>
          <table:table-cell table:style-name="ce54" office:value-type="float" office:value="4" calcext:value-type="float">
            <text:p>4</text:p>
          </table:table-cell>
          <table:table-cell table:style-name="ce54" office:value-type="float" office:value="7" calcext:value-type="float">
            <text:p>7</text:p>
          </table:table-cell>
          <table:table-cell table:style-name="ce54" office:value-type="string" calcext:value-type="string">
            <text:p>至近</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UGN開發的近戰用彈道盾，增設了能讓持盾的超越者直接進行鎮壓的尖刺和握柄。</text:p>
            <text:p>次要動作使用，該主要階段間你進行攻擊的攻擊力+3。</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異能射手</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10" calcext:value-type="float">
            <text:p>10</text:p>
          </table:table-cell>
          <table:table-cell table:style-name="ce49" office:value-type="string" calcext:value-type="string">
            <text:p>將異能以子彈擊出的手槍，射出的子彈根據症候會產生冰、火、雷、音波、爪、針甚至是破壞精神的催眠波等。</text:p>
            <text:p>使用該武器進行攻擊時侵蝕率+1，非超越者角色不能使用。</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閃現者</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6" calcext:value-type="float">
            <text:p>6</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10" calcext:value-type="float">
            <text:p>10</text:p>
          </table:table-cell>
          <table:table-cell table:style-name="ce49" office:value-type="string" calcext:value-type="string">
            <text:p>將扭曲空間的子彈射出的EX背教者衝鋒槍，擊出的子彈會從目標背後出現而無法回避。</text:p>
            <text:p>使用該武器進行的射擊攻擊變為[對象：單體]，該效果優先級大於組合異能的對象。針對使用該武器進行的攻擊，對象進行的回避判定骰數-4個。</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影縫</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7" calcext:value-type="float">
            <text:p>7</text:p>
          </table:table-cell>
          <table:table-cell table:style-name="ce54" office:value-type="string" calcext:value-type="string">
            <text:p>-</text:p>
          </table:table-cell>
          <table:table-cell table:style-name="ce54" office:value-type="string" calcext:value-type="string">
            <text:p>15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能將飛鳥之影釘住的投擲匕首，有非常高的精度，能將敵人的攻擊擊落。</text:p>
            <text:p>你對&lt;射擊&gt;判定進行的回應動作判定骰數+2個。</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試作型激光炮</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10" calcext:value-type="float">
            <text:p>10</text:p>
          </table:table-cell>
          <table:table-cell table:style-name="ce54" office:value-type="string" calcext:value-type="string">
            <text:p>-</text:p>
          </table:table-cell>
          <table:table-cell table:style-name="ce54" office:value-type="string" calcext:value-type="string">
            <text:p>100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UGN試做的步兵用自由電子激光炮，需要搭配巨大的背包型電池使用（雷擊黑犬症候除外）。</text:p>
            <text:p>使用該武器進行的攻擊在計算對象裝甲值時-15（最低0）。你未擁有雷擊黑犬症候時行動值-5，回避達成值-2。</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奪命籌碼</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7" calcext:value-type="float">
            <text:p>7</text:p>
          </table:table-cell>
          <table:table-cell table:style-name="ce54" office:value-type="string" calcext:value-type="string">
            <text:p>-</text:p>
          </table:table-cell>
          <table:table-cell table:style-name="ce54" office:value-type="string" calcext:value-type="string">
            <text:p>10m</text:p>
          </table:table-cell>
          <table:table-cell table:style-name="ce54" table:number-columns-repeated="3"/>
          <table:table-cell table:style-name="ce54" office:value-type="float" office:value="15" calcext:value-type="float">
            <text:p>15</text:p>
          </table:table-cell>
          <table:table-cell table:style-name="ce49" office:value-type="string" calcext:value-type="string">
            <text:p>UGN開發的超越者用投擲武器，平時是硬幣型，會與異能反應變成使用者想像的形態。</text:p>
            <text:p>次要動作使用，該主要階段間使用該武器組合異能進行的攻擊判定骰數+2個。</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被詛咒者之槍</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9" calcext:value-type="float">
            <text:p>9</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20" calcext:value-type="float">
            <text:p>20</text:p>
          </table:table-cell>
          <table:table-cell table:style-name="ce49" office:value-type="string" calcext:value-type="string">
            <text:p>曾死於非命的名槍手使用的舊槍，被EX背教者感染後能按持有者的意志扭曲物理法則，使用這種力量的哪怕是普通子彈也能擊穿鋼鐵。</text:p>
            <text:p>組合異能的攻擊判定骰數+1個。</text:p>
          </table:table-cell>
          <table:table-cell table:style-name="ce54" office:value-type="string" calcext:value-type="string">
            <text:p>IA P58</text:p>
          </table:table-cell>
          <table:table-cell table:style-name="ce53" table:number-columns-repeated="13"/>
          <table:table-cell table:number-columns-repeated="998"/>
        </table:table-row>
        <table:table-row table:style-name="ro2">
          <table:table-cell table:style-name="ce42" office:value-type="string" calcext:value-type="string">
            <text:p>魔彈射手</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10" calcext:value-type="float">
            <text:p>10</text:p>
          </table:table-cell>
          <table:table-cell table:style-name="ce54" office:value-type="string" calcext:value-type="string">
            <text:p>-</text:p>
          </table:table-cell>
          <table:table-cell table:style-name="ce54" office:value-type="string" calcext:value-type="string">
            <text:p>視野</text:p>
          </table:table-cell>
          <table:table-cell table:style-name="ce54" table:number-columns-repeated="3"/>
          <table:table-cell table:style-name="ce54" office:value-type="float" office:value="25" calcext:value-type="float">
            <text:p>25</text:p>
          </table:table-cell>
          <table:table-cell table:style-name="ce49" office:value-type="string" calcext:value-type="string">
            <text:p>永遠只能準備三發子彈，射出後能永遠追蹤目標的狙擊槍，對EX背教者來說不存在射擊距離這一概念。</text:p>
            <text:p>對使用該武器進行的攻擊的閃避判定骰數-2個，該武器的射程優先級大於組合異能的射程。該武器一劇本可以使用三次。至近不可。</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暴風纏繞者</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float" office:value="12" calcext:value-type="float">
            <text:p>12</text:p>
          </table:table-cell>
          <table:table-cell table:style-name="ce54" office:value-type="string" calcext:value-type="string">
            <text:p>-</text:p>
          </table:table-cell>
          <table:table-cell table:style-name="ce54" office:value-type="string" calcext:value-type="string">
            <text:p>【肉體】+20m</text:p>
          </table:table-cell>
          <table:table-cell table:style-name="ce54" table:number-columns-repeated="3"/>
          <table:table-cell table:style-name="ce54" office:value-type="float" office:value="30" calcext:value-type="float">
            <text:p>30</text:p>
          </table:table-cell>
          <table:table-cell table:style-name="ce49" office:value-type="string" calcext:value-type="string">
            <text:p>被EX背教者感染的弓，用這把弓射出的箭矢在風暴中也能筆直前進。</text:p>
            <text:p>使用該武器進行的攻擊判定不會受到來自其他角色使用的異能減少骰數效果影響。雙手持握。至近不可。</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送葬者</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string" calcext:value-type="string">
            <text:p>7/15</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擁有送葬者之異名的大口徑左輪手槍，後坐力極大，沒有高超的瞄準能力難以使用。</text:p>
            <text:p>【感覺】為10以上時，攻擊力使用右側數據。</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朱紅風暴</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string" calcext:value-type="string">
            <text:p>22</text:p>
          </table:table-cell>
          <table:table-cell table:style-name="ce54" office:value-type="string" calcext:value-type="string">
            <text:p>-</text:p>
          </table:table-cell>
          <table:table-cell table:style-name="ce54" office:value-type="string" calcext:value-type="string">
            <text:p>300m</text:p>
          </table:table-cell>
          <table:table-cell table:style-name="ce54" table:number-columns-repeated="3"/>
          <table:table-cell table:style-name="ce54" office:value-type="float" office:value="35" calcext:value-type="float">
            <text:p>35</text:p>
          </table:table-cell>
          <table:table-cell table:style-name="ce49" office:value-type="string" calcext:value-type="string">
            <text:p>以超越者使用為考量開發的超大型步槍，其後坐力會對身體產生極大的負荷。</text:p>
            <text:p>使用該武器的主要階段結束時你失去1D10HP。雙手持握。至近不可。</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決鬥領主</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string" calcext:value-type="string">
            <text:p>9</text:p>
          </table:table-cell>
          <table:table-cell table:style-name="ce54" office:value-type="string" calcext:value-type="string">
            <text:p>-</text:p>
          </table:table-cell>
          <table:table-cell table:style-name="ce54" office:value-type="string" calcext:value-type="string">
            <text:p>20m</text:p>
          </table:table-cell>
          <table:table-cell table:style-name="ce54" table:number-columns-repeated="3"/>
          <table:table-cell table:style-name="ce54" office:value-type="float" office:value="45" calcext:value-type="float">
            <text:p>45</text:p>
          </table:table-cell>
          <table:table-cell table:style-name="ce49" office:value-type="string" calcext:value-type="string">
            <text:p>古舊的杠杆式霰彈槍。槍身很短，在近戰中才能發揮威力。</text:p>
            <text:p>使用該武器對處於同一接戰區域內的角色進行攻擊時攻擊力+10，該效果的攻擊對象必須是[對象：單體]。</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蒼藍叛亂</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0" calcext:value-type="float">
            <text:p>0</text:p>
          </table:table-cell>
          <table:table-cell table:style-name="ce54" office:value-type="float" office:value="21" calcext:value-type="float">
            <text:p>21</text:p>
          </table:table-cell>
          <table:table-cell table:style-name="ce54" office:value-type="string" calcext:value-type="string">
            <text:p>-</text:p>
          </table:table-cell>
          <table:table-cell table:style-name="ce54" office:value-type="string" calcext:value-type="string">
            <text:p>200m</text:p>
          </table:table-cell>
          <table:table-cell table:style-name="ce54" table:number-columns-repeated="3"/>
          <table:table-cell table:style-name="ce54" office:value-type="float" office:value="60" calcext:value-type="float">
            <text:p>60</text:p>
          </table:table-cell>
          <table:table-cell table:style-name="ce49" office:value-type="string" calcext:value-type="string">
            <text:p>以超越者使用為考量開發的狙擊槍，優秀的槍手使用時能發揮更高的精度。</text:p>
            <text:p>次要動作使用，該主要階段間使用該武器進行的攻擊判定達成值+[【感覺】+5]。至近不可。</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猩紅龍息</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1" calcext:value-type="float">
            <text:p>-1</text:p>
          </table:table-cell>
          <table:table-cell table:style-name="ce54" office:value-type="float" office:value="18" calcext:value-type="float">
            <text:p>18</text:p>
          </table:table-cell>
          <table:table-cell table:style-name="ce54" office:value-type="string" calcext:value-type="string">
            <text:p>-</text:p>
          </table:table-cell>
          <table:table-cell table:style-name="ce54" office:value-type="string" calcext:value-type="string">
            <text:p>30m</text:p>
          </table:table-cell>
          <table:table-cell table:style-name="ce54" table:number-columns-repeated="3"/>
          <table:table-cell table:style-name="ce54" office:value-type="float" office:value="65" calcext:value-type="float">
            <text:p>65</text:p>
          </table:table-cell>
          <table:table-cell table:style-name="ce49" office:value-type="string" calcext:value-type="string">
            <text:p>據說感染了火龍詛咒的標槍，命中後會產生爆炸，但槍會完好無損地回到手中。</text:p>
            <text:p>使用該武器進行的攻擊變為[對象：範圍]，該效果優先級大於組合異能的對象。使用該武器進行攻擊時你的侵蝕率+3。</text:p>
            <text:p>至近不可</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巴別巨塔</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3" calcext:value-type="float">
            <text:p>-3</text:p>
          </table:table-cell>
          <table:table-cell table:style-name="ce54" office:value-type="float" office:value="22" calcext:value-type="float">
            <text:p>22</text:p>
          </table:table-cell>
          <table:table-cell table:style-name="ce54" office:value-type="string" calcext:value-type="string">
            <text:p>-</text:p>
          </table:table-cell>
          <table:table-cell table:style-name="ce54" office:value-type="string" calcext:value-type="string">
            <text:p>50m</text:p>
          </table:table-cell>
          <table:table-cell table:style-name="ce54" table:number-columns-repeated="3"/>
          <table:table-cell table:style-name="ce54" office:value-type="float" office:value="70" calcext:value-type="float">
            <text:p>70</text:p>
          </table:table-cell>
          <table:table-cell table:style-name="ce49" office:value-type="string" calcext:value-type="string">
            <text:p>類似現代複合弓一樣用大量滑輪和纜線組裝的古代弓，射出的箭矢會伴隨雷電，據說能夠毀滅巨塔。</text:p>
            <text:p>次要動作使用，該主要階段間使用該武器進行的射擊攻擊傷害+3D10，該效果一劇本可以使用三次。雙手持握。至近不可。</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42" office:value-type="string" calcext:value-type="string">
            <text:p>破夜拂曉</text:p>
          </table:table-cell>
          <table:table-cell table:style-name="ce54" office:value-type="string" calcext:value-type="string">
            <text:p>射擊</text:p>
          </table:table-cell>
          <table:table-cell table:style-name="ce54" office:value-type="string" calcext:value-type="string">
            <text:p>&lt;射擊&gt;</text:p>
          </table:table-cell>
          <table:table-cell table:style-name="ce54" office:value-type="float" office:value="-2" calcext:value-type="float">
            <text:p>-2</text:p>
          </table:table-cell>
          <table:table-cell table:style-name="ce54" office:value-type="string" calcext:value-type="string">
            <text:p>0/28</text:p>
          </table:table-cell>
          <table:table-cell table:style-name="ce54" office:value-type="string" calcext:value-type="string">
            <text:p>-</text:p>
          </table:table-cell>
          <table:table-cell table:style-name="ce54" office:value-type="string" calcext:value-type="string">
            <text:p>200m</text:p>
          </table:table-cell>
          <table:table-cell table:style-name="ce54" table:number-columns-repeated="3"/>
          <table:table-cell table:style-name="ce54" office:value-type="float" office:value="75" calcext:value-type="float">
            <text:p>75</text:p>
          </table:table-cell>
          <table:table-cell table:style-name="ce49" office:value-type="string" calcext:value-type="string">
            <text:p>被天使光環EX背教者感染的激光炮，發射需要蓄力，但其火力能一擊熔斷高樓。</text:p>
            <text:p>準備階段使用，該回合間該武器攻擊力使用右側數據，你的行動值-10。使用該武器進行的攻擊無視裝甲值。至近不可。</text:p>
          </table:table-cell>
          <table:table-cell table:style-name="ce54" office:value-type="string" calcext:value-type="string">
            <text:p>IA P59</text:p>
          </table:table-cell>
          <table:table-cell table:style-name="ce53" table:number-columns-repeated="13"/>
          <table:table-cell table:number-columns-repeated="998"/>
        </table:table-row>
        <table:table-row table:style-name="ro2">
          <table:table-cell table:style-name="ce57" office:value-type="string" calcext:value-type="string" table:number-columns-spanned="13" table:number-rows-spanned="1">
            <text:p>防具</text:p>
          </table:table-cell>
          <table:covered-table-cell table:number-columns-repeated="12"/>
          <table:table-cell table:style-name="ce53" table:number-columns-repeated="13"/>
          <table:table-cell table:number-columns-repeated="998"/>
        </table:table-row>
        <table:table-row table:style-name="ro2">
          <table:table-cell table:style-name="ce42" office:value-type="string" calcext:value-type="string">
            <text:p>RMA裝甲</text:p>
          </table:table-cell>
          <table:table-cell table:style-name="ce54" office:value-type="string" calcext:value-type="string">
            <text:p>防具</text:p>
          </table:table-cell>
          <table:table-cell table:style-name="ce54" table:number-columns-repeated="5"/>
          <table:table-cell table:style-name="ce54" office:value-type="float" office:value="-2" calcext:value-type="float">
            <text:p>-2</text:p>
          </table:table-cell>
          <table:table-cell table:style-name="ce54" office:value-type="float" office:value="0" calcext:value-type="float">
            <text:p>0</text:p>
          </table:table-cell>
          <table:table-cell table:style-name="ce54" office:value-type="float" office:value="4" calcext:value-type="float">
            <text:p>4</text:p>
          </table:table-cell>
          <table:table-cell table:style-name="ce54" office:value-type="float" office:value="10" calcext:value-type="float">
            <text:p>10</text:p>
          </table:table-cell>
          <table:table-cell table:style-name="ce49" office:value-type="string" calcext:value-type="string">
            <text:p>通過網絡與使用者進行實時情報連接的最新型戰鬥服，可以從衛星獲取情報並反應在武器與瞄準裝置上，是防衛隊和美軍採用的實驗裝備。</text:p>
            <text:p>準備階段使用，該回合間你的行動值+4，該效果一場景可以使用一次。</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鐵織</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4" calcext:value-type="float">
            <text:p>4</text:p>
          </table:table-cell>
          <table:table-cell table:style-name="ce54" office:value-type="float" office:value="15" calcext:value-type="float">
            <text:p>15</text:p>
          </table:table-cell>
          <table:table-cell table:style-name="ce49" office:value-type="string" calcext:value-type="string">
            <text:p>用金屬般強韌的素材製作的和服，據說是江戶時期製作的EX背教者物品。</text:p>
            <text:p>你受到來自處於同一接戰區的對象攻擊時，你受到的傷害-5。</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多重支援套裝</text:p>
          </table:table-cell>
          <table:table-cell table:style-name="ce54" office:value-type="string" calcext:value-type="string">
            <text:p>防具</text:p>
          </table:table-cell>
          <table:table-cell table:style-name="ce54" table:number-columns-repeated="5"/>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4" calcext:value-type="float">
            <text:p>4</text:p>
          </table:table-cell>
          <table:table-cell table:style-name="ce54" office:value-type="float" office:value="15" calcext:value-type="float">
            <text:p>15</text:p>
          </table:table-cell>
          <table:table-cell table:style-name="ce49" office:value-type="string" calcext:value-type="string">
            <text:p>UGN開發的任務支援用特殊套裝，能根據使用者的希望安裝各種輔助功能。</text:p>
            <text:p>取得時選擇一項能力值（肉體/感覺/精神/社會），使用該能力值進行的判定骰數+2個，該效果對判定和閃避判定無效。</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氣動力學套裝</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2" calcext:value-type="float">
            <text:p>-2</text:p>
          </table:table-cell>
          <table:table-cell table:style-name="ce54" office:value-type="float" office:value="6" calcext:value-type="float">
            <text:p>6</text:p>
          </table:table-cell>
          <table:table-cell table:style-name="ce54" office:value-type="float" office:value="20" calcext:value-type="float">
            <text:p>20</text:p>
          </table:table-cell>
          <table:table-cell table:style-name="ce49" office:value-type="string" calcext:value-type="string">
            <text:p>操縱時能將空氣阻力和G力影響減弱至極限的防護夾克，是為駕車進行偵查任務的超越者開發的。</text:p>
            <text:p>你處於登場狀態間，進行判定時若受到減少骰數效果，你可以無視最多4個減益骰，但你使用的異能和道具不受該效果影響。</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強力推進器</text:p>
          </table:table-cell>
          <table:table-cell table:style-name="ce54" office:value-type="string" calcext:value-type="string">
            <text:p>防具</text:p>
          </table:table-cell>
          <table:table-cell table:style-name="ce54" table:number-columns-repeated="5"/>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7" calcext:value-type="float">
            <text:p>7</text:p>
          </table:table-cell>
          <table:table-cell table:style-name="ce54" office:value-type="float" office:value="20" calcext:value-type="float">
            <text:p>20</text:p>
          </table:table-cell>
          <table:table-cell table:style-name="ce49" office:value-type="string" calcext:value-type="string">
            <text:p>UGN開發的近戰用身體裝甲，伸縮性服裝增幅了其爆發力，能夠應對各種超越者。</text:p>
            <text:p>你的戰鬥移動+5m，該防具在《完全獸化》效果中也能裝備。</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原型武裝套裝</text:p>
          </table:table-cell>
          <table:table-cell table:style-name="ce54" office:value-type="string" calcext:value-type="string">
            <text:p>防具</text:p>
          </table:table-cell>
          <table:table-cell table:style-name="ce54" table:number-columns-repeated="5"/>
          <table:table-cell table:style-name="ce54" office:value-type="float" office:value="-3" calcext:value-type="float">
            <text:p>-3</text:p>
          </table:table-cell>
          <table:table-cell table:style-name="ce54" office:value-type="float" office:value="-2" calcext:value-type="float">
            <text:p>-2</text:p>
          </table:table-cell>
          <table:table-cell table:style-name="ce54" office:value-type="float" office:value="10" calcext:value-type="float">
            <text:p>10</text:p>
          </table:table-cell>
          <table:table-cell table:style-name="ce54" office:value-type="float" office:value="20" calcext:value-type="float">
            <text:p>20</text:p>
          </table:table-cell>
          <table:table-cell table:style-name="ce49" office:value-type="string" calcext:value-type="string">
            <text:p>UGN廣泛應用的武裝套裝原型，使用馬裡亞納海溝底部發掘的未知精神感應金屬，擁有超越量產型的防禦力。</text:p>
            <text:p>你使用【肉體】進行的判定達成值+2。</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動作禮服</text:p>
          </table:table-cell>
          <table:table-cell table:style-name="ce54" office:value-type="string" calcext:value-type="string">
            <text:p>防具</text:p>
          </table:table-cell>
          <table:table-cell table:style-name="ce54" table:number-columns-repeated="5"/>
          <table:table-cell table:style-name="ce54" office:value-type="float" office:value="0" calcext:value-type="float">
            <text:p>0</text:p>
          </table:table-cell>
          <table:table-cell table:style-name="ce54" office:value-type="float" office:value="5" calcext:value-type="float">
            <text:p>5</text:p>
          </table:table-cell>
          <table:table-cell table:style-name="ce54" office:value-type="float" office:value="9" calcext:value-type="float">
            <text:p>9</text:p>
          </table:table-cell>
          <table:table-cell table:style-name="ce54" office:value-type="float" office:value="25" calcext:value-type="float">
            <text:p>25</text:p>
          </table:table-cell>
          <table:table-cell table:style-name="ce49" office:value-type="string" calcext:value-type="string">
            <text:p>重點為增強反應速度的武裝套裝發展型，使用特殊纖維獲得了防彈防刃效果，作為新世代UGN戰鬥服備受眾望，現在由一部分特殊部隊試驗運用中。</text:p>
            <text:p>取得該防具需要[關聯：UGN幹部]或UGN本部特工/評議員的紋章</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詛咒十字</text:p>
          </table:table-cell>
          <table:table-cell table:style-name="ce54" office:value-type="string" calcext:value-type="string">
            <text:p>防具</text:p>
          </table:table-cell>
          <table:table-cell table:style-name="ce54" table:number-columns-repeated="5"/>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30" calcext:value-type="float">
            <text:p>30</text:p>
          </table:table-cell>
          <table:table-cell table:style-name="ce49" office:value-type="string" calcext:value-type="string">
            <text:p>被EX背教者感染的古舊禮服，被曾經擁有者的怨念之力侵染。</text:p>
            <text:p>你進行的&lt;RC&gt;判定達成值+4，使用&lt;RC&gt;進行攻擊的攻擊力+4，使用該效果時你的侵蝕率+3。</text:p>
          </table:table-cell>
          <table:table-cell table:style-name="ce54" office:value-type="string" calcext:value-type="string">
            <text:p>IA P60</text:p>
          </table:table-cell>
          <table:table-cell table:style-name="ce53" table:number-columns-repeated="13"/>
          <table:table-cell table:number-columns-repeated="998"/>
        </table:table-row>
        <table:table-row table:style-name="ro2">
          <table:table-cell table:style-name="ce42" office:value-type="string" calcext:value-type="string">
            <text:p>秘密指令</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12" calcext:value-type="float">
            <text:p>12</text:p>
          </table:table-cell>
          <table:table-cell table:style-name="ce54" office:value-type="float" office:value="35" calcext:value-type="float">
            <text:p>35</text:p>
          </table:table-cell>
          <table:table-cell table:style-name="ce49" office:value-type="string" calcext:value-type="string">
            <text:p>神城集團為特工開發的高級套裝，同樣的物品在各組織之間也有使用，外觀看起來是普通的衣服，實際上縫入了精神感應金屬絲能夠根據使用者的意志增強防彈性能。</text:p>
            <text:p>你受到的傷害-【精神】。</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罪人之縛</text:p>
          </table:table-cell>
          <table:table-cell table:style-name="ce54" office:value-type="string" calcext:value-type="string">
            <text:p>防具</text:p>
          </table:table-cell>
          <table:table-cell table:style-name="ce54" table:number-columns-repeated="5"/>
          <table:table-cell table:number-columns-repeated="2" table:style-name="ce54" office:value-type="float" office:value="-2" calcext:value-type="float">
            <text:p>-2</text:p>
          </table:table-cell>
          <table:table-cell table:style-name="ce54" office:value-type="float" office:value="5" calcext:value-type="float">
            <text:p>5</text:p>
          </table:table-cell>
          <table:table-cell table:style-name="ce54" office:value-type="float" office:value="40" calcext:value-type="float">
            <text:p>40</text:p>
          </table:table-cell>
          <table:table-cell table:style-name="ce49" office:value-type="string" calcext:value-type="string">
            <text:p>被EX背教者感染的拘束衣，沾染了大量穿著過的罪犯怨念，會給予能夠解開束縛的人力量。</text:p>
            <text:p>你進行攻擊前使用，該攻擊的傷害+3D10，使用該效果後該防具破壞。</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黑暗聖約</text:p>
          </table:table-cell>
          <table:table-cell table:style-name="ce54" office:value-type="string" calcext:value-type="string">
            <text:p>防具</text:p>
          </table:table-cell>
          <table:table-cell table:style-name="ce54" table:number-columns-repeated="5"/>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8" calcext:value-type="float">
            <text:p>8</text:p>
          </table:table-cell>
          <table:table-cell table:style-name="ce54" office:value-type="float" office:value="55" calcext:value-type="float">
            <text:p>55</text:p>
          </table:table-cell>
          <table:table-cell table:style-name="ce49" office:value-type="string" calcext:value-type="string">
            <text:p>增幅衝動的謎之黑色外套，研磨至極的衝動將成為達成目的強大意志的源頭。</text:p>
            <text:p>你受到不良狀態[暴走]間進行的判定骰數+4個，造成的傷害+5，你處於不良狀態[暴走]間也可以閃避。</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重裝PA裝甲</text:p>
          </table:table-cell>
          <table:table-cell table:style-name="ce54" office:value-type="string" calcext:value-type="string">
            <text:p>防具</text:p>
          </table:table-cell>
          <table:table-cell table:style-name="ce54" table:number-columns-repeated="5"/>
          <table:table-cell table:style-name="ce54" office:value-type="float" office:value="-7" calcext:value-type="float">
            <text:p>-7</text:p>
          </table:table-cell>
          <table:table-cell table:style-name="ce54" office:value-type="float" office:value="-5" calcext:value-type="float">
            <text:p>-5</text:p>
          </table:table-cell>
          <table:table-cell table:style-name="ce54" office:value-type="float" office:value="20" calcext:value-type="float">
            <text:p>20</text:p>
          </table:table-cell>
          <table:table-cell table:style-name="ce54" office:value-type="float" office:value="60" calcext:value-type="float">
            <text:p>60</text:p>
          </table:table-cell>
          <table:table-cell table:style-name="ce49" office:value-type="string" calcext:value-type="string">
            <text:p>為第二世代型動力裝甲安裝與第一世代型同等裝甲的突擊型號，背部有四條準備武器用的機械臂。</text:p>
            <text:p>你進行近戰攻擊的攻擊力+5，你可以將搭載火器視為雙手持握進行裝備。</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智能頭盔</text:p>
          </table:table-cell>
          <table:table-cell table:style-name="ce54" office:value-type="string" calcext:value-type="string">
            <text:p>防具（輔助）</text:p>
          </table:table-cell>
          <table:table-cell table:style-name="ce54" table:number-columns-repeated="5"/>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float" office:value="3" calcext:value-type="float">
            <text:p>3</text:p>
          </table:table-cell>
          <table:table-cell table:style-name="ce54" office:value-type="float" office:value="10" calcext:value-type="float">
            <text:p>10</text:p>
          </table:table-cell>
          <table:table-cell table:style-name="ce49" office:value-type="string" calcext:value-type="string">
            <text:p>搭載了AI導航機能的高性能頭盔，與車載電腦聯動後可以更加簡單地操縱，防彈性能也很高。</text:p>
            <text:p>你進行的&lt;駕駛：●●&gt;判定與為了調查道路交通狀態進行的判定骰數+2個。</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閃避靴</text:p>
          </table:table-cell>
          <table:table-cell table:style-name="ce54" office:value-type="string" calcext:value-type="string">
            <text:p>防具（輔助）</text:p>
          </table:table-cell>
          <table:table-cell table:style-name="ce54" table:number-columns-repeated="5"/>
          <table:table-cell table:style-name="ce54" office:value-type="float" office:value="0" calcext:value-type="float">
            <text:p>0</text:p>
          </table:table-cell>
          <table:table-cell table:style-name="ce54" office:value-type="float" office:value="-2" calcext:value-type="float">
            <text:p>-2</text:p>
          </table:table-cell>
          <table:table-cell table:style-name="ce54" office:value-type="float" office:value="2" calcext:value-type="float">
            <text:p>2</text:p>
          </table:table-cell>
          <table:table-cell table:style-name="ce54" office:value-type="float" office:value="10" calcext:value-type="float">
            <text:p>10</text:p>
          </table:table-cell>
          <table:table-cell table:style-name="ce49" office:value-type="string" calcext:value-type="string">
            <text:p>內部安裝小型火箭馬達的強化靴，緊急時可以採用立體回避，因為操控困難、燃燒時間短等問題難以普及。</text:p>
            <text:p>你進行&lt;回避&gt;判定前使用，該判定骰數+4個，該效果一回合可以使用一次。</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騎手防護</text:p>
          </table:table-cell>
          <table:table-cell table:style-name="ce54" office:value-type="string" calcext:value-type="string">
            <text:p>防具（輔助）</text:p>
          </table:table-cell>
          <table:table-cell table:style-name="ce54" table:number-columns-repeated="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10" calcext:value-type="float">
            <text:p>10</text:p>
          </table:table-cell>
          <table:table-cell table:style-name="ce49" office:value-type="string" calcext:value-type="string">
            <text:p>駕駛摩托等時使用的護胸，採用了減少操縱時阻力的設計。</text:p>
            <text:p>若受到減少骰數效果，你可以無視最多2個減益骰，但你使用的異能和道具不受該效果影響。</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三目頭盔</text:p>
          </table:table-cell>
          <table:table-cell table:style-name="ce54" office:value-type="string" calcext:value-type="string">
            <text:p>防具（輔助）</text:p>
          </table:table-cell>
          <table:table-cell table:style-name="ce54" table:number-columns-repeated="5"/>
          <table:table-cell table:style-name="ce54" office:value-type="float" office:value="-1" calcext:value-type="float">
            <text:p>-1</text:p>
          </table:table-cell>
          <table:table-cell table:style-name="ce54" office:value-type="float" office:value="-3" calcext:value-type="float">
            <text:p>-3</text:p>
          </table:table-cell>
          <table:table-cell table:style-name="ce54" office:value-type="float" office:value="4" calcext:value-type="float">
            <text:p>4</text:p>
          </table:table-cell>
          <table:table-cell table:style-name="ce54" office:value-type="float" office:value="15" calcext:value-type="float">
            <text:p>15</text:p>
          </table:table-cell>
          <table:table-cell table:style-name="ce49" office:value-type="string" calcext:value-type="string">
            <text:p>額頭部分安裝有“第三隻眼”的黃金頭盔，原理不明，但能增強使用者對背教者病毒的控制力。</text:p>
            <text:p>你進行的&lt;RC&gt;&lt;意志&gt;判定達成值+1。</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斯卡拉目鏡</text:p>
          </table:table-cell>
          <table:table-cell table:style-name="ce54" office:value-type="string" calcext:value-type="string">
            <text:p>防具（輔助）</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15" calcext:value-type="float">
            <text:p>15</text:p>
          </table:table-cell>
          <table:table-cell table:style-name="ce49" office:value-type="string" calcext:value-type="string">
            <text:p>看起來像普通眼鏡一樣的戰術分析儀，能將與最尖端全息頭盔匹敵的情報量以AR模式展現，也擁有通信機能，有墨鏡型、護目鏡型、單鏡片型等多種款式。</text:p>
            <text:p>次要動作使用，該主要階段間你進行的判定骰數+2個，該效果一劇本可以使用三次。</text:p>
          </table:table-cell>
          <table:table-cell table:style-name="ce54" office:value-type="string" calcext:value-type="string">
            <text:p>IA P61</text:p>
          </table:table-cell>
          <table:table-cell table:style-name="ce53" table:number-columns-repeated="13"/>
          <table:table-cell table:number-columns-repeated="998"/>
        </table:table-row>
        <table:table-row table:style-name="ro2">
          <table:table-cell table:style-name="ce42" office:value-type="string" calcext:value-type="string">
            <text:p>隱蔽外套</text:p>
          </table:table-cell>
          <table:table-cell table:style-name="ce54" office:value-type="string" calcext:value-type="string">
            <text:p>防具（輔助）</text:p>
          </table:table-cell>
          <table:table-cell table:style-name="ce54" table:number-columns-repeated="5"/>
          <table:table-cell table:style-name="ce54" office:value-type="float" office:value="2" calcext:value-type="float">
            <text:p>2</text:p>
          </table:table-cell>
          <table:table-cell table:style-name="ce54" office:value-type="float" office:value="0" calcext:value-type="float">
            <text:p>0</text:p>
          </table:table-cell>
          <table:table-cell table:style-name="ce54" office:value-type="float" office:value="3" calcext:value-type="float">
            <text:p>3</text:p>
          </table:table-cell>
          <table:table-cell table:style-name="ce54" office:value-type="float" office:value="15" calcext:value-type="float">
            <text:p>15</text:p>
          </table:table-cell>
          <table:table-cell table:style-name="ce49" office:value-type="string" calcext:value-type="string">
            <text:p>使用特殊素材可以投影周圍環境的防彈外套，能夠抑制紅外放射來干擾紅外線探測儀，可以穿在其他防具上，因為散熱問題使用前需要特別訓練。</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42" office:value-type="string" calcext:value-type="string">
            <text:p>歐米茄護目鏡</text:p>
          </table:table-cell>
          <table:table-cell table:style-name="ce54" office:value-type="string" calcext:value-type="string">
            <text:p>防具（輔助）</text:p>
          </table:table-cell>
          <table:table-cell table:style-name="ce54" table:number-columns-repeated="5"/>
          <table:table-cell table:number-columns-repeated="2" table:style-name="ce54" office:value-type="float" office:value="0" calcext:value-type="float">
            <text:p>0</text:p>
          </table:table-cell>
          <table:table-cell table:style-name="ce54" office:value-type="float" office:value="3" calcext:value-type="float">
            <text:p>3</text:p>
          </table:table-cell>
          <table:table-cell table:style-name="ce54" office:value-type="float" office:value="20" calcext:value-type="float">
            <text:p>20</text:p>
          </table:table-cell>
          <table:table-cell table:style-name="ce49" office:value-type="string" calcext:value-type="string">
            <text:p>裝備各種探測儀和夜視功能的專屬分析護目鏡，可以與頭盔一體化保護頭部。</text:p>
            <text:p>你進行的【感覺】判定骰數+2個，使用該效果時你的侵蝕率+1。</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42" office:value-type="string" calcext:value-type="string">
            <text:p>崩潰外套</text:p>
          </table:table-cell>
          <table:table-cell table:style-name="ce54" office:value-type="string" calcext:value-type="string">
            <text:p>防具（輔助）</text:p>
          </table:table-cell>
          <table:table-cell table:style-name="ce54" table:number-columns-repeated="5"/>
          <table:table-cell table:style-name="ce54" office:value-type="float" office:value="-1" calcext:value-type="float">
            <text:p>-1</text:p>
          </table:table-cell>
          <table:table-cell table:style-name="ce54" office:value-type="float" office:value="-3" calcext:value-type="float">
            <text:p>-3</text:p>
          </table:table-cell>
          <table:table-cell table:style-name="ce54" office:value-type="float" office:value="9" calcext:value-type="float">
            <text:p>9</text:p>
          </table:table-cell>
          <table:table-cell table:style-name="ce54" office:value-type="float" office:value="20" calcext:value-type="float">
            <text:p>20</text:p>
          </table:table-cell>
          <table:table-cell table:style-name="ce49" office:value-type="string" calcext:value-type="string">
            <text:p>UGN開發的衝擊吸收外套，由於素材製作方法洩露，很多組織都能製作。</text:p>
            <text:p>你受到1點以上HP傷害後，該場景結束時該防具破壞。</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57" office:value-type="string" calcext:value-type="string" table:number-columns-spanned="13" table:number-rows-spanned="1">
            <text:p>載具</text:p>
          </table:table-cell>
          <table:covered-table-cell table:number-columns-repeated="12"/>
          <table:table-cell table:style-name="ce53" table:number-columns-repeated="13"/>
          <table:table-cell table:number-columns-repeated="998"/>
        </table:table-row>
        <table:table-row table:style-name="ro2">
          <table:table-cell table:style-name="ce42" office:value-type="string" calcext:value-type="string">
            <text:p>快步者</text:p>
          </table:table-cell>
          <table:table-cell table:style-name="ce54" office:value-type="string" calcext:value-type="string">
            <text:p>載具</text:p>
          </table:table-cell>
          <table:table-cell table:style-name="ce54" office:value-type="string" calcext:value-type="string">
            <text:p>&lt;駕駛：四輪&gt;</text:p>
          </table:table-cell>
          <table:table-cell table:style-name="ce54"/>
          <table:table-cell table:style-name="ce54" office:value-type="float" office:value="6" calcext:value-type="float">
            <text:p>6</text:p>
          </table:table-cell>
          <table:table-cell table:style-name="ce54" table:number-columns-repeated="3"/>
          <table:table-cell table:style-name="ce54" office:value-type="float" office:value="0" calcext:value-type="float">
            <text:p>0</text:p>
          </table:table-cell>
          <table:table-cell table:style-name="ce54" office:value-type="float" office:value="4" calcext:value-type="float">
            <text:p>4</text:p>
          </table:table-cell>
          <table:table-cell table:style-name="ce54" office:value-type="float" office:value="15" calcext:value-type="float">
            <text:p>15</text:p>
          </table:table-cell>
          <table:table-cell table:style-name="ce49" office:value-type="string" calcext:value-type="string">
            <text:p>能夠輕鬆乘坐的敞篷車，在小路也能方便操控，全力移動：100m。</text:p>
            <text:p>你進行的&lt;駕駛：四輪&gt;判定骰數+3個，但是不適用於攻擊判定。</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42" office:value-type="string" calcext:value-type="string">
            <text:p>對超越者裝甲車</text:p>
          </table:table-cell>
          <table:table-cell table:style-name="ce54" office:value-type="string" calcext:value-type="string">
            <text:p>載具</text:p>
          </table:table-cell>
          <table:table-cell table:style-name="ce54" office:value-type="string" calcext:value-type="string">
            <text:p>&lt;駕駛：四輪&gt;</text:p>
          </table:table-cell>
          <table:table-cell table:style-name="ce54"/>
          <table:table-cell table:style-name="ce54" office:value-type="float" office:value="8" calcext:value-type="float">
            <text:p>8</text:p>
          </table:table-cell>
          <table:table-cell table:style-name="ce54" table:number-columns-repeated="3"/>
          <table:table-cell table:style-name="ce54" office:value-type="float" office:value="-6" calcext:value-type="float">
            <text:p>-6</text:p>
          </table:table-cell>
          <table:table-cell table:style-name="ce54" office:value-type="float" office:value="8" calcext:value-type="float">
            <text:p>8</text:p>
          </table:table-cell>
          <table:table-cell table:style-name="ce54" office:value-type="float" office:value="15" calcext:value-type="float">
            <text:p>15</text:p>
          </table:table-cell>
          <table:table-cell table:style-name="ce49" office:value-type="string" calcext:value-type="string">
            <text:p>UGN、美軍、陌生者、特調等廣泛應用的六輪裝甲車，使用了能防止侵蝕的特殊素材製作裝甲，在被稱為“魔街”的地方試驗運行過但是具體未定，全力移動：200m。</text:p>
            <text:p>你受到的使用了異能進行的攻擊時，傷害-10。</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42" office:value-type="string" calcext:value-type="string">
            <text:p>渦流疾星</text:p>
          </table:table-cell>
          <table:table-cell table:style-name="ce54" office:value-type="string" calcext:value-type="string">
            <text:p>載具</text:p>
          </table:table-cell>
          <table:table-cell table:style-name="ce54" office:value-type="string" calcext:value-type="string">
            <text:p>&lt;駕駛：二輪&gt;</text:p>
          </table:table-cell>
          <table:table-cell table:style-name="ce54"/>
          <table:table-cell table:style-name="ce54" office:value-type="float" office:value="8" calcext:value-type="float">
            <text:p>8</text:p>
          </table:table-cell>
          <table:table-cell table:style-name="ce54" table:number-columns-repeated="3"/>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30" calcext:value-type="float">
            <text:p>30</text:p>
          </table:table-cell>
          <table:table-cell table:style-name="ce49" office:value-type="string" calcext:value-type="string">
            <text:p>UGN試做的電動摩托，擁有馬達驅動特有的高初速和極強的轉彎性能，全力移動：250m。</text:p>
            <text:p>準備階段使用，該回合間你的行動值+10，該效果一劇本可以使用一次。</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42" office:value-type="string" calcext:value-type="string">
            <text:p>動力車輪</text:p>
          </table:table-cell>
          <table:table-cell table:style-name="ce54" office:value-type="string" calcext:value-type="string">
            <text:p>載具</text:p>
          </table:table-cell>
          <table:table-cell table:style-name="ce54" office:value-type="string" calcext:value-type="string">
            <text:p>&lt;駕駛：二輪&gt;</text:p>
          </table:table-cell>
          <table:table-cell table:style-name="ce54"/>
          <table:table-cell table:style-name="ce54" office:value-type="float" office:value="12" calcext:value-type="float">
            <text:p>12</text:p>
          </table:table-cell>
          <table:table-cell table:style-name="ce54" table:number-columns-repeated="3"/>
          <table:table-cell table:style-name="ce54" office:value-type="float" office:value="-5" calcext:value-type="float">
            <text:p>-5</text:p>
          </table:table-cell>
          <table:table-cell table:style-name="ce54" office:value-type="float" office:value="7" calcext:value-type="float">
            <text:p>7</text:p>
          </table:table-cell>
          <table:table-cell table:style-name="ce54" office:value-type="float" office:value="35" calcext:value-type="float">
            <text:p>35</text:p>
          </table:table-cell>
          <table:table-cell table:style-name="ce49" office:value-type="string" calcext:value-type="string">
            <text:p>安裝了衝撞用尖錐和強化裝甲整流罩的近戰用改裝摩托，全力移動：150m。</text:p>
            <text:p>使用該載具進行的攻擊判定骰數+2個。</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42" office:value-type="string" calcext:value-type="string">
            <text:p>超級跑車</text:p>
          </table:table-cell>
          <table:table-cell table:style-name="ce54" office:value-type="string" calcext:value-type="string">
            <text:p>載具</text:p>
          </table:table-cell>
          <table:table-cell table:style-name="ce54" office:value-type="string" calcext:value-type="string">
            <text:p>&lt;駕駛：四輪&gt;</text:p>
          </table:table-cell>
          <table:table-cell table:style-name="ce54"/>
          <table:table-cell table:style-name="ce54" office:value-type="float" office:value="13" calcext:value-type="float">
            <text:p>13</text:p>
          </table:table-cell>
          <table:table-cell table:style-name="ce54" table:number-columns-repeated="3"/>
          <table:table-cell table:style-name="ce54" office:value-type="float" office:value="-3" calcext:value-type="float">
            <text:p>-3</text:p>
          </table:table-cell>
          <table:table-cell table:style-name="ce54" office:value-type="float" office:value="6" calcext:value-type="float">
            <text:p>6</text:p>
          </table:table-cell>
          <table:table-cell table:style-name="ce54" office:value-type="float" office:value="40" calcext:value-type="float">
            <text:p>40</text:p>
          </table:table-cell>
          <table:table-cell table:style-name="ce49" office:value-type="string" calcext:value-type="string">
            <text:p>有著絢麗奪目的美麗設計和壓倒性引擎馬力的“奔馳的藝術品”，各企業都有發表各種各樣的超級跑車，全力移動：200m。</text:p>
          </table:table-cell>
          <table:table-cell table:style-name="ce54" office:value-type="string" calcext:value-type="string">
            <text:p>IA P62</text:p>
          </table:table-cell>
          <table:table-cell table:style-name="ce53" table:number-columns-repeated="13"/>
          <table:table-cell table:number-columns-repeated="998"/>
        </table:table-row>
        <table:table-row table:style-name="ro2">
          <table:table-cell table:style-name="ce42" office:value-type="string" calcext:value-type="string">
            <text:p>戰鬥直升機</text:p>
          </table:table-cell>
          <table:table-cell table:style-name="ce54" office:value-type="string" calcext:value-type="string">
            <text:p>載具</text:p>
          </table:table-cell>
          <table:table-cell table:style-name="ce54" office:value-type="string" calcext:value-type="string">
            <text:p>&lt;駕駛：航空器&gt;</text:p>
          </table:table-cell>
          <table:table-cell table:style-name="ce54"/>
          <table:table-cell table:style-name="ce54" office:value-type="float" office:value="5" calcext:value-type="float">
            <text:p>5</text:p>
          </table:table-cell>
          <table:table-cell table:style-name="ce54" table:number-columns-repeated="3"/>
          <table:table-cell table:style-name="ce54" office:value-type="float" office:value="-3" calcext:value-type="float">
            <text:p>-3</text:p>
          </table:table-cell>
          <table:table-cell table:style-name="ce54" office:value-type="float" office:value="18" calcext:value-type="float">
            <text:p>18</text:p>
          </table:table-cell>
          <table:table-cell table:style-name="ce54" office:value-type="float" office:value="50" calcext:value-type="float">
            <text:p>50</text:p>
          </table:table-cell>
          <table:table-cell table:style-name="ce49" office:value-type="string" calcext:value-type="string">
            <text:p>搭載機關炮的軍用直升機，各國軍隊和傭兵組織都有使用，全力移動：200m。</text:p>
            <text:p>搭乘該載具時你自動裝備鏈式機槍（即使你未持有該武器），你和同乘者進入飛行狀態。</text:p>
          </table:table-cell>
          <table:table-cell table:style-name="ce54" office:value-type="string" calcext:value-type="string">
            <text:p>IA P63</text:p>
          </table:table-cell>
          <table:table-cell table:style-name="ce53" table:number-columns-repeated="13"/>
          <table:table-cell table:number-columns-repeated="998"/>
        </table:table-row>
        <table:table-row table:style-name="ro2">
          <table:table-cell table:style-name="ce42" office:value-type="string" calcext:value-type="string">
            <text:p>幻影舞者</text:p>
          </table:table-cell>
          <table:table-cell table:style-name="ce54" office:value-type="string" calcext:value-type="string">
            <text:p>載具</text:p>
          </table:table-cell>
          <table:table-cell table:style-name="ce54" office:value-type="string" calcext:value-type="string">
            <text:p>&lt;駕駛：四輪&gt;</text:p>
          </table:table-cell>
          <table:table-cell table:style-name="ce54"/>
          <table:table-cell table:style-name="ce54" office:value-type="float" office:value="12" calcext:value-type="float">
            <text:p>12</text:p>
          </table:table-cell>
          <table:table-cell table:style-name="ce54" table:number-columns-repeated="3"/>
          <table:table-cell table:style-name="ce54" office:value-type="float" office:value="-1" calcext:value-type="float">
            <text:p>-1</text:p>
          </table:table-cell>
          <table:table-cell table:style-name="ce54" office:value-type="float" office:value="8" calcext:value-type="float">
            <text:p>8</text:p>
          </table:table-cell>
          <table:table-cell table:style-name="ce54" office:value-type="float" office:value="50" calcext:value-type="float">
            <text:p>50</text:p>
          </table:table-cell>
          <table:table-cell table:style-name="ce49" office:value-type="string" calcext:value-type="string">
            <text:p>內藏戰鬥用機關的高科技超跑，使用內藏的噴氣引擎可以像電影中一樣立體行駛，全力移動：300m。</text:p>
            <text:p>你進行的攻擊的判定，或是閃避判定，選擇一個骰子使其數值+2（最大為10），該效果可以在判定中任意時刻使用，該效果在一次判定中可以使用一次，該效果一劇本可以使用一次。</text:p>
          </table:table-cell>
          <table:table-cell table:style-name="ce54" office:value-type="string" calcext:value-type="string">
            <text:p>IA P63</text:p>
          </table:table-cell>
          <table:table-cell table:style-name="ce53" table:number-columns-repeated="13"/>
          <table:table-cell table:number-columns-repeated="998"/>
        </table:table-row>
        <table:table-row table:style-name="ro2">
          <table:table-cell table:style-name="ce42" office:value-type="string" calcext:value-type="string">
            <text:p>領主野獸</text:p>
          </table:table-cell>
          <table:table-cell table:style-name="ce54" office:value-type="string" calcext:value-type="string">
            <text:p>載具</text:p>
          </table:table-cell>
          <table:table-cell table:style-name="ce54" office:value-type="string" calcext:value-type="string">
            <text:p>&lt;駕駛：二輪&gt;</text:p>
          </table:table-cell>
          <table:table-cell table:style-name="ce54"/>
          <table:table-cell table:style-name="ce54" office:value-type="float" office:value="15" calcext:value-type="float">
            <text:p>15</text:p>
          </table:table-cell>
          <table:table-cell table:style-name="ce54" table:number-columns-repeated="3"/>
          <table:table-cell table:style-name="ce54" office:value-type="float" office:value="-2" calcext:value-type="float">
            <text:p>-2</text:p>
          </table:table-cell>
          <table:table-cell table:style-name="ce54" office:value-type="float" office:value="2" calcext:value-type="float">
            <text:p>2</text:p>
          </table:table-cell>
          <table:table-cell table:style-name="ce54" office:value-type="float" office:value="60" calcext:value-type="float">
            <text:p>60</text:p>
          </table:table-cell>
          <table:table-cell table:style-name="ce49" office:value-type="string" calcext:value-type="string">
            <text:p>冠有“野獸”之名的EX背教者摩托，其狂暴的騎乘感令普通人無法控制，全力移動：200m。</text:p>
            <text:p>你進行的攻擊傷害+3D10，使用該效果時你的HP減少1D10。</text:p>
          </table:table-cell>
          <table:table-cell table:style-name="ce54" office:value-type="string" calcext:value-type="string">
            <text:p>IA P63</text:p>
          </table:table-cell>
          <table:table-cell table:style-name="ce53" table:number-columns-repeated="13"/>
          <table:table-cell table:number-columns-repeated="998"/>
        </table:table-row>
        <table:table-row table:style-name="ro2">
          <table:table-cell table:style-name="ce57" office:value-type="string" calcext:value-type="string" table:number-columns-spanned="13" table:number-rows-spanned="1">
            <text:p>一般道具</text:p>
          </table:table-cell>
          <table:covered-table-cell table:number-columns-repeated="12"/>
          <table:table-cell table:style-name="ce53" table:number-columns-repeated="13"/>
          <table:table-cell table:number-columns-repeated="998"/>
        </table:table-row>
        <table:table-row table:style-name="ro2">
          <table:table-cell table:style-name="ce42" office:value-type="string" calcext:value-type="string">
            <text:p>惡魔之種</text:p>
          </table:table-cell>
          <table:table-cell table:style-name="ce54" office:value-type="string" calcext:value-type="string">
            <text:p>一般</text:p>
          </table:table-cell>
          <table:table-cell table:style-name="ce54" table:number-columns-repeated="8"/>
          <table:table-cell table:style-name="ce54" office:value-type="float" office:value="3" calcext:value-type="float">
            <text:p>3</text:p>
          </table:table-cell>
          <table:table-cell table:style-name="ce49" office:value-type="string" calcext:value-type="string">
            <text:p>能使背教者病毒變質的神秘種子狀物質，由來不明但是能具有增強異能的作用。</text:p>
            <text:p>取得時選擇一個你擁有的異能，該異能最大LV+1，侵蝕值+1（若為[時機：常駐]則基本侵蝕率+2）。該道具只能常備化一個。</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AR地圖</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利用AR疊層提供周邊地區情報的網絡服務，附帶AR表示用護目鏡，能夠將周圍道路擁堵或事故發生等情報盡收眼底。</text:p>
            <text:p>你進行&lt;情報：●●&gt;判定前使用，該判定骰數+2個，該效果一劇本可以使用三次。</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食品配送</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UGN的有志小隊運營的補給食物配送服務，發出請求後無論地址都會配送，人氣很高，訂購需要排隊。</text:p>
            <text:p>主要動作使用，進行目標值為7的&lt;籌措&gt;判定，成功時，該場景中登場的任意角色回復5D10HP，無法在戰鬥中使用，該效果一劇本可以使用一次。</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復古遮陽鏡</text:p>
          </table:table-cell>
          <table:table-cell table:style-name="ce54" office:value-type="string" calcext:value-type="string">
            <text:p>一般</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由狂熱粉絲從曾經未能風靡一時的復古虛擬遊戲機改造而來，可以進行實戰射擊訓練，也有獨特的品味。</text:p>
            <text:p>你進行的&lt;射擊&gt;判定達成值+2，你的【行動值】-2。</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R串流</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由疾速靈猿症候超越者運營的非官方音樂直播服務，順應場合的音樂列表能增強集中力。</text:p>
            <text:p>次要動作使用，該場景間你進行的主要動作判定骰數+2個，每次進行主要動作時侵蝕率+2。</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風之領巾</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被EX背教者感染的領巾，能生成微弱的順風加速使用者的動作。</text:p>
            <text:p>你的行動值+3。</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可自選推進器</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特殊的車輛用推進器組件，能將被稱為殺手鐧的機能發揮出來。</text:p>
            <text:p>取得時選擇一件你常備化的[種類：載具]，該載具的[一劇本可以使用n次]效果使用次數+1，該道具最多可以重複取得兩個。</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強振的穿環</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能增強攻擊勢頭的不可思議穿環，但會失去准度。</text:p>
            <text:p>你進行的攻擊傷害+1D10，但你進行的攻擊的判定，其達成值不能加上所使用技能的等級。</text:p>
          </table:table-cell>
          <table:table-cell table:style-name="ce54" office:value-type="string" calcext:value-type="string">
            <text:p>IA P64</text:p>
          </table:table-cell>
          <table:table-cell table:style-name="ce53" table:number-columns-repeated="13"/>
          <table:table-cell table:number-columns-repeated="998"/>
        </table:table-row>
        <table:table-row table:style-name="ro2">
          <table:table-cell table:style-name="ce42" office:value-type="string" calcext:value-type="string">
            <text:p>傷害手套</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戴上後能立刻貼緊皮膚的謎之素材手套。</text:p>
            <text:p>你的空手數據變更如下，使用異能改變空手數據時該道具失效：</text:p>
            <text:p>種類：近戰  技能：近戰  命中：0  攻擊力：1  格擋值：1  射程：至近</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守護者的手套</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古代被稱為守護者的存在所戴的手套，被EX背教者感染，能對使用者想要守護某人的意志起反應。</text:p>
            <text:p>你進行掩護時格擋值+3。</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鬼牌</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你知道他人的弱點、重要的秘密等在情報收集方面的底牌。</text:p>
            <text:p>你使用[種類：關聯]時使用，該判定達成值+5，該效果一劇本可以使用一次。</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致死日光</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將背教者病毒向特定攻擊傾向變質的因子，發現時感染者的身體浮現出了陽光般的波紋。</text:p>
            <text:p>你使用的[製作武器並裝備]或[空手數據變化如下]異能時製作的武器或變更的空手數據，攻擊力+3。該道具無法與“閃耀星座”和“怪奇月相”同時獲得。</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劍刃之石</text:p>
          </table:table-cell>
          <table:table-cell table:style-name="ce54" office:value-type="string" calcext:value-type="string">
            <text:p>一般</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帶有EX背教者的寶石，擁有強化嵌入的武器的作用。</text:p>
            <text:p>選擇劇本開始時便擁有的一件武器，該武器攻擊力+2，你的基本侵蝕率+2，該道具無法複數常備化。</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R超越者生命</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擁有能增加背教者力量機構的頭盔，但使用會使背教者病毒活性化。</text:p>
            <text:p>你進行組合了異能的判定前使用，該判定骰數+2個，你的侵蝕率+3，該效果一場景可以使用一次。</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攻堅小組</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聽從你指揮的戰鬥部隊，擁有高度訓練和對超越者裝備，在你的指揮下能發揮更強的力量。</text:p>
            <text:p>取得該道具需要【社會】6以上。你可以進行主要動作使用如下武器攻擊，判定可以與異能組合，該效果一劇本可以使用三次。</text:p>
            <text:p>種類：射擊  技能：交涉  命中：0  攻擊力：5  格擋值：-  射程：20m</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武器配送</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UGN的有志小隊運營的武器彈藥配送服務，發出請求後無論在哪都會配送到，因為人手不足不一定能通過請求。</text:p>
            <text:p>主要動作使用，進行目標值為10的&lt;籌措&gt;判定，成功時，該場景中登場的任意角色進行攻擊的攻擊力+5，無法在戰鬥中使用，該效果一劇本可以使用一次。</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回生的穿環</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增幅回復異能的不可思議穿環，對背教者的操縱能力越高越能高效回復。</text:p>
            <text:p>你使用的[回復HP]異能額外回復你的&lt;RC&gt;點HP，但該效果對於《復蘇》無效。</text:p>
          </table:table-cell>
          <table:table-cell table:style-name="ce54" office:value-type="string" calcext:value-type="string">
            <text:p>IA P65</text:p>
          </table:table-cell>
          <table:table-cell table:style-name="ce53" table:number-columns-repeated="13"/>
          <table:table-cell table:number-columns-repeated="998"/>
        </table:table-row>
        <table:table-row table:style-name="ro2">
          <table:table-cell table:style-name="ce42" office:value-type="string" calcext:value-type="string">
            <text:p>堅守的穿環</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增幅防禦異能的不可思議穿環。</text:p>
            <text:p>你使用[格擋時使用]異能格擋時，格擋值+[你的&lt;近戰&gt;等級]。</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閃耀星座</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將背教者病毒向特定攻擊傾向變質的因子，發現時感染者的周圍舞動著星座般的光輝。</text:p>
            <text:p>你組合異能使用[種類：射擊]武器進行的攻擊判定達成值+3，傷害+1D10。該道具無法與“致死日光”和“怪奇月相”同時獲得。</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斑點帽</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很古老的牛仔帽，仔細看過去有很多洞。</text:p>
            <text:p>你在場景中受到的第一次攻擊造成的HP傷害-1D10。</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怪奇月相</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將背教者病毒向特定攻擊傾向變質的因子，發現時感染者使用的異能宛如月陰變化不定。</text:p>
            <text:p>你使用&lt;RC&gt;進行的攻擊判定骰數+3個。該道具無法與“致死日光”和“閃耀星座”同時取得。</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審判之眼</text:p>
          </table:table-cell>
          <table:table-cell table:style-name="ce54" office:value-type="string" calcext:value-type="string">
            <text:p>一般</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能夠感知到背教者引發的衝動氣場的不可思議義眼。</text:p>
            <text:p>準備階段使用，選擇一名該場景登場的角色，你獲知該角色衝動，使用該效果後你的侵蝕率+3。</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同化武器</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與你的一部分身體同化的武器，你能將其如身體一部分般任意顯現並自在操縱。</text:p>
            <text:p>只有背教者生命體角色可以取得，導入時選擇一件你擁有的武器，該武器攻擊力+[《起源：●●》等級×2]，使用該武器時你的侵蝕率+2。</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怨念的咒石</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宛如骷髏的黑色寶玉，能夠解放衝動強化暴走。</text:p>
            <text:p>準備階段使用，你受到不良狀態[暴走]，該暴走持續期間你進行的攻擊傷害+2D10，使用的準備階段結束時你的侵蝕率+3，該效果一場景可以使用一次。</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靜滯手錶</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擁有減緩時間流速效果的被EX背教者感染的懷錶，使用者也會因此減速。</text:p>
            <text:p>準備階段使用，以一名該場景登場的角色為對象，該回合間對象與你的行動值-[1D10+[你的精神]]，該效果一劇本可以使用一次。</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訓練營</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表示你受過嚴厲戰鬥訓練磨煉技能的道具。</text:p>
            <text:p>取得時選擇&lt;近戰&gt;&lt;射擊&gt;&lt;閃避&gt;中的一項，使用該技能判定達成值+3。</text:p>
          </table:table-cell>
          <table:table-cell table:style-name="ce54" office:value-type="string" calcext:value-type="string">
            <text:p>IA P66</text:p>
          </table:table-cell>
          <table:table-cell table:style-name="ce53" table:number-columns-repeated="13"/>
          <table:table-cell table:number-columns-repeated="998"/>
        </table:table-row>
        <table:table-row table:style-name="ro2">
          <table:table-cell table:style-name="ce42" office:value-type="string" calcext:value-type="string">
            <text:p>爆破小組</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攜帶大範圍殲滅裝備的戰鬥部隊，他們會聽從你的指示迅速殲滅敵人。</text:p>
            <text:p>與“攻堅小組”同時使用，使用“攻堅小組”效果進行的射擊攻擊變為[對象：範圍（選擇）]，該效果的對象優先級大於組合異能的對象，該效果一劇本可以使用一次。</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背教者腰帶</text:p>
          </table:table-cell>
          <table:table-cell table:style-name="ce54" office:value-type="string" calcext:value-type="string">
            <text:p>一般</text:p>
          </table:table-cell>
          <table:table-cell table:style-name="ce54" table:number-columns-repeated="8"/>
          <table:table-cell table:style-name="ce54" office:value-type="float" office:value="20" calcext:value-type="float">
            <text:p>20</text:p>
          </table:table-cell>
          <table:table-cell table:style-name="ce49" office:value-type="string" calcext:value-type="string">
            <text:p>能強化超越者力量的腰帶，根據症候需要切換不同的模式。</text:p>
            <text:p>次要動作使用，選擇一個症候，該主要階段中組合該症候異能的判定骰數+3個，但該場景間，選擇過的症候無法重複選擇。</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無限日冕</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突然變異的“致死日光”因子，感染者散發的陽光波紋猶如王冠。</text:p>
            <text:p>取得該道具前必須取得“致死日光”，你進行近戰攻擊前使用，該攻擊的攻擊力+[使用的其中一件武器的攻擊力]，該效果一劇本可以使用一次。</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無限新星</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突然變異的“閃耀星座”因子，感染者寄宿的星座光輝能加速子彈貫穿敵人。</text:p>
            <text:p>取得該道具前必須取得“閃耀星座”，你使用[種類：射擊]武器進行攻擊前使用，該判定暴擊值-1（下限6），該效果一劇本可以使用一次。</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影響者</text:p>
          </table:table-cell>
          <table:table-cell table:style-name="ce54" office:value-type="string" calcext:value-type="string">
            <text:p>一般</text:p>
          </table:table-cell>
          <table:table-cell table:style-name="ce54" table:number-columns-repeated="8"/>
          <table:table-cell table:style-name="ce54" office:value-type="float" office:value="25" calcext:value-type="float">
            <text:p>25</text:p>
          </table:table-cell>
          <table:table-cell table:style-name="ce49" office:value-type="string" calcext:value-type="string">
            <text:p>你擁有數萬人為單位的社交軟件或粉絲，驅使你的影響力可以撼動世界，但為了發起影響力需要你付出身心精力。</text:p>
            <text:p>你進行的【社會】判定骰數+3個，HP最大值-5（最低1）。</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無限月蝕</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突然變異的“怪奇月相”因子，感染者使用的異能帶著幻月之影支配空間。</text:p>
            <text:p>取得該道具前必須取得“怪奇月相”，你使用[技能：RC]異能進行攻擊前使用，對象無法對該攻擊進行回應，對該攻擊進行掩護時不計算格擋值，該效果一劇本可以使用一次。</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英雄之石</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被EX背教者感染的20克拉鑽石，其光芒可以治癒持有者的傷口。</text:p>
            <text:p>結算階段使用，你的HP回復30點，使用該效果的結算階段結束時你的侵蝕率+5，該效果一場景可以使用一次，一劇本可以使用三次。</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法術書</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也被稱為魔導書的書籍，被EX背教者感染，詠唱其中的咒文能增強異能的力量。</text:p>
            <text:p>次要動作使用，該主要階段你組合異能進行攻擊的攻擊力+7，侵蝕率+3。</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衛星手錶</text:p>
          </table:table-cell>
          <table:table-cell table:style-name="ce54" office:value-type="string" calcext:value-type="string">
            <text:p>一般</text:p>
          </table:table-cell>
          <table:table-cell table:style-name="ce54" table:number-columns-repeated="8"/>
          <table:table-cell table:style-name="ce54" office:value-type="float" office:value="30" calcext:value-type="float">
            <text:p>30</text:p>
          </table:table-cell>
          <table:table-cell table:style-name="ce49" office:value-type="string" calcext:value-type="string">
            <text:p>能接收衛星傳來的信息服務，可以自由自在地監視機密和個人情報。</text:p>
            <text:p>進行判定時使用，該判定可以使用&lt;知覺&gt;進行判定，該效果一劇本可以使用三次。</text:p>
          </table:table-cell>
          <table:table-cell table:style-name="ce54" office:value-type="string" calcext:value-type="string">
            <text:p>IA P67</text:p>
          </table:table-cell>
          <table:table-cell table:style-name="ce53" table:number-columns-repeated="13"/>
          <table:table-cell table:number-columns-repeated="998"/>
        </table:table-row>
        <table:table-row table:style-name="ro2">
          <table:table-cell table:style-name="ce42" office:value-type="string" calcext:value-type="string">
            <text:p>狂戰之石</text:p>
          </table:table-cell>
          <table:table-cell table:style-name="ce54" office:value-type="string" calcext:value-type="string">
            <text:p>一般</text:p>
          </table:table-cell>
          <table:table-cell table:style-name="ce54" table:number-columns-repeated="8"/>
          <table:table-cell table:style-name="ce54" office:value-type="float" office:value="35" calcext:value-type="float">
            <text:p>35</text:p>
          </table:table-cell>
          <table:table-cell table:style-name="ce49" office:value-type="string" calcext:value-type="string">
            <text:p>被EX背教者感染的紫色不祥寶石，能暫時增幅暴走狀態超越者的背教者。</text:p>
            <text:p>你受到[不良狀態：暴走]時可以使用，次要動作使用，該主要階段間你組合異能進行的攻擊傷害+2D10，該效果一劇本可以使用三次。</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空投物資</text:p>
          </table:table-cell>
          <table:table-cell table:style-name="ce54" office:value-type="string" calcext:value-type="string">
            <text:p>一般</text:p>
          </table:table-cell>
          <table:table-cell table:style-name="ce54" table:number-columns-repeated="8"/>
          <table:table-cell table:style-name="ce54" office:value-type="float" office:value="40" calcext:value-type="float">
            <text:p>40</text:p>
          </table:table-cell>
          <table:table-cell table:style-name="ce49" office:value-type="string" calcext:value-type="string">
            <text:p>戰鬥用物資的空投服務，搭載了非常強力的支援物資，申請難度也出了名的高。</text:p>
            <text:p>主要動作使用，進行達成值為15的&lt;籌措&gt;判定，成功時，該場景中登場的任意角色取得的一個帶有次數限制的異能，回復一次使用次數，該效果一劇本可以使用一次。</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魔狼的心臟</text:p>
          </table:table-cell>
          <table:table-cell table:style-name="ce54" office:value-type="string" calcext:value-type="string">
            <text:p>一般</text:p>
          </table:table-cell>
          <table:table-cell table:style-name="ce54" table:number-columns-repeated="8"/>
          <table:table-cell table:style-name="ce54" office:value-type="float" office:value="45" calcext:value-type="float">
            <text:p>45</text:p>
          </table:table-cell>
          <table:table-cell table:style-name="ce49" office:value-type="string" calcext:value-type="string">
            <text:p>死後依然在脈動著的強大背教者生命體的心臟，如果放入自己體內就能獲得等同於不死的生命。</text:p>
            <text:p>你的HP最大值+40。取得該道具時你的基本侵蝕率+8。</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魔王的石板</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對特殊的背教者病毒干涉以獲取力量的謎之石板，經由被稱為“惡魔之種”的端末從超越者處奪取力量。</text:p>
            <text:p>你受到的傷害-[場景中登場的擁有“惡魔之種”的角色數×5]（最低-20），取得需要GM許可。</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幻燈鏡</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映照幻影的鏡子，成功複刻遺產一部分力量的仿造品。</text:p>
            <text:p>目標發動[對象：範圍]或[對象：範圍（選擇）]攻擊，且你是攻擊對象之一時使用，該攻擊變為[目標：單體]，並需重新選擇目標，該效果的對象優先級大於組合異能的對象，該效果一劇本可以使用一次。</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千年磚塊</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古代遺跡內發現的迷之八面體護符，解開表面浮現的謎題後就會啟動並放出強大的能量。</text:p>
            <text:p>準備階段使用，該回合間你造成的傷害+5D10，若你為【精神】8以下無法使用該效果，該效果一劇本可以使用一次。</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記憶水晶</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將死去人類的記憶或技術結晶化的輝石，只有背教者生命體能引出晶體內的記憶加以利用。</text:p>
            <text:p>只有背教者生命體角色可以取得，取得時選擇一項技能，使用該技能進行判定前使用，該判定達成值+10，使用該效果後你的侵蝕率+3，該效果一劇本可以使用三次。</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獵犬的前肢</text:p>
          </table:table-cell>
          <table:table-cell table:style-name="ce54" office:value-type="string" calcext:value-type="string">
            <text:p>一般</text:p>
          </table:table-cell>
          <table:table-cell table:style-name="ce54" table:number-columns-repeated="8"/>
          <table:table-cell table:style-name="ce54" office:value-type="float" office:value="50" calcext:value-type="float">
            <text:p>50</text:p>
          </table:table-cell>
          <table:table-cell table:style-name="ce49" office:value-type="string" calcext:value-type="string">
            <text:p>據說是用從死角出現的空想生物前肢做成的裝飾品，擁有扭曲空間進行移動的能力。</text:p>
            <text:p>你進行戰鬥移動或全力移動前使用，該移動可以脫離接戰區域，可以直接移動到場景中其他角色所在的接戰區，該效果一場景可以使用一次。</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荊棘之冠</text:p>
          </table:table-cell>
          <table:table-cell table:style-name="ce54" office:value-type="string" calcext:value-type="string">
            <text:p>一般</text:p>
          </table:table-cell>
          <table:table-cell table:style-name="ce54" table:number-columns-repeated="8"/>
          <table:table-cell table:style-name="ce54" office:value-type="float" office:value="80" calcext:value-type="float">
            <text:p>80</text:p>
          </table:table-cell>
          <table:table-cell table:style-name="ce49" office:value-type="string" calcext:value-type="string">
            <text:p>為捕獲原菌開發的拘束力場發生裝置。</text:p>
            <text:p>準備階段使用，以場景內登場的一名角色為對象，如對象在該主要階段進行主要動作的主要階段結束時失去5D10HP，該效果可以使用主要動作解除，該效果一劇本可以使用一次。你不處於搭乘狀態時無法移動。</text:p>
          </table:table-cell>
          <table:table-cell table:style-name="ce54" office:value-type="string" calcext:value-type="string">
            <text:p>IA P68</text:p>
          </table:table-cell>
          <table:table-cell table:style-name="ce53" table:number-columns-repeated="13"/>
          <table:table-cell table:number-columns-repeated="998"/>
        </table:table-row>
        <table:table-row table:style-name="ro2">
          <table:table-cell table:style-name="ce42" office:value-type="string" calcext:value-type="string">
            <text:p>PWE</text:p>
          </table:table-cell>
          <table:table-cell table:style-name="ce54" office:value-type="string" calcext:value-type="string">
            <text:p>一般</text:p>
          </table:table-cell>
          <table:table-cell table:style-name="ce54" table:number-columns-repeated="8"/>
          <table:table-cell table:style-name="ce54" office:value-type="float" office:value="200" calcext:value-type="float">
            <text:p>200</text:p>
          </table:table-cell>
          <table:table-cell table:style-name="ce49" office:value-type="string" calcext:value-type="string">
            <text:p>能展開擬似結界的巨大裝置，正式名稱為近似結界生成裝置，能將一定範圍內的普通人無力化。</text:p>
            <text:p>主要動作使用，該場景中登場的非超越者角色全部變為臨時演員，該效果與《結界化》同等效果，GM可以設定該效果可以由某種判定解除。</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無可替代的珍寶</text:p>
          </table:table-cell>
          <table:table-cell table:style-name="ce54" office:value-type="string" calcext:value-type="string">
            <text:p>消耗品</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連體內的背教者病毒都能動搖的，對你來說無比珍貴的東西。</text:p>
            <text:p>場景登場時你投擲侵蝕率上升骰後使用，重骰並使用重骰後的結果，該道具最多可以常備化3個。</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天堂之果</text:p>
          </table:table-cell>
          <table:table-cell table:style-name="ce54" office:value-type="string" calcext:value-type="string">
            <text:p>消耗品</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從世間少有的被EX背教者感染的樹上摘下的水果，雖然能治癒疲勞和傷口，但也有讓人酩酊大醉的幻覺作用。</text:p>
            <text:p>次要動作使用，你回復5D10HP，但你會受到[不良效果：重壓]和[不良效果：恍惚]。</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醫用手帕</text:p>
          </table:table-cell>
          <table:table-cell table:style-name="ce54" office:value-type="string" calcext:value-type="string">
            <text:p>消耗品</text:p>
          </table:table-cell>
          <table:table-cell table:style-name="ce54" table:number-columns-repeated="8"/>
          <table:table-cell table:style-name="ce54" office:value-type="float" office:value="5" calcext:value-type="float">
            <text:p>5</text:p>
          </table:table-cell>
          <table:table-cell table:style-name="ce49" office:value-type="string" calcext:value-type="string">
            <text:p>擁有很高的抑菌性和消毒作用，能用來進行緊急處置的手帕。</text:p>
            <text:p>主要動作使用，你或與你處於同一接戰區域內的一名角色回復2D10HP。</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修理服務</text:p>
          </table:table-cell>
          <table:table-cell table:style-name="ce54" office:value-type="string" calcext:value-type="string">
            <text:p>消耗品</text:p>
          </table:table-cell>
          <table:table-cell table:style-name="ce54" table:number-columns-repeated="8"/>
          <table:table-cell table:style-name="ce54" office:value-type="float" office:value="10" calcext:value-type="float">
            <text:p>10</text:p>
          </table:table-cell>
          <table:table-cell table:style-name="ce49" office:value-type="string" calcext:value-type="string">
            <text:p>修理破損裝備的支援體制。</text:p>
            <text:p>主要動作使用，解除你擁有的一件購入難度或必要經驗值在20以下的道具的破壞狀態，戰鬥中無法使用。該道具無法複數常備化。</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帕那刻亞之果</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EX背教者結晶化後形成的類似桃、蘋果或是柑橘類水果的形狀。</text:p>
            <text:p>主要動作使用，你回復5D10HP。稀有道具。</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滅活劑D</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暫時抑制背教者活性的飲料，很難大量生產，流通很少。</text:p>
            <text:p>場景登場時你投擲侵蝕率上升骰後使用，該骰值變為1。稀有道具。</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活化劑D</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讓背教者活性化提高侵蝕率的飲料，很難大量生產，流通很少。</text:p>
            <text:p>場景登場時你投擲侵蝕率上升骰後使用，該骰值變為10。稀有道具。</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office:value-type="string" calcext:value-type="string">
            <text:p>紅之噩夢</text:p>
          </table:table-cell>
          <table:table-cell table:style-name="ce54" office:value-type="string" calcext:value-type="string">
            <text:p>消耗品</text:p>
          </table:table-cell>
          <table:table-cell table:style-name="ce54" table:number-columns-repeated="8"/>
          <table:table-cell table:style-name="ce54" office:value-type="float" office:value="15" calcext:value-type="float">
            <text:p>15</text:p>
          </table:table-cell>
          <table:table-cell table:style-name="ce49" office:value-type="string" calcext:value-type="string">
            <text:p>將各種藥物與結晶化的EX背教者混合製成的合成藥。</text:p>
            <text:p>準備階段使用，該回合間你的行動值+3，進行的判定骰數+1個，進行近戰攻擊的攻擊力+3，使用後你的侵蝕率+10。</text:p>
          </table:table-cell>
          <table:table-cell table:style-name="ce54" office:value-type="string" calcext:value-type="string">
            <text:p>IA P69</text:p>
          </table:table-cell>
          <table:table-cell table:style-name="ce53" table:number-columns-repeated="13"/>
          <table:table-cell table:number-columns-repeated="998"/>
        </table:table-row>
        <table:table-row table:style-name="ro2">
          <table:table-cell table:style-name="ce42"/>
          <table:table-cell table:style-name="ce54" table:number-columns-repeated="10"/>
          <table:table-cell table:style-name="ce49"/>
          <table:table-cell table:style-name="ce45"/>
          <table:table-cell table:style-name="ce53" table:number-columns-repeated="13"/>
          <table:table-cell table:number-columns-repeated="998"/>
        </table:table-row>
        <table:table-row table:style-name="ro2" table:number-rows-repeated="199">
          <table:table-cell table:style-name="ce42"/>
          <table:table-cell table:style-name="ce54" table:number-columns-repeated="10"/>
          <table:table-cell table:style-name="ce49"/>
          <table:table-cell table:style-name="ce45"/>
          <table:table-cell table:style-name="ce53" table:number-columns-repeated="13"/>
          <table:table-cell table:number-columns-repeated="998"/>
        </table:table-row>
        <table:table-row table:style-name="ro2" table:number-rows-repeated="679">
          <table:table-cell table:style-name="ce53" table:number-columns-repeated="26"/>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D-Lois秘密武器專用道具" table:style-name="ta6">
        <table:table-column table:style-name="co26" table:default-cell-style-name="Default"/>
        <table:table-column table:style-name="co4" table:default-cell-style-name="Default"/>
        <table:table-column table:style-name="co27" table:default-cell-style-name="Default"/>
        <table:table-column table:style-name="co4" table:number-columns-repeated="3" table:default-cell-style-name="Default"/>
        <table:table-column table:style-name="co28" table:default-cell-style-name="Default"/>
        <table:table-column table:style-name="co4" table:default-cell-style-name="Default"/>
        <table:table-column table:style-name="co29" table:default-cell-style-name="Default"/>
        <table:table-column table:style-name="co30" table:default-cell-style-name="Default"/>
        <table:table-column table:style-name="co31" table:default-cell-style-name="Default"/>
        <table:table-column table:style-name="co17" table:default-cell-style-name="Default"/>
        <table:table-column table:style-name="co31" table:number-columns-repeated="14" table:default-cell-style-name="Default"/>
        <table:table-column table:style-name="co5" table:number-columns-repeated="998" table:default-cell-style-name="Default"/>
        <table:table-row table:style-name="ro2">
          <table:table-cell table:style-name="ce60" office:value-type="string" calcext:value-type="string" table:number-columns-spanned="12" table:number-rows-spanned="1">
            <text:p>武器</text:p>
          </table:table-cell>
          <table:covered-table-cell table:number-columns-repeated="11"/>
          <table:table-cell table:style-name="ce44" table:number-columns-repeated="14"/>
          <table:table-cell table:number-columns-repeated="998"/>
        </table:table-row>
        <table:table-row table:style-name="ro2">
          <table:table-cell table:style-name="ce61" office:value-type="string" calcext:value-type="string">
            <text:p>名稱</text:p>
          </table:table-cell>
          <table:table-cell table:style-name="ce61" office:value-type="string" calcext:value-type="string">
            <text:p>種類</text:p>
          </table:table-cell>
          <table:table-cell table:style-name="ce61" office:value-type="string" calcext:value-type="string">
            <text:p>技能</text:p>
          </table:table-cell>
          <table:table-cell table:style-name="ce61" office:value-type="string" calcext:value-type="string">
            <text:p>命中</text:p>
          </table:table-cell>
          <table:table-cell table:style-name="ce61" office:value-type="string" calcext:value-type="string">
            <text:p>攻擊力</text:p>
          </table:table-cell>
          <table:table-cell table:style-name="ce61" office:value-type="string" calcext:value-type="string">
            <text:p>格擋值</text:p>
          </table:table-cell>
          <table:table-cell table:style-name="ce61" office:value-type="string" calcext:value-type="string">
            <text:p>射程</text:p>
          </table:table-cell>
          <table:table-cell table:style-name="ce73" office:value-type="string" calcext:value-type="string">
            <text:p>購買/常備化</text:p>
          </table:table-cell>
          <table:table-cell table:style-name="ce73" office:value-type="string" calcext:value-type="string">
            <text:p>必要經驗點</text:p>
          </table:table-cell>
          <table:table-cell table:style-name="ce76" office:value-type="string" calcext:value-type="string">
            <text:p>解說</text:p>
          </table:table-cell>
          <table:table-cell table:style-name="ce61" office:value-type="string" calcext:value-type="string">
            <text:p>參照</text:p>
          </table:table-cell>
          <table:table-cell table:style-name="ce61" office:value-type="string" calcext:value-type="string">
            <text:p>備註</text:p>
          </table:table-cell>
          <table:table-cell table:style-name="ce85" table:number-columns-repeated="14"/>
          <table:table-cell table:number-columns-repeated="998"/>
        </table:table-row>
        <table:table-row table:style-name="ro2">
          <table:table-cell table:style-name="ce45" office:value-type="string" calcext:value-type="string">
            <text:p>銳爪噴射</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8" calcext:value-type="float">
            <text:p>8</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將爪子用火箭噴射擊出的鋼鐵義手，也有作為籠手的設計，擊出的爪子可以用纜線回收。</text:p>
            <text:p>次要動作使用，該主要階段間該武器變為[射程：20m]。</text:p>
          </table:table-cell>
          <table:table-cell table:style-name="ce45" office:value-type="string" calcext:value-type="string">
            <text:p>IA P113</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
          <table:table-cell table:style-name="ce45" office:value-type="string" calcext:value-type="string">
            <text:p>刃彈</text:p>
          </table:table-cell>
          <table:table-cell table:style-name="ce45" office:value-type="string" calcext:value-type="string">
            <text:p>近戰／射擊</text:p>
          </table:table-cell>
          <table:table-cell table:style-name="ce45" office:value-type="string" calcext:value-type="string">
            <text:p>&lt;近戰&gt;&lt;射擊&gt;</text:p>
          </table:table-cell>
          <table:table-cell table:style-name="ce45" office:value-type="float" office:value="0" calcext:value-type="float">
            <text:p>0</text:p>
          </table:table-cell>
          <table:table-cell table:style-name="ce45" office:value-type="float" office:value="8" calcext:value-type="float">
            <text:p>8</text:p>
          </table:table-cell>
          <table:table-cell table:style-name="ce45" office:value-type="float" office:value="2" calcext:value-type="float">
            <text:p>2</text:p>
          </table:table-cell>
          <table:table-cell table:style-name="ce45" office:value-type="string" calcext:value-type="string">
            <text:p>至近/1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感染了EX背教者病毒的投擲用小刀。刀身上有著特殊的刻印，于投擲時將會加速刀身的飛行，並造成足以造成奪去對方意識的猛烈衝擊。</text:p>
            <text:p>作為射擊武器使用時，使用右邊的數據。使用該武器進行射擊攻擊，造成至少1點HP傷害時，給對象造成“恍惚”不良狀態。</text:p>
          </table:table-cell>
          <table:table-cell table:style-name="ce45" office:value-type="string" calcext:value-type="string">
            <text:p>IA P113</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墮天之斧</text:p>
            <text:p>（フォールンアックス）</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10" calcext:value-type="float">
            <text:p>10</text:p>
          </table:table-cell>
          <table:table-cell table:style-name="ce45" office:value-type="float" office:value="2" calcext:value-type="float">
            <text:p>2</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所感染的大斧。能夠自動的使改變重量平衡以輕鬆斬出強力的一擊。</text:p>
            <text:p>使用該武器進行的近戰攻擊進行傷害擲骰之後立即使用，從傷害骰中選擇最多三個骰子重擲，必須採用重骰後的結果，發動了這個效果的主要階段結束時，你的侵蝕率+2。</text:p>
          </table:table-cell>
          <table:table-cell table:style-name="ce45" office:value-type="string" calcext:value-type="string">
            <text:p>IA P113</text:p>
          </table:table-cell>
          <table:table-cell table:style-name="ce45"/>
          <table:table-cell table:style-name="ce85" table:number-columns-repeated="14"/>
          <table:table-cell table:number-columns-repeated="998"/>
        </table:table-row>
        <table:table-row table:style-name="ro2">
          <table:table-cell table:style-name="ce45" office:value-type="string" calcext:value-type="string">
            <text:p>墮天之刃</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9" calcext:value-type="float">
            <text:p>9</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感染的刀劍，會根據使用者的意志而強化鋒利度。</text:p>
            <text:p>使用該武器進行近戰攻擊前宣言，該攻擊暴擊值-1（下限5），但使用了此效果的主要階段結束後，該武器被破壞。</text:p>
          </table:table-cell>
          <table:table-cell table:style-name="ce45" office:value-type="string" calcext:value-type="string">
            <text:p>IA P113</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墮天之槍</text:p>
            <text:p>（フォールンランス）</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11" calcext:value-type="float">
            <text:p>11</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感染的長槍，其前端部分呈圓錐形螺旋狀，啟動後便能以高速旋轉來貫穿防禦。</text:p>
            <text:p>以次要動作使用，使用該武器進行的近戰攻擊對進行格擋的角色造成的傷害+3D10，持續到回合結束為止，該效果一場景可以使用三次。</text:p>
          </table:table-cell>
          <table:table-cell table:style-name="ce45" office:value-type="string" calcext:value-type="string">
            <text:p>IA P113</text:p>
          </table:table-cell>
          <table:table-cell table:style-name="ce45"/>
          <table:table-cell table:style-name="ce85" table:number-columns-repeated="14"/>
          <table:table-cell table:number-columns-repeated="998"/>
        </table:table-row>
        <table:table-row table:style-name="ro2">
          <table:table-cell table:style-name="ce45" office:value-type="string" calcext:value-type="string">
            <text:p>熟習之劍</text:p>
            <text:p>（ブレードオブアデプト）</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9" calcext:value-type="float">
            <text:p>9</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搭載了輸入劍士達人頭腦資料的人工智能的超智能劍，能自動判斷對手裝甲上的薄弱位置。</text:p>
            <text:p>使用該武器進行攻擊時，以對象裝甲值-10（最低0）計算傷害。</text:p>
          </table:table-cell>
          <table:table-cell table:style-name="ce45" office:value-type="string" calcext:value-type="string">
            <text:p>IA P113</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
          <table:table-cell table:style-name="ce45" office:value-type="string" calcext:value-type="string">
            <text:p>水銀長矛</text:p>
            <text:p>（マーキュリースピア）</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1" calcext:value-type="float">
            <text:p>-1</text:p>
          </table:table-cell>
          <table:table-cell table:style-name="ce45" office:value-type="float" office:value="12" calcext:value-type="float">
            <text:p>12</text:p>
          </table:table-cell>
          <table:table-cell table:style-name="ce45" office:value-type="float" office:value="3" calcext:value-type="float">
            <text:p>3</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使用特殊金屬製成、能自由變換尖端的三叉戟，能夠拘束被其貫穿的對手。</text:p>
            <text:p>被該武器攻擊命中的對象受到[不良狀態：硬直]，該[不良狀態：硬直]你與該對象不在同一接戰範圍內時立刻解除。</text:p>
          </table:table-cell>
          <table:table-cell table:style-name="ce45" office:value-type="string" calcext:value-type="string">
            <text:p>IA P113</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
          <table:table-cell table:style-name="ce45" office:value-type="string" calcext:value-type="string">
            <text:p>狂暴之刃</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2" calcext:value-type="float">
            <text:p>-2</text:p>
          </table:table-cell>
          <table:table-cell table:style-name="ce45" office:value-type="float" office:value="12" calcext:value-type="float">
            <text:p>12</text:p>
          </table:table-cell>
          <table:table-cell table:style-name="ce45" office:value-type="float" office:value="6" calcext:value-type="float">
            <text:p>6</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感染的巨大刀劍，會根據使用者的意志而強化威力。</text:p>
            <text:p>以該武器進行近戰攻擊前使用，該攻擊的傷害+2D，該效果一場景可以使用一次。裝備該武器時【行動值】-4。雙手持握。</text:p>
          </table:table-cell>
          <table:table-cell table:style-name="ce45" office:value-type="string" calcext:value-type="string">
            <text:p>IA P113</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回旋盾</text:p>
            <text:p>（ブーメランアスピス）</text:p>
          </table:table-cell>
          <table:table-cell table:style-name="ce45" office:value-type="string" calcext:value-type="string">
            <text:p>近戰／射擊</text:p>
          </table:table-cell>
          <table:table-cell table:style-name="ce45" office:value-type="string" calcext:value-type="string">
            <text:p>&lt;近戰&gt;&lt;射擊&gt;</text:p>
          </table:table-cell>
          <table:table-cell table:style-name="ce45" office:value-type="float" office:value="-2" calcext:value-type="float">
            <text:p>-2</text:p>
          </table:table-cell>
          <table:table-cell table:style-name="ce45" office:value-type="float" office:value="6" calcext:value-type="float">
            <text:p>6</text:p>
          </table:table-cell>
          <table:table-cell table:style-name="ce45" office:value-type="float" office:value="8" calcext:value-type="float">
            <text:p>8</text:p>
          </table:table-cell>
          <table:table-cell table:style-name="ce45" office:value-type="string" calcext:value-type="string">
            <text:p>至近/2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用特殊合金鑄成的盾。寄宿著秘密開發的EX背教者病毒，即使投擲出去也能回到手上，還有提高持有者力量的作用。</text:p>
            <text:p>進行射擊攻擊時，使用右邊的數據。你進行攻擊判定前使用，該判定的達成值+4，每當你使用這個效果時，你的侵蝕率+1。</text:p>
          </table:table-cell>
          <table:table-cell table:style-name="ce45" office:value-type="string" calcext:value-type="string">
            <text:p>IA P114</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墮天之盾</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8" calcext:value-type="float">
            <text:p>8</text:p>
          </table:table-cell>
          <table:table-cell table:style-name="ce45" office:value-type="string" calcext:value-type="string">
            <text:p>至近</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感染，變得能夠自由改變硬度的盾牌。</text:p>
            <text:p>你格擋時使用，此次格擋期間該武器的格擋值+5，每當使用這個效果時，你的侵蝕率+1。</text:p>
          </table:table-cell>
          <table:table-cell table:style-name="ce45" office:value-type="string" calcext:value-type="string">
            <text:p>IA P114</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蜘蛛射手</text:p>
            <text:p>（スピナーシューター）</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6" calcext:value-type="float">
            <text:p>6</text:p>
          </table:table-cell>
          <table:table-cell table:style-name="ce45" office:value-type="string" calcext:value-type="string">
            <text:p>-</text:p>
          </table:table-cell>
          <table:table-cell table:style-name="ce45" office:value-type="string" calcext:value-type="string">
            <text:p>10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手掌大小、能發射強韌絲線的裝置，可以直接射擊敵人也可以用絲線拘束，還可以纏住其他東西快速移動。</text:p>
            <text:p>次要動作使用，你以飛行狀態進行戰鬥移動，使用該效果時你的侵蝕率+1。</text:p>
          </table:table-cell>
          <table:table-cell table:style-name="ce45" office:value-type="string" calcext:value-type="string">
            <text:p>IA P114</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
          <table:table-cell table:style-name="ce45" office:value-type="string" calcext:value-type="string">
            <text:p>陀螺UFO</text:p>
            <text:p>（ジャイロユーエフオー）</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7" calcext:value-type="float">
            <text:p>7</text:p>
          </table:table-cell>
          <table:table-cell table:style-name="ce45" office:value-type="string" calcext:value-type="string">
            <text:p>-</text:p>
          </table:table-cell>
          <table:table-cell table:style-name="ce45" office:value-type="string" calcext:value-type="string">
            <text:p>15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使用陀螺儀的的效果自由操縱軌道的戰鬥悠悠球，可以使用各種機關進行變幻自在的攻擊。</text:p>
            <text:p>使用該武器進行攻擊的判定擲骰後使用，將其中一顆判定骰的骰值變為10，該效果可以在判定過程中使用，該效果一場景可以使用一次。</text:p>
          </table:table-cell>
          <table:table-cell table:style-name="ce45" office:value-type="string" calcext:value-type="string">
            <text:p>IA P114</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
          <table:table-cell table:style-name="ce45" office:value-type="string" calcext:value-type="string">
            <text:p>墮天手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8" calcext:value-type="float">
            <text:p>8</text:p>
          </table:table-cell>
          <table:table-cell table:style-name="ce45" office:value-type="string" calcext:value-type="string">
            <text:p>-</text:p>
          </table:table-cell>
          <table:table-cell table:style-name="ce45" office:value-type="string" calcext:value-type="string">
            <text:p>2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感染的手槍，可隨使用者的意志自由改變彈道。</text:p>
            <text:p>使用該武器進行射擊攻擊前宣言，針對此攻擊進行的回應動作暴擊值+1，該效果一劇本中可以使用三次。</text:p>
          </table:table-cell>
          <table:table-cell table:style-name="ce45" office:value-type="string" calcext:value-type="string">
            <text:p>IA P114</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墮天加特林</text:p>
            <text:p>（フォールンガトリング）</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5" office:value-type="float" office:value="13" calcext:value-type="float">
            <text:p>13</text:p>
          </table:table-cell>
          <table:table-cell table:style-name="ce45" office:value-type="string" calcext:value-type="string">
            <text:p>-</text:p>
          </table:table-cell>
          <table:table-cell table:style-name="ce45" office:value-type="string" calcext:value-type="string">
            <text:p>15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所感染的加特林機炮，其不需要任何動力源，重量也輕量化到了人類可以攜帶的程度。</text:p>
            <text:p>使用該武器進行的，[對象：單體]以外的射擊攻擊，攻擊力+4。雙手持握。至近不可。</text:p>
          </table:table-cell>
          <table:table-cell table:style-name="ce45" office:value-type="string" calcext:value-type="string">
            <text:p>IA P114</text:p>
          </table:table-cell>
          <table:table-cell table:style-name="ce45"/>
          <table:table-cell table:style-name="ce85" table:number-columns-repeated="14"/>
          <table:table-cell table:number-columns-repeated="998"/>
        </table:table-row>
        <table:table-row table:style-name="ro2">
          <table:table-cell table:style-name="ce45" office:value-type="string" calcext:value-type="string">
            <text:p>墮天步槍</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10" calcext:value-type="float">
            <text:p>10</text:p>
          </table:table-cell>
          <table:table-cell table:style-name="ce45" office:value-type="string" calcext:value-type="string">
            <text:p>-</text:p>
          </table:table-cell>
          <table:table-cell table:style-name="ce45" office:value-type="string" calcext:value-type="string">
            <text:p>20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感染的步槍，能射出對背教者病毒有鎮靜效果的子彈</text:p>
            <text:p>使用該武器進行的射擊攻擊，對超越者（或原菌）造成至少1點HP傷害時，該回合間，對象進行的所有判定骰子數-3個</text:p>
            <text:p>至近不可</text:p>
          </table:table-cell>
          <table:table-cell table:style-name="ce45" office:value-type="string" calcext:value-type="string">
            <text:p>IA P114</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機械監管者</text:p>
            <text:p>（マシンワーデン）</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9" calcext:value-type="float">
            <text:p>9</text:p>
          </table:table-cell>
          <table:table-cell table:style-name="ce45" office:value-type="string" calcext:value-type="string">
            <text:p>-</text:p>
          </table:table-cell>
          <table:table-cell table:style-name="ce45" office:value-type="string" calcext:value-type="string">
            <text:p>5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可以變成戰鬥機器人的AI摩托，機器人形態可以自律攻擊敵人，守護所有者，該數據為機器人形態的數據。</text:p>
            <text:p>你的裝甲值合計值+7，次要動作使用後可以變成摩托形態，數據使用“摩托”的數據，可以再次使用次要動作變成機器人形態。</text:p>
          </table:table-cell>
          <table:table-cell table:style-name="ce45" office:value-type="string" calcext:value-type="string">
            <text:p>IA P114</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
          <table:table-cell table:style-name="ce45" office:value-type="string" calcext:value-type="string">
            <text:p>狂怒射手</text:p>
            <text:p>（レイジングシューター）</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2" calcext:value-type="float">
            <text:p>-2</text:p>
          </table:table-cell>
          <table:table-cell table:style-name="ce47" office:value-type="string" calcext:value-type="string">
            <text:p>10/15</text:p>
          </table:table-cell>
          <table:table-cell table:style-name="ce45" office:value-type="string" calcext:value-type="string">
            <text:p>-</text:p>
          </table:table-cell>
          <table:table-cell table:style-name="ce45" office:value-type="string" calcext:value-type="string">
            <text:p>100m/500m</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所感染的反坦克炮，可以在攜帶和炮擊兩種形態之間切換。</text:p>
            <text:p>使用次要動作，將攻擊力和射程變更為右側的數據，但是進行了攻擊或是場景結束時，數據都將恢復原狀。雙手持握。至近不可。</text:p>
          </table:table-cell>
          <table:table-cell table:style-name="ce45" office:value-type="string" calcext:value-type="string">
            <text:p>IA P114</text:p>
          </table:table-cell>
          <table:table-cell table:style-name="ce45"/>
          <table:table-cell table:style-name="ce85" table:number-columns-repeated="14"/>
          <table:table-cell table:number-columns-repeated="998"/>
        </table:table-row>
        <table:table-row table:style-name="ro2">
          <table:table-cell table:style-name="ce51" table:number-columns-repeated="4"/>
          <table:table-cell table:style-name="ce66"/>
          <table:table-cell table:style-name="ce51" table:number-columns-repeated="2"/>
          <table:table-cell table:style-name="ce66"/>
          <table:table-cell table:style-name="ce51"/>
          <table:table-cell table:style-name="ce81"/>
          <table:table-cell table:style-name="ce51" table:number-columns-repeated="2"/>
          <table:table-cell table:style-name="ce44" table:number-columns-repeated="14"/>
          <table:table-cell table:number-columns-repeated="998"/>
        </table:table-row>
        <table:table-row table:style-name="ro2">
          <table:table-cell table:style-name="ce51" table:number-columns-repeated="5"/>
          <table:table-cell table:style-name="ce67"/>
          <table:table-cell table:style-name="ce51"/>
          <table:table-cell table:style-name="ce66"/>
          <table:table-cell table:style-name="ce51"/>
          <table:table-cell table:style-name="ce81"/>
          <table:table-cell table:style-name="ce51"/>
          <table:table-cell table:style-name="ce50"/>
          <table:table-cell table:style-name="ce44" table:number-columns-repeated="14"/>
          <table:table-cell table:number-columns-repeated="998"/>
        </table:table-row>
        <table:table-row table:style-name="ro2">
          <table:table-cell table:style-name="ce60" office:value-type="string" calcext:value-type="string" table:number-columns-spanned="12" table:number-rows-spanned="1">
            <text:p>防具</text:p>
          </table:table-cell>
          <table:covered-table-cell table:number-columns-repeated="11"/>
          <table:table-cell table:style-name="ce44" table:number-columns-repeated="14"/>
          <table:table-cell table:number-columns-repeated="998"/>
        </table:table-row>
        <table:table-row table:style-name="ro2">
          <table:table-cell table:style-name="ce61" office:value-type="string" calcext:value-type="string">
            <text:p>名稱</text:p>
          </table:table-cell>
          <table:table-cell table:style-name="ce61" office:value-type="string" calcext:value-type="string">
            <text:p>種類</text:p>
          </table:table-cell>
          <table:table-cell table:style-name="ce61" office:value-type="string" calcext:value-type="string">
            <text:p>回避</text:p>
          </table:table-cell>
          <table:table-cell table:style-name="ce61" office:value-type="string" calcext:value-type="string">
            <text:p>行動值</text:p>
          </table:table-cell>
          <table:table-cell table:style-name="ce61" office:value-type="string" calcext:value-type="string">
            <text:p>裝甲值</text:p>
          </table:table-cell>
          <table:table-cell table:style-name="ce65" office:value-type="string" calcext:value-type="string">
            <text:p>購買/常備化</text:p>
          </table:table-cell>
          <table:table-cell table:style-name="ce73" office:value-type="string" calcext:value-type="string">
            <text:p>必要經驗點</text:p>
          </table:table-cell>
          <table:table-cell table:style-name="ce76" office:value-type="string" calcext:value-type="string" table:number-columns-spanned="3" table:number-rows-spanned="1">
            <text:p>解說</text:p>
          </table:table-cell>
          <table:covered-table-cell table:number-columns-repeated="2" table:style-name="ce74"/>
          <table:table-cell table:style-name="ce61" office:value-type="string" calcext:value-type="string">
            <text:p>參照</text:p>
          </table:table-cell>
          <table:table-cell table:style-name="ce61" office:value-type="string" calcext:value-type="string">
            <text:p>備註</text:p>
          </table:table-cell>
          <table:table-cell table:style-name="ce85" table:number-columns-repeated="14"/>
          <table:table-cell table:number-columns-repeated="998"/>
        </table:table-row>
        <table:table-row table:style-name="ro10">
          <table:table-cell table:style-name="ce45" office:value-type="string" calcext:value-type="string">
            <text:p>金屬制服</text:p>
            <text:p>（メタルス一ツ）</text:p>
          </table:table-cell>
          <table:table-cell table:style-name="ce45" office:value-type="string" calcext:value-type="string">
            <text:p>防具</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16" calcext:value-type="float">
            <text:p>16</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77" office:value-type="string" calcext:value-type="string" table:number-columns-spanned="3" table:number-rows-spanned="1">
            <text:p>搭載了各種各樣的武器的強化服。</text:p>
            <text:p>裝備該防具期間，你視為裝備了3個數據如下的射擊武器，這些射擊武器不計入已裝備武器數量，每個武器一劇本中可以使用一次：</text:p>
            <text:p>技能：&lt;射擊&gt;　命中：-2　攻擊力：12　格擋值：－　射程：視野</text:p>
          </table:table-cell>
          <table:covered-table-cell table:number-columns-repeated="2" table:style-name="ce75"/>
          <table:table-cell table:style-name="ce45" office:value-type="string" calcext:value-type="string">
            <text:p>IA P115</text:p>
          </table:table-cell>
          <table:table-cell table:style-name="ce83"/>
          <table:table-cell table:style-name="ce85" table:number-columns-repeated="14"/>
          <table:table-cell table:number-columns-repeated="998"/>
        </table:table-row>
        <table:table-row table:style-name="ro11">
          <table:table-cell table:style-name="ce45" office:value-type="string" calcext:value-type="string">
            <text:p>EX探路者</text:p>
            <text:p>（EXパスファインダー）</text:p>
          </table:table-cell>
          <table:table-cell table:style-name="ce45" office:value-type="string" calcext:value-type="string">
            <text:p>防具</text:p>
          </table:table-cell>
          <table:table-cell table:number-columns-repeated="2" table:style-name="ce45" office:value-type="float" office:value="0" calcext:value-type="float">
            <text:p>0</text:p>
          </table:table-cell>
          <table:table-cell table:style-name="ce45" office:value-type="float" office:value="12" calcext:value-type="float">
            <text:p>12</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3" table:number-rows-spanned="1">
            <text:p>感染了EX背教者病毒的防彈衣。可以讓著裝者的反應速度暫時加快。</text:p>
            <text:p>準備階段時使用，該回合間，你的【行動值】+7，使用該效果後，你的侵蝕率+3，該效果一場景可以使用一次。</text:p>
          </table:table-cell>
          <table:covered-table-cell table:number-columns-repeated="2"/>
          <table:table-cell table:style-name="ce45" office:value-type="string" calcext:value-type="string">
            <text:p>IA P115</text:p>
          </table:table-cell>
          <table:table-cell table:style-name="ce83"/>
          <table:table-cell table:style-name="ce85" table:number-columns-repeated="14"/>
          <table:table-cell table:number-columns-repeated="998"/>
        </table:table-row>
        <table:table-row table:style-name="ro12">
          <table:table-cell table:style-name="ce45" office:value-type="string" calcext:value-type="string">
            <text:p>武裝腰帶</text:p>
            <text:p>（アーマメントベルト）</text:p>
          </table:table-cell>
          <table:table-cell table:style-name="ce45" office:value-type="string" calcext:value-type="string">
            <text:p>防具</text:p>
          </table:table-cell>
          <table:table-cell table:number-columns-repeated="2" table:style-name="ce45" office:value-type="float" office:value="0" calcext:value-type="float">
            <text:p>0</text:p>
          </table:table-cell>
          <table:table-cell table:style-name="ce45" office:value-type="string" calcext:value-type="string">
            <text:p>0/12</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3" table:number-rows-spanned="1">
            <text:p>平時收納成腰帶形狀的戰鬥服，通過使用特定道具或是進行語音識別便能使其展開變成原本的姿態。</text:p>
            <text:p>準備階段使用該防具，該場景間裝甲值變更為右側的數據，該效果持續期間，你的空手變更為「攻擊力：8」。</text:p>
          </table:table-cell>
          <table:covered-table-cell table:number-columns-repeated="2"/>
          <table:table-cell table:style-name="ce45" office:value-type="string" calcext:value-type="string">
            <text:p>IA P115</text:p>
          </table:table-cell>
          <table:table-cell table:style-name="ce83"/>
          <table:table-cell table:style-name="ce85" table:number-columns-repeated="14"/>
          <table:table-cell table:number-columns-repeated="998"/>
        </table:table-row>
        <table:table-row table:style-name="ro13">
          <table:table-cell table:style-name="ce45" office:value-type="string" calcext:value-type="string">
            <text:p>變色龍披風</text:p>
            <text:p>（カメレオンクローク）</text:p>
          </table:table-cell>
          <table:table-cell table:style-name="ce45" office:value-type="string" calcext:value-type="string">
            <text:p>防具</text:p>
          </table:table-cell>
          <table:table-cell table:style-name="ce45" office:value-type="float" office:value="4" calcext:value-type="float">
            <text:p>4</text:p>
          </table:table-cell>
          <table:table-cell table:style-name="ce45" office:value-type="float" office:value="0" calcext:value-type="float">
            <text:p>0</text:p>
          </table:table-cell>
          <table:table-cell table:style-name="ce45" office:value-type="float" office:value="2" calcext:value-type="float">
            <text:p>2</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3" table:number-rows-spanned="1">
            <text:p>利用機密迷彩隱藏身影的披風，能無效各種探測器，也能反過來探知周圍的情況。</text:p>
            <text:p>你進行的&lt;知覺&gt;判定骰數+4個，此外你在進行&lt;知覺&gt;或回避判定前使用，該判定達成值+10，該效果一劇本可以使用一次。</text:p>
          </table:table-cell>
          <table:covered-table-cell table:number-columns-repeated="2"/>
          <table:table-cell table:style-name="ce45" office:value-type="string" calcext:value-type="string">
            <text:p>IA P115</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4">
          <table:table-cell table:style-name="ce45" office:value-type="string" calcext:value-type="string">
            <text:p>促力裝甲</text:p>
          </table:table-cell>
          <table:table-cell table:style-name="ce45" office:value-type="string" calcext:value-type="string">
            <text:p>防具</text:p>
          </table:table-cell>
          <table:table-cell table:style-name="ce45" office:value-type="float" office:value="0" calcext:value-type="float">
            <text:p>0</text:p>
          </table:table-cell>
          <table:table-cell table:style-name="ce45" office:value-type="float" office:value="-2" calcext:value-type="float">
            <text:p>-2</text:p>
          </table:table-cell>
          <table:table-cell table:style-name="ce45" office:value-type="float" office:value="15" calcext:value-type="float">
            <text:p>15</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3" table:number-rows-spanned="1">
            <text:p>刺激裝備者的背教者病毒，使能力上升的防彈衣。</text:p>
            <text:p>裝備該防具角色的【肉體】【感覺】【精神】的判定骰數+2個。裝備期間，每次主要階段結束時，侵蝕率＋2。</text:p>
          </table:table-cell>
          <table:covered-table-cell table:number-columns-repeated="2"/>
          <table:table-cell table:style-name="ce45" office:value-type="string" calcext:value-type="string">
            <text:p>IA P115</text:p>
          </table:table-cell>
          <table:table-cell table:style-name="ce83"/>
          <table:table-cell table:style-name="ce85" table:number-columns-repeated="14"/>
          <table:table-cell table:number-columns-repeated="998"/>
        </table:table-row>
        <table:table-row table:style-name="ro14">
          <table:table-cell table:style-name="ce45" office:value-type="string" calcext:value-type="string">
            <text:p>活外套</text:p>
          </table:table-cell>
          <table:table-cell table:style-name="ce45" office:value-type="string" calcext:value-type="string">
            <text:p>防具（輔助）</text:p>
          </table:table-cell>
          <table:table-cell table:number-columns-repeated="2" table:style-name="ce45" office:value-type="float" office:value="0" calcext:value-type="float">
            <text:p>0</text:p>
          </table:table-cell>
          <table:table-cell table:style-name="ce45" office:value-type="float" office:value="7" calcext:value-type="float">
            <text:p>7</text:p>
          </table:table-cell>
          <table:table-cell table:style-name="ce47"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3" table:number-rows-spanned="1">
            <text:p>受EX背教者病毒感染的外套。</text:p>
            <text:p>受到傷害前使用，裝備該防具的角色（預定）受到的HP傷害-4D10，使用該效果的HP傷害結算後，該防具將被破壞。</text:p>
          </table:table-cell>
          <table:covered-table-cell table:number-columns-repeated="2"/>
          <table:table-cell table:style-name="ce45" office:value-type="string" calcext:value-type="string">
            <text:p>IA P115</text:p>
          </table:table-cell>
          <table:table-cell table:style-name="ce83"/>
          <table:table-cell table:style-name="ce85" table:number-columns-repeated="14"/>
          <table:table-cell table:number-columns-repeated="998"/>
        </table:table-row>
        <table:table-row table:style-name="ro2">
          <table:table-cell table:style-name="ce51" table:number-columns-repeated="7"/>
          <table:table-cell table:style-name="ce78" table:number-columns-spanned="3" table:number-rows-spanned="1"/>
          <table:covered-table-cell table:number-columns-repeated="2"/>
          <table:table-cell table:style-name="ce51"/>
          <table:table-cell table:style-name="ce50"/>
          <table:table-cell table:style-name="ce44" table:number-columns-repeated="14"/>
          <table:table-cell table:number-columns-repeated="998"/>
        </table:table-row>
        <table:table-row table:style-name="ro2">
          <table:table-cell table:style-name="ce51" table:number-columns-repeated="7"/>
          <table:table-cell table:style-name="ce78" table:number-columns-spanned="3" table:number-rows-spanned="1"/>
          <table:covered-table-cell table:number-columns-repeated="2"/>
          <table:table-cell table:style-name="ce51"/>
          <table:table-cell table:style-name="ce50"/>
          <table:table-cell table:style-name="ce44" table:number-columns-repeated="14"/>
          <table:table-cell table:number-columns-repeated="998"/>
        </table:table-row>
        <table:table-row table:style-name="ro2">
          <table:table-cell table:style-name="ce62" office:value-type="string" calcext:value-type="string" table:number-columns-spanned="12" table:number-rows-spanned="1">
            <text:p>載具</text:p>
          </table:table-cell>
          <table:covered-table-cell table:number-columns-repeated="11"/>
          <table:table-cell table:style-name="ce44" table:number-columns-repeated="14"/>
          <table:table-cell table:number-columns-repeated="998"/>
        </table:table-row>
        <table:table-row table:style-name="ro2">
          <table:table-cell table:style-name="ce61" office:value-type="string" calcext:value-type="string">
            <text:p>名稱</text:p>
          </table:table-cell>
          <table:table-cell table:style-name="ce61" office:value-type="string" calcext:value-type="string">
            <text:p>種類</text:p>
          </table:table-cell>
          <table:table-cell table:style-name="ce61" office:value-type="string" calcext:value-type="string">
            <text:p>技能</text:p>
          </table:table-cell>
          <table:table-cell table:style-name="ce61" office:value-type="string" calcext:value-type="string">
            <text:p>攻擊力</text:p>
          </table:table-cell>
          <table:table-cell table:style-name="ce61" office:value-type="string" calcext:value-type="string">
            <text:p>行動值</text:p>
          </table:table-cell>
          <table:table-cell table:style-name="ce61" office:value-type="string" calcext:value-type="string">
            <text:p>裝甲值</text:p>
          </table:table-cell>
          <table:table-cell table:style-name="ce61" office:value-type="string" calcext:value-type="string">
            <text:p>全力移動</text:p>
          </table:table-cell>
          <table:table-cell table:style-name="ce73" office:value-type="string" calcext:value-type="string">
            <text:p>購買/常備化</text:p>
          </table:table-cell>
          <table:table-cell table:style-name="ce73" office:value-type="string" calcext:value-type="string">
            <text:p>必要經驗點</text:p>
          </table:table-cell>
          <table:table-cell table:style-name="ce76" office:value-type="string" calcext:value-type="string">
            <text:p>解說</text:p>
          </table:table-cell>
          <table:table-cell table:style-name="ce61" office:value-type="string" calcext:value-type="string">
            <text:p>參照</text:p>
          </table:table-cell>
          <table:table-cell table:style-name="ce61" office:value-type="string" calcext:value-type="string">
            <text:p>備註</text:p>
          </table:table-cell>
          <table:table-cell table:style-name="ce85" table:number-columns-repeated="14"/>
          <table:table-cell table:number-columns-repeated="998"/>
        </table:table-row>
        <table:table-row table:style-name="ro2">
          <table:table-cell table:style-name="ce45" office:value-type="string" calcext:value-type="string">
            <text:p>打擊機動</text:p>
            <text:p>（ストライクモービル）</text:p>
          </table:table-cell>
          <table:table-cell table:style-name="ce45" office:value-type="string" calcext:value-type="string">
            <text:p>載具</text:p>
          </table:table-cell>
          <table:table-cell table:style-name="ce45" office:value-type="string" calcext:value-type="string">
            <text:p>&lt;駕駛：●●&gt;</text:p>
          </table:table-cell>
          <table:table-cell table:style-name="ce45" office:value-type="float" office:value="10" calcext:value-type="float">
            <text:p>10</text:p>
          </table:table-cell>
          <table:table-cell table:style-name="ce45" office:value-type="float" office:value="-1" calcext:value-type="float">
            <text:p>-1</text:p>
          </table:table-cell>
          <table:table-cell table:style-name="ce45" office:value-type="float" office:value="13" calcext:value-type="float">
            <text:p>13</text:p>
          </table:table-cell>
          <table:table-cell table:style-name="ce45" office:value-type="string" calcext:value-type="string">
            <text:p>350m</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適合戰鬥用的載具機器。</text:p>
            <text:p>&lt;駕駛：●●&gt;的類別於取得此道具時決定。搭乘期間，你進行的攻擊判定骰數+4個。</text:p>
          </table:table-cell>
          <table:table-cell table:style-name="ce45" office:value-type="string" calcext:value-type="string">
            <text:p>IA P115</text:p>
          </table:table-cell>
          <table:table-cell table:style-name="ce45"/>
          <table:table-cell table:style-name="ce49" table:number-columns-repeated="14"/>
          <table:table-cell table:number-columns-repeated="998"/>
        </table:table-row>
        <table:table-row table:style-name="ro2">
          <table:table-cell table:style-name="ce45" office:value-type="string" calcext:value-type="string">
            <text:p>墮天載具</text:p>
          </table:table-cell>
          <table:table-cell table:style-name="ce45" office:value-type="string" calcext:value-type="string">
            <text:p>載具</text:p>
          </table:table-cell>
          <table:table-cell table:style-name="ce45" office:value-type="string" calcext:value-type="string">
            <text:p>&lt;駕駛：●●&gt;</text:p>
          </table:table-cell>
          <table:table-cell table:style-name="ce45" office:value-type="float" office:value="13" calcext:value-type="float">
            <text:p>13</text:p>
          </table:table-cell>
          <table:table-cell table:style-name="ce45" office:value-type="float" office:value="-3" calcext:value-type="float">
            <text:p>-3</text:p>
          </table:table-cell>
          <table:table-cell table:style-name="ce45" office:value-type="float" office:value="13" calcext:value-type="float">
            <text:p>13</text:p>
          </table:table-cell>
          <table:table-cell table:style-name="ce45" office:value-type="string" calcext:value-type="string">
            <text:p>300m</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受EX背教者病毒感染的載具。</text:p>
            <text:p>&lt;駕駛：●●&gt;的類別於取得該道具時決定。搭乘期間，你的判定骰數+1個。</text:p>
          </table:table-cell>
          <table:table-cell table:style-name="ce45" office:value-type="string" calcext:value-type="string">
            <text:p>IA P115</text:p>
          </table:table-cell>
          <table:table-cell table:style-name="ce49" table:number-columns-repeated="15"/>
          <table:table-cell table:number-columns-repeated="998"/>
        </table:table-row>
        <table:table-row table:style-name="ro2">
          <table:table-cell table:style-name="ce45" office:value-type="string" calcext:value-type="string">
            <text:p>墮天機械</text:p>
            <text:p>（フオールンマシン）</text:p>
          </table:table-cell>
          <table:table-cell table:style-name="ce45" office:value-type="string" calcext:value-type="string">
            <text:p>載具</text:p>
          </table:table-cell>
          <table:table-cell table:style-name="ce45" office:value-type="string" calcext:value-type="string">
            <text:p>&lt;駕駛：多腳戰車&gt;</text:p>
          </table:table-cell>
          <table:table-cell table:style-name="ce45" office:value-type="float" office:value="17" calcext:value-type="float">
            <text:p>17</text:p>
          </table:table-cell>
          <table:table-cell table:style-name="ce45" office:value-type="float" office:value="-3" calcext:value-type="float">
            <text:p>-3</text:p>
          </table:table-cell>
          <table:table-cell table:style-name="ce45" office:value-type="float" office:value="15" calcext:value-type="float">
            <text:p>15</text:p>
          </table:table-cell>
          <table:table-cell table:style-name="ce45" office:value-type="string" calcext:value-type="string">
            <text:p>150m</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80" office:value-type="string" calcext:value-type="string">
            <text:p>三米高的人形機械。利用EX背教者病毒完成的獨一無二的機體。</text:p>
            <text:p>搭乘期間，具有“雙手持握”性質的武器可以裝備最多4個。</text:p>
          </table:table-cell>
          <table:table-cell table:style-name="ce45" office:value-type="string" calcext:value-type="string">
            <text:p>IA P115</text:p>
          </table:table-cell>
          <table:table-cell table:style-name="ce45"/>
          <table:table-cell table:style-name="ce49" table:number-columns-repeated="14"/>
          <table:table-cell table:number-columns-repeated="998"/>
        </table:table-row>
        <table:table-row table:style-name="ro2">
          <table:table-cell table:style-name="ce45" office:value-type="string" calcext:value-type="string">
            <text:p>戰鬥卡車</text:p>
            <text:p>（バトルトレーラー）</text:p>
          </table:table-cell>
          <table:table-cell table:style-name="ce45" office:value-type="string" calcext:value-type="string">
            <text:p>載具</text:p>
          </table:table-cell>
          <table:table-cell table:style-name="ce45" office:value-type="string" calcext:value-type="string">
            <text:p>&lt;駕駛：四輪&gt;&lt;駕駛：多腳戰車&gt;</text:p>
          </table:table-cell>
          <table:table-cell table:style-name="ce47" office:value-type="string" calcext:value-type="string">
            <text:p>12/20</text:p>
          </table:table-cell>
          <table:table-cell table:style-name="ce45" office:value-type="float" office:value="-4" calcext:value-type="float">
            <text:p>-4</text:p>
          </table:table-cell>
          <table:table-cell table:style-name="ce47" office:value-type="string" calcext:value-type="string">
            <text:p>14/20</text:p>
          </table:table-cell>
          <table:table-cell table:style-name="ce47" office:value-type="string" calcext:value-type="string">
            <text:p>100m</text:p>
          </table:table-cell>
          <table:table-cell table:style-name="ce45" office:value-type="string" calcext:value-type="string">
            <text:p>購買不可/不可</text:p>
          </table:table-cell>
          <table:table-cell table:style-name="ce45" office:value-type="string" calcext:value-type="string">
            <text:p>100點</text:p>
          </table:table-cell>
          <table:table-cell table:style-name="ce80" office:value-type="string" calcext:value-type="string">
            <text:p>平常只是巨大的載具，但實際上可以通過命令使其變形為人型機器人的EX背教者。</text:p>
            <text:p>次要動作使用，該場景間，使其攻擊力和裝甲值變為右側的數據。同時，在此期間，可以用&lt;近戰&gt;使用該載具進行攻擊。該道具只能通過支付經驗點取得。</text:p>
          </table:table-cell>
          <table:table-cell table:style-name="ce45" office:value-type="string" calcext:value-type="string">
            <text:p>IA P116</text:p>
          </table:table-cell>
          <table:table-cell table:style-name="ce45"/>
          <table:table-cell table:style-name="ce49" table:number-columns-repeated="14"/>
          <table:table-cell table:number-columns-repeated="998"/>
        </table:table-row>
        <table:table-row table:style-name="ro2" table:number-rows-repeated="2">
          <table:table-cell table:style-name="ce51" table:number-columns-repeated="7"/>
          <table:table-cell table:style-name="ce66"/>
          <table:table-cell table:style-name="ce51"/>
          <table:table-cell table:style-name="ce81"/>
          <table:table-cell table:style-name="ce51"/>
          <table:table-cell table:style-name="ce50"/>
          <table:table-cell table:style-name="ce44" table:number-columns-repeated="14"/>
          <table:table-cell table:number-columns-repeated="998"/>
        </table:table-row>
        <table:table-row table:style-name="ro2">
          <table:table-cell table:style-name="ce62" office:value-type="string" calcext:value-type="string" table:number-columns-spanned="12" table:number-rows-spanned="1">
            <text:p>其他</text:p>
          </table:table-cell>
          <table:covered-table-cell table:number-columns-repeated="11"/>
          <table:table-cell table:style-name="ce44" table:number-columns-repeated="14"/>
          <table:table-cell table:number-columns-repeated="998"/>
        </table:table-row>
        <table:table-row table:style-name="ro2">
          <table:table-cell table:style-name="ce63" office:value-type="string" calcext:value-type="string">
            <text:p>名稱</text:p>
          </table:table-cell>
          <table:table-cell table:style-name="ce63" office:value-type="string" calcext:value-type="string">
            <text:p>種類</text:p>
          </table:table-cell>
          <table:table-cell table:style-name="ce63" office:value-type="string" calcext:value-type="string">
            <text:p>技能</text:p>
          </table:table-cell>
          <table:table-cell table:style-name="ce65" office:value-type="string" calcext:value-type="string">
            <text:p>購買/常備化</text:p>
          </table:table-cell>
          <table:table-cell table:style-name="ce65" office:value-type="string" calcext:value-type="string">
            <text:p>必要經驗點</text:p>
          </table:table-cell>
          <table:table-cell table:style-name="ce68" office:value-type="string" calcext:value-type="string" table:number-columns-spanned="5" table:number-rows-spanned="1">
            <text:p>解說</text:p>
          </table:table-cell>
          <table:covered-table-cell table:number-columns-repeated="4" table:style-name="ce74"/>
          <table:table-cell table:style-name="ce63" office:value-type="string" calcext:value-type="string">
            <text:p>參照</text:p>
          </table:table-cell>
          <table:table-cell table:style-name="ce63" office:value-type="string" calcext:value-type="string">
            <text:p>備註</text:p>
          </table:table-cell>
          <table:table-cell table:style-name="ce85" table:number-columns-repeated="14"/>
          <table:table-cell table:number-columns-repeated="998"/>
        </table:table-row>
        <table:table-row table:style-name="ro15">
          <table:table-cell table:style-name="ce64" office:value-type="string" calcext:value-type="string">
            <text:p>關聯：大師級領域</text:p>
          </table:table-cell>
          <table:table-cell table:style-name="ce45" office:value-type="string" calcext:value-type="string">
            <text:p>關聯</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69" office:value-type="string" calcext:value-type="string" table:number-columns-spanned="5" table:number-rows-spanned="1">
            <text:p>由特定領域的專家們進行互相幫扶的組織。參加該組織的成員，可以獲得來自其他成員的協助。</text:p>
            <text:p>於任意判定前使用，該判定直接成功。不能用於對決判定。GM可以選擇拒絕使用，此時不消耗使用次數。該效果一劇本可以使用一次。</text:p>
          </table:table-cell>
          <table:covered-table-cell table:number-columns-repeated="4" table:style-name="ce75"/>
          <table:table-cell table:style-name="ce45" office:value-type="string" calcext:value-type="string">
            <text:p>IA P116</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R控制器</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0" office:value-type="string" calcext:value-type="string" table:number-columns-spanned="5" table:number-rows-spanned="1">
            <text:p>裝備於手腕上的背教者病毒增幅器，效果強大但是使用次數有限。</text:p>
            <text:p>進行&lt;RC&gt;判定前使用，判定骰數+5個，該效果一劇本可以使用三次。</text:p>
          </table:table-cell>
          <table:covered-table-cell table:number-columns-repeated="4"/>
          <table:table-cell table:style-name="ce45" office:value-type="string" calcext:value-type="string">
            <text:p>IA P116</text:p>
          </table:table-cell>
          <table:table-cell table:style-name="ce83"/>
          <table:table-cell table:style-name="ce85" table:number-columns-repeated="14"/>
          <table:table-cell table:number-columns-repeated="998"/>
        </table:table-row>
        <table:table-row table:style-name="ro2">
          <table:table-cell table:style-name="ce45" office:value-type="string" calcext:value-type="string">
            <text:p>真實之視</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0" office:value-type="string" calcext:value-type="string" table:number-columns-spanned="5" table:number-rows-spanned="1">
            <text:p>受EX背教者病毒感染的多功能護目鏡，為了應對各種狀況而搭載著各種各樣的功能。</text:p>
            <text:p>於任意判定前使用，判定骰數+3個，該效果一劇本可以使用三次。</text:p>
          </table:table-cell>
          <table:covered-table-cell table:number-columns-repeated="4"/>
          <table:table-cell table:style-name="ce45" office:value-type="string" calcext:value-type="string">
            <text:p>IA P116</text:p>
          </table:table-cell>
          <table:table-cell table:style-name="ce83"/>
          <table:table-cell table:style-name="ce85" table:number-columns-repeated="14"/>
          <table:table-cell table:number-columns-repeated="998"/>
        </table:table-row>
        <table:table-row table:style-name="ro16">
          <table:table-cell table:style-name="ce45" office:value-type="string" calcext:value-type="string">
            <text:p>特殊裝甲義肢</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0" office:value-type="string" calcext:value-type="string" table:number-columns-spanned="5" table:number-rows-spanned="1">
            <office:annotation draw:style-name="gr1" draw:text-style-name="P2" svg:width="496.66pt" svg:height="295.48pt" svg:x="539.63pt" svg:y="834.75pt" draw:caption-point-x="485.12pt" draw:caption-point-y="-22.22pt">
              <dc:date>2026-04-24T00:00:00</dc:date>
              <text:p text:style-name="P1">機械臂</text:p>
              <text:p text:style-name="P1">最大等級：10</text:p>
              <text:p text:style-name="P1">時機：常駐</text:p>
              <text:p text:style-name="P1">技能：－ 難易度：自動成功</text:p>
              <text:p text:style-name="P1">對象：自身 射程：至近</text:p>
              <text:p text:style-name="P1">侵蝕值：－ 限制：－</text:p>
              <text:p text:style-name="P1">效果：將手臂機械化的異能。</text:p>
              <text:p text:style-name="P1">將空手變更成以下數據。此異能的等級不受侵蝕率影響。取得此異能的話，侵蝕率基本值+3。</text:p>
              <text:p text:style-name="P1">種類：近戰　技能：&lt;近戰&gt;　命中：0</text:p>
              <text:p text:style-name="P1">攻擊力：+[LV+3]　格擋值：5　射程：至近</text:p>
              <text:p text:style-name="P1">======</text:p>
            </office:annotation>
            <text:p>最新型的義肢，使用了軍用裝甲和強化肌肉。</text:p>
            <text:p>只有雷擊黑犬症候群的角色才能取得。空手的攻擊力+6，格擋值+3，並且你所進行的&lt;近戰&gt;判定骰數+1個。多次取得該道具效果不疊加。這個效果可與《機械臂》的效果疊加，受到《破壞之爪》一類的空手資料變更效果時也能適用。</text:p>
          </table:table-cell>
          <table:covered-table-cell table:number-columns-repeated="4"/>
          <table:table-cell table:style-name="ce45" office:value-type="string" calcext:value-type="string">
            <text:p>IA P116</text:p>
          </table:table-cell>
          <table:table-cell table:style-name="ce49" office:value-type="string" calcext:value-type="string">
            <text:p>雷擊黑犬專用</text:p>
          </table:table-cell>
          <table:table-cell table:style-name="ce85" table:number-columns-repeated="14"/>
          <table:table-cell table:number-columns-repeated="998"/>
        </table:table-row>
        <table:table-row table:style-name="ro2">
          <table:table-cell table:style-name="ce45" office:value-type="string" calcext:value-type="string">
            <text:p>海伯利安要塞</text:p>
            <text:p>（ハイペリオンフォート）</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5" table:number-rows-spanned="1">
            <text:p>作為超越者活動據點開發的空中機動基地，可從上空進行艦炮射擊或情報支援等輔助所有者的活動。</text:p>
            <text:p>你進行的&lt;情報：●●&gt;判定骰數+4個。此外你在進行攻擊前使用，該攻擊的攻擊力+10，該效果一劇本可以使用一次。</text:p>
          </table:table-cell>
          <table:covered-table-cell table:number-columns-repeated="4"/>
          <table:table-cell table:style-name="ce45" office:value-type="string" calcext:value-type="string">
            <text:p>IA P116</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
          <table:table-cell table:style-name="ce45" office:value-type="string" calcext:value-type="string">
            <text:p>墮天火蜥蜴</text:p>
            <text:p>（フォールンサラマンダー）</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5" table:number-rows-spanned="1">
            <text:p>被EX背教者病毒感染的小型無人機。可通過簡易炮臺和異能進行火力支援。</text:p>
            <text:p>於場景中登場的任意角色進行傷害擲骰前使用，使其傷害+2D10，該效果一回合可以使用一次，一劇本可以使用三次。</text:p>
          </table:table-cell>
          <table:covered-table-cell table:number-columns-repeated="4"/>
          <table:table-cell table:style-name="ce45" office:value-type="string" calcext:value-type="string">
            <text:p>IA P116</text:p>
          </table:table-cell>
          <table:table-cell table:style-name="ce45"/>
          <table:table-cell table:style-name="ce85" table:number-columns-repeated="14"/>
          <table:table-cell table:number-columns-repeated="998"/>
        </table:table-row>
        <table:table-row table:style-name="ro10">
          <table:table-cell table:style-name="ce45" office:value-type="string" calcext:value-type="string">
            <text:p>墮天小精靈</text:p>
            <text:p>（フォールンスプライト）</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1" office:value-type="string" calcext:value-type="string" table:number-columns-spanned="5" table:number-rows-spanned="1">
            <text:p>被EX背教者病毒感染的小型無人機。擁有一定的智能，可以輔助持有者的行動。</text:p>
            <text:p>於場景中登場的任意角色進行判定前使用，使其判定骰數+3個，該效果一場景中可以使用一次。</text:p>
            <text:p>此外，墮天小精靈還可以作為聽從你命令的臨時角色進行簡單的工作（搬運小物件，按下你不在的地方的開關等等），具體能夠做到何種程度由GM決定。</text:p>
          </table:table-cell>
          <table:covered-table-cell table:number-columns-repeated="4"/>
          <table:table-cell table:style-name="ce45" office:value-type="string" calcext:value-type="string">
            <text:p>IA P116</text:p>
          </table:table-cell>
          <table:table-cell table:style-name="ce45"/>
          <table:table-cell table:style-name="ce85" table:number-columns-repeated="14"/>
          <table:table-cell table:number-columns-repeated="998"/>
        </table:table-row>
        <table:table-row table:style-name="ro2">
          <table:table-cell table:style-name="ce45" office:value-type="string" calcext:value-type="string">
            <text:p>破壞者</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0" office:value-type="string" calcext:value-type="string" table:number-columns-spanned="5" table:number-rows-spanned="1">
            <text:p>干涉背教者病毒使其從內部造成破壞的髮夾型裝置。</text:p>
            <text:p>於場景中登場的角色進行攻擊前使用，該攻擊無視對象裝甲值進行傷害計算，該效果一場景可以使用一次。</text:p>
          </table:table-cell>
          <table:covered-table-cell table:number-columns-repeated="4"/>
          <table:table-cell table:style-name="ce45" office:value-type="string" calcext:value-type="string">
            <text:p>IA P116</text:p>
          </table:table-cell>
          <table:table-cell table:style-name="ce45"/>
          <table:table-cell table:style-name="ce85" table:number-columns-repeated="14"/>
          <table:table-cell table:number-columns-repeated="998"/>
        </table:table-row>
        <table:table-row table:style-name="ro13">
          <table:table-cell table:style-name="ce45" office:value-type="string" calcext:value-type="string">
            <text:p>傳說鎧甲</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0" office:value-type="string" calcext:value-type="string" table:number-columns-spanned="5" table:number-rows-spanned="1">
            <text:p>你所持有的防具是傳說中的逸品，與其他防具相比有著天差地別的性能。</text:p>
            <text:p>取得時選擇一件你常備化的防具，該防具的裝甲值+5，回避+2，行動值+2。取得多個該道具時，無法選擇同一防具進行效果疊加。</text:p>
          </table:table-cell>
          <table:covered-table-cell table:number-columns-repeated="4"/>
          <table:table-cell table:style-name="ce45" office:value-type="string" calcext:value-type="string">
            <text:p>IA P117</text:p>
          </table:table-cell>
          <table:table-cell table:style-name="ce45"/>
          <table:table-cell table:style-name="ce85" table:number-columns-repeated="14"/>
          <table:table-cell table:number-columns-repeated="998"/>
        </table:table-row>
        <table:table-row table:style-name="ro13">
          <table:table-cell table:style-name="ce45" office:value-type="string" calcext:value-type="string">
            <text:p>傳說載具</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0" office:value-type="string" calcext:value-type="string" table:number-columns-spanned="5" table:number-rows-spanned="1">
            <text:p>你所持有的載具是傳說中的逸品，與其他載具相比有著天差地別的性能。</text:p>
            <text:p>取得時選擇一輛你常備化的載具，該載具的攻擊力+5，全力移動+50m。取得多個該道具時，無法選擇同一載具進行效果疊加。</text:p>
          </table:table-cell>
          <table:covered-table-cell table:number-columns-repeated="4"/>
          <table:table-cell table:style-name="ce45" office:value-type="string" calcext:value-type="string">
            <text:p>IA P117</text:p>
          </table:table-cell>
          <table:table-cell table:style-name="ce45"/>
          <table:table-cell table:style-name="ce85" table:number-columns-repeated="14"/>
          <table:table-cell table:number-columns-repeated="998"/>
        </table:table-row>
        <table:table-row table:style-name="ro13">
          <table:table-cell table:style-name="ce45" office:value-type="string" calcext:value-type="string">
            <text:p>傳說武器</text:p>
          </table:table-cell>
          <table:table-cell table:style-name="ce45" office:value-type="string" calcext:value-type="string">
            <text:p>一般</text:p>
          </table:table-cell>
          <table:table-cell table:style-name="ce45" office:value-type="string" calcext:value-type="string">
            <text:p>-</text:p>
          </table:table-cell>
          <table:table-cell table:style-name="ce45" office:value-type="string" calcext:value-type="string">
            <text:p>購買不可/不可</text:p>
          </table:table-cell>
          <table:table-cell table:style-name="ce45" office:value-type="string" calcext:value-type="string">
            <text:p>20點</text:p>
          </table:table-cell>
          <table:table-cell table:style-name="ce70" office:value-type="string" calcext:value-type="string" table:number-columns-spanned="5" table:number-rows-spanned="1">
            <text:p>你所持有的武器是傳說中的逸品，與其他武器相比有著天差地別的性能。</text:p>
            <text:p>取得時選擇一件你常備化的武器，該武器的攻擊力+5，選擇的武器為「種類：近戰」時，其格擋值+2，為「種類：射擊」時，其射程+10m。取得多個該道具時，無法選擇同一武器進行效果疊加。</text:p>
          </table:table-cell>
          <table:covered-table-cell table:number-columns-repeated="4"/>
          <table:table-cell table:style-name="ce45" office:value-type="string" calcext:value-type="string">
            <text:p>IA P117</text:p>
          </table:table-cell>
          <table:table-cell table:style-name="ce45"/>
          <table:table-cell table:style-name="ce85" table:number-columns-repeated="14"/>
          <table:table-cell table:number-columns-repeated="998"/>
        </table:table-row>
        <table:table-row table:style-name="ro2">
          <table:table-cell table:style-name="ce51" table:number-columns-repeated="5"/>
          <table:table-cell table:style-name="ce72" table:number-columns-spanned="5" table:number-rows-spanned="1"/>
          <table:covered-table-cell table:number-columns-repeated="4"/>
          <table:table-cell table:style-name="ce51" table:number-columns-repeated="2"/>
          <table:table-cell table:style-name="ce44" table:number-columns-repeated="14"/>
          <table:table-cell table:number-columns-repeated="998"/>
        </table:table-row>
        <table:table-row table:style-name="ro2" table:number-rows-repeated="6">
          <table:table-cell table:style-name="ce51" table:number-columns-repeated="7"/>
          <table:table-cell table:style-name="ce66"/>
          <table:table-cell table:style-name="ce51"/>
          <table:table-cell table:style-name="ce81"/>
          <table:table-cell table:style-name="ce51" table:number-columns-repeated="2"/>
          <table:table-cell table:style-name="ce44" table:number-columns-repeated="14"/>
          <table:table-cell table:number-columns-repeated="998"/>
        </table:table-row>
        <table:table-row table:style-name="ro2">
          <table:table-cell table:style-name="ce51" table:number-columns-repeated="7"/>
          <table:table-cell table:style-name="ce66"/>
          <table:table-cell table:style-name="ce51"/>
          <table:table-cell table:style-name="ce81"/>
          <table:table-cell table:style-name="ce51"/>
          <table:table-cell table:style-name="ce50"/>
          <table:table-cell table:style-name="ce44" table:number-columns-repeated="14"/>
          <table:table-cell table:number-columns-repeated="998"/>
        </table:table-row>
        <table:table-row table:style-name="ro2" table:number-rows-repeated="10">
          <table:table-cell table:style-name="ce51" table:number-columns-repeated="7"/>
          <table:table-cell table:style-name="ce66"/>
          <table:table-cell table:style-name="ce51"/>
          <table:table-cell table:style-name="ce81"/>
          <table:table-cell table:style-name="ce51"/>
          <table:table-cell table:style-name="ce50"/>
          <table:table-cell table:style-name="ce44" table:number-columns-repeated="14"/>
          <table:table-cell table:number-columns-repeated="998"/>
        </table:table-row>
        <table:table-row table:style-name="ro2">
          <table:table-cell table:style-name="ce50" table:number-columns-repeated="7"/>
          <table:table-cell table:style-name="ce79" table:number-columns-repeated="2"/>
          <table:table-cell table:style-name="ce82"/>
          <table:table-cell table:style-name="ce51"/>
          <table:table-cell table:style-name="ce50"/>
          <table:table-cell table:style-name="ce44" table:number-columns-repeated="14"/>
          <table:table-cell table:number-columns-repeated="998"/>
        </table:table-row>
        <table:table-row table:style-name="ro2" table:number-rows-repeated="7">
          <table:table-cell table:style-name="ce50" table:number-columns-repeated="7"/>
          <table:table-cell table:style-name="ce79" table:number-columns-repeated="2"/>
          <table:table-cell table:style-name="ce82"/>
          <table:table-cell table:style-name="ce51"/>
          <table:table-cell table:style-name="ce50"/>
          <table:table-cell table:style-name="ce44" table:number-columns-repeated="14"/>
          <table:table-cell table:number-columns-repeated="998"/>
        </table:table-row>
        <table:table-row table:style-name="ro2">
          <table:table-cell table:style-name="ce51" table:number-columns-repeated="7"/>
          <table:table-cell table:style-name="ce66"/>
          <table:table-cell table:style-name="ce51"/>
          <table:table-cell table:style-name="ce81"/>
          <table:table-cell table:style-name="ce51"/>
          <table:table-cell table:style-name="ce50"/>
          <table:table-cell table:style-name="ce44" table:number-columns-repeated="14"/>
          <table:table-cell table:number-columns-repeated="998"/>
        </table:table-row>
        <table:table-row table:style-name="ro2">
          <table:table-cell table:style-name="ce51" table:number-columns-repeated="7"/>
          <table:table-cell table:style-name="ce66"/>
          <table:table-cell table:style-name="ce51"/>
          <table:table-cell table:style-name="ce81"/>
          <table:table-cell table:style-name="ce51"/>
          <table:table-cell table:style-name="ce50"/>
          <table:table-cell table:style-name="ce44" table:number-columns-repeated="14"/>
          <table:table-cell table:number-columns-repeated="998"/>
        </table:table-row>
        <table:table-row table:style-name="ro2">
          <table:table-cell table:style-name="ce50" table:number-columns-repeated="7"/>
          <table:table-cell table:style-name="ce79" table:number-columns-repeated="2"/>
          <table:table-cell table:style-name="ce82"/>
          <table:table-cell table:style-name="ce51"/>
          <table:table-cell table:style-name="ce50"/>
          <table:table-cell table:style-name="ce44" table:number-columns-repeated="14"/>
          <table:table-cell table:number-columns-repeated="998"/>
        </table:table-row>
        <table:table-row table:style-name="ro2" table:number-rows-repeated="7">
          <table:table-cell table:style-name="ce50" table:number-columns-repeated="7"/>
          <table:table-cell table:style-name="ce79" table:number-columns-repeated="2"/>
          <table:table-cell table:style-name="ce82"/>
          <table:table-cell table:style-name="ce51"/>
          <table:table-cell table:style-name="ce50"/>
          <table:table-cell table:style-name="ce44" table:number-columns-repeated="14"/>
          <table:table-cell table:number-columns-repeated="998"/>
        </table:table-row>
        <table:table-row table:style-name="ro2" table:number-rows-repeated="4">
          <table:table-cell table:style-name="ce51" table:number-columns-repeated="7"/>
          <table:table-cell table:style-name="ce66" table:number-columns-repeated="2"/>
          <table:table-cell table:style-name="ce81"/>
          <table:table-cell table:style-name="ce51"/>
          <table:table-cell table:style-name="ce84"/>
          <table:table-cell table:style-name="ce44" table:number-columns-repeated="14"/>
          <table:table-cell table:number-columns-repeated="998"/>
        </table:table-row>
        <table:table-row table:style-name="ro2">
          <table:table-cell table:style-name="ce50" table:number-columns-repeated="7"/>
          <table:table-cell table:style-name="ce79" table:number-columns-repeated="2"/>
          <table:table-cell table:style-name="ce82"/>
          <table:table-cell table:style-name="ce51"/>
          <table:table-cell table:style-name="ce84"/>
          <table:table-cell table:style-name="ce44" table:number-columns-repeated="14"/>
          <table:table-cell table:number-columns-repeated="998"/>
        </table:table-row>
        <table:table-row table:style-name="ro2" table:number-rows-repeated="4">
          <table:table-cell table:style-name="ce50" table:number-columns-repeated="7"/>
          <table:table-cell table:style-name="ce79" table:number-columns-repeated="2"/>
          <table:table-cell table:style-name="ce82"/>
          <table:table-cell table:style-name="ce51"/>
          <table:table-cell table:style-name="ce84"/>
          <table:table-cell table:style-name="ce44" table:number-columns-repeated="14"/>
          <table:table-cell table:number-columns-repeated="998"/>
        </table:table-row>
        <table:table-row table:style-name="ro2">
          <table:table-cell table:style-name="ce50" table:number-columns-repeated="7"/>
          <table:table-cell table:style-name="ce79" table:number-columns-repeated="2"/>
          <table:table-cell table:style-name="ce82"/>
          <table:table-cell table:style-name="ce51" table:number-columns-repeated="2"/>
          <table:table-cell table:style-name="ce44" table:number-columns-repeated="14"/>
          <table:table-cell table:number-columns-repeated="998"/>
        </table:table-row>
        <table:table-row table:style-name="ro2">
          <table:table-cell table:style-name="ce50" table:number-columns-repeated="7"/>
          <table:table-cell table:style-name="ce79" table:number-columns-repeated="2"/>
          <table:table-cell table:style-name="ce82"/>
          <table:table-cell table:style-name="ce51"/>
          <table:table-cell table:style-name="ce50"/>
          <table:table-cell table:style-name="ce44" table:number-columns-repeated="14"/>
          <table:table-cell table:number-columns-repeated="998"/>
        </table:table-row>
        <table:table-row table:style-name="ro2" table:number-rows-repeated="6">
          <table:table-cell table:style-name="ce50" table:number-columns-repeated="7"/>
          <table:table-cell table:style-name="ce79" table:number-columns-repeated="2"/>
          <table:table-cell table:style-name="ce82"/>
          <table:table-cell table:style-name="ce51"/>
          <table:table-cell table:style-name="ce50"/>
          <table:table-cell table:style-name="ce44" table:number-columns-repeated="14"/>
          <table:table-cell table:number-columns-repeated="998"/>
        </table:table-row>
        <table:table-row table:style-name="ro2" table:number-rows-repeated="6">
          <table:table-cell table:style-name="ce50" table:number-columns-repeated="7"/>
          <table:table-cell table:style-name="ce79" table:number-columns-repeated="2"/>
          <table:table-cell table:style-name="ce82"/>
          <table:table-cell table:style-name="ce51"/>
          <table:table-cell table:style-name="ce50" table:number-columns-repeated="15"/>
          <table:table-cell table:number-columns-repeated="998"/>
        </table:table-row>
        <table:table-row table:style-name="ro2">
          <table:table-cell table:style-name="ce50" table:number-columns-repeated="7"/>
          <table:table-cell table:style-name="ce79" table:number-columns-repeated="2"/>
          <table:table-cell table:style-name="ce82"/>
          <table:table-cell table:style-name="ce50" table:number-columns-repeated="2"/>
          <table:table-cell table:style-name="ce44" table:number-columns-repeated="14"/>
          <table:table-cell table:number-columns-repeated="998"/>
        </table:table-row>
        <table:table-row table:style-name="ro2" table:number-rows-repeated="888">
          <table:table-cell table:style-name="ce50" table:number-columns-repeated="7"/>
          <table:table-cell table:style-name="ce79" table:number-columns-repeated="2"/>
          <table:table-cell table:style-name="ce82"/>
          <table:table-cell table:style-name="ce50" table:number-columns-repeated="2"/>
          <table:table-cell table:style-name="ce44" table:number-columns-repeated="14"/>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D-Lois遺產繼承者專用道具" table:style-name="ta7">
        <table:table-column table:style-name="co26" table:default-cell-style-name="Default"/>
        <table:table-column table:style-name="co4" table:default-cell-style-name="Default"/>
        <table:table-column table:style-name="co27" table:default-cell-style-name="Default"/>
        <table:table-column table:style-name="co32" table:default-cell-style-name="Default"/>
        <table:table-column table:style-name="co4" table:number-columns-repeated="2" table:default-cell-style-name="Default"/>
        <table:table-column table:style-name="co28" table:default-cell-style-name="Default"/>
        <table:table-column table:style-name="co4" table:default-cell-style-name="Default"/>
        <table:table-column table:style-name="co29" table:default-cell-style-name="Default"/>
        <table:table-column table:style-name="co33" table:default-cell-style-name="Default"/>
        <table:table-column table:style-name="co31" table:default-cell-style-name="Default"/>
        <table:table-column table:style-name="co17" table:default-cell-style-name="Default"/>
        <table:table-column table:style-name="co31" table:number-columns-repeated="14" table:default-cell-style-name="Default"/>
        <table:table-column table:style-name="co5" table:number-columns-repeated="998" table:default-cell-style-name="Default"/>
        <table:table-row table:style-name="ro16">
          <table:table-cell table:style-name="ce60" office:value-type="string" calcext:value-type="string" table:number-columns-spanned="12" table:number-rows-spanned="1">
            <text:p>武器</text:p>
          </table:table-cell>
          <table:covered-table-cell table:number-columns-repeated="11"/>
          <table:table-cell table:style-name="ce85" table:number-columns-repeated="14"/>
          <table:table-cell table:number-columns-repeated="998"/>
        </table:table-row>
        <table:table-row table:style-name="ro16">
          <table:table-cell table:style-name="ce61" office:value-type="string" calcext:value-type="string">
            <text:p>名稱</text:p>
          </table:table-cell>
          <table:table-cell table:style-name="ce61" office:value-type="string" calcext:value-type="string">
            <text:p>種類</text:p>
          </table:table-cell>
          <table:table-cell table:style-name="ce61" office:value-type="string" calcext:value-type="string">
            <text:p>技能</text:p>
          </table:table-cell>
          <table:table-cell table:style-name="ce61" office:value-type="string" calcext:value-type="string">
            <text:p>命中</text:p>
          </table:table-cell>
          <table:table-cell table:style-name="ce61" office:value-type="string" calcext:value-type="string">
            <text:p>攻擊力</text:p>
          </table:table-cell>
          <table:table-cell table:style-name="ce61" office:value-type="string" calcext:value-type="string">
            <text:p>格擋值</text:p>
          </table:table-cell>
          <table:table-cell table:style-name="ce61" office:value-type="string" calcext:value-type="string">
            <text:p>射程</text:p>
          </table:table-cell>
          <table:table-cell table:style-name="ce73" office:value-type="string" calcext:value-type="string">
            <text:p>購買/常備化</text:p>
          </table:table-cell>
          <table:table-cell table:style-name="ce73" office:value-type="string" calcext:value-type="string">
            <text:p>必要經驗點</text:p>
          </table:table-cell>
          <table:table-cell table:style-name="ce76" office:value-type="string" calcext:value-type="string">
            <text:p>解說</text:p>
          </table:table-cell>
          <table:table-cell table:style-name="ce61" office:value-type="string" calcext:value-type="string">
            <text:p>參照</text:p>
          </table:table-cell>
          <table:table-cell table:style-name="ce61" office:value-type="string" calcext:value-type="string">
            <text:p>備註</text:p>
          </table:table-cell>
          <table:table-cell table:style-name="ce85" table:number-columns-repeated="14"/>
          <table:table-cell table:number-columns-repeated="998"/>
        </table:table-row>
        <table:table-row table:style-name="ro17">
          <table:table-cell table:style-name="ce54" office:value-type="string" calcext:value-type="string">
            <text:p>榮光與勝利之槍</text:p>
          </table:table-cell>
          <table:table-cell table:style-name="ce54" office:value-type="string" calcext:value-type="string">
            <text:p>近戰／射擊</text:p>
          </table:table-cell>
          <table:table-cell table:style-name="ce54" office:value-type="string" calcext:value-type="string">
            <text:p>&lt;近戰&gt;&lt;射擊&gt;</text:p>
          </table:table-cell>
          <table:table-cell table:style-name="ce54" office:value-type="float" office:value="-1" calcext:value-type="float">
            <text:p>-1</text:p>
          </table:table-cell>
          <table:table-cell table:style-name="ce54" office:value-type="float" office:value="11" calcext:value-type="float">
            <text:p>11</text:p>
          </table:table-cell>
          <table:table-cell table:style-name="ce54" office:value-type="float" office:value="3" calcext:value-type="float">
            <text:p>3</text:p>
          </table:table-cell>
          <table:table-cell table:style-name="ce54" office:value-type="string" calcext:value-type="string">
            <text:p>至近/視野</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80" office:value-type="string" calcext:value-type="string">
            <office:annotation draw:style-name="gr2" draw:text-style-name="P2" svg:width="193.15pt" svg:height="322.5pt" svg:x="1054.29pt" svg:y="96.75pt" draw:caption-point-x="-11.54pt" draw:caption-point-y="-66.47pt">
              <dc:date>2026-04-24T00:00:00</dc:date>
              <text:p text:style-name="P1">反擊</text:p>
              <text:p text:style-name="P1">最大等級：3</text:p>
              <text:p text:style-name="P1">時機：響應動作</text:p>
              <text:p text:style-name="P1">技能：&lt;近戰&gt;&lt;射擊&gt; 難易度：對決</text:p>
              <text:p text:style-name="P1">對象：單體 射程：武器</text:p>
              <text:p text:style-name="P1">侵蝕值：4 限制：80%</text:p>
              <text:p text:style-name="P1">次數：LV/劇本</text:p>
              <text:p text:style-name="P1">效果：對象對你進行「對象：單體」的攻擊時，可作為響應動作使用。</text:p>
              <text:p text:style-name="P1">向對象進行攻擊，此時可組合「時機：主要動作」的異能，對決勝利的一方才會命中。</text:p>
              <text:p text:style-name="P1">只能在未行動時使用，使用後變成已行動。</text:p>
              <text:p text:style-name="P1">======</text:p>
            </office:annotation>
            <text:p>傳說是英雄使用過的必勝之槍，只要投出就必定能貫穿敵人。</text:p>
            <text:p>你免費取得LV1的異能《反擊》，該異能可使用經驗點成長。進行射擊攻擊時，技能、射程會使用右邊的數據。</text:p>
            <text:p>代價：契約者總是會被迫追求勝利。侵蝕率基本值+6。</text:p>
          </table:table-cell>
          <table:table-cell table:style-name="ce54" office:value-type="string" calcext:value-type="string">
            <text:p>IA P118</text:p>
          </table:table-cell>
          <table:table-cell table:style-name="ce83"/>
          <table:table-cell table:style-name="ce85" table:number-columns-repeated="14"/>
          <table:table-cell table:number-columns-repeated="998"/>
        </table:table-row>
        <table:table-row table:style-name="ro16">
          <table:table-cell table:style-name="ce54" office:value-type="string" calcext:value-type="string">
            <text:p>斬鬼的古太刀</text:p>
          </table:table-cell>
          <table:table-cell table:style-name="ce54" office:value-type="string" calcext:value-type="string">
            <text:p>近戰</text:p>
          </table:table-cell>
          <table:table-cell table:style-name="ce54" office:value-type="string" calcext:value-type="string">
            <text:p>&lt;近戰&gt;</text:p>
          </table:table-cell>
          <table:table-cell table:style-name="ce54" office:value-type="float" office:value="0" calcext:value-type="float">
            <text:p>0</text:p>
          </table:table-cell>
          <table:table-cell table:style-name="ce54" office:value-type="float" office:value="10" calcext:value-type="float">
            <text:p>10</text:p>
          </table:table-cell>
          <table:table-cell table:style-name="ce54" office:value-type="float" office:value="3" calcext:value-type="float">
            <text:p>3</text:p>
          </table:table-cell>
          <table:table-cell table:style-name="ce54" office:value-type="string" calcext:value-type="string">
            <text:p>至近</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80" office:value-type="string" calcext:value-type="string">
            <text:p>傳說是曾斬殺過鬼的太刀，有著可以終結邪惡魔術的能力。</text:p>
            <text:p>使用該武器的攻擊造成至少1點HP傷害時，可以將一個對象使用的，效果仍在持續生效的E-lois解除，但是當設定了其他解除條件時，需要得到GM的允許才能解除。</text:p>
            <text:p>代價：契約者會變得非常討厭原菌。侵蝕率基本值+4。</text:p>
          </table:table-cell>
          <table:table-cell table:style-name="ce54" office:value-type="string" calcext:value-type="string">
            <text:p>IA P118</text:p>
          </table:table-cell>
          <table:table-cell table:style-name="ce83"/>
          <table:table-cell table:style-name="ce85" table:number-columns-repeated="14"/>
          <table:table-cell table:number-columns-repeated="998"/>
        </table:table-row>
        <table:table-row table:style-name="ro16">
          <table:table-cell table:style-name="ce54" office:value-type="string" calcext:value-type="string">
            <text:p>少女的旗幟</text:p>
          </table:table-cell>
          <table:table-cell table:style-name="ce45" office:value-type="string" calcext:value-type="string">
            <text:p>近戰</text:p>
          </table:table-cell>
          <table:table-cell table:style-name="ce45" office:value-type="string" calcext:value-type="string">
            <text:p>&lt;近戰&gt;</text:p>
          </table:table-cell>
          <table:table-cell table:style-name="ce54" office:value-type="float" office:value="-4" calcext:value-type="float">
            <text:p>-4</text:p>
          </table:table-cell>
          <table:table-cell table:style-name="ce54" office:value-type="float" office:value="11" calcext:value-type="float">
            <text:p>11</text:p>
          </table:table-cell>
          <table:table-cell table:style-name="ce54" office:value-type="float" office:value="9" calcext:value-type="float">
            <text:p>9</text:p>
          </table:table-cell>
          <table:table-cell table:style-name="ce45" office:value-type="string" calcext:value-type="string">
            <text:p>至近</text:p>
          </table:table-cell>
          <table:table-cell table:style-name="ce47" office:value-type="string" calcext:value-type="string">
            <text:p>購入不可/不可</text:p>
          </table:table-cell>
          <table:table-cell table:style-name="ce45" office:value-type="string" calcext:value-type="string">
            <text:p>-</text:p>
          </table:table-cell>
          <table:table-cell table:style-name="ce80" office:value-type="string" calcext:value-type="string">
            <text:p>曾經揚起戰旗的長槍，會回應契約浮現出虛幻的旗幟，強化旗手的守護之力。</text:p>
            <text:p>你使用掩護時受到的HP傷害-10。</text:p>
            <text:p>代價：只有不會捨棄夥伴、擁有自我犧牲精神的人才會被其選中。侵蝕率基本值+2。</text:p>
          </table:table-cell>
          <table:table-cell table:style-name="ce54" office:value-type="string" calcext:value-type="string">
            <text:p>IA P118</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6">
          <table:table-cell table:style-name="ce54" office:value-type="string" calcext:value-type="string">
            <text:p>黑曜石匕首</text:p>
          </table:table-cell>
          <table:table-cell table:style-name="ce45" office:value-type="string" calcext:value-type="string">
            <text:p>近戰</text:p>
          </table:table-cell>
          <table:table-cell table:style-name="ce45" office:value-type="string" calcext:value-type="string">
            <text:p>&lt;近戰&gt;</text:p>
          </table:table-cell>
          <table:table-cell table:style-name="ce54" office:value-type="float" office:value="-1" calcext:value-type="float">
            <text:p>-1</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45" office:value-type="string" calcext:value-type="string">
            <text:p>至近</text:p>
          </table:table-cell>
          <table:table-cell table:style-name="ce47" office:value-type="string" calcext:value-type="string">
            <text:p>購入不可/不可</text:p>
          </table:table-cell>
          <table:table-cell table:style-name="ce45" office:value-type="string" calcext:value-type="string">
            <text:p>-</text:p>
          </table:table-cell>
          <table:table-cell table:style-name="ce80" office:value-type="string" calcext:value-type="string">
            <text:p>曾作為神的祭器使用的匕首，將該武器刺入自己的心臟就能完成契約。</text:p>
            <text:p>使用該武器造成HP傷害時你回復[【肉體】+10]HP。</text:p>
            <text:p>代價：契約者必須定期用祭品的血液進行獻祭。每次攻擊時侵蝕率+2。</text:p>
          </table:table-cell>
          <table:table-cell table:style-name="ce54" office:value-type="string" calcext:value-type="string">
            <text:p>IA P118</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8">
          <table:table-cell table:style-name="ce45" office:value-type="string" calcext:value-type="string">
            <text:p>侏羅紀記錄</text:p>
            <text:p>（ジュラシックレコード）</text:p>
          </table:table-cell>
          <table:table-cell table:style-name="ce45" office:value-type="string" calcext:value-type="string">
            <text:p>近戰</text:p>
          </table:table-cell>
          <table:table-cell table:style-name="ce45" office:value-type="string" calcext:value-type="string">
            <text:p>&lt;近戰&gt;</text:p>
          </table:table-cell>
          <table:table-cell table:style-name="ce45" office:value-type="float" office:value="-2" calcext:value-type="float">
            <text:p>-2</text:p>
          </table:table-cell>
          <table:table-cell table:style-name="ce45" office:value-type="float" office:value="12" calcext:value-type="float">
            <text:p>12</text:p>
          </table:table-cell>
          <table:table-cell table:style-name="ce45" office:value-type="float" office:value="4" calcext:value-type="float">
            <text:p>4</text:p>
          </table:table-cell>
          <table:table-cell table:style-name="ce45" office:value-type="string" calcext:value-type="string">
            <text:p>至近</text:p>
          </table:table-cell>
          <table:table-cell table:style-name="ce47" office:value-type="string" calcext:value-type="string">
            <text:p>購入不可/不可</text:p>
          </table:table-cell>
          <table:table-cell table:style-name="ce45" office:value-type="string" calcext:value-type="string">
            <text:p>-</text:p>
          </table:table-cell>
          <table:table-cell table:style-name="ce80" office:value-type="string" calcext:value-type="string">
            <text:p>沉睡著恐龍基因的神秘石斧，可以提高契約者的潛在能力，並且皮膚會變得跟鱗片一樣強韌。</text:p>
            <text:p>取得時從能力值之中選擇一項使其上升2點。此外，你的裝甲值+10。</text:p>
            <text:p>代價：契約者將會害怕火焰。侵蝕率基本值+2。</text:p>
          </table:table-cell>
          <table:table-cell table:style-name="ce54" office:value-type="string" calcext:value-type="string">
            <text:p>IA P118</text:p>
          </table:table-cell>
          <table:table-cell table:style-name="ce45"/>
          <table:table-cell table:style-name="ce85" table:number-columns-repeated="14"/>
          <table:table-cell table:number-columns-repeated="998"/>
        </table:table-row>
        <table:table-row table:style-name="ro18">
          <table:table-cell table:style-name="ce45" office:value-type="string" calcext:value-type="string">
            <text:p>聖劍之王者</text:p>
          </table:table-cell>
          <table:table-cell table:style-name="ce54" office:value-type="string" calcext:value-type="string">
            <text:p>近戰</text:p>
          </table:table-cell>
          <table:table-cell table:style-name="ce54" office:value-type="string" calcext:value-type="string">
            <text:p>&lt;近戰&gt;</text:p>
          </table:table-cell>
          <table:table-cell table:style-name="ce45" office:value-type="float" office:value="0" calcext:value-type="float">
            <text:p>0</text:p>
          </table:table-cell>
          <table:table-cell table:style-name="ce45" office:value-type="float" office:value="15" calcext:value-type="float">
            <text:p>15</text:p>
          </table:table-cell>
          <table:table-cell table:style-name="ce45" office:value-type="float" office:value="7" calcext:value-type="float">
            <text:p>7</text:p>
          </table:table-cell>
          <table:table-cell table:style-name="ce45" office:value-type="string" calcext:value-type="string">
            <text:p>至近</text:p>
          </table:table-cell>
          <table:table-cell table:style-name="ce47" office:value-type="string" calcext:value-type="string">
            <text:p>購入不可/不可</text:p>
          </table:table-cell>
          <table:table-cell table:style-name="ce45" office:value-type="string" calcext:value-type="string">
            <text:p>-</text:p>
          </table:table-cell>
          <table:table-cell table:style-name="ce80" office:value-type="string" calcext:value-type="string">
            <text:p>即使在無數的傳說之劍中也被稱為王者的無鞘之劍。</text:p>
            <text:p>次要動作使用，該主要階段間使用該武器進行的攻擊的暴擊值-2（下限值4），該效果一劇本可以使用一次。</text:p>
            <text:p>代價：契約者將變得追求不會被力量所吞噬的強大。你在受到[不良狀態：暴走]期間無法進行攻擊。</text:p>
          </table:table-cell>
          <table:table-cell table:style-name="ce54" office:value-type="string" calcext:value-type="string">
            <text:p>IA P118</text:p>
          </table:table-cell>
          <table:table-cell table:style-name="ce83"/>
          <table:table-cell table:style-name="ce85" table:number-columns-repeated="14"/>
          <table:table-cell table:number-columns-repeated="998"/>
        </table:table-row>
        <table:table-row table:style-name="ro16">
          <table:table-cell table:style-name="ce45" office:value-type="string" calcext:value-type="string">
            <text:p>信仰之火</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1" calcext:value-type="float">
            <text:p>-1</text:p>
          </table:table-cell>
          <table:table-cell table:style-name="ce45" office:value-type="float" office:value="9" calcext:value-type="float">
            <text:p>9</text:p>
          </table:table-cell>
          <table:table-cell table:style-name="ce45" office:value-type="string" calcext:value-type="string">
            <text:p>-</text:p>
          </table:table-cell>
          <table:table-cell table:style-name="ce45" office:value-type="string" calcext:value-type="string">
            <text:p>50m</text:p>
          </table:table-cell>
          <table:table-cell table:style-name="ce47" office:value-type="string" calcext:value-type="string">
            <text:p>購入不可/不可</text:p>
          </table:table-cell>
          <table:table-cell table:style-name="ce45" office:value-type="string" calcext:value-type="string">
            <text:p>-</text:p>
          </table:table-cell>
          <table:table-cell table:style-name="ce80" office:value-type="string" calcext:value-type="string">
            <text:p>據說是某傭兵使用的火繩槍，契約者會擁有名為啟示或心眼的超感覺。</text:p>
            <text:p>使用該武器進行的射擊攻擊判定骰數+4個，你沒有受到[不良狀態：暴走]時攻擊力額外+6。至近不可。</text:p>
            <text:p>代價：契約者會漸漸失去視力。&lt;知覺&gt;判定骰數-2個。</text:p>
          </table:table-cell>
          <table:table-cell table:style-name="ce54" office:value-type="string" calcext:value-type="string">
            <text:p>IA P118</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6">
          <table:table-cell table:style-name="ce45" office:value-type="string" calcext:value-type="string">
            <text:p>天空之隼</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7" calcext:value-type="float">
            <text:p>7</text:p>
          </table:table-cell>
          <table:table-cell table:style-name="ce45" office:value-type="string" calcext:value-type="string">
            <text:p>-</text:p>
          </table:table-cell>
          <table:table-cell table:style-name="ce45" office:value-type="string" calcext:value-type="string">
            <text:p>150m</text:p>
          </table:table-cell>
          <table:table-cell table:style-name="ce47" office:value-type="string" calcext:value-type="string">
            <text:p>購入不可/不可</text:p>
          </table:table-cell>
          <table:table-cell table:style-name="ce45" office:value-type="string" calcext:value-type="string">
            <text:p>-</text:p>
          </table:table-cell>
          <table:table-cell table:style-name="ce80" office:value-type="string" calcext:value-type="string">
            <text:p>作為天空神化身的獵隼雕像，能像真正的獵隼一樣飛到空中襲擊敵人。</text:p>
            <text:p>取得時從【感覺】【精神】中選擇一項，該能力值+2。你進行的射擊攻擊達成值+4。</text:p>
            <text:p>代價：契約者會害怕黑暗。侵蝕率基本值+5。</text:p>
          </table:table-cell>
          <table:table-cell table:style-name="ce54" office:value-type="string" calcext:value-type="string">
            <text:p>IA P118</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6">
          <table:table-cell table:style-name="ce45" office:value-type="string" calcext:value-type="string">
            <text:p>必中之弓</text:p>
          </table:table-cell>
          <table:table-cell table:style-name="ce45" office:value-type="string" calcext:value-type="string">
            <text:p>射擊</text:p>
          </table:table-cell>
          <table:table-cell table:style-name="ce45" office:value-type="string" calcext:value-type="string">
            <text:p>&lt;射擊&gt;</text:p>
          </table:table-cell>
          <table:table-cell table:style-name="ce45" office:value-type="float" office:value="0" calcext:value-type="float">
            <text:p>0</text:p>
          </table:table-cell>
          <table:table-cell table:style-name="ce45" office:value-type="float" office:value="11" calcext:value-type="float">
            <text:p>11</text:p>
          </table:table-cell>
          <table:table-cell table:style-name="ce45" office:value-type="string" calcext:value-type="string">
            <text:p>-</text:p>
          </table:table-cell>
          <table:table-cell table:style-name="ce45" office:value-type="string" calcext:value-type="string">
            <text:p>視野</text:p>
          </table:table-cell>
          <table:table-cell table:style-name="ce47" office:value-type="string" calcext:value-type="string">
            <text:p>購入不可/不可</text:p>
          </table:table-cell>
          <table:table-cell table:style-name="ce45" office:value-type="string" calcext:value-type="string">
            <text:p>-</text:p>
          </table:table-cell>
          <table:table-cell table:style-name="ce80" office:value-type="string" calcext:value-type="string">
            <text:p>無論持有者的水平如何都能以達人般的技術操控的謎一般的長弓。</text:p>
            <text:p>使用該武器進行的射擊攻擊達成值+10。另外，該武器的射擊攻擊不會受到來自異能的減少骰數的懲罰效果</text:p>
            <text:p>代價：契約者被強迫必須做到百發百中。攻擊未能命中時，你將會受到[不良狀態：暴走]。</text:p>
          </table:table-cell>
          <table:table-cell table:style-name="ce54" office:value-type="string" calcext:value-type="string">
            <text:p>IA P119</text:p>
          </table:table-cell>
          <table:table-cell table:style-name="ce45"/>
          <table:table-cell table:style-name="ce85" table:number-columns-repeated="14"/>
          <table:table-cell table:number-columns-repeated="998"/>
        </table:table-row>
        <table:table-row table:style-name="ro19">
          <table:table-cell table:style-name="ce45" table:number-columns-repeated="7"/>
          <table:table-cell table:style-name="ce47"/>
          <table:table-cell table:style-name="ce45"/>
          <table:table-cell table:style-name="ce59"/>
          <table:table-cell table:style-name="ce45"/>
          <table:table-cell table:style-name="ce83"/>
          <table:table-cell table:style-name="ce85" table:number-columns-repeated="14"/>
          <table:table-cell table:number-columns-repeated="998"/>
        </table:table-row>
        <table:table-row table:style-name="ro16">
          <table:table-cell table:style-name="ce45" table:number-columns-repeated="7"/>
          <table:table-cell table:style-name="ce47"/>
          <table:table-cell table:style-name="ce45"/>
          <table:table-cell table:style-name="ce59"/>
          <table:table-cell table:style-name="ce45"/>
          <table:table-cell table:style-name="ce83"/>
          <table:table-cell table:style-name="ce85" table:number-columns-repeated="14"/>
          <table:table-cell table:number-columns-repeated="998"/>
        </table:table-row>
        <table:table-row table:style-name="ro16">
          <table:table-cell table:style-name="ce60" office:value-type="string" calcext:value-type="string" table:number-columns-spanned="12" table:number-rows-spanned="1">
            <text:p>防具</text:p>
          </table:table-cell>
          <table:covered-table-cell table:number-columns-repeated="11"/>
          <table:table-cell table:style-name="ce85" table:number-columns-repeated="14"/>
          <table:table-cell table:number-columns-repeated="998"/>
        </table:table-row>
        <table:table-row table:style-name="ro16">
          <table:table-cell table:style-name="ce61" office:value-type="string" calcext:value-type="string">
            <text:p>名稱</text:p>
          </table:table-cell>
          <table:table-cell table:style-name="ce61" office:value-type="string" calcext:value-type="string">
            <text:p>種類</text:p>
          </table:table-cell>
          <table:table-cell table:style-name="ce61" office:value-type="string" calcext:value-type="string">
            <text:p>回避</text:p>
          </table:table-cell>
          <table:table-cell table:style-name="ce61" office:value-type="string" calcext:value-type="string">
            <text:p>行動值</text:p>
          </table:table-cell>
          <table:table-cell table:style-name="ce61" office:value-type="string" calcext:value-type="string">
            <text:p>裝甲值</text:p>
          </table:table-cell>
          <table:table-cell table:style-name="ce65" office:value-type="string" calcext:value-type="string">
            <text:p>購買/常備化</text:p>
          </table:table-cell>
          <table:table-cell table:style-name="ce73" office:value-type="string" calcext:value-type="string">
            <text:p>必要經驗點</text:p>
          </table:table-cell>
          <table:table-cell table:style-name="ce76" office:value-type="string" calcext:value-type="string" table:number-columns-spanned="3" table:number-rows-spanned="1">
            <text:p>解說</text:p>
          </table:table-cell>
          <table:covered-table-cell table:number-columns-repeated="2" table:style-name="ce74"/>
          <table:table-cell table:style-name="ce61" office:value-type="string" calcext:value-type="string">
            <text:p>參照</text:p>
          </table:table-cell>
          <table:table-cell table:style-name="ce61" office:value-type="string" calcext:value-type="string">
            <text:p>備註</text:p>
          </table:table-cell>
          <table:table-cell table:style-name="ce85" table:number-columns-repeated="14"/>
          <table:table-cell table:number-columns-repeated="998"/>
        </table:table-row>
        <table:table-row table:style-name="ro10">
          <table:table-cell table:style-name="ce45" office:value-type="string" calcext:value-type="string">
            <text:p>祈禱之造花</text:p>
          </table:table-cell>
          <table:table-cell table:style-name="ce45" office:value-type="string" calcext:value-type="string">
            <text:p>防具</text:p>
          </table:table-cell>
          <table:table-cell table:number-columns-repeated="2" table:style-name="ce45" office:value-type="float" office:value="0" calcext:value-type="float">
            <text:p>0</text:p>
          </table:table-cell>
          <table:table-cell table:style-name="ce45" office:value-type="float" office:value="8" calcext:value-type="float">
            <text:p>8</text:p>
          </table:table-cell>
          <table:table-cell table:style-name="ce45" office:value-type="string" calcext:value-type="string">
            <text:p>購買不可/不可</text:p>
          </table:table-cell>
          <table:table-cell table:style-name="ce45" office:value-type="string" calcext:value-type="string">
            <text:p>-</text:p>
          </table:table-cell>
          <table:table-cell table:style-name="ce71" office:value-type="string" calcext:value-type="string" table:number-columns-spanned="3" table:number-rows-spanned="1">
            <office:annotation draw:style-name="gr3" draw:text-style-name="P2" svg:width="475.65pt" svg:height="929.99pt" svg:x="682.38pt" svg:y="482.26pt" draw:caption-point-x="360.37pt" draw:caption-point-y="-65.74pt">
              <dc:date>2026-04-24T00:00:00</dc:date>
              <text:p text:style-name="P1">無限武器</text:p>
              <text:p text:style-name="P1">最大等級：5</text:p>
              <text:p text:style-name="P1">時機：次要動作</text:p>
              <text:p text:style-name="P1">技能：－ 難易度：自動成功</text:p>
              <text:p text:style-name="P1">對象：自身 射程：至近</text:p>
              <text:p text:style-name="P1">侵蝕值：3 限制：－</text:p>
              <text:p text:style-name="P1">效果：變換物質，制作近戰用的武器的異能。形狀隨你所想。</text:p>
              <text:p text:style-name="P1">該場景中，制作並裝備以下數據的武器。</text:p>
              <text:p text:style-name="P1">種類：近戰　技能：&lt;近戰&gt;　命中：0</text:p>
              <text:p text:style-name="P1">攻擊力：+[LV+7]　格擋值：3　射程：至近</text:p>
              <text:p text:style-name="P1"/>
              <text:p text:style-name="P1">百槍</text:p>
              <text:p text:style-name="P1">最大等級：5</text:p>
              <text:p text:style-name="P1">時機：次要動作</text:p>
              <text:p text:style-name="P1">技能：－ 難易度：自動成功</text:p>
              <text:p text:style-name="P1">對象：自身 射程：至近</text:p>
              <text:p text:style-name="P1">侵蝕值：3 限制：－</text:p>
              <text:p text:style-name="P1">效果：變換物質，制作射擊戰用的武器的異能。形狀隨你所想。</text:p>
              <text:p text:style-name="P1">該場景中，制作並裝備以下數據的武器。</text:p>
              <text:p text:style-name="P1">種類：射擊　技能：&lt;射擊&gt;　命中：0</text:p>
              <text:p text:style-name="P1">攻擊力：+[LV+4]　格擋值：－　射程：30m</text:p>
              <text:p text:style-name="P1">======</text:p>
            </office:annotation>
            <text:p>由無數少女的祈禱之力轉化而成的石之玫瑰，通過禱告可以使其變換成戰鬥服和武器。</text:p>
            <text:p>你免費取得LV3的《無限武器》或《百槍》。</text:p>
            <text:p>代價：契約者將不被允許絕望，你于回歸階段原菌化時，會以死亡代替原菌化，並化作該遺產的一部分。</text:p>
          </table:table-cell>
          <table:covered-table-cell table:number-columns-repeated="2"/>
          <table:table-cell table:style-name="ce54" office:value-type="string" calcext:value-type="string">
            <text:p>IA P119</text:p>
          </table:table-cell>
          <table:table-cell table:style-name="ce45" office:value-type="string" calcext:value-type="string">
            <text:p>IA修改取得異能等級</text:p>
            <text:p>（LV5→3）</text:p>
          </table:table-cell>
          <table:table-cell table:style-name="ce85" table:number-columns-repeated="14"/>
          <table:table-cell table:number-columns-repeated="998"/>
        </table:table-row>
        <table:table-row table:style-name="ro20">
          <table:table-cell table:style-name="ce45" office:value-type="string" calcext:value-type="string">
            <text:p>蛇王的外套</text:p>
          </table:table-cell>
          <table:table-cell table:style-name="ce45" office:value-type="string" calcext:value-type="string">
            <text:p>防具</text:p>
          </table:table-cell>
          <table:table-cell table:number-columns-repeated="2" table:style-name="ce45" office:value-type="float" office:value="0" calcext:value-type="float">
            <text:p>0</text:p>
          </table:table-cell>
          <table:table-cell table:style-name="ce45" office:value-type="float" office:value="7" calcext:value-type="float">
            <text:p>7</text:p>
          </table:table-cell>
          <table:table-cell table:style-name="ce47" office:value-type="string" calcext:value-type="string">
            <text:p>購買不可/不可</text:p>
          </table:table-cell>
          <table:table-cell table:style-name="ce45" office:value-type="string" calcext:value-type="string">
            <text:p>-</text:p>
          </table:table-cell>
          <table:table-cell table:style-name="ce71" office:value-type="string" calcext:value-type="string" table:number-columns-spanned="3" table:number-rows-spanned="1">
            <text:p>古代的王與惡魔定下契約得到的外套，傳說契約者的雙肩將會浮現蛇形斑痕並獲得來自惡魔的各種知識。</text:p>
            <text:p>選擇並免費取得一個LV1的[限制：-]的噬身影蛇異能，該異能可以使用經驗點成長。</text:p>
            <text:p>代價：契約者會漸漸失去良心而變得冷漠。侵蝕率基本值+8。</text:p>
          </table:table-cell>
          <table:covered-table-cell table:number-columns-repeated="2"/>
          <table:table-cell table:style-name="ce54" office:value-type="string" calcext:value-type="string">
            <text:p>IA P119</text:p>
          </table:table-cell>
          <table:table-cell table:style-name="ce83"/>
          <table:table-cell table:style-name="ce85" table:number-columns-repeated="14"/>
          <table:table-cell table:number-columns-repeated="998"/>
        </table:table-row>
        <table:table-row table:style-name="ro19">
          <table:table-cell table:style-name="ce45" office:value-type="string" calcext:value-type="string">
            <text:p>女神之盾</text:p>
          </table:table-cell>
          <table:table-cell table:style-name="ce45" office:value-type="string" calcext:value-type="string">
            <text:p>防具</text:p>
          </table:table-cell>
          <table:table-cell table:number-columns-repeated="2" table:style-name="ce45" office:value-type="float" office:value="0" calcext:value-type="float">
            <text:p>0</text:p>
          </table:table-cell>
          <table:table-cell table:style-name="ce45" office:value-type="float" office:value="9" calcext:value-type="float">
            <text:p>9</text:p>
          </table:table-cell>
          <table:table-cell table:style-name="ce47" office:value-type="string" calcext:value-type="string">
            <text:p>購買不可/不可</text:p>
          </table:table-cell>
          <table:table-cell table:style-name="ce45" office:value-type="string" calcext:value-type="string">
            <text:p>-</text:p>
          </table:table-cell>
          <table:table-cell table:style-name="ce71" office:value-type="string" calcext:value-type="string" table:number-columns-spanned="3" table:number-rows-spanned="1">
            <text:p>象徵某女神的黃金盾，作為防具時可以作為胸甲使用，裝備時可以產生力場盾。</text:p>
            <text:p>你進行格擋的格擋值+5，因該防具獲得的裝甲值和格擋值不能被異能效果無視。</text:p>
            <text:p>代價：契約者作為女神的鬥士無法使用武器。你無法使用[空手]以外的武器。</text:p>
          </table:table-cell>
          <table:covered-table-cell table:number-columns-repeated="2"/>
          <table:table-cell table:style-name="ce54" office:value-type="string" calcext:value-type="string">
            <text:p>IA P119</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9">
          <table:table-cell table:style-name="ce45" office:value-type="string" calcext:value-type="string">
            <text:p>白猿的額冠</text:p>
          </table:table-cell>
          <table:table-cell table:style-name="ce45" office:value-type="string" calcext:value-type="string">
            <text:p>防具（輔助）</text:p>
          </table:table-cell>
          <table:table-cell table:style-name="ce45" office:value-type="float" office:value="0" calcext:value-type="float">
            <text:p>0</text:p>
          </table:table-cell>
          <table:table-cell table:style-name="ce45" office:value-type="float" office:value="3" calcext:value-type="float">
            <text:p>3</text:p>
          </table:table-cell>
          <table:table-cell table:style-name="ce45" office:value-type="float" office:value="5" calcext:value-type="float">
            <text:p>5</text:p>
          </table:table-cell>
          <table:table-cell table:style-name="ce45" office:value-type="string" calcext:value-type="string">
            <text:p>購買不可/不可</text:p>
          </table:table-cell>
          <table:table-cell table:style-name="ce45" office:value-type="string" calcext:value-type="string">
            <text:p>-</text:p>
          </table:table-cell>
          <table:table-cell table:style-name="ce71" office:value-type="string" calcext:value-type="string" table:number-columns-spanned="3" table:number-rows-spanned="1">
            <text:p>猿人姿態的超越者的所遺留下的頭箍。</text:p>
            <text:p>選擇並免費取得一個LV1的[限制：-]的疾速靈猿異能，該異能可以使用經驗點成長。</text:p>
            <text:p>代價：契約者被要求理性行動。每當你受到[不良狀態：暴走]時，都將失去5D10點HP。</text:p>
          </table:table-cell>
          <table:covered-table-cell table:number-columns-repeated="2"/>
          <table:table-cell table:style-name="ce54" office:value-type="string" calcext:value-type="string">
            <text:p>IA P119</text:p>
          </table:table-cell>
          <table:table-cell table:style-name="ce83"/>
          <table:table-cell table:style-name="ce85" table:number-columns-repeated="14"/>
          <table:table-cell table:number-columns-repeated="998"/>
        </table:table-row>
        <table:table-row table:style-name="ro16">
          <table:table-cell table:style-name="ce83" table:number-columns-repeated="7"/>
          <table:table-cell table:style-name="ce88" table:number-columns-repeated="2"/>
          <table:table-cell table:style-name="ce90"/>
          <table:table-cell table:style-name="ce83" table:number-columns-repeated="2"/>
          <table:table-cell table:style-name="ce85" table:number-columns-repeated="14"/>
          <table:table-cell table:number-columns-repeated="998"/>
        </table:table-row>
        <table:table-row table:style-name="ro9">
          <table:table-cell table:style-name="ce83" table:number-columns-repeated="7"/>
          <table:table-cell table:style-name="ce88" table:number-columns-repeated="2"/>
          <table:table-cell table:style-name="ce90"/>
          <table:table-cell table:style-name="ce83" table:number-columns-repeated="2"/>
          <table:table-cell table:style-name="ce85" table:number-columns-repeated="14"/>
          <table:table-cell table:number-columns-repeated="998"/>
        </table:table-row>
        <table:table-row table:style-name="ro9">
          <table:table-cell table:style-name="ce62" office:value-type="string" calcext:value-type="string" table:number-columns-spanned="12" table:number-rows-spanned="1">
            <text:p>載具</text:p>
          </table:table-cell>
          <table:covered-table-cell table:number-columns-repeated="11"/>
          <table:table-cell table:style-name="ce85" table:number-columns-repeated="14"/>
          <table:table-cell table:number-columns-repeated="998"/>
        </table:table-row>
        <table:table-row table:style-name="ro9">
          <table:table-cell table:style-name="ce63" office:value-type="string" calcext:value-type="string">
            <text:p>名稱</text:p>
          </table:table-cell>
          <table:table-cell table:style-name="ce63" office:value-type="string" calcext:value-type="string">
            <text:p>種類</text:p>
          </table:table-cell>
          <table:table-cell table:style-name="ce63" office:value-type="string" calcext:value-type="string">
            <text:p>技能</text:p>
          </table:table-cell>
          <table:table-cell table:style-name="ce63" office:value-type="string" calcext:value-type="string">
            <text:p>攻擊力</text:p>
          </table:table-cell>
          <table:table-cell table:style-name="ce63" office:value-type="string" calcext:value-type="string">
            <text:p>行動值</text:p>
          </table:table-cell>
          <table:table-cell table:style-name="ce63" office:value-type="string" calcext:value-type="string">
            <text:p>裝甲值</text:p>
          </table:table-cell>
          <table:table-cell table:style-name="ce63" office:value-type="string" calcext:value-type="string">
            <text:p>全力移動</text:p>
          </table:table-cell>
          <table:table-cell table:style-name="ce65" office:value-type="string" calcext:value-type="string">
            <text:p>購買/常備化</text:p>
          </table:table-cell>
          <table:table-cell table:style-name="ce65" office:value-type="string" calcext:value-type="string">
            <text:p>必要經驗點</text:p>
          </table:table-cell>
          <table:table-cell table:style-name="ce68" office:value-type="string" calcext:value-type="string">
            <text:p>解說</text:p>
          </table:table-cell>
          <table:table-cell table:style-name="ce63" office:value-type="string" calcext:value-type="string">
            <text:p>參照</text:p>
          </table:table-cell>
          <table:table-cell table:style-name="ce63" office:value-type="string" calcext:value-type="string">
            <text:p>備註</text:p>
          </table:table-cell>
          <table:table-cell table:style-name="ce85" table:number-columns-repeated="14"/>
          <table:table-cell table:number-columns-repeated="998"/>
        </table:table-row>
        <table:table-row table:style-name="ro11">
          <table:table-cell table:style-name="ce45" office:value-type="string" calcext:value-type="string">
            <text:p>戰車挽馬</text:p>
            <text:p>（チャリオットバラー）</text:p>
          </table:table-cell>
          <table:table-cell table:style-name="ce54" office:value-type="string" calcext:value-type="string">
            <text:p>載具</text:p>
          </table:table-cell>
          <table:table-cell table:style-name="ce54" office:value-type="string" calcext:value-type="string">
            <text:p>&lt;駕駛：馬&gt;</text:p>
          </table:table-cell>
          <table:table-cell table:style-name="ce54" office:value-type="float" office:value="13" calcext:value-type="float">
            <text:p>13</text:p>
          </table:table-cell>
          <table:table-cell table:style-name="ce54" office:value-type="float" office:value="-1" calcext:value-type="float">
            <text:p>-1</text:p>
          </table:table-cell>
          <table:table-cell table:style-name="ce54" office:value-type="float" office:value="6" calcext:value-type="float">
            <text:p>6</text:p>
          </table:table-cell>
          <table:table-cell table:style-name="ce54" office:value-type="string" calcext:value-type="string">
            <text:p>200m</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80" office:value-type="string" calcext:value-type="string">
            <office:annotation draw:style-name="gr4" draw:text-style-name="P2" svg:width="193.15pt" svg:height="349.48pt" svg:x="1054.29pt" svg:y="744.01pt" draw:caption-point-x="-11.54pt" draw:caption-point-y="-50.74pt">
              <dc:date>2026-04-24T00:00:00</dc:date>
              <text:p text:style-name="P1">戰術</text:p>
              <text:p text:style-name="P1">最大等級：5</text:p>
              <text:p text:style-name="P1">時機：準備階段</text:p>
              <text:p text:style-name="P1">技能：－ 難易度：自動成功</text:p>
              <text:p text:style-name="P1">對象：場景(選擇) 射程：視界</text:p>
              <text:p text:style-name="P1">侵蝕值：6 限制：－</text:p>
              <text:p text:style-name="P1">效果：你以外的對象在此回合中的主要動作骰數+LV顆。</text:p>
              <text:p text:style-name="P1">======</text:p>
            </office:annotation>
            <text:p>古時勇將跨越山野所騎乘的動物，響應你的呼喚而顯現。</text:p>
            <text:p>你免費取得LV1的異能《戰術》，該異能可以使用經驗點成長。</text:p>
            <text:p>代價：契約者會變得追求速度。侵蝕率基本值+3。</text:p>
          </table:table-cell>
          <table:table-cell table:style-name="ce54" office:value-type="string" calcext:value-type="string">
            <text:p>IA P119</text:p>
          </table:table-cell>
          <table:table-cell table:style-name="ce45"/>
          <table:table-cell table:style-name="ce85" table:number-columns-repeated="14"/>
          <table:table-cell table:number-columns-repeated="998"/>
        </table:table-row>
        <table:table-row table:style-name="ro9">
          <table:table-cell table:style-name="ce45" table:number-columns-repeated="7"/>
          <table:table-cell table:style-name="ce89" table:number-columns-spanned="3" table:number-rows-spanned="1"/>
          <table:covered-table-cell table:number-columns-repeated="2"/>
          <table:table-cell table:style-name="ce45"/>
          <table:table-cell table:style-name="ce83"/>
          <table:table-cell table:style-name="ce85" table:number-columns-repeated="14"/>
          <table:table-cell table:number-columns-repeated="998"/>
        </table:table-row>
        <table:table-row table:style-name="ro9">
          <table:table-cell table:style-name="ce45" table:number-columns-repeated="7"/>
          <table:table-cell table:style-name="ce89" table:number-columns-spanned="3" table:number-rows-spanned="1"/>
          <table:covered-table-cell table:number-columns-repeated="2"/>
          <table:table-cell table:style-name="ce45"/>
          <table:table-cell table:style-name="ce83"/>
          <table:table-cell table:style-name="ce85" table:number-columns-repeated="14"/>
          <table:table-cell table:number-columns-repeated="998"/>
        </table:table-row>
        <table:table-row table:style-name="ro9">
          <table:table-cell table:style-name="ce62" office:value-type="string" calcext:value-type="string" table:number-columns-spanned="12" table:number-rows-spanned="1">
            <text:p>其他</text:p>
          </table:table-cell>
          <table:covered-table-cell table:number-columns-repeated="11"/>
          <table:table-cell table:style-name="ce85" table:number-columns-repeated="14"/>
          <table:table-cell table:number-columns-repeated="998"/>
        </table:table-row>
        <table:table-row table:style-name="ro9">
          <table:table-cell table:style-name="ce63" office:value-type="string" calcext:value-type="string">
            <text:p>名稱</text:p>
          </table:table-cell>
          <table:table-cell table:style-name="ce63" office:value-type="string" calcext:value-type="string">
            <text:p>種類</text:p>
          </table:table-cell>
          <table:table-cell table:style-name="ce63" office:value-type="string" calcext:value-type="string">
            <text:p>技能</text:p>
          </table:table-cell>
          <table:table-cell table:style-name="ce65" office:value-type="string" calcext:value-type="string">
            <text:p>購買/常備化</text:p>
          </table:table-cell>
          <table:table-cell table:style-name="ce65" office:value-type="string" calcext:value-type="string">
            <text:p>必要經驗點</text:p>
          </table:table-cell>
          <table:table-cell table:style-name="ce68" office:value-type="string" calcext:value-type="string">
            <text:p>解說</text:p>
          </table:table-cell>
          <table:table-cell table:style-name="ce68" table:number-columns-repeated="4"/>
          <table:table-cell table:style-name="ce63" office:value-type="string" calcext:value-type="string">
            <text:p>參照</text:p>
          </table:table-cell>
          <table:table-cell table:style-name="ce63" office:value-type="string" calcext:value-type="string">
            <text:p>備註</text:p>
          </table:table-cell>
          <table:table-cell table:style-name="ce85" table:number-columns-repeated="14"/>
          <table:table-cell table:number-columns-repeated="998"/>
        </table:table-row>
        <table:table-row table:style-name="ro19">
          <table:table-cell table:style-name="ce86" office:value-type="string" calcext:value-type="string">
            <text:p>伊弗利特之臂</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69" office:value-type="string" calcext:value-type="string" table:number-columns-spanned="5" table:number-rows-spanned="1">
            <text:p>被稱作炎之魔神的存在的雙臂，寄宿於契約者的手臂之上，並賜予其操縱火焰的力量。</text:p>
            <text:p>空手攻擊力+6。選擇並免費取得一個LV1的[限制：-]的冰炎奇蜥異能，該異能可以使用經驗點成長。</text:p>
            <text:p>代價：契約者會漸漸失去憤怒和哀傷的感情。你的侵蝕率基本值+8。</text:p>
          </table:table-cell>
          <table:covered-table-cell table:number-columns-repeated="4" table:style-name="ce75"/>
          <table:table-cell table:style-name="ce54" office:value-type="string" calcext:value-type="string">
            <text:p>IA P119</text:p>
          </table:table-cell>
          <table:table-cell table:style-name="ce45"/>
          <table:table-cell table:style-name="ce85" table:number-columns-repeated="14"/>
          <table:table-cell table:number-columns-repeated="998"/>
        </table:table-row>
        <table:table-row table:style-name="ro21">
          <table:table-cell table:style-name="ce45" office:value-type="string" calcext:value-type="string">
            <text:p>失卻的歌聲</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1" office:value-type="string" calcext:value-type="string" table:number-columns-spanned="5" table:number-rows-spanned="1">
            <text:p>傳說是魚人或鳥人的神之眷屬的遺產，形狀不明；作為契約者的聲音出現，以音波操縱背教者病毒。</text:p>
            <text:p>你以主要動作使用的不進行攻擊的異能，均按照[LV+1]計算效果，此效果可以超過等級上限，但不會因此而增加使用次數。</text:p>
            <text:p>代價：契約者會失去原本的聲音，同時魔性之聲對契約者的負荷也十分沉重。你取得的[時機：主要動作]的異能，侵蝕值+1。</text:p>
          </table:table-cell>
          <table:covered-table-cell table:number-columns-repeated="4"/>
          <table:table-cell table:style-name="ce54" office:value-type="string" calcext:value-type="string">
            <text:p>IA P119</text:p>
          </table:table-cell>
          <table:table-cell table:style-name="ce45"/>
          <table:table-cell table:style-name="ce85" table:number-columns-repeated="14"/>
          <table:table-cell table:number-columns-repeated="998"/>
        </table:table-row>
        <table:table-row table:style-name="ro19">
          <table:table-cell table:style-name="ce54" office:value-type="string" calcext:value-type="string">
            <text:p>黃金的海賊船</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text:p>存在於世界任何地方的海上、伴隨著風暴共同出現的海賊船，用數不盡的財寶和風暴般的炮擊支援契約者。</text:p>
            <text:p>你的常備化點數+10。你進行攻擊的攻擊力+7。</text:p>
            <text:p>代價：契約者發現無主的物品時會想要據為己有。你的侵蝕率基本值+3。</text:p>
          </table:table-cell>
          <table:covered-table-cell table:number-columns-repeated="4"/>
          <table:table-cell table:style-name="ce54" office:value-type="string" calcext:value-type="string">
            <text:p>IA P119</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20">
          <table:table-cell table:style-name="ce45" office:value-type="string" calcext:value-type="string">
            <text:p>海鳴的石板</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text:p>刻著曾經分割大海的偉人所留下的契約誓言的石板，具有擁有操縱暴風和海流的力量。</text:p>
            <text:p>任意角色進行判定後立即使用，該判定的達成值-15，該效果一劇本可以使用三次。</text:p>
            <text:p>代價：契約者將會以合理的判斷為優先並逐漸忘卻感情。每當你的Lois昇華為Titus時，無論出於自己的意願與否，侵蝕率都會上升5點。</text:p>
          </table:table-cell>
          <table:covered-table-cell table:number-columns-repeated="4"/>
          <table:table-cell table:style-name="ce54" office:value-type="string" calcext:value-type="string">
            <text:p>IA P120</text:p>
          </table:table-cell>
          <table:table-cell table:style-name="ce45"/>
          <table:table-cell table:style-name="ce85" table:number-columns-repeated="14"/>
          <table:table-cell table:number-columns-repeated="998"/>
        </table:table-row>
        <table:table-row table:style-name="ro20">
          <table:table-cell table:style-name="ce45" office:value-type="string" calcext:value-type="string">
            <text:p>銀色之腕</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text:p>擁有斬斷邪魔之力的銀色義手。</text:p>
            <text:p>你的空手數據變更如下：另外，攻擊傷害擲骰前使用，該攻擊傷害+3D10，該效果一劇本可以使用一次。</text:p>
            <text:p>種類：近戰  技能：&lt;近戰&gt;  命中：0  攻擊力：11  格擋值：7  射程：至近</text:p>
            <text:p>代價：該手腕會燃燒契約者的生命變換為力量。使用空手攻擊或格擋時，你失去2HP。</text:p>
          </table:table-cell>
          <table:covered-table-cell table:number-columns-repeated="4"/>
          <table:table-cell table:style-name="ce54" office:value-type="string" calcext:value-type="string">
            <text:p>IA P120</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7">
          <table:table-cell table:style-name="ce45" office:value-type="string" calcext:value-type="string">
            <text:p>巨人殺手</text:p>
            <text:p>（ジャイアントキル）</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office:annotation draw:style-name="gr5" draw:text-style-name="P2" svg:width="499.49pt" svg:height="531.75pt" svg:x="554.8pt" svg:y="1157.24pt" draw:caption-point-x="487.96pt" draw:caption-point-y="-66.47pt">
              <dc:date>2026-04-24T00:00:00</dc:date>
              <text:p text:style-name="P1">骨之槍</text:p>
              <text:p text:style-name="P1">最大等級：5</text:p>
              <text:p text:style-name="P1">時機：次要動作</text:p>
              <text:p text:style-name="P1">技能：－ 難易度：自動成功</text:p>
              <text:p text:style-name="P1">對象：自身 射程：至近</text:p>
              <text:p text:style-name="P1">侵蝕值：3 限制：－</text:p>
              <text:p text:style-name="P1">效果：該場景中，制作並裝備以下數據的武器。</text:p>
              <text:p text:style-name="P1">種類：射擊　技能：&lt;射擊&gt;　命中：-1</text:p>
              <text:p text:style-name="P1">攻擊力：+[LV+5]　格擋值：－　射程：20m</text:p>
              <text:p text:style-name="P1">======</text:p>
            </office:annotation>
            <text:p>能夠將被稱為巨人的原菌一擊打昏的投石索，通過使契約者的肉體產生變化來產出彈藥。</text:p>
            <text:p>你免費取得LV1的《骨之槍》，該異能可以使用經驗點成長。同時，你使用這個異能製作出來的武器進行的射擊攻擊時，傷害+2D10。</text:p>
            <text:p>代價：契約者將會變得勇敢起來，並且逐漸忘記恐懼為何物。你的侵蝕率基本值+4。</text:p>
          </table:table-cell>
          <table:covered-table-cell table:number-columns-repeated="4"/>
          <table:table-cell table:style-name="ce54" office:value-type="string" calcext:value-type="string">
            <text:p>IA P120</text:p>
          </table:table-cell>
          <table:table-cell table:style-name="ce45"/>
          <table:table-cell table:style-name="ce85" table:number-columns-repeated="14"/>
          <table:table-cell table:number-columns-repeated="998"/>
        </table:table-row>
        <table:table-row table:style-name="ro20">
          <table:table-cell table:style-name="ce45" office:value-type="string" calcext:value-type="string">
            <text:p>深海都市之夢</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1" office:value-type="string" calcext:value-type="string" table:number-columns-spanned="5" table:number-rows-spanned="1">
            <text:p>沉沒於世界某處的古代都市。這座都市本身即是遺產，會將其末裔指定為契約者，並賦予契約者異常的再生力。</text:p>
            <text:p>即使身處水中，你也可像魚一樣自由行動。另外，直至侵蝕率達到110%（而非原來的100%）之前，你都可照常使用異能《復蘇》。</text:p>
            <text:p>代價：契約者會在夢中被命令“為了沉沒都市的再興而行動”。你的侵蝕率基本值+4。</text:p>
          </table:table-cell>
          <table:covered-table-cell table:number-columns-repeated="4"/>
          <table:table-cell table:style-name="ce54" office:value-type="string" calcext:value-type="string">
            <text:p>IA P120</text:p>
          </table:table-cell>
          <table:table-cell table:style-name="ce45"/>
          <table:table-cell table:style-name="ce85" table:number-columns-repeated="14"/>
          <table:table-cell table:number-columns-repeated="998"/>
        </table:table-row>
        <table:table-row table:style-name="ro19">
          <table:table-cell table:style-name="ce45" office:value-type="string" calcext:value-type="string">
            <text:p>聖人的遺骨</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text:p>這是曾經被稱為“鬼”的超越者盜走的聖人之骨，骨頭中混合寄宿著取回它的偉人與鬼的力量。</text:p>
            <text:p>你進行的近戰攻擊的攻擊力和你的【行動值】+5。你的侵蝕率超過99%時，你近戰攻擊的攻擊力會額外+5。</text:p>
            <text:p>代價：契約者將會聽到從內心傳來的，唆使自己逐漸變得傲慢的聲音。你的侵蝕率基本值+2。</text:p>
          </table:table-cell>
          <table:covered-table-cell table:number-columns-repeated="4"/>
          <table:table-cell table:style-name="ce54" office:value-type="string" calcext:value-type="string">
            <text:p>IA P120</text:p>
          </table:table-cell>
          <table:table-cell table:style-name="ce45"/>
          <table:table-cell table:style-name="ce85" table:number-columns-repeated="14"/>
          <table:table-cell table:number-columns-repeated="998"/>
        </table:table-row>
        <table:table-row table:style-name="ro20">
          <table:table-cell table:style-name="ce54" office:value-type="string" calcext:value-type="string">
            <text:p>誓約之瞳</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87" office:value-type="string" calcext:value-type="string" table:number-columns-spanned="5" table:number-rows-spanned="1">
            <office:annotation draw:style-name="gr6" draw:text-style-name="P2" svg:width="499.49pt" svg:height="411pt" svg:x="554.8pt" svg:y="1325.25pt" draw:caption-point-x="487.96pt" draw:caption-point-y="-67.24pt">
              <dc:date>2026-04-24T00:00:00</dc:date>
              <text:p text:style-name="P1">神經劫取（效果變更後）</text:p>
              <text:p text:style-name="P1">最大等級：1</text:p>
              <text:p text:style-name="P1">時機：主要動作</text:p>
              <text:p text:style-name="P1">技能：&lt;RC&gt; 難易度：對決</text:p>
              <text:p text:style-name="P1">對象：單體 射程：視界</text:p>
              <text:p text:style-name="P1">侵蝕值：10 限制：120%</text:p>
              <text:p text:style-name="P1">次數：1/劇本</text:p>
              <text:p text:style-name="P1">效果：與對象的&lt;意志&gt;進行對決，你勝利的話，可使對象進行1次主要動作，行動內容由你決定，</text:p>
              <text:p text:style-name="P1">但是不能使用有次數限制的異能或裝備。此異能的對象不能因組合變更。</text:p>
              <text:p text:style-name="P1">======</text:p>
            </office:annotation>
            <text:p>與契約者的眼睛一體化的黑色石頭，給予其隨心所欲操縱他人的力量。</text:p>
            <text:p>你所進行的&lt;RC&gt;判定骰數+2個。你免費取得LV1的異能《神經劫取》，該異能的侵蝕率上升（從4D10變更為10），且使用限制（從【不限】）變成【一劇本可以使用一次】。</text:p>
            <text:p>代價：契約者會漸漸變得無法相信他人。你的侵蝕率基本值+7。</text:p>
          </table:table-cell>
          <table:covered-table-cell table:number-columns-repeated="4"/>
          <table:table-cell table:style-name="ce54" office:value-type="string" calcext:value-type="string">
            <text:p>IA P120</text:p>
          </table:table-cell>
          <table:table-cell table:style-name="ce45"/>
          <table:table-cell table:style-name="ce85" table:number-columns-repeated="14"/>
          <table:table-cell table:number-columns-repeated="998"/>
        </table:table-row>
        <table:table-row table:style-name="ro11">
          <table:table-cell table:style-name="ce54" office:value-type="string" calcext:value-type="string">
            <text:p>尼伯龍根的指環</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text:p>能生出黃金的魔性指環，傳說是由名為尼伯龍根的妖精製造的。</text:p>
            <text:p>你的常備化點數+20。此外，你進行的格擋，格擋值+5。</text:p>
            <text:p>代價：契約者的身邊將會常常發生不幸。你的判定骰數-1個。你的侵蝕率基本值+2。</text:p>
          </table:table-cell>
          <table:covered-table-cell table:number-columns-repeated="4"/>
          <table:table-cell table:style-name="ce54" office:value-type="string" calcext:value-type="string">
            <text:p>IA P120</text:p>
          </table:table-cell>
          <table:table-cell table:style-name="ce45"/>
          <table:table-cell table:style-name="ce85" table:number-columns-repeated="14"/>
          <table:table-cell table:number-columns-repeated="998"/>
        </table:table-row>
        <table:table-row table:style-name="ro19">
          <table:table-cell table:style-name="ce54" office:value-type="string" calcext:value-type="string">
            <text:p>謀略的牢獄</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text:p>在世界某處存在的監獄，會在陷入背叛與謀略之人的夢中出現，講述真相教導報復。</text:p>
            <text:p>你受到[不良狀態]期間，進行攻擊的達成值與攻擊力+7。另外，你的行動值+7。</text:p>
            <text:p>代價：你的心被這座監獄囚禁，它一直尖叫著要取回被奪走的東西，逃離這座囚籠。你的判定骰數-1個。</text:p>
          </table:table-cell>
          <table:covered-table-cell table:number-columns-repeated="4"/>
          <table:table-cell table:style-name="ce54" office:value-type="string" calcext:value-type="string">
            <text:p>IA P120</text:p>
          </table:table-cell>
          <table:table-cell table:style-name="ce45" office:value-type="string" calcext:value-type="string">
            <text:p>IA新增</text:p>
          </table:table-cell>
          <table:table-cell table:style-name="ce85" table:number-columns-repeated="14"/>
          <table:table-cell table:number-columns-repeated="998"/>
        </table:table-row>
        <table:table-row table:style-name="ro17">
          <table:table-cell table:style-name="ce45" office:value-type="string" calcext:value-type="string">
            <text:p>欲望的公主</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office:annotation draw:style-name="gr7" draw:text-style-name="P2" svg:width="499.49pt" svg:height="433.5pt" svg:x="554.8pt" svg:y="1476pt" draw:caption-point-x="487.96pt" draw:caption-point-y="-66.47pt">
              <dc:date>2026-04-24T00:00:00</dc:date>
              <text:p text:style-name="P1">砂之刃</text:p>
              <text:p text:style-name="P1">最大等級：10</text:p>
              <text:p text:style-name="P1">時機：主要動作</text:p>
              <text:p text:style-name="P1">技能：&lt;RC&gt; 難易度：對決</text:p>
              <text:p text:style-name="P1">對象：－ 射程：視界</text:p>
              <text:p text:style-name="P1">侵蝕值：2 限制：－</text:p>
              <text:p text:style-name="P1">效果：進行「攻擊力：+[LV+2]」的射擊攻擊。格擋此攻擊的話，該格擋的格擋值-5。</text:p>
              <text:p text:style-name="P1"/>
              <text:p text:style-name="P1">晶化</text:p>
              <text:p text:style-name="P1">最大等級：3</text:p>
              <text:p text:style-name="P1">時機：主要動作</text:p>
              <text:p text:style-name="P1">技能：癥狀 難易度：對決</text:p>
              <text:p text:style-name="P1">對象：－ 射程：－</text:p>
              <text:p text:style-name="P1">侵蝕值：4 限制：100%</text:p>
              <text:p text:style-name="P1">次數：3/劇本</text:p>
              <text:p text:style-name="P1">效果：從攻擊命中的地方開始，使對象結晶化並粉碎的異能。</text:p>
              <text:p text:style-name="P1">組合此異能的攻擊的攻擊力+[LV×3]，且無視對象的裝甲值。</text:p>
              <text:p text:style-name="P1">======</text:p>
            </office:annotation>
            <text:p>由寶石構成的果實，吃起來和普通的果肉一樣柔軟，通過食用來完成契約。存在著寶石、果實種類各不相同的個體。</text:p>
            <text:p>你免費取得LV1的《砂之刃》和《晶化》，該異能可以使用經驗點成長。</text:p>
            <text:p>代價：契約者將會被要求收集某種東西，至於是什麼東西將由締結契約的個體決定。你的侵蝕率基本值+6。</text:p>
          </table:table-cell>
          <table:covered-table-cell table:number-columns-repeated="4"/>
          <table:table-cell table:style-name="ce54" office:value-type="string" calcext:value-type="string">
            <text:p>IA P120</text:p>
          </table:table-cell>
          <table:table-cell table:style-name="ce45"/>
          <table:table-cell table:style-name="ce85" table:number-columns-repeated="14"/>
          <table:table-cell table:number-columns-repeated="998"/>
        </table:table-row>
        <table:table-row table:style-name="ro19">
          <table:table-cell table:style-name="ce54" office:value-type="string" calcext:value-type="string">
            <text:p>約頓巨人的鮮血</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office:annotation draw:style-name="gr8" draw:text-style-name="P2" svg:width="499.49pt" svg:height="259.51pt" svg:x="554.8pt" svg:y="1523.99pt" draw:caption-point-x="487.96pt" draw:caption-point-y="-55.22pt">
              <dc:date>2026-04-24T00:00:00</dc:date>
              <text:p text:style-name="P1">完全獸化</text:p>
              <text:p text:style-name="P1">最大等級：3</text:p>
              <text:p text:style-name="P1">時機：次要動作</text:p>
              <text:p text:style-name="P1">技能：－ 難易度：自動成功</text:p>
              <text:p text:style-name="P1">對象：自身 射程：至近</text:p>
              <text:p text:style-name="P1">侵蝕值：6 限制：－</text:p>
              <text:p text:style-name="P1">效果：將肉體變化成完全的戰鬥型態的異能。</text:p>
              <text:p text:style-name="P1">此場景中，所有使用【肉體】能力值的判定骰數+[LV+2]顆，但在此異能持續發揮效果的期間，不能裝備、使用空手以外的所有道具。</text:p>
              <text:p text:style-name="P1">======</text:p>
            </office:annotation>
            <text:p>受被稱作巨人族的存在所擁有的背教者病毒感染的血液。也可能是表示你繼承了這種血統。</text:p>
            <text:p>你的最大HP+20，免費取得LV1的異能《完全獸化》，該異能可以使用經驗點成長。</text:p>
            <text:p>代價：雖然契約者能夠將自己的肉體變得非常巨大，但卻也承受著相對應的強烈侵蝕。你的侵蝕率基本值+7。</text:p>
          </table:table-cell>
          <table:covered-table-cell table:number-columns-repeated="4"/>
          <table:table-cell table:style-name="ce54" office:value-type="string" calcext:value-type="string">
            <text:p>IA P121</text:p>
          </table:table-cell>
          <table:table-cell table:style-name="ce45"/>
          <table:table-cell table:style-name="ce85" table:number-columns-repeated="14"/>
          <table:table-cell table:number-columns-repeated="998"/>
        </table:table-row>
        <table:table-row table:style-name="ro22">
          <table:table-cell table:style-name="ce45" office:value-type="string" calcext:value-type="string">
            <text:p>夜之小鳥</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0" office:value-type="string" calcext:value-type="string" table:number-columns-spanned="5" table:number-rows-spanned="1">
            <office:annotation draw:style-name="gr9" draw:text-style-name="P2" svg:width="499.49pt" svg:height="375pt" svg:x="554.8pt" svg:y="1597.49pt" draw:caption-point-x="487.96pt" draw:caption-point-y="-80.73pt">
              <dc:date>2026-04-24T00:00:00</dc:date>
              <text:p text:style-name="P1">陽炎之衣</text:p>
              <text:p text:style-name="P1">最大等級：3</text:p>
              <text:p text:style-name="P1">時機：次要動作</text:p>
              <text:p text:style-name="P1">技能：－ 難易度：自動成功</text:p>
              <text:p text:style-name="P1">對象：自身 射程：至近</text:p>
              <text:p text:style-name="P1">侵蝕值：3 限制：－</text:p>
              <text:p text:style-name="P1">次數：LV/場景</text:p>
              <text:p text:style-name="P1">效果：使光線折射，隱藏自己身形的異能。</text:p>
              <text:p text:style-name="P1">變成隱蔽狀態，持續到該主要階段結束。即使與敵人接戰，也能以此效果變成隱蔽狀態。</text:p>
              <text:p text:style-name="P1"/>
              <text:p text:style-name="P1">光與闇之眼</text:p>
              <text:p text:style-name="P1">最大等級：1</text:p>
              <text:p text:style-name="P1">時機：常駐</text:p>
              <text:p text:style-name="P1">技能：－ 難易度：自動成功</text:p>
              <text:p text:style-name="P1">對象：自身 射程：至近</text:p>
              <text:p text:style-name="P1">侵蝕值：－ 限制：－</text:p>
              <text:p text:style-name="P1">效果：強化視覺，看出隱藏的人事物的異能。</text:p>
              <text:p text:style-name="P1">你可以選擇隱蔽狀態的角色作為主要動作的對象。此異能的等級不受侵蝕率影響。</text:p>
              <text:p text:style-name="P1">取得此異能的話，侵蝕率基本值+4。</text:p>
              <text:p text:style-name="P1">======</text:p>
            </office:annotation>
            <text:p>塗成黑色的木雕鳥，既與人進行交談，也自由自在地四處飛翔。該遺產給予契約者隱藏身形與看破隱藏之物的力量。</text:p>
            <text:p>你免費取得LV1的《陽炎之衣》和《光與闇之眼》，該異能可以使用經驗點成長。另外，你在隱蔽狀態中進行判定時，判定骰數+3個。</text:p>
            <text:p>代價：契約者將被鼓勵盜竊。你無法使用財富點數。</text:p>
          </table:table-cell>
          <table:covered-table-cell table:number-columns-repeated="4"/>
          <table:table-cell table:style-name="ce54" office:value-type="string" calcext:value-type="string">
            <text:p>IA P121</text:p>
          </table:table-cell>
          <table:table-cell table:style-name="ce45"/>
          <table:table-cell table:style-name="ce85" table:number-columns-repeated="14"/>
          <table:table-cell table:number-columns-repeated="998"/>
        </table:table-row>
        <table:table-row table:style-name="ro23">
          <table:table-cell table:style-name="ce45" office:value-type="string" calcext:value-type="string">
            <text:p>雷神之槌</text:p>
          </table:table-cell>
          <table:table-cell table:style-name="ce54" office:value-type="string" calcext:value-type="string">
            <text:p>一般</text:p>
          </table:table-cell>
          <table:table-cell table:style-name="ce54" office:value-type="string" calcext:value-type="string">
            <text:p>-</text:p>
          </table:table-cell>
          <table:table-cell table:style-name="ce54" office:value-type="string" calcext:value-type="string">
            <text:p>購買不可/不可</text:p>
          </table:table-cell>
          <table:table-cell table:style-name="ce45" office:value-type="string" calcext:value-type="string">
            <text:p>-</text:p>
          </table:table-cell>
          <table:table-cell table:style-name="ce71" office:value-type="string" calcext:value-type="string" table:number-columns-spanned="5" table:number-rows-spanned="1">
            <text:p>曾被稱作戰神的存在遺留下來的暴雷之餘威，寄宿於契約者的一臂，並將其投射物化為閃電。</text:p>
            <text:p>你進行的射擊攻擊的攻擊力+10，但每當觸發此效果時，你都會失去3點HP。此外，你還可以於射擊攻擊的傷害擲骰前使用，使此次傷害+2D10，該效果一劇本可以使用一次。</text:p>
            <text:p>代價：神之雷會侵蝕契約者的生命。你的最大HP-7。</text:p>
          </table:table-cell>
          <table:covered-table-cell table:number-columns-repeated="4"/>
          <table:table-cell table:style-name="ce54" office:value-type="string" calcext:value-type="string">
            <text:p>IA P121</text:p>
          </table:table-cell>
          <table:table-cell table:style-name="ce45"/>
          <table:table-cell table:style-name="ce85" table:number-columns-repeated="14"/>
          <table:table-cell table:number-columns-repeated="998"/>
        </table:table-row>
        <table:table-row table:style-name="ro9" table:number-rows-repeated="8">
          <table:table-cell table:style-name="ce83" table:number-columns-repeated="7"/>
          <table:table-cell table:style-name="ce88" table:number-columns-repeated="2"/>
          <table:table-cell table:style-name="ce90"/>
          <table:table-cell table:style-name="ce83"/>
          <table:table-cell table:style-name="ce45"/>
          <table:table-cell table:style-name="ce85" table:number-columns-repeated="14"/>
          <table:table-cell table:number-columns-repeated="998"/>
        </table:table-row>
        <table:table-row table:style-name="ro9" table:number-rows-repeated="2">
          <table:table-cell table:style-name="ce83" table:number-columns-repeated="7"/>
          <table:table-cell table:style-name="ce88" table:number-columns-repeated="2"/>
          <table:table-cell table:style-name="ce90"/>
          <table:table-cell table:style-name="ce83" table:number-columns-repeated="2"/>
          <table:table-cell table:style-name="ce85" table:number-columns-repeated="14"/>
          <table:table-cell table:number-columns-repeated="998"/>
        </table:table-row>
        <table:table-row table:style-name="ro9" table:number-rows-repeated="5">
          <table:table-cell table:style-name="ce45" table:number-columns-repeated="7"/>
          <table:table-cell table:style-name="ce47"/>
          <table:table-cell table:style-name="ce45"/>
          <table:table-cell table:style-name="ce59"/>
          <table:table-cell table:style-name="ce45" table:number-columns-repeated="2"/>
          <table:table-cell table:style-name="ce85" table:number-columns-repeated="14"/>
          <table:table-cell table:number-columns-repeated="998"/>
        </table:table-row>
        <table:table-row table:style-name="ro9">
          <table:table-cell table:style-name="ce45" table:number-columns-repeated="7"/>
          <table:table-cell table:style-name="ce47"/>
          <table:table-cell table:style-name="ce45"/>
          <table:table-cell table:style-name="ce59"/>
          <table:table-cell table:style-name="ce45"/>
          <table:table-cell table:style-name="ce83"/>
          <table:table-cell table:style-name="ce85" table:number-columns-repeated="14"/>
          <table:table-cell table:number-columns-repeated="998"/>
        </table:table-row>
        <table:table-row table:style-name="ro9" table:number-rows-repeated="10">
          <table:table-cell table:style-name="ce45" table:number-columns-repeated="7"/>
          <table:table-cell table:style-name="ce47"/>
          <table:table-cell table:style-name="ce45"/>
          <table:table-cell table:style-name="ce59"/>
          <table:table-cell table:style-name="ce45"/>
          <table:table-cell table:style-name="ce83"/>
          <table:table-cell table:style-name="ce85" table:number-columns-repeated="14"/>
          <table:table-cell table:number-columns-repeated="998"/>
        </table:table-row>
        <table:table-row table:style-name="ro9">
          <table:table-cell table:style-name="ce83" table:number-columns-repeated="7"/>
          <table:table-cell table:style-name="ce88" table:number-columns-repeated="2"/>
          <table:table-cell table:style-name="ce90"/>
          <table:table-cell table:style-name="ce45"/>
          <table:table-cell table:style-name="ce83"/>
          <table:table-cell table:style-name="ce85" table:number-columns-repeated="14"/>
          <table:table-cell table:number-columns-repeated="998"/>
        </table:table-row>
        <table:table-row table:style-name="ro9" table:number-rows-repeated="7">
          <table:table-cell table:style-name="ce83" table:number-columns-repeated="7"/>
          <table:table-cell table:style-name="ce88" table:number-columns-repeated="2"/>
          <table:table-cell table:style-name="ce90"/>
          <table:table-cell table:style-name="ce45"/>
          <table:table-cell table:style-name="ce83"/>
          <table:table-cell table:style-name="ce85" table:number-columns-repeated="14"/>
          <table:table-cell table:number-columns-repeated="998"/>
        </table:table-row>
        <table:table-row table:style-name="ro9">
          <table:table-cell table:style-name="ce45" table:number-columns-repeated="7"/>
          <table:table-cell table:style-name="ce47"/>
          <table:table-cell table:style-name="ce45"/>
          <table:table-cell table:style-name="ce59"/>
          <table:table-cell table:style-name="ce45"/>
          <table:table-cell table:style-name="ce83"/>
          <table:table-cell table:style-name="ce85" table:number-columns-repeated="14"/>
          <table:table-cell table:number-columns-repeated="998"/>
        </table:table-row>
        <table:table-row table:style-name="ro9">
          <table:table-cell table:style-name="ce45" table:number-columns-repeated="7"/>
          <table:table-cell table:style-name="ce47"/>
          <table:table-cell table:style-name="ce45"/>
          <table:table-cell table:style-name="ce59"/>
          <table:table-cell table:style-name="ce45"/>
          <table:table-cell table:style-name="ce83"/>
          <table:table-cell table:style-name="ce85" table:number-columns-repeated="14"/>
          <table:table-cell table:number-columns-repeated="998"/>
        </table:table-row>
        <table:table-row table:style-name="ro9">
          <table:table-cell table:style-name="ce83" table:number-columns-repeated="7"/>
          <table:table-cell table:style-name="ce88" table:number-columns-repeated="2"/>
          <table:table-cell table:style-name="ce90"/>
          <table:table-cell table:style-name="ce45"/>
          <table:table-cell table:style-name="ce83"/>
          <table:table-cell table:style-name="ce85" table:number-columns-repeated="14"/>
          <table:table-cell table:number-columns-repeated="998"/>
        </table:table-row>
        <table:table-row table:style-name="ro9" table:number-rows-repeated="7">
          <table:table-cell table:style-name="ce83" table:number-columns-repeated="7"/>
          <table:table-cell table:style-name="ce88" table:number-columns-repeated="2"/>
          <table:table-cell table:style-name="ce90"/>
          <table:table-cell table:style-name="ce45"/>
          <table:table-cell table:style-name="ce83"/>
          <table:table-cell table:style-name="ce85" table:number-columns-repeated="14"/>
          <table:table-cell table:number-columns-repeated="998"/>
        </table:table-row>
        <table:table-row table:style-name="ro9" table:number-rows-repeated="4">
          <table:table-cell table:style-name="ce45" table:number-columns-repeated="7"/>
          <table:table-cell table:style-name="ce47" table:number-columns-repeated="2"/>
          <table:table-cell table:style-name="ce59"/>
          <table:table-cell table:style-name="ce45"/>
          <table:table-cell table:style-name="ce49"/>
          <table:table-cell table:style-name="ce85" table:number-columns-repeated="14"/>
          <table:table-cell table:number-columns-repeated="998"/>
        </table:table-row>
        <table:table-row table:style-name="ro9">
          <table:table-cell table:style-name="ce83" table:number-columns-repeated="7"/>
          <table:table-cell table:style-name="ce88" table:number-columns-repeated="2"/>
          <table:table-cell table:style-name="ce90"/>
          <table:table-cell table:style-name="ce45"/>
          <table:table-cell table:style-name="ce49"/>
          <table:table-cell table:style-name="ce85" table:number-columns-repeated="14"/>
          <table:table-cell table:number-columns-repeated="998"/>
        </table:table-row>
        <table:table-row table:style-name="ro9" table:number-rows-repeated="4">
          <table:table-cell table:style-name="ce83" table:number-columns-repeated="7"/>
          <table:table-cell table:style-name="ce88" table:number-columns-repeated="2"/>
          <table:table-cell table:style-name="ce90"/>
          <table:table-cell table:style-name="ce45"/>
          <table:table-cell table:style-name="ce49"/>
          <table:table-cell table:style-name="ce85" table:number-columns-repeated="14"/>
          <table:table-cell table:number-columns-repeated="998"/>
        </table:table-row>
        <table:table-row table:style-name="ro9">
          <table:table-cell table:style-name="ce83" table:number-columns-repeated="7"/>
          <table:table-cell table:style-name="ce88" table:number-columns-repeated="2"/>
          <table:table-cell table:style-name="ce90"/>
          <table:table-cell table:style-name="ce45" table:number-columns-repeated="2"/>
          <table:table-cell table:style-name="ce85" table:number-columns-repeated="14"/>
          <table:table-cell table:number-columns-repeated="998"/>
        </table:table-row>
        <table:table-row table:style-name="ro9">
          <table:table-cell table:style-name="ce83" table:number-columns-repeated="7"/>
          <table:table-cell table:style-name="ce88" table:number-columns-repeated="2"/>
          <table:table-cell table:style-name="ce90"/>
          <table:table-cell table:style-name="ce45"/>
          <table:table-cell table:style-name="ce83"/>
          <table:table-cell table:style-name="ce85" table:number-columns-repeated="14"/>
          <table:table-cell table:number-columns-repeated="998"/>
        </table:table-row>
        <table:table-row table:style-name="ro9" table:number-rows-repeated="12">
          <table:table-cell table:style-name="ce83" table:number-columns-repeated="7"/>
          <table:table-cell table:style-name="ce88" table:number-columns-repeated="2"/>
          <table:table-cell table:style-name="ce90"/>
          <table:table-cell table:style-name="ce45"/>
          <table:table-cell table:style-name="ce83"/>
          <table:table-cell table:style-name="ce85" table:number-columns-repeated="14"/>
          <table:table-cell table:number-columns-repeated="998"/>
        </table:table-row>
        <table:table-row table:style-name="ro9">
          <table:table-cell table:style-name="ce83" table:number-columns-repeated="7"/>
          <table:table-cell table:style-name="ce88" table:number-columns-repeated="2"/>
          <table:table-cell table:style-name="ce90"/>
          <table:table-cell table:style-name="ce83" table:number-columns-repeated="2"/>
          <table:table-cell table:style-name="ce85" table:number-columns-repeated="14"/>
          <table:table-cell table:number-columns-repeated="998"/>
        </table:table-row>
        <table:table-row table:style-name="ro9" table:number-rows-repeated="889">
          <table:table-cell table:style-name="ce83" table:number-columns-repeated="7"/>
          <table:table-cell table:style-name="ce88" table:number-columns-repeated="2"/>
          <table:table-cell table:style-name="ce90"/>
          <table:table-cell table:style-name="ce83" table:number-columns-repeated="2"/>
          <table:table-cell table:style-name="ce85" table:number-columns-repeated="14"/>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D-lois No.CRC11 咒物污染者專用道具 咒物" table:style-name="ta8">
        <table:table-column table:style-name="co34" table:default-cell-style-name="Default"/>
        <table:table-column table:style-name="co4" table:default-cell-style-name="Default"/>
        <table:table-column table:style-name="co35" table:default-cell-style-name="Default"/>
        <table:table-column table:style-name="co36" table:default-cell-style-name="Default"/>
        <table:table-column table:style-name="co17" table:number-columns-repeated="2" table:default-cell-style-name="Default"/>
        <table:table-column table:style-name="co37" table:default-cell-style-name="Default"/>
        <table:table-column table:style-name="co38" table:default-cell-style-name="Default"/>
        <table:table-column table:style-name="co5" table:default-cell-style-name="Default"/>
        <table:table-column table:style-name="co39" table:default-cell-style-name="Default"/>
        <table:table-column table:style-name="co5" table:number-columns-repeated="1014" table:default-cell-style-name="Default"/>
        <table:table-row table:style-name="ro16">
          <table:table-cell table:style-name="ce91" office:value-type="string" calcext:value-type="string" table:number-columns-spanned="12" table:number-rows-spanned="1">
            <text:p>武器</text:p>
          </table:table-cell>
          <table:covered-table-cell table:number-columns-repeated="11"/>
          <table:table-cell table:number-columns-repeated="1012"/>
        </table:table-row>
        <table:table-row table:style-name="ro16">
          <table:table-cell table:style-name="ce92" office:value-type="string" calcext:value-type="string">
            <text:p>名稱</text:p>
          </table:table-cell>
          <table:table-cell table:style-name="ce92" office:value-type="string" calcext:value-type="string">
            <text:p>種類</text:p>
          </table:table-cell>
          <table:table-cell table:style-name="ce92" office:value-type="string" calcext:value-type="string">
            <text:p>技能</text:p>
          </table:table-cell>
          <table:table-cell table:style-name="ce92" office:value-type="string" calcext:value-type="string">
            <text:p>命中</text:p>
          </table:table-cell>
          <table:table-cell table:style-name="ce92" office:value-type="string" calcext:value-type="string">
            <text:p>攻擊力</text:p>
          </table:table-cell>
          <table:table-cell table:style-name="ce92" office:value-type="string" calcext:value-type="string">
            <text:p>格擋值</text:p>
          </table:table-cell>
          <table:table-cell table:style-name="ce92" office:value-type="string" calcext:value-type="string">
            <text:p>射程</text:p>
          </table:table-cell>
          <table:table-cell table:style-name="ce96" office:value-type="string" calcext:value-type="string">
            <text:p>購買/常備化</text:p>
          </table:table-cell>
          <table:table-cell table:style-name="ce96" office:value-type="string" calcext:value-type="string">
            <text:p>必要經驗點</text:p>
          </table:table-cell>
          <table:table-cell table:style-name="ce98" office:value-type="string" calcext:value-type="string">
            <text:p>解說</text:p>
          </table:table-cell>
          <table:table-cell table:style-name="ce92" office:value-type="string" calcext:value-type="string">
            <text:p>參照</text:p>
          </table:table-cell>
          <table:table-cell table:style-name="ce92" office:value-type="string" calcext:value-type="string">
            <text:p>備註</text:p>
          </table:table-cell>
          <table:table-cell table:number-columns-repeated="1012"/>
        </table:table-row>
        <table:table-row table:style-name="ro16">
          <table:table-cell table:style-name="ce93" office:value-type="string" calcext:value-type="string">
            <text:p>常暗之劍</text:p>
            <text:p>（常闇の剣）</text:p>
          </table:table-cell>
          <table:table-cell table:style-name="ce93" office:value-type="string" calcext:value-type="string">
            <text:p>近戰</text:p>
          </table:table-cell>
          <table:table-cell table:style-name="ce93" office:value-type="string" calcext:value-type="string">
            <text:p>&lt;近戰&gt;</text:p>
          </table:table-cell>
          <table:table-cell table:style-name="ce93" office:value-type="float" office:value="-3" calcext:value-type="float">
            <text:p>-3</text:p>
          </table:table-cell>
          <table:table-cell table:style-name="ce93" office:value-type="float" office:value="20" calcext:value-type="float">
            <text:p>20</text:p>
          </table:table-cell>
          <table:table-cell table:style-name="ce93" office:value-type="float" office:value="6" calcext:value-type="float">
            <text:p>6</text:p>
          </table:table-cell>
          <table:table-cell table:style-name="ce93" office:value-type="string" calcext:value-type="string">
            <text:p>至近</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1" office:value-type="string" calcext:value-type="string">
            <text:p>傳說中人類最初的殺人者所用的漆黑之劍，由黑曜石製成。從刀身到刀柄通體漆黑，就連裝飾於握把末段的寶石都是黑色。在給持有者帶來勝利榮耀的同時，若裝備者不配擁有那榮耀則會反過來加害其身。</text:p>
            <text:p>以該武器進行的攻擊的達成值為40以上時，無視對象的裝甲值計算傷害。達成值為60以上時，再無視格擋和掩護計算傷害。</text:p>
            <text:p>以該武器進行的攻擊未能將對象的HP降為0時，你失去1D10點HP。</text:p>
          </table:table-cell>
          <table:table-cell table:style-name="ce93" office:value-type="string" calcext:value-type="string">
            <text:p>NC P115</text:p>
          </table:table-cell>
          <table:table-cell table:style-name="ce102"/>
          <table:table-cell table:number-columns-repeated="1012"/>
        </table:table-row>
        <table:table-row table:style-name="ro16">
          <table:table-cell table:style-name="ce93" office:value-type="string" calcext:value-type="string">
            <text:p>烏撒的偃月刀</text:p>
            <text:p>（バルザイの偃月刀）</text:p>
          </table:table-cell>
          <table:table-cell table:style-name="ce93" office:value-type="string" calcext:value-type="string">
            <text:p>近戰</text:p>
          </table:table-cell>
          <table:table-cell table:style-name="ce93" office:value-type="string" calcext:value-type="string">
            <text:p>&lt;近戰&gt;</text:p>
          </table:table-cell>
          <table:table-cell table:style-name="ce93" office:value-type="float" office:value="0" calcext:value-type="float">
            <text:p>0</text:p>
          </table:table-cell>
          <table:table-cell table:style-name="ce93" office:value-type="float" office:value="10" calcext:value-type="float">
            <text:p>10</text:p>
          </table:table-cell>
          <table:table-cell table:style-name="ce93" office:value-type="float" office:value="3" calcext:value-type="float">
            <text:p>3</text:p>
          </table:table-cell>
          <table:table-cell table:style-name="ce93" office:value-type="string" calcext:value-type="string">
            <text:p>至近</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1" office:value-type="string" calcext:value-type="string">
            <text:p>《死靈之書》中記載的、帶有土星領域力量的彎刀（scimitar）。帶有侍奉阿撒托斯宮廷的舊神們的力量，用於繪製魔法陣或幾何學記號來強化咒力，以及用來討滅靈性存在。平時必須用黑色絲布覆蓋。使用者以希望作為代價，背負著在各個多元宇宙中與〈外神〉戰鬥的宿命。</text:p>
            <text:p>使用此武器攻擊造成1點以上傷害時，可以解除對象正在使用且效果持續中的一個E-Lois。但是，如果解除設有其他條件，未經GM許可則無法解除。</text:p>
            <text:p>此武器無法從裝備中卸下，裝備中，你受到來自[神性][神話生物]的異常狀態【恐怖】會變更為【暴走】。</text:p>
          </table:table-cell>
          <table:table-cell table:style-name="ce93" office:value-type="string" calcext:value-type="string">
            <text:p>NC P115</text:p>
          </table:table-cell>
          <table:table-cell table:style-name="ce102"/>
          <table:table-cell table:number-columns-repeated="1012"/>
        </table:table-row>
        <table:table-row table:style-name="ro16">
          <table:table-cell table:style-name="ce91" office:value-type="string" calcext:value-type="string" table:number-columns-spanned="12" table:number-rows-spanned="1">
            <text:p>其他</text:p>
          </table:table-cell>
          <table:covered-table-cell table:number-columns-repeated="11"/>
          <table:table-cell table:number-columns-repeated="1012"/>
        </table:table-row>
        <table:table-row table:style-name="ro16">
          <table:table-cell table:style-name="ce92" office:value-type="string" calcext:value-type="string">
            <text:p>名稱</text:p>
          </table:table-cell>
          <table:table-cell table:style-name="ce92" office:value-type="string" calcext:value-type="string">
            <text:p>種類</text:p>
          </table:table-cell>
          <table:table-cell table:style-name="ce92" office:value-type="string" calcext:value-type="string">
            <text:p>技能</text:p>
          </table:table-cell>
          <table:table-cell table:style-name="ce96" office:value-type="string" calcext:value-type="string">
            <text:p>購買/常備化</text:p>
          </table:table-cell>
          <table:table-cell table:style-name="ce96" office:value-type="string" calcext:value-type="string">
            <text:p>必要經驗點</text:p>
          </table:table-cell>
          <table:table-cell table:style-name="ce98" office:value-type="string" calcext:value-type="string" table:number-columns-spanned="5" table:number-rows-spanned="1">
            <text:p>解說</text:p>
          </table:table-cell>
          <table:covered-table-cell table:number-columns-repeated="4" table:style-name="ce74"/>
          <table:table-cell table:style-name="ce92" office:value-type="string" calcext:value-type="string">
            <text:p>參照</text:p>
          </table:table-cell>
          <table:table-cell table:style-name="ce92" office:value-type="string" calcext:value-type="string">
            <text:p>備註</text:p>
          </table:table-cell>
          <table:table-cell table:number-columns-repeated="1012"/>
        </table:table-row>
        <table:table-row table:style-name="ro16">
          <table:table-cell table:style-name="ce94" office:value-type="string" calcext:value-type="string">
            <text:p>阿爾哈紮德之燈</text:p>
            <text:p>（アルハザードのランプ）</text:p>
          </table:table-cell>
          <table:table-cell table:style-name="ce93" office:value-type="string" calcext:value-type="string">
            <text:p>其他</text:p>
          </table:table-cell>
          <table:table-cell table:style-name="ce95" office:value-type="string" calcext:value-type="string">
            <text:p>—</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99" office:value-type="string" calcext:value-type="string" table:number-columns-spanned="5" table:number-rows-spanned="1">
            <text:p>據說那個瘋狂的阿拉伯人曾經持有的黃金油燈，點燃火焰後，被其煙霧包圍的人會看到關於〈舊日支配者〉和〈外神〉的幻視。幻視的內容由GM判斷，但多數情況下會伴隨恐怖判定。一說此燈是原本埋藏在瘋狂都市中的秘寶。</text:p>
            <text:p>但是，這盞燈還有另一個用途。在用骰子決定魔術侵蝕率上升時，燈的持有者可以在原本骰子範圍內任意決定侵蝕率上升多少（2D10的話為2~20）。此效果一劇本限用一次。可以對同一接戰區域內的其他角色使用。</text:p>
          </table:table-cell>
          <table:covered-table-cell table:number-columns-repeated="4" table:style-name="ce75"/>
          <table:table-cell table:style-name="ce93" office:value-type="string" calcext:value-type="string">
            <text:p>NC P115</text:p>
          </table:table-cell>
          <table:table-cell table:style-name="ce102"/>
          <table:table-cell table:number-columns-repeated="1012"/>
        </table:table-row>
        <table:table-row table:style-name="ro16">
          <table:table-cell table:style-name="ce93" office:value-type="string" calcext:value-type="string">
            <text:p>伊斯的時間結晶</text:p>
            <text:p>（イスの時間結晶）</text:p>
          </table:table-cell>
          <table:table-cell table:style-name="ce93" office:value-type="string" calcext:value-type="string">
            <text:p>其他</text:p>
          </table:table-cell>
          <table:table-cell table:style-name="ce95" office:value-type="string" calcext:value-type="string">
            <text:p>—</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0" office:value-type="string" calcext:value-type="string" table:number-columns-spanned="5" table:number-rows-spanned="1">
            <text:p>這個複雜的方塊乍看之下像是小型立方體，但展開後會呈現由多個立方體碎形結構組成的形狀。這是伊斯的偉大種族為了蓄積時間能量而創造的一種提普勒圓筒。</text:p>
            <text:p>此結晶展開後最大可擴大至2立方米，內部的時間流速最多可減速至1兆分之1。也就是說，外面經過數千年，內部也只經過1秒。</text:p>
            <text:p>使用者可以釋放時間結晶的力量，一劇本可以使用一次《時之棺》。但是，其侵蝕值變更為20。</text:p>
          </table:table-cell>
          <table:covered-table-cell table:number-columns-repeated="4"/>
          <table:table-cell table:style-name="ce93" office:value-type="string" calcext:value-type="string">
            <text:p>NC P115</text:p>
          </table:table-cell>
          <table:table-cell table:style-name="ce102"/>
          <table:table-cell table:number-columns-repeated="1012"/>
        </table:table-row>
        <table:table-row table:style-name="ro16">
          <table:table-cell table:style-name="ce93" office:value-type="string" calcext:value-type="string">
            <text:p>閃耀的偏方三八面體</text:p>
            <text:p>（輝くトラペゾヘドロン）</text:p>
          </table:table-cell>
          <table:table-cell table:style-name="ce93" office:value-type="string" calcext:value-type="string">
            <text:p>其他</text:p>
          </table:table-cell>
          <table:table-cell table:style-name="ce95" office:value-type="string" calcext:value-type="string">
            <text:p>—</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0" office:value-type="string" calcext:value-type="string" table:number-columns-spanned="5" table:number-rows-spanned="1">
            <text:p>放在金屬盒中的這個不可思議的多面體，是帶有紅色紋路的漆黑結晶。每個面都切割成幾何學上不可能的形狀，光是試圖理解其整體結構就會帶來瘋狂。</text:p>
            <text:p>在這個結晶內部，封印著〈外神〉的領域，也就是他們被〈舊神〉放逐的領域本身。</text:p>
            <text:p>被此咒物選中的人將背教者的力量注入梯形多面體，就能引出〈外神〉的力量。</text:p>
            <text:p>也就是用於傷害擲骰時，對場景內任意角色造成的傷害+6D。傷害的對象多於一個時，傷害增加僅對其中一個對象生效。另外，受到此效果的攻擊對象無法變更，也無法受到掩護。但是，行使此效果時，使用者的侵蝕率+2D。此效果一劇本可以使用一次。</text:p>
          </table:table-cell>
          <table:covered-table-cell table:number-columns-repeated="4"/>
          <table:table-cell table:style-name="ce93" office:value-type="string" calcext:value-type="string">
            <text:p>NC P115</text:p>
          </table:table-cell>
          <table:table-cell table:style-name="ce102"/>
          <table:table-cell table:number-columns-repeated="1012"/>
        </table:table-row>
        <table:table-row table:style-name="ro4" table:number-rows-repeated="1048566">
          <table:table-cell table:number-columns-repeated="1024"/>
        </table:table-row>
        <table:table-row table:style-name="ro4">
          <table:table-cell table:number-columns-repeated="1024"/>
        </table:table-row>
      </table:table>
      <table:table table:name="D-lois No.UA03 封具專用道具" table:style-name="ta9">
        <table:table-column table:style-name="co40" table:default-cell-style-name="Default"/>
        <table:table-column table:style-name="co41" table:default-cell-style-name="Default"/>
        <table:table-column table:style-name="co42" table:default-cell-style-name="Default"/>
        <table:table-column table:style-name="co7" table:default-cell-style-name="Default"/>
        <table:table-column table:style-name="co29" table:default-cell-style-name="Default"/>
        <table:table-column table:style-name="co11" table:default-cell-style-name="Default"/>
        <table:table-column table:style-name="co43" table:default-cell-style-name="Default"/>
        <table:table-column table:style-name="co5" table:number-columns-repeated="2" table:default-cell-style-name="Default"/>
        <table:table-column table:style-name="co44" table:default-cell-style-name="Default"/>
        <table:table-column table:style-name="co5" table:number-columns-repeated="1014" table:default-cell-style-name="Default"/>
        <table:table-row table:style-name="ro16">
          <table:table-cell table:style-name="ce91" office:value-type="string" calcext:value-type="string" table:number-columns-spanned="11" table:number-rows-spanned="1">
            <text:p>武器</text:p>
          </table:table-cell>
          <table:covered-table-cell table:number-columns-repeated="10"/>
          <table:table-cell table:style-name="ce102"/>
          <table:table-cell table:number-columns-repeated="1012"/>
        </table:table-row>
        <table:table-row table:style-name="ro16">
          <table:table-cell table:style-name="ce92" office:value-type="string" calcext:value-type="string">
            <text:p>名稱</text:p>
          </table:table-cell>
          <table:table-cell table:style-name="ce92" office:value-type="string" calcext:value-type="string">
            <text:p>種類</text:p>
          </table:table-cell>
          <table:table-cell table:style-name="ce92" office:value-type="string" calcext:value-type="string">
            <text:p>技能</text:p>
          </table:table-cell>
          <table:table-cell table:style-name="ce92" office:value-type="string" calcext:value-type="string">
            <text:p>命中</text:p>
          </table:table-cell>
          <table:table-cell table:style-name="ce92" office:value-type="string" calcext:value-type="string">
            <text:p>攻擊力</text:p>
          </table:table-cell>
          <table:table-cell table:style-name="ce92" office:value-type="string" calcext:value-type="string">
            <text:p>格擋值</text:p>
          </table:table-cell>
          <table:table-cell table:style-name="ce92" office:value-type="string" calcext:value-type="string">
            <text:p>射程</text:p>
          </table:table-cell>
          <table:table-cell table:style-name="ce96" office:value-type="string" calcext:value-type="string">
            <text:p>購買/常備化</text:p>
          </table:table-cell>
          <table:table-cell table:style-name="ce96" office:value-type="string" calcext:value-type="string">
            <text:p>必要經驗點</text:p>
          </table:table-cell>
          <table:table-cell table:style-name="ce98" office:value-type="string" calcext:value-type="string">
            <text:p>解說</text:p>
          </table:table-cell>
          <table:table-cell table:style-name="ce92" office:value-type="string" calcext:value-type="string">
            <text:p>參照</text:p>
          </table:table-cell>
          <table:table-cell table:style-name="ce92" office:value-type="string" calcext:value-type="string">
            <text:p>備註</text:p>
          </table:table-cell>
          <table:table-cell table:number-columns-repeated="1012"/>
        </table:table-row>
        <table:table-row table:style-name="ro16">
          <table:table-cell table:style-name="ce93" office:value-type="string" calcext:value-type="string">
            <text:p>忠義之刀</text:p>
          </table:table-cell>
          <table:table-cell table:style-name="ce93" office:value-type="string" calcext:value-type="string">
            <text:p>近戰</text:p>
          </table:table-cell>
          <table:table-cell table:style-name="ce93" office:value-type="string" calcext:value-type="string">
            <text:p>&lt;近戰&gt;</text:p>
          </table:table-cell>
          <table:table-cell table:style-name="ce93" office:value-type="float" office:value="-1" calcext:value-type="float">
            <text:p>-1</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string" calcext:value-type="string">
            <text:p>至近</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4" office:value-type="string" calcext:value-type="string">
            <text:p>會保護持有者的日本刀型RB。說話使用古風的語氣。</text:p>
            <text:p>封具效果：在對你的HP傷害算出後使用，你預計受到的傷害-20點。</text:p>
          </table:table-cell>
          <table:table-cell table:style-name="ce93" office:value-type="string" calcext:value-type="string">
            <text:p>DF P41</text:p>
          </table:table-cell>
          <table:table-cell table:style-name="ce102"/>
          <table:table-cell table:number-columns-repeated="1012"/>
        </table:table-row>
        <table:table-row table:style-name="ro16">
          <table:table-cell table:style-name="ce93" office:value-type="string" calcext:value-type="string">
            <text:p>飛斧</text:p>
          </table:table-cell>
          <table:table-cell table:style-name="ce93" office:value-type="string" calcext:value-type="string">
            <text:p>近戰</text:p>
          </table:table-cell>
          <table:table-cell table:style-name="ce93" office:value-type="string" calcext:value-type="string">
            <text:p>&lt;近戰&gt;&lt;射擊&gt;</text:p>
          </table:table-cell>
          <table:table-cell table:style-name="ce93" office:value-type="float" office:value="-3" calcext:value-type="float">
            <text:p>-3</text:p>
          </table:table-cell>
          <table:table-cell table:style-name="ce93" office:value-type="float" office:value="12" calcext:value-type="float">
            <text:p>12</text:p>
          </table:table-cell>
          <table:table-cell table:style-name="ce93" office:value-type="float" office:value="2" calcext:value-type="float">
            <text:p>2</text:p>
          </table:table-cell>
          <table:table-cell table:style-name="ce93" office:value-type="string" calcext:value-type="string">
            <text:p>至近/10m</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4" office:value-type="string" calcext:value-type="string">
            <text:p>具有浮游能力、喜歡自由的雙刃斧型RB。這個武器不計入裝備的武器個數中。</text:p>
            <text:p>封具效果：在用這個武器進行近戰攻擊時使用，這一次攻擊變為射程：視界，攻擊力+3d。</text:p>
          </table:table-cell>
          <table:table-cell table:style-name="ce93" office:value-type="string" calcext:value-type="string">
            <text:p>DF P41</text:p>
          </table:table-cell>
          <table:table-cell table:style-name="ce102"/>
          <table:table-cell table:number-columns-repeated="1012"/>
        </table:table-row>
        <table:table-row table:style-name="ro16">
          <table:table-cell table:style-name="ce93" office:value-type="string" calcext:value-type="string">
            <text:p>殺戮的聖甲蟲</text:p>
          </table:table-cell>
          <table:table-cell table:style-name="ce93" office:value-type="string" calcext:value-type="string">
            <text:p>射擊</text:p>
          </table:table-cell>
          <table:table-cell table:style-name="ce93" office:value-type="string" calcext:value-type="string">
            <text:p>&lt;射擊&gt;</text:p>
          </table:table-cell>
          <table:table-cell table:style-name="ce93" office:value-type="float" office:value="0" calcext:value-type="float">
            <text:p>0</text:p>
          </table:table-cell>
          <table:table-cell table:style-name="ce93" office:value-type="float" office:value="20" calcext:value-type="float">
            <text:p>20</text:p>
          </table:table-cell>
          <table:table-cell table:style-name="ce95" office:value-type="string" calcext:value-type="string">
            <text:p>—</text:p>
          </table:table-cell>
          <table:table-cell table:style-name="ce93" office:value-type="string" calcext:value-type="string">
            <text:p>20m</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4" office:value-type="string" calcext:value-type="string">
            <text:p>寶石工藝品形狀的、兇暴的RB。扔出之後會變為昆蟲攻擊。1場景只能使用1次。</text:p>
            <text:p>封具效果：主要動作使用，可以無視這個道具的使用次數進行攻擊，這次攻擊的對象變為範圍（選擇），傷害+2D。</text:p>
          </table:table-cell>
          <table:table-cell table:style-name="ce93" office:value-type="string" calcext:value-type="string">
            <text:p>DF P41</text:p>
          </table:table-cell>
          <table:table-cell table:style-name="ce102"/>
          <table:table-cell table:number-columns-repeated="1012"/>
        </table:table-row>
        <table:table-row table:style-name="ro16">
          <table:table-cell table:style-name="ce93" office:value-type="string" calcext:value-type="string">
            <text:p>妖精弓</text:p>
          </table:table-cell>
          <table:table-cell table:style-name="ce93" office:value-type="string" calcext:value-type="string">
            <text:p>射擊</text:p>
          </table:table-cell>
          <table:table-cell table:style-name="ce93" office:value-type="string" calcext:value-type="string">
            <text:p>&lt;射擊&gt;</text:p>
          </table:table-cell>
          <table:table-cell table:style-name="ce93" office:value-type="float" office:value="0" calcext:value-type="float">
            <text:p>0</text:p>
          </table:table-cell>
          <table:table-cell table:style-name="ce93" office:value-type="float" office:value="9" calcext:value-type="float">
            <text:p>9</text:p>
          </table:table-cell>
          <table:table-cell table:style-name="ce95" office:value-type="string" calcext:value-type="string">
            <text:p>—</text:p>
          </table:table-cell>
          <table:table-cell table:style-name="ce93" office:value-type="string" calcext:value-type="string">
            <text:p>30m</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4" office:value-type="string" calcext:value-type="string">
            <text:p>喜歡惡作劇的植物型RB變成的弓。視為兩手武器，對使用這個武器的攻擊的回應動作骰數-2D。</text:p>
            <text:p>封具效果：在場景中登場的角色進行判定後使用，達成值-20。</text:p>
          </table:table-cell>
          <table:table-cell table:style-name="ce93" office:value-type="string" calcext:value-type="string">
            <text:p>DF P41</text:p>
          </table:table-cell>
          <table:table-cell table:style-name="ce102"/>
          <table:table-cell table:number-columns-repeated="1012"/>
        </table:table-row>
        <table:table-row table:style-name="ro16">
          <table:table-cell table:style-name="ce93" office:value-type="string" calcext:value-type="string">
            <text:p>天才手槍</text:p>
          </table:table-cell>
          <table:table-cell table:style-name="ce93" office:value-type="string" calcext:value-type="string">
            <text:p>射擊</text:p>
          </table:table-cell>
          <table:table-cell table:style-name="ce93" office:value-type="string" calcext:value-type="string">
            <text:p>&lt;射擊&gt;</text:p>
          </table:table-cell>
          <table:table-cell table:number-columns-repeated="2" table:style-name="ce93" office:value-type="float" office:value="5" calcext:value-type="float">
            <text:p>5</text:p>
          </table:table-cell>
          <table:table-cell table:style-name="ce95" office:value-type="string" calcext:value-type="string">
            <text:p>—</text:p>
          </table:table-cell>
          <table:table-cell table:style-name="ce93" office:value-type="string" calcext:value-type="string">
            <text:p>100m</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4" office:value-type="string" calcext:value-type="string">
            <text:p>冷靜、有著極高思考能力的手槍型RB。</text:p>
            <text:p>封具效果：在使用這個武器進行射擊攻擊時使用，對象無法閃避或格擋。</text:p>
          </table:table-cell>
          <table:table-cell table:style-name="ce93" office:value-type="string" calcext:value-type="string">
            <text:p>DF P41</text:p>
          </table:table-cell>
          <table:table-cell table:style-name="ce102"/>
          <table:table-cell table:number-columns-repeated="1012"/>
        </table:table-row>
        <table:table-row table:style-name="ro16">
          <table:table-cell table:style-name="ce91" office:value-type="string" calcext:value-type="string" table:number-columns-spanned="11" table:number-rows-spanned="1">
            <text:p>防具</text:p>
          </table:table-cell>
          <table:covered-table-cell table:number-columns-repeated="10"/>
          <table:table-cell table:style-name="ce102"/>
          <table:table-cell table:number-columns-repeated="1012"/>
        </table:table-row>
        <table:table-row table:style-name="ro16">
          <table:table-cell table:style-name="ce92" office:value-type="string" calcext:value-type="string">
            <text:p>名稱</text:p>
          </table:table-cell>
          <table:table-cell table:style-name="ce92" office:value-type="string" calcext:value-type="string">
            <text:p>種類</text:p>
          </table:table-cell>
          <table:table-cell table:style-name="ce92" office:value-type="string" calcext:value-type="string">
            <text:p>回避</text:p>
          </table:table-cell>
          <table:table-cell table:style-name="ce96" office:value-type="string" calcext:value-type="string">
            <text:p>行動值</text:p>
          </table:table-cell>
          <table:table-cell table:style-name="ce96" office:value-type="string" calcext:value-type="string">
            <text:p>裝甲值</text:p>
          </table:table-cell>
          <table:table-cell table:style-name="ce92" office:value-type="string" calcext:value-type="string">
            <text:p>購買/常備化</text:p>
          </table:table-cell>
          <table:table-cell table:style-name="ce92" office:value-type="string" calcext:value-type="string">
            <text:p>必要經驗點</text:p>
          </table:table-cell>
          <table:table-cell table:style-name="ce98" office:value-type="string" calcext:value-type="string" table:number-columns-spanned="3" table:number-rows-spanned="1">
            <text:p>解說</text:p>
          </table:table-cell>
          <table:covered-table-cell table:number-columns-repeated="2" table:style-name="ce74"/>
          <table:table-cell table:style-name="ce92" office:value-type="string" calcext:value-type="string">
            <text:p>參照</text:p>
          </table:table-cell>
          <table:table-cell table:style-name="ce92" office:value-type="string" calcext:value-type="string">
            <text:p>備註</text:p>
          </table:table-cell>
          <table:table-cell table:number-columns-repeated="1012"/>
        </table:table-row>
        <table:table-row table:style-name="ro16">
          <table:table-cell table:style-name="ce94" office:value-type="string" calcext:value-type="string">
            <text:p>黑泥之鎧</text:p>
          </table:table-cell>
          <table:table-cell table:style-name="ce93" office:value-type="string" calcext:value-type="string">
            <text:p>防具</text:p>
          </table:table-cell>
          <table:table-cell table:style-name="ce95" office:value-type="float" office:value="0" calcext:value-type="float">
            <text:p>0</text:p>
          </table:table-cell>
          <table:table-cell table:style-name="ce97" office:value-type="string" calcext:value-type="string">
            <text:p>-2</text:p>
          </table:table-cell>
          <table:table-cell table:style-name="ce95" office:value-type="float" office:value="9" calcext:value-type="float">
            <text:p>9</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3" office:value-type="string" calcext:value-type="string" table:number-columns-spanned="3" table:number-rows-spanned="1">
            <text:p>裝在小瓶中的漆黑的液體形狀的RB。平時沉默，偶爾會露出殘忍的一面。可以用準備階段的自動動作裝備。</text:p>
            <text:p>封具效果：主要階段使用，進行任意手段的攻擊，射程變為[射程：至近]，攻擊力+5D。</text:p>
          </table:table-cell>
          <table:covered-table-cell table:number-columns-repeated="2"/>
          <table:table-cell table:style-name="ce93" office:value-type="string" calcext:value-type="string">
            <text:p>DF P41</text:p>
          </table:table-cell>
          <table:table-cell table:style-name="ce102"/>
          <table:table-cell table:number-columns-repeated="1012"/>
        </table:table-row>
        <table:table-row table:style-name="ro16">
          <table:table-cell table:style-name="ce93" office:value-type="string" calcext:value-type="string">
            <text:p>翼之靴</text:p>
          </table:table-cell>
          <table:table-cell table:style-name="ce93" office:value-type="string" calcext:value-type="string">
            <text:p>防具（輔助）</text:p>
          </table:table-cell>
          <table:table-cell table:style-name="ce95" office:value-type="float" office:value="0" calcext:value-type="float">
            <text:p>0</text:p>
          </table:table-cell>
          <table:table-cell table:style-name="ce97" office:value-type="string" calcext:value-type="string">
            <text:p>0</text:p>
          </table:table-cell>
          <table:table-cell table:style-name="ce95" office:value-type="float" office:value="3" calcext:value-type="float">
            <text:p>3</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3" office:value-type="string" calcext:value-type="string" table:number-columns-spanned="3" table:number-rows-spanned="1">
            <text:p>總是很有精神、性格頑皮的靴子型RB。</text:p>
            <text:p>裝備中，當你進行移動時，變為飛行狀態。</text:p>
            <text:p>封具效果：在你閃避時使用，解除所有你受到的負面狀態，判定的達成值+20。</text:p>
          </table:table-cell>
          <table:covered-table-cell table:number-columns-repeated="2"/>
          <table:table-cell table:style-name="ce93" office:value-type="string" calcext:value-type="string">
            <text:p>DF P41</text:p>
          </table:table-cell>
          <table:table-cell table:style-name="ce102"/>
          <table:table-cell table:number-columns-repeated="1012"/>
        </table:table-row>
        <table:table-row table:style-name="ro16">
          <table:table-cell table:style-name="ce93" office:value-type="string" calcext:value-type="string">
            <text:p>紅斗篷</text:p>
          </table:table-cell>
          <table:table-cell table:style-name="ce93" office:value-type="string" calcext:value-type="string">
            <text:p>防具（輔助）</text:p>
          </table:table-cell>
          <table:table-cell table:style-name="ce95" office:value-type="float" office:value="5" calcext:value-type="float">
            <text:p>5</text:p>
          </table:table-cell>
          <table:table-cell table:style-name="ce97" office:value-type="string" calcext:value-type="string">
            <text:p>0</text:p>
          </table:table-cell>
          <table:table-cell table:style-name="ce95" office:value-type="float" office:value="0" calcext:value-type="float">
            <text:p>0</text:p>
          </table:table-cell>
          <table:table-cell table:style-name="ce97" office:value-type="string" calcext:value-type="string">
            <text:p>購入不可/不可</text:p>
          </table:table-cell>
          <table:table-cell table:style-name="ce95" office:value-type="string" calcext:value-type="string">
            <text:p>—</text:p>
          </table:table-cell>
          <table:table-cell table:style-name="ce103" office:value-type="string" calcext:value-type="string" table:number-columns-spanned="3" table:number-rows-spanned="1">
            <text:p>玩弄眼前之人的紅布斗篷。性格裝腔作勢，但非常高傲。</text:p>
            <text:p>準備階段使用。在這一回合間，場景中登場的一個角色的判定骰子-2個。</text:p>
            <text:p>封具效果：在攻擊對象包含與你處於同一接戰區域的角色時使用，攻擊變為[對象：單體]，對象變為你。</text:p>
          </table:table-cell>
          <table:covered-table-cell table:number-columns-repeated="2"/>
          <table:table-cell table:style-name="ce93" office:value-type="string" calcext:value-type="string">
            <text:p>DF P41</text:p>
          </table:table-cell>
          <table:table-cell table:style-name="ce102"/>
          <table:table-cell table:number-columns-repeated="1012"/>
        </table:table-row>
        <table:table-row table:style-name="ro16">
          <table:table-cell table:style-name="ce91" office:value-type="string" calcext:value-type="string" table:number-columns-spanned="11" table:number-rows-spanned="1">
            <text:p>載具</text:p>
          </table:table-cell>
          <table:covered-table-cell table:number-columns-repeated="10"/>
          <table:table-cell table:style-name="ce102"/>
          <table:table-cell table:number-columns-repeated="1012"/>
        </table:table-row>
        <table:table-row table:style-name="ro16">
          <table:table-cell table:style-name="ce92" office:value-type="string" calcext:value-type="string">
            <text:p>名稱</text:p>
          </table:table-cell>
          <table:table-cell table:style-name="ce92" office:value-type="string" calcext:value-type="string">
            <text:p>種類</text:p>
          </table:table-cell>
          <table:table-cell table:style-name="ce92" office:value-type="string" calcext:value-type="string">
            <text:p>技能</text:p>
          </table:table-cell>
          <table:table-cell table:style-name="ce92" office:value-type="string" calcext:value-type="string">
            <text:p>攻擊力</text:p>
          </table:table-cell>
          <table:table-cell table:style-name="ce92" office:value-type="string" calcext:value-type="string">
            <text:p>行動值</text:p>
          </table:table-cell>
          <table:table-cell table:style-name="ce92" office:value-type="string" calcext:value-type="string">
            <text:p>裝甲值</text:p>
          </table:table-cell>
          <table:table-cell table:style-name="ce92" office:value-type="string" calcext:value-type="string">
            <text:p>全力移動</text:p>
          </table:table-cell>
          <table:table-cell table:style-name="ce96" office:value-type="string" calcext:value-type="string">
            <text:p>購買/常備化</text:p>
          </table:table-cell>
          <table:table-cell table:style-name="ce96" office:value-type="string" calcext:value-type="string">
            <text:p>必要經驗點</text:p>
          </table:table-cell>
          <table:table-cell table:style-name="ce98" office:value-type="string" calcext:value-type="string">
            <text:p>解說</text:p>
          </table:table-cell>
          <table:table-cell table:style-name="ce92" office:value-type="string" calcext:value-type="string">
            <text:p>參照</text:p>
          </table:table-cell>
          <table:table-cell table:style-name="ce92" office:value-type="string" calcext:value-type="string">
            <text:p>備註</text:p>
          </table:table-cell>
          <table:table-cell table:number-columns-repeated="1012"/>
        </table:table-row>
        <table:table-row table:style-name="ro16">
          <table:table-cell table:style-name="ce93" office:value-type="string" calcext:value-type="string">
            <text:p>鋼鐵坐騎</text:p>
          </table:table-cell>
          <table:table-cell table:style-name="ce93" office:value-type="string" calcext:value-type="string">
            <text:p>載具</text:p>
          </table:table-cell>
          <table:table-cell table:style-name="ce93" office:value-type="string" calcext:value-type="string">
            <text:p>＜駕駛：二輪＞</text:p>
          </table:table-cell>
          <table:table-cell table:style-name="ce93" office:value-type="float" office:value="9" calcext:value-type="float">
            <text:p>9</text:p>
          </table:table-cell>
          <table:table-cell table:style-name="ce93" office:value-type="float" office:value="0" calcext:value-type="float">
            <text:p>0</text:p>
          </table:table-cell>
          <table:table-cell table:style-name="ce93" office:value-type="float" office:value="9" calcext:value-type="float">
            <text:p>9</text:p>
          </table:table-cell>
          <table:table-cell table:style-name="ce93" office:value-type="string" calcext:value-type="string">
            <text:p>250m</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4" office:value-type="string" calcext:value-type="string">
            <text:p>能夠變形的摩托車型RB。蔑視人類，但會承認主人。</text:p>
            <text:p>封具效果：先制階段使用，你可以與同乘者立刻進行戰鬥移動或者脫離。這時可以無視封鎖或硬直的效果。</text:p>
          </table:table-cell>
          <table:table-cell table:style-name="ce93" office:value-type="string" calcext:value-type="string">
            <text:p>DF P42</text:p>
          </table:table-cell>
          <table:table-cell table:style-name="ce102"/>
          <table:table-cell table:number-columns-repeated="1012"/>
        </table:table-row>
        <table:table-row table:style-name="ro16">
          <table:table-cell table:style-name="ce93" office:value-type="string" calcext:value-type="string">
            <text:p>神秘台座</text:p>
          </table:table-cell>
          <table:table-cell table:style-name="ce93" office:value-type="string" calcext:value-type="string">
            <text:p>載具</text:p>
          </table:table-cell>
          <table:table-cell table:style-name="ce93" office:value-type="string" calcext:value-type="string">
            <text:p>＜駕駛：騎乘動物＞</text:p>
          </table:table-cell>
          <table:table-cell table:style-name="ce93" office:value-type="float" office:value="-3" calcext:value-type="float">
            <text:p>-3</text:p>
          </table:table-cell>
          <table:table-cell table:number-columns-repeated="2" table:style-name="ce93" office:value-type="float" office:value="10" calcext:value-type="float">
            <text:p>10</text:p>
          </table:table-cell>
          <table:table-cell table:style-name="ce93" office:value-type="string" calcext:value-type="string">
            <text:p>150m</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4" office:value-type="string" calcext:value-type="string">
            <text:p>跟隨主人的小動物型RB。可以巨大化，讓主人坐在背上。性格悠閒而粗心大意。</text:p>
            <text:p>準備階段使用，裝備並變更這個道具。</text:p>
            <text:p>封具效果：在使用這個載具進行攻擊時使用，攻擊變為[對象：範圍（選擇）]，傷害+2D。</text:p>
          </table:table-cell>
          <table:table-cell table:style-name="ce93" office:value-type="string" calcext:value-type="string">
            <text:p>DF P42</text:p>
          </table:table-cell>
          <table:table-cell table:style-name="ce102"/>
          <table:table-cell table:number-columns-repeated="1012"/>
        </table:table-row>
        <table:table-row table:style-name="ro16">
          <table:table-cell table:style-name="ce91" office:value-type="string" calcext:value-type="string" table:number-columns-spanned="11" table:number-rows-spanned="1">
            <text:p>其他</text:p>
          </table:table-cell>
          <table:covered-table-cell table:number-columns-repeated="10"/>
          <table:table-cell table:style-name="ce102"/>
          <table:table-cell table:number-columns-repeated="1012"/>
        </table:table-row>
        <table:table-row table:style-name="ro16">
          <table:table-cell table:style-name="ce92" office:value-type="string" calcext:value-type="string">
            <text:p>名稱</text:p>
          </table:table-cell>
          <table:table-cell table:style-name="ce92" office:value-type="string" calcext:value-type="string">
            <text:p>種類</text:p>
          </table:table-cell>
          <table:table-cell table:style-name="ce92" office:value-type="string" calcext:value-type="string">
            <text:p>技能</text:p>
          </table:table-cell>
          <table:table-cell table:style-name="ce96" office:value-type="string" calcext:value-type="string">
            <text:p>購買/常備化</text:p>
          </table:table-cell>
          <table:table-cell table:style-name="ce96" office:value-type="string" calcext:value-type="string">
            <text:p>必要經驗點</text:p>
          </table:table-cell>
          <table:table-cell table:style-name="ce98" office:value-type="string" calcext:value-type="string" table:number-columns-spanned="5" table:number-rows-spanned="1">
            <text:p>解說</text:p>
          </table:table-cell>
          <table:covered-table-cell table:number-columns-repeated="4" table:style-name="ce74"/>
          <table:table-cell table:style-name="ce92" office:value-type="string" calcext:value-type="string">
            <text:p>參照</text:p>
          </table:table-cell>
          <table:table-cell table:style-name="ce92" office:value-type="string" calcext:value-type="string">
            <text:p>備註</text:p>
          </table:table-cell>
          <table:table-cell table:number-columns-repeated="1012"/>
        </table:table-row>
        <table:table-row table:style-name="ro16">
          <table:table-cell table:style-name="ce94" office:value-type="string" calcext:value-type="string">
            <text:p>嵐之杖</text:p>
          </table:table-cell>
          <table:table-cell table:style-name="ce93" office:value-type="string" calcext:value-type="string">
            <text:p>一般</text:p>
          </table:table-cell>
          <table:table-cell table:style-name="ce93" office:value-type="string" calcext:value-type="string">
            <text:p>——</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99" office:value-type="string" calcext:value-type="string" table:number-columns-spanned="5" table:number-rows-spanned="1">
            <text:p>揮動就能隨意操作天氣的手杖。性格老謀深算，偶爾會使壞。</text:p>
            <text:p>準備階段使用。在這一回合中，你進行的&lt;RC&gt;判定骰數+3個。1場景最多1次。</text:p>
            <text:p>封具效果：準備階段使用，讓場景中登場的一個集團無法戰鬥。</text:p>
          </table:table-cell>
          <table:covered-table-cell table:number-columns-repeated="4" table:style-name="ce75"/>
          <table:table-cell table:style-name="ce93" office:value-type="string" calcext:value-type="string">
            <text:p>DF P42</text:p>
          </table:table-cell>
          <table:table-cell table:style-name="ce102"/>
          <table:table-cell table:number-columns-repeated="1012"/>
        </table:table-row>
        <table:table-row table:style-name="ro16">
          <table:table-cell table:style-name="ce93" office:value-type="string" calcext:value-type="string">
            <text:p>助言的骷髏</text:p>
          </table:table-cell>
          <table:table-cell table:style-name="ce93" office:value-type="string" calcext:value-type="string">
            <text:p>一般</text:p>
          </table:table-cell>
          <table:table-cell table:style-name="ce93" office:value-type="string" calcext:value-type="string">
            <text:p>——</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0" office:value-type="string" calcext:value-type="string" table:number-columns-spanned="5" table:number-rows-spanned="1">
            <text:p>骷髏頭形狀的銀飾。會給予主人建議。個性輕浮而愛說話。</text:p>
            <text:p>在進行主要階段的判定之前使用，這個判定的暴擊值-1（下限6）。1劇本最多可以使用3次。</text:p>
            <text:p>封具效果：使用上述效果時宣言，這次判定的暴擊值再-1（下限5）</text:p>
          </table:table-cell>
          <table:covered-table-cell table:number-columns-repeated="4"/>
          <table:table-cell table:style-name="ce93" office:value-type="string" calcext:value-type="string">
            <text:p>DF P42</text:p>
          </table:table-cell>
          <table:table-cell table:style-name="ce102"/>
          <table:table-cell table:number-columns-repeated="1012"/>
        </table:table-row>
        <table:table-row table:style-name="ro16">
          <table:table-cell table:style-name="ce93" office:value-type="string" calcext:value-type="string">
            <text:p>小櫃子</text:p>
          </table:table-cell>
          <table:table-cell table:style-name="ce93" office:value-type="string" calcext:value-type="string">
            <text:p>一般</text:p>
          </table:table-cell>
          <table:table-cell table:style-name="ce93" office:value-type="string" calcext:value-type="string">
            <text:p>——</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0" office:value-type="string" calcext:value-type="string" table:number-columns-spanned="5" table:number-rows-spanned="1">
            <text:p>能夠拿出主人想要的道具的小箱子型RB。基本上很愛照顧人，偶爾會顯得冷淡。</text:p>
            <text:p>主要動作使用，可以獲得一個購入難度在20以下的道具。1劇本最多使用3次。</text:p>
            <text:p>封具效果：主要階段使用，獲得一個購入難易度40以下的道具並立刻裝備。場景結束時道具會消失。</text:p>
          </table:table-cell>
          <table:covered-table-cell table:number-columns-repeated="4"/>
          <table:table-cell table:style-name="ce93" office:value-type="string" calcext:value-type="string">
            <text:p>DF P42</text:p>
          </table:table-cell>
          <table:table-cell table:style-name="ce102"/>
          <table:table-cell table:number-columns-repeated="1012"/>
        </table:table-row>
        <table:table-row table:style-name="ro16">
          <table:table-cell table:style-name="ce93" office:value-type="string" calcext:value-type="string">
            <text:p>遠見石</text:p>
          </table:table-cell>
          <table:table-cell table:style-name="ce93" office:value-type="string" calcext:value-type="string">
            <text:p>一般</text:p>
          </table:table-cell>
          <table:table-cell table:style-name="ce93" office:value-type="string" calcext:value-type="string">
            <text:p>——</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0" office:value-type="string" calcext:value-type="string" table:number-columns-spanned="5" table:number-rows-spanned="1">
            <text:p>好奇心旺盛的寶石型RB。性格任性，會折騰主人。</text:p>
            <text:p>你進行的【感覺】【精神】的判定骰數+2個。</text:p>
            <text:p>封具效果：在你進行【感覺】【精神】判定之前使用，這個判定的骰數+10個。</text:p>
          </table:table-cell>
          <table:covered-table-cell table:number-columns-repeated="4"/>
          <table:table-cell table:style-name="ce93" office:value-type="string" calcext:value-type="string">
            <text:p>DF P42</text:p>
          </table:table-cell>
          <table:table-cell table:style-name="ce102"/>
          <table:table-cell table:number-columns-repeated="1012"/>
        </table:table-row>
        <table:table-row table:style-name="ro16">
          <table:table-cell table:style-name="ce93" office:value-type="string" calcext:value-type="string">
            <text:p>忠臣之兵</text:p>
          </table:table-cell>
          <table:table-cell table:style-name="ce93" office:value-type="string" calcext:value-type="string">
            <text:p>一般</text:p>
          </table:table-cell>
          <table:table-cell table:style-name="ce93" office:value-type="string" calcext:value-type="string">
            <text:p>——</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0" office:value-type="string" calcext:value-type="string" table:number-columns-spanned="5" table:number-rows-spanned="1">
            <text:p>黑檀木製成的國際象棋棋子RB。一套只有五枚兵。會將主人作為君主加以保護，有點吵。</text:p>
            <text:p>在計算你受到的HP傷害之後使用。你（預計）受到的傷害-5。1劇本最多使用5次。</text:p>
            <text:p>封具效果：在你進行攻擊、投擲傷害骰時使用，傷害+16。</text:p>
          </table:table-cell>
          <table:covered-table-cell table:number-columns-repeated="4"/>
          <table:table-cell table:style-name="ce93" office:value-type="string" calcext:value-type="string">
            <text:p>DF P42</text:p>
          </table:table-cell>
          <table:table-cell table:style-name="ce102"/>
          <table:table-cell table:number-columns-repeated="1012"/>
        </table:table-row>
        <table:table-row table:style-name="ro16">
          <table:table-cell table:style-name="ce93" office:value-type="string" calcext:value-type="string">
            <text:p>七彩人偶</text:p>
          </table:table-cell>
          <table:table-cell table:style-name="ce93" office:value-type="string" calcext:value-type="string">
            <text:p>一般</text:p>
          </table:table-cell>
          <table:table-cell table:style-name="ce93" office:value-type="string" calcext:value-type="string">
            <text:p>——</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0" office:value-type="string" calcext:value-type="string" table:number-columns-spanned="5" table:number-rows-spanned="1">
            <text:p>小小的人形RB。能夠變身成想變成的人類、潛入各種地方。對主人有獻身精神，但嫉妒心很強。</text:p>
            <text:p>你進行的情報收集判定的&lt;情報：&gt;達成值+5。</text:p>
            <text:p>封具效果：在無法戰鬥時使用，回復無法戰鬥狀態，HP恢復到1點。</text:p>
          </table:table-cell>
          <table:covered-table-cell table:number-columns-repeated="4"/>
          <table:table-cell table:style-name="ce93" office:value-type="string" calcext:value-type="string">
            <text:p>DF P42</text:p>
          </table:table-cell>
          <table:table-cell table:style-name="ce102"/>
          <table:table-cell table:number-columns-repeated="1012"/>
        </table:table-row>
        <table:table-row table:style-name="ro16">
          <table:table-cell table:style-name="ce93" office:value-type="string" calcext:value-type="string">
            <text:p>不可視之王冠</text:p>
          </table:table-cell>
          <table:table-cell table:style-name="ce93" office:value-type="string" calcext:value-type="string">
            <text:p>一般</text:p>
          </table:table-cell>
          <table:table-cell table:style-name="ce93" office:value-type="string" calcext:value-type="string">
            <text:p>——</text:p>
          </table:table-cell>
          <table:table-cell table:style-name="ce93" office:value-type="string" calcext:value-type="string">
            <text:p>購買不可/不可</text:p>
          </table:table-cell>
          <table:table-cell table:style-name="ce95" office:value-type="string" calcext:value-type="string">
            <text:p>—</text:p>
          </table:table-cell>
          <table:table-cell table:style-name="ce100" office:value-type="string" calcext:value-type="string" table:number-columns-spanned="5" table:number-rows-spanned="1">
            <text:p>王冠型的RB。透明、感受不到重量，只有無機質的聲音在不斷誘惑著持有者走向榮光。</text:p>
            <text:p>你進行的&lt;交涉&gt;判定骰數+3個。</text:p>
            <text:p>封具效果：在你進行&lt;交涉&gt;判定前使用，判定骰數+12個。</text:p>
          </table:table-cell>
          <table:covered-table-cell table:number-columns-repeated="4"/>
          <table:table-cell table:style-name="ce93" office:value-type="string" calcext:value-type="string">
            <text:p>DF P42</text:p>
          </table:table-cell>
          <table:table-cell table:style-name="ce102"/>
          <table:table-cell table:number-columns-repeated="1012"/>
        </table:table-row>
        <table:table-row table:style-name="ro4" table:number-rows-repeated="1048550">
          <table:table-cell table:number-columns-repeated="1024"/>
        </table:table-row>
        <table:table-row table:style-name="ro4">
          <table:table-cell table:number-columns-repeated="1024"/>
        </table:table-row>
      </table:table>
      <table:table table:name="REC道具" table:style-name="ta10">
        <table:table-column table:style-name="co45" table:default-cell-style-name="Default"/>
        <table:table-column table:style-name="co46" table:default-cell-style-name="Default"/>
        <table:table-column table:style-name="co43" table:default-cell-style-name="Default"/>
        <table:table-column table:style-name="co4"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38" table:default-cell-style-name="Default"/>
        <table:table-column table:style-name="co50" table:default-cell-style-name="Default"/>
        <table:table-column table:style-name="co3" table:number-columns-repeated="16" table:default-cell-style-name="Default"/>
        <table:table-column table:style-name="co5" table:number-columns-repeated="998" table:default-cell-style-name="Default"/>
        <table:table-row table:style-name="ro16">
          <table:table-cell table:style-name="ce105" office:value-type="string" calcext:value-type="string">
            <text:p>名稱</text:p>
          </table:table-cell>
          <table:table-cell table:style-name="ce110" office:value-type="string" calcext:value-type="string">
            <text:p>類別</text:p>
          </table:table-cell>
          <table:table-cell table:style-name="ce110" office:value-type="string" calcext:value-type="string">
            <text:p>所需經驗點</text:p>
          </table:table-cell>
          <table:table-cell table:style-name="ce110" office:value-type="string" calcext:value-type="string">
            <text:p>REC</text:p>
          </table:table-cell>
          <table:table-cell table:style-name="ce110" office:value-type="string" calcext:value-type="string">
            <text:p>次數</text:p>
          </table:table-cell>
          <table:table-cell table:style-name="ce110" office:value-type="string" calcext:value-type="string">
            <text:p>解說</text:p>
          </table:table-cell>
          <table:table-cell table:style-name="ce110" office:value-type="string" calcext:value-type="string">
            <text:p>通常效果</text:p>
          </table:table-cell>
          <table:table-cell table:style-name="ce120" office:value-type="string" calcext:value-type="string">
            <text:p>強化效果</text:p>
          </table:table-cell>
          <table:table-cell table:style-name="ce120" office:value-type="string" calcext:value-type="string">
            <text:p>參照</text:p>
          </table:table-cell>
          <table:table-cell table:style-name="ce110" office:value-type="string" calcext:value-type="string">
            <text:p>備註</text:p>
          </table:table-cell>
          <table:table-cell table:style-name="ce121" table:number-columns-repeated="16"/>
          <table:table-cell table:number-columns-repeated="998"/>
        </table:table-row>
        <table:table-row table:style-name="ro16">
          <table:table-cell table:style-name="ce106" office:value-type="string" calcext:value-type="string">
            <text:p>關聯：霧谷雄吾</text:p>
          </table:table-cell>
          <table:table-cell table:style-name="ce111" office:value-type="string" calcext:value-type="string">
            <text:p>聯繫/關聯</text:p>
          </table:table-cell>
          <table:table-cell table:style-name="ce113" office:value-type="float" office:value="5" calcext:value-type="float">
            <text:p>5</text:p>
          </table:table-cell>
          <table:table-cell table:style-name="ce113" office:value-type="string" calcext:value-type="string">
            <text:p>霧谷雄吾</text:p>
          </table:table-cell>
          <table:table-cell table:style-name="ce113" office:value-type="string" calcext:value-type="string">
            <text:p>1/劇本</text:p>
          </table:table-cell>
          <table:table-cell table:style-name="ce115" office:value-type="string" calcext:value-type="string">
            <text:p>表示與UGN日本支部長霧谷雄吾之間的聯繫，可以借用霧谷雄吾擁有的，在UGN內部廣泛人脈的效果。</text:p>
            <text:p>受到霧穀的薰陶，受到影響的你也繼承著極強的行動力和他人的影響力。</text:p>
          </table:table-cell>
          <table:table-cell table:style-name="ce115" office:value-type="string" calcext:value-type="string">
            <text:p>你進行的&lt;情報：UGN&gt;判定骰數+3個。</text:p>
            <text:p>稀有道具。</text:p>
          </table:table-cell>
          <table:table-cell table:style-name="ce119" office:value-type="string" calcext:value-type="string">
            <text:p>你以主要動作對其他角色使用異能時使用，以此異能的LV+1來計算最終效果，此時可以超過最大等級進行計算，組合了複數異能時，需從組合的異能中指定一個進行提升。</text:p>
            <text:p>該效果無法應用於攻擊判定，一劇本可以使用一次。</text:p>
          </table:table-cell>
          <table:table-cell table:style-name="ce113" office:value-type="string" calcext:value-type="string">
            <text:p>IA P196</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利維坦代碼</text:p>
          </table:table-cell>
          <table:table-cell table:style-name="ce112" office:value-type="string" calcext:value-type="string">
            <text:p>聯繫/一般</text:p>
          </table:table-cell>
          <table:table-cell table:style-name="ce112" office:value-type="float" office:value="40" calcext:value-type="float">
            <text:p>40</text:p>
          </table:table-cell>
          <table:table-cell table:style-name="ce112" office:value-type="string" calcext:value-type="string">
            <text:p>霧谷雄吾</text:p>
          </table:table-cell>
          <table:table-cell table:style-name="ce112" office:value-type="string" calcext:value-type="string">
            <text:p>1/劇本</text:p>
          </table:table-cell>
          <table:table-cell table:style-name="ce116" office:value-type="string" calcext:value-type="string">
            <text:p>UGN日本支部長的特殊作戰通知，能得到日本支部全體的支援指令，跨越支部和所屬的藩籬，流動性地調動人材，必要戰力在瞬間就會到達。</text:p>
            <text:p>普通狀況下會因過度集中戰力而使其他地方破綻百出，不可能進行這麼亂來的作戰，但霧谷那超人般的人才把握和指揮能力能使其成為可能。</text:p>
          </table:table-cell>
          <table:table-cell table:style-name="ce116" office:value-type="string" calcext:value-type="string">
            <text:p>任何時候均可使用，指定任意一個技能，該場景間登場的，由你選擇的任意角色的指定技能判定達成值+5，被選擇的角色可以拒絕這個效果。</text:p>
            <text:p>該效果一劇本可以使用一次。</text:p>
          </table:table-cell>
          <table:table-cell table:style-name="ce116" office:value-type="string" calcext:value-type="string">
            <text:p>與通常效果同時使用，該場景間，你能夠以通常效果所指定的技能等級為5，對應能力值為10來(替代你原本的數據)進行判定。</text:p>
          </table:table-cell>
          <table:table-cell table:style-name="ce112" office:value-type="string" calcext:value-type="string">
            <text:p>IA P196</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霧谷全席</text:p>
          </table:table-cell>
          <table:table-cell table:style-name="ce112" office:value-type="string" calcext:value-type="string">
            <text:p>聯繫/消耗品</text:p>
          </table:table-cell>
          <table:table-cell table:style-name="ce112" office:value-type="float" office:value="15" calcext:value-type="float">
            <text:p>15</text:p>
          </table:table-cell>
          <table:table-cell table:style-name="ce112" office:value-type="string" calcext:value-type="string">
            <text:p>霧谷雄吾</text:p>
          </table:table-cell>
          <table:table-cell table:style-name="ce112" office:value-type="string" calcext:value-type="string">
            <text:p>-</text:p>
          </table:table-cell>
          <table:table-cell table:style-name="ce116" office:value-type="string" calcext:value-type="string">
            <text:p>表示能讓霧穀親自招待料理的關係。作為他隱藏特技的特製料理和招待，只向足夠親近的人或是執行特殊任務的UGN特工展露。</text:p>
            <text:p>對於日本支部長的親自招待，大部分人都表示實在不敢當，食不知味。</text:p>
            <text:p>但根據某些大膽的人的說法，似乎是讓人意外覺得親切的味道。</text:p>
          </table:table-cell>
          <table:table-cell table:style-name="ce116" office:value-type="string" calcext:value-type="string">
            <text:p>主要動作使用，從該場景中登場了的角色之中任意選擇一個，其HP回復4D10點，被選擇的角色可以拒絕此效果。</text:p>
            <text:p>無法於戰鬥中使用。</text:p>
          </table:table-cell>
          <table:table-cell table:style-name="ce116" office:value-type="string" calcext:value-type="string">
            <text:p>與通常效果同時使用，使用時，選擇一項技能，該劇本間，所選技能的判定達成值+3。</text:p>
          </table:table-cell>
          <table:table-cell table:style-name="ce112" office:value-type="string" calcext:value-type="string">
            <text:p>IA P196</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關聯：強羅琉璃</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強羅琉璃</text:p>
          </table:table-cell>
          <table:table-cell table:style-name="ce112" office:value-type="string" calcext:value-type="string">
            <text:p>-</text:p>
          </table:table-cell>
          <table:table-cell table:style-name="ce116" office:value-type="string" calcext:value-type="string">
            <text:p>表示與UGN身為特殊部隊“夕暮”隊長的強羅琉璃有所關聯，能夠得到她基於與遺產事件相關方面的知識和經驗給出的建言。</text:p>
          </table:table-cell>
          <table:table-cell table:style-name="ce116" office:value-type="string" calcext:value-type="string">
            <text:p>&lt;知識：遺產&gt;判定的達成值+4。</text:p>
            <text:p>稀有道具。</text:p>
          </table:table-cell>
          <table:table-cell table:style-name="ce116" office:value-type="string" calcext:value-type="string">
            <text:p>你受到的來自持有"遺產"的角色的傷害-5。</text:p>
            <text:p>所謂遺產，即是"遺產繼承者專用道具"，以及GM認可其性質為遺產的物品。</text:p>
          </table:table-cell>
          <table:table-cell table:style-name="ce112" office:value-type="string" calcext:value-type="string">
            <text:p>IA P197</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夕暮戰鬥服</text:p>
          </table:table-cell>
          <table:table-cell table:style-name="ce112" office:value-type="string" calcext:value-type="string">
            <text:p>聯繫/防具</text:p>
          </table:table-cell>
          <table:table-cell table:style-name="ce112" office:value-type="float" office:value="30" calcext:value-type="float">
            <text:p>30</text:p>
          </table:table-cell>
          <table:table-cell table:style-name="ce112" office:value-type="string" calcext:value-type="string">
            <text:p>強羅琉璃</text:p>
          </table:table-cell>
          <table:table-cell table:style-name="ce112" office:value-type="string" calcext:value-type="string">
            <text:p>-</text:p>
          </table:table-cell>
          <table:table-cell table:style-name="ce116" office:value-type="string" calcext:value-type="string">
            <text:p>為“夕暮”部隊試製的戰鬥服，以“夕暮”所積累的遺產相關情報為基礎開發的，UGN戰鬥服的對遺產用改裝版。</text:p>
          </table:table-cell>
          <table:table-cell table:style-name="ce116" office:value-type="string" calcext:value-type="string">
            <text:p>閃避：0 行動值：-1 裝甲值：10</text:p>
            <text:p>你在與持有“遺產”的角色進行對決中進行回應動作時，判定骰數+2個。</text:p>
            <text:p>所謂遺產，即是"遺產繼承者專用道具"，以及GM認可其性質為遺產的物品。</text:p>
          </table:table-cell>
          <table:table-cell table:style-name="ce116" office:value-type="string" calcext:value-type="string">
            <text:p>你對持有“遺產”的角色造成的傷害+5。</text:p>
            <text:p>所謂遺產，即是"遺產繼承者專用道具"，以及GM認可其性質為遺產的物品。</text:p>
          </table:table-cell>
          <table:table-cell table:style-name="ce112" office:value-type="string" calcext:value-type="string">
            <text:p>IA P197</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夕暮登場！</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強羅琉璃 or 拉哈布 or 加賀美志津香 or Haunt or 強羅琉衣</text:p>
          </table:table-cell>
          <table:table-cell table:style-name="ce112" office:value-type="string" calcext:value-type="string">
            <text:p>1/劇本</text:p>
          </table:table-cell>
          <table:table-cell table:style-name="ce116" office:value-type="string" calcext:value-type="string">
            <text:p>緊急召集"夕暮"成員的聯繫道具。能夠喚來"夕暮"的成員幫助阻礙敵人行動。</text:p>
          </table:table-cell>
          <table:table-cell table:style-name="ce116" office:value-type="string" calcext:value-type="string">
            <text:p>準備階段使用，該場景中登場的任意角色全員進行的判定骰數-5個，持續至回合結束。</text:p>
            <text:p>該效果一劇本可以使用一次。</text:p>
          </table:table-cell>
          <table:table-cell table:style-name="ce116" office:value-type="string" calcext:value-type="string">
            <text:p>受到通常效果影響中的角色進行的移動距離-10m（最低1m）。</text:p>
          </table:table-cell>
          <table:table-cell table:style-name="ce112" office:value-type="string" calcext:value-type="string">
            <text:p>IA P197</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關聯：德蕾絲·布魯姆</text:p>
          </table:table-cell>
          <table:table-cell table:style-name="ce112" office:value-type="string" calcext:value-type="string">
            <text:p>聯繫/關聯</text:p>
          </table:table-cell>
          <table:table-cell table:style-name="ce112" office:value-type="float" office:value="30" calcext:value-type="float">
            <text:p>30</text:p>
          </table:table-cell>
          <table:table-cell table:style-name="ce112" office:value-type="string" calcext:value-type="string">
            <text:p>德蕾絲·布魯姆</text:p>
          </table:table-cell>
          <table:table-cell table:style-name="ce112" office:value-type="string" calcext:value-type="string">
            <text:p>1/劇本</text:p>
          </table:table-cell>
          <table:table-cell table:style-name="ce116" office:value-type="string" calcext:value-type="string">
            <text:p>與UGN中樞評議員之一，德蕾絲‧布魯姆的聯繫。屬_xffff_穩健派的她，作為各種問題和派系糾紛的調解者而知名，是現在UGN的中心人物之一。</text:p>
            <text:p>正因如此，繁忙的她需要很多能幹能信賴的人。如果你能回應那個期待的話，她會毫不吝惜地支持你的吧……但同時可能也會被無窮無盡的麻煩事給纏身。</text:p>
          </table:table-cell>
          <table:table-cell table:style-name="ce116" office:value-type="string" calcext:value-type="string">
            <text:p>你進行&lt;情報：UGN&gt;判定前使用，判定骰數+3個。</text:p>
            <text:p>稀有道具。</text:p>
          </table:table-cell>
          <table:table-cell table:style-name="ce116" office:value-type="string" calcext:value-type="string">
            <text:p>主要動作使用，可以直接向GM發起提問。GM可以拒絕回答，這種情況下不消耗使用次數。</text:p>
            <text:p>該效果一劇本可以使用一次。</text:p>
          </table:table-cell>
          <table:table-cell table:style-name="ce112" office:value-type="string" calcext:value-type="string">
            <text:p>IA P197</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守衛者之刃</text:p>
          </table:table-cell>
          <table:table-cell table:style-name="ce112" office:value-type="string" calcext:value-type="string">
            <text:p>聯繫/近戰武器</text:p>
          </table:table-cell>
          <table:table-cell table:style-name="ce112" office:value-type="float" office:value="50" calcext:value-type="float">
            <text:p>50</text:p>
          </table:table-cell>
          <table:table-cell table:style-name="ce112" office:value-type="string" calcext:value-type="string">
            <text:p>德蕾絲·布魯姆</text:p>
          </table:table-cell>
          <table:table-cell table:style-name="ce112" office:value-type="string" calcext:value-type="string">
            <text:p>1/劇本</text:p>
            <text:p>1/場景</text:p>
          </table:table-cell>
          <table:table-cell table:style-name="ce116" office:value-type="string" calcext:value-type="string">
            <text:p>德蕾絲交給信賴的保鏢的活著的刀，是感染了EX背教者病毒的逸品。</text:p>
            <text:p>這是為了保護中樞評議員等重要人物而開發的武器，乍看雖然沒有什麼特異之處，卻有呼應彼此的信賴關係而提高身體能力的特性。</text:p>
          </table:table-cell>
          <table:table-cell table:style-name="ce116" office:value-type="string" calcext:value-type="string">
            <text:p>技能：近戰  命中：-2  攻擊力：12  格擋值：3  射程：至近</text:p>
            <text:p>你進行掩護時使用，該掩護變為對離你10m遠的角色也能進行，該效果一劇本可以使用一次。</text:p>
          </table:table-cell>
          <table:table-cell table:style-name="ce116" office:value-type="string" calcext:value-type="string">
            <text:p>將通常效果從“一劇本可以使用一次”變為“一場景可以使用一次”。</text:p>
          </table:table-cell>
          <table:table-cell table:style-name="ce112" office:value-type="string" calcext:value-type="string">
            <text:p>IA P197</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評議員命令</text:p>
          </table:table-cell>
          <table:table-cell table:style-name="ce112" office:value-type="string" calcext:value-type="string">
            <text:p>聯繫/一般</text:p>
          </table:table-cell>
          <table:table-cell table:style-name="ce112" office:value-type="float" office:value="5" calcext:value-type="float">
            <text:p>5</text:p>
          </table:table-cell>
          <table:table-cell table:style-name="ce112" office:value-type="string" calcext:value-type="string">
            <text:p>德蕾絲·布魯姆</text:p>
          </table:table-cell>
          <table:table-cell table:style-name="ce112" office:value-type="string" calcext:value-type="string">
            <text:p>1/劇本</text:p>
          </table:table-cell>
          <table:table-cell table:style-name="ce116" office:value-type="string" calcext:value-type="string">
            <text:p>表示德蕾絲‧布魯姆賦予與本部特工同等級的權限，交付了她的隨身保鏢貓頭鷹‧薩傑斯身上帶著的ID芯片。授予的權限涵蓋多方面，如果是UGN影響力能涉及的範圍，有些亂來的請求多少也能被允許。</text:p>
          </table:table-cell>
          <table:table-cell table:style-name="ce116" office:value-type="string" calcext:value-type="string">
            <text:p>你的財產點數+2。</text:p>
          </table:table-cell>
          <table:table-cell table:style-name="ce116" office:value-type="string" calcext:value-type="string">
            <text:p>你進行與UGN相關人員的&lt;交涉&gt;判定前使用，該判定達成值+5。</text:p>
            <text:p>該效果一劇本可以使用一次。</text:p>
          </table:table-cell>
          <table:table-cell table:style-name="ce112" office:value-type="string" calcext:value-type="string">
            <text:p>IA P197</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關聯：玉野椿</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玉野椿</text:p>
          </table:table-cell>
          <table:table-cell table:style-name="ce112" office:value-type="string" calcext:value-type="string">
            <text:p>-</text:p>
          </table:table-cell>
          <table:table-cell table:style-name="ce116" office:value-type="string" calcext:value-type="string">
            <text:p>表示與UGN之子的訓練教官玉野椿協力的關係。經過了無數激戰的她在UGN日本支部中也是屈指可數的實力者。你接受了她的訓練和指導，提高了實力。她教授的不只是戰鬥方式，還包含了如何生存下來、控制背教者病毒等等獨當一面必須的技術。</text:p>
          </table:table-cell>
          <table:table-cell table:style-name="ce116" office:value-type="string" calcext:value-type="string">
            <text:p>你進行的&lt;意志&gt;和&lt;情報：UGN&gt;判定骰數+2個。</text:p>
            <text:p>稀有道具。</text:p>
          </table:table-cell>
          <table:table-cell table:style-name="ce116" office:value-type="string" calcext:value-type="string">
            <text:p>你進行的攻擊，攻擊力+3。</text:p>
          </table:table-cell>
          <table:table-cell table:style-name="ce112" office:value-type="string" calcext:value-type="string">
            <text:p>IA P198</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蜘蛛夾克</text:p>
          </table:table-cell>
          <table:table-cell table:style-name="ce112" office:value-type="string" calcext:value-type="string">
            <text:p>聯繫/防具</text:p>
          </table:table-cell>
          <table:table-cell table:style-name="ce112" office:value-type="float" office:value="25" calcext:value-type="float">
            <text:p>25</text:p>
          </table:table-cell>
          <table:table-cell table:style-name="ce112" office:value-type="string" calcext:value-type="string">
            <text:p>玉野椿</text:p>
          </table:table-cell>
          <table:table-cell table:style-name="ce112" office:value-type="string" calcext:value-type="string">
            <text:p>-</text:p>
          </table:table-cell>
          <table:table-cell table:style-name="ce116" office:value-type="string" calcext:value-type="string">
            <text:p>新開發的特殊織物編成的防彈夾克。參考了玉野椿搜集的數據，合身而不妨礙攻防動作，耐久度非常高，也能像盾一樣地作為妨礙對方攻擊的工具，其性質簡直就像是活著一樣。對於熟知椿習慣的人來說，更是容易使用到不可思議的地步。</text:p>
          </table:table-cell>
          <table:table-cell table:style-name="ce116" office:value-type="string" calcext:value-type="string">
            <text:p>閃避：-2　行動值：-1　裝甲值：6</text:p>
            <text:p>你進行的格擋，格擋值+3。</text:p>
          </table:table-cell>
          <table:table-cell table:style-name="ce116" office:value-type="string" calcext:value-type="string">
            <text:p>你進行的格擋，格擋值額外+5（與通常效果合計+8）。</text:p>
          </table:table-cell>
          <table:table-cell table:style-name="ce112" office:value-type="string" calcext:value-type="string">
            <text:p>IA P198</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蜘蛛絲與隼之劍</text:p>
          </table:table-cell>
          <table:table-cell table:style-name="ce112" office:value-type="string" calcext:value-type="string">
            <text:p>聯繫/一般</text:p>
          </table:table-cell>
          <table:table-cell table:style-name="ce112" office:value-type="float" office:value="40" calcext:value-type="float">
            <text:p>40</text:p>
          </table:table-cell>
          <table:table-cell table:style-name="ce112" office:value-type="string" calcext:value-type="string">
            <text:p>玉野椿 or 高崎隼人</text:p>
          </table:table-cell>
          <table:table-cell table:style-name="ce112" office:value-type="string" calcext:value-type="string">
            <text:p>1/劇本</text:p>
          </table:table-cell>
          <table:table-cell table:style-name="ce116" office:value-type="string" calcext:value-type="string">
            <text:p>請求玉野椿和高崎隼人搭檔協助應援的道具。兩人雖然因為各自的任務而忙碌，卻還是像以往一樣會在同伴面臨絕境時迅速趕到。</text:p>
          </table:table-cell>
          <table:table-cell table:style-name="ce116" office:value-type="string" calcext:value-type="string">
            <text:p>準備階段時使用，該回合間，你進行的攻擊，攻擊力+10，該效果一劇本可以使用一次。</text:p>
          </table:table-cell>
          <table:table-cell table:style-name="ce116" office:value-type="string" calcext:value-type="string">
            <text:p>該效果只能在通常效果生效期間使用，你受到HP傷害前發動，該HP傷害變為0。</text:p>
            <text:p>該效果一劇本可以使用一次。</text:p>
          </table:table-cell>
          <table:table-cell table:style-name="ce112" office:value-type="string" calcext:value-type="string">
            <text:p>IA P198</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關聯：藥王寺結希</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藥王寺結希</text:p>
          </table:table-cell>
          <table:table-cell table:style-name="ce112" office:value-type="string" calcext:value-type="string">
            <text:p>-</text:p>
          </table:table-cell>
          <table:table-cell table:style-name="ce116" office:value-type="string" calcext:value-type="string">
            <text:p>表示你與年紀輕輕便擔任S市支部長的藥王寺結希有所關聯的道具。其實力透過出色的指揮本領和超越支部範圍的活動而廣為人知，其部隊訓練有素的程度在受到頗高評價的同時，亦有著對她的部隊評價不佳的情況存在。究竟是受她本人的緣由影響，還是正因為部隊足夠優秀才招致風言風語呢？無論如何，你正是在她的指揮之下作戰並生還的一員。</text:p>
          </table:table-cell>
          <table:table-cell table:style-name="ce116" office:value-type="string" calcext:value-type="string">
            <text:p>你進行的&lt;情報：UGN&gt;判定，達成值+2。</text:p>
            <text:p>稀有道具。</text:p>
          </table:table-cell>
          <table:table-cell table:style-name="ce116" office:value-type="string" calcext:value-type="string">
            <text:p>你的最大HP+5，若REC是在遊戲過程中才取得而非作為固定Lois存在時，請注意只有最大HP會+5（當前HP不會因HP上限的增長而恢復）。</text:p>
          </table:table-cell>
          <table:table-cell table:style-name="ce112" office:value-type="string" calcext:value-type="string">
            <text:p>IA P198</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S市支部的牽絆</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
            <text:p>藥王寺結希</text:p>
            <text:p>or 檜山ケイト</text:p>
            <text:p>or 上月司</text:p>
            <text:p>or 上月永鬥</text:p>
            <text:p/>
          </table:table-cell>
          <table:table-cell table:style-name="ce112" office:value-type="string" calcext:value-type="string">
            <text:p>1/劇本</text:p>
          </table:table-cell>
          <table:table-cell table:style-name="ce116" office:value-type="string" calcext:value-type="string">
            <text:p>表示你也曾是由藥王寺結希為了對抗襲擊日本的FH的威脅而編成的TroubleSweeper部隊一員的聯繫道具。其成員包含了檜山ケイト、現在已經是身為其他支部的支部長的上月司，以及傳說的暗殺者上月永鬥等人。你在作為其一員活動的過程中，收穫了迅速解決事件的行動力和無可替代的同伴。這些同伴們時至今日也仍然會在你遭遇危機時迅速馳援。</text:p>
          </table:table-cell>
          <table:table-cell table:style-name="ce116" office:value-type="string" calcext:value-type="string">
            <text:p>你的【行動值】+3。</text:p>
          </table:table-cell>
          <table:table-cell table:style-name="ce116" office:value-type="string" calcext:value-type="string">
            <text:p>與任意“從戰鬥不能中回復”的效果一同使用，當你從戰鬥不能狀態中回復後，在原本效果的基礎上額外恢復30點HP。</text:p>
            <text:p>該效果一劇本可以使用一次。</text:p>
          </table:table-cell>
          <table:table-cell table:style-name="ce112" office:value-type="string" calcext:value-type="string">
            <text:p>IA P198</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神崎的遺傳基因</text:p>
          </table:table-cell>
          <table:table-cell table:style-name="ce112" office:value-type="string" calcext:value-type="string">
            <text:p>聯繫/一般</text:p>
          </table:table-cell>
          <table:table-cell table:style-name="ce112" office:value-type="float" office:value="30" calcext:value-type="float">
            <text:p>30</text:p>
          </table:table-cell>
          <table:table-cell table:style-name="ce112" office:value-type="string" calcext:value-type="string">
            <text:p>藥王寺結希</text:p>
          </table:table-cell>
          <table:table-cell table:style-name="ce112" office:value-type="string" calcext:value-type="string">
            <text:p>1/劇本</text:p>
          </table:table-cell>
          <table:table-cell table:style-name="ce116" office:value-type="string" calcext:value-type="string">
            <text:p>表示你的身體接受過謎之手術的聯繫道具。其乃是應用了複製體的技術，使得超越者的異能發揮穩定化的處理。但是，接受了這種技術的背教者病毒會在特定狀況下產生變異。那簡直就像是在改變並引導"命運"一般的，招致荒唐之力的暴走。</text:p>
          </table:table-cell>
          <table:table-cell table:style-name="ce116" office:value-type="string" calcext:value-type="string">
            <text:p>從你取得的異能中選擇一個，使該異能的等級上限無視你的血統，變為其本身記述的最大LV。</text:p>
          </table:table-cell>
          <table:table-cell table:style-name="ce116" office:value-type="string" calcext:value-type="string">
            <text:p>在你的侵蝕率超過99%(達到100%以上)期間的任何時候均可使用，將一個你所取得的異能使用次數+1，效果發揮後，你陷入[不良狀態：暴走]。</text:p>
            <text:p>該效果一劇本可以使用一次。</text:p>
          </table:table-cell>
          <table:table-cell table:style-name="ce112" office:value-type="string" calcext:value-type="string">
            <text:p>IA P198</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關聯：亞修‧雷多利克</text:p>
          </table:table-cell>
          <table:table-cell table:style-name="ce112" office:value-type="string" calcext:value-type="string">
            <text:p>聯繫/關聯</text:p>
          </table:table-cell>
          <table:table-cell table:style-name="ce112" office:value-type="float" office:value="30" calcext:value-type="float">
            <text:p>30</text:p>
          </table:table-cell>
          <table:table-cell table:style-name="ce112" office:value-type="string" calcext:value-type="string">
            <text:p>亞修‧雷多利克</text:p>
          </table:table-cell>
          <table:table-cell table:style-name="ce112" office:value-type="string" calcext:value-type="string">
            <text:p>1/劇本</text:p>
          </table:table-cell>
          <table:table-cell table:style-name="ce116" office:value-type="string" calcext:value-type="string">
            <text:p>表示你與UGN中樞評議員之一，亞修‧雷多利克的聯繫。作為中樞評議員的巨大權力，以及曾經是監察部局長的他自身所擁有的情報力，對UGN內外的種種情況十分瞭解。他帶來的信息會對你有所幫助。可是亞修‧雷多利克從來不是從熱情幫助別人的人物，他的信息，應該會要你以巨大的代價償還吧。</text:p>
          </table:table-cell>
          <table:table-cell table:style-name="ce116" office:value-type="string" calcext:value-type="string">
            <text:p>你進行&lt;情報：UGN&gt;和&lt;情報：黑社會&gt;判定前使用，判定骰數+2個。</text:p>
            <text:p>稀有道具。</text:p>
          </table:table-cell>
          <table:table-cell table:style-name="ce116" office:value-type="string" calcext:value-type="string">
            <text:p>主要動作使用，可以直接向GM發起提問。GM可以拒絕回答，這種情況下不消耗使用次數。</text:p>
            <text:p>該效果一劇本可以使用一次。</text:p>
          </table:table-cell>
          <table:table-cell table:style-name="ce112" office:value-type="string" calcext:value-type="string">
            <text:p>IA P199</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天之火</text:p>
          </table:table-cell>
          <table:table-cell table:style-name="ce112" office:value-type="string" calcext:value-type="string">
            <text:p>聯繫/射擊武器</text:p>
          </table:table-cell>
          <table:table-cell table:style-name="ce112" office:value-type="float" office:value="150" calcext:value-type="float">
            <text:p>150</text:p>
          </table:table-cell>
          <table:table-cell table:style-name="ce112" office:value-type="string" calcext:value-type="string">
            <text:p>亞修‧雷多利克</text:p>
          </table:table-cell>
          <table:table-cell table:style-name="ce112" office:value-type="string" calcext:value-type="string">
            <text:p>1/劇本</text:p>
            <text:p>3/劇本</text:p>
          </table:table-cell>
          <table:table-cell table:style-name="ce116" office:value-type="string" calcext:value-type="string">
            <text:p>UGN所開發，設置在衛星軌道上的巨大激光兵器，可以往地球上任何場所發射。本來是為了殲滅原菌開發的兵器，據說現在使用權由亞修‧雷多利克持有，也是他所能利用的最大王牌。</text:p>
          </table:table-cell>
          <table:table-cell table:style-name="ce116" office:value-type="string" calcext:value-type="string">
            <text:p>技能：&lt;知識：機械工學&gt;  命中：-10  攻擊力：40  格擋值：-  射程：視野</text:p>
            <text:p>你進行的&lt;交涉&gt;判定達成值+10。該武器一劇本中可以使用一次。</text:p>
          </table:table-cell>
          <table:table-cell table:style-name="ce116" office:value-type="string" calcext:value-type="string">
            <text:p>該武器一劇本中可以使用三次而非一次。</text:p>
          </table:table-cell>
          <table:table-cell table:style-name="ce112" office:value-type="string" calcext:value-type="string">
            <text:p>IA P199</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黑筆記</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亞修‧雷多利克</text:p>
          </table:table-cell>
          <table:table-cell table:style-name="ce112" office:value-type="string" calcext:value-type="string">
            <text:p>1/劇本</text:p>
          </table:table-cell>
          <table:table-cell table:style-name="ce116" office:value-type="string" calcext:value-type="string">
            <text:p>記錄亞修‧雷多利克掌握的UGN有關人員檢查內容的筆記本。雖然記載了違反行為的證據和未報告的信息，但亞修表示“因為現在還不應該公開”而隱藏著那些信息。很明顯，它將來會被用作某人的弱點……但筆記中記述的一部分對你的行動也有好處。</text:p>
          </table:table-cell>
          <table:table-cell table:style-name="ce116" office:value-type="string" calcext:value-type="string">
            <text:p>你的財產點數+10。</text:p>
          </table:table-cell>
          <table:table-cell table:style-name="ce116" office:value-type="string" calcext:value-type="string">
            <text:p>準備階段使用，選擇一個在該場景中登場了的角色，你下次對該角色造成的傷害+2D10。</text:p>
            <text:p>該效果一劇本可以使用一次。</text:p>
          </table:table-cell>
          <table:table-cell table:style-name="ce112" office:value-type="string" calcext:value-type="string">
            <text:p>IA P199</text:p>
          </table:table-cell>
          <table:table-cell table:style-name="ce112"/>
          <table:table-cell table:style-name="ce109" table:number-columns-repeated="16"/>
          <table:table-cell table:number-columns-repeated="998"/>
        </table:table-row>
        <table:table-row table:style-name="ro16">
          <table:table-cell table:style-name="ce107" office:value-type="string" calcext:value-type="string">
            <text:p>關聯：阿爾弗雷德·J·考德威爾</text:p>
          </table:table-cell>
          <table:table-cell table:style-name="ce112" office:value-type="string" calcext:value-type="string">
            <text:p>聯繫/關聯</text:p>
          </table:table-cell>
          <table:table-cell table:style-name="ce112" office:value-type="float" office:value="20" calcext:value-type="float">
            <text:p>20</text:p>
          </table:table-cell>
          <table:table-cell table:style-name="ce112" office:value-type="string" calcext:value-type="string">
            <text:p>阿爾弗雷德·J·考德威爾</text:p>
          </table:table-cell>
          <table:table-cell table:style-name="ce112" office:value-type="string" calcext:value-type="string">
            <text:p>1/劇本</text:p>
          </table:table-cell>
          <table:table-cell table:style-name="ce116" office:value-type="string" calcext:value-type="string">
            <text:p>表示你有著與考德威爾博士的聯繫。博士的目的有兩個：破壞UGN，以及對「某物」的搜尋。不知道是因為你符合其目的，還是因為你會造成妨礙，這個謎一般的賢人常常出現在你的面前……仿佛是在測量你的「器量」一樣。</text:p>
          </table:table-cell>
          <table:table-cell table:style-name="ce116" office:value-type="string" calcext:value-type="string">
            <text:p>你進行的&lt;情報：UGN&gt;和&lt;情報：FH&gt;判定的骰數+2個。</text:p>
            <text:p>稀有道具。</text:p>
          </table:table-cell>
          <table:table-cell table:style-name="ce116" office:value-type="string" calcext:value-type="string">
            <text:p>你進行&lt;知識：背教者&gt;前使用，該判定的達成值+10。</text:p>
            <text:p>該效果一劇本可以使用一次。</text:p>
          </table:table-cell>
          <table:table-cell table:style-name="ce112" office:value-type="string" calcext:value-type="string">
            <text:p>IA P199</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使徒之衣</text:p>
          </table:table-cell>
          <table:table-cell table:style-name="ce112" office:value-type="string" calcext:value-type="string">
            <text:p>聯繫/防具</text:p>
          </table:table-cell>
          <table:table-cell table:style-name="ce112" office:value-type="float" office:value="35" calcext:value-type="float">
            <text:p>35</text:p>
          </table:table-cell>
          <table:table-cell table:style-name="ce112" office:value-type="string" calcext:value-type="string">
            <text:p>阿爾弗雷德·J·考德威爾</text:p>
          </table:table-cell>
          <table:table-cell table:style-name="ce112" office:value-type="string" calcext:value-type="string">
            <text:p>-</text:p>
          </table:table-cell>
          <table:table-cell table:style-name="ce116" office:value-type="string" calcext:value-type="string">
            <text:p>在考德威爾博士的私人軍團「使徒」中，只有被選中的存在才會被賦予的白色上衣。不過，因為是勸誘的證明，也存在著即使不是「使徒」也被授予此物的人。有提高穿著者的思緒，將其轉變成堅固的意志和欲望的力量——欲望，就是博士持續尋找著什麼的力量源泉。</text:p>
          </table:table-cell>
          <table:table-cell table:style-name="ce116" office:value-type="string" calcext:value-type="string">
            <text:p>閃避：-1 行動值：-2 裝甲值：-9</text:p>
            <text:p>你進行的&lt;意志&gt;和&lt;RC&gt;判定，達成值+2。</text:p>
          </table:table-cell>
          <table:table-cell table:style-name="ce116" office:value-type="string" calcext:value-type="string">
            <text:p>你進行的&lt;意志&gt;和&lt;RC&gt;判定達成值額外+3（與通常效果合計+5）。</text:p>
          </table:table-cell>
          <table:table-cell table:style-name="ce112" office:value-type="string" calcext:value-type="string">
            <text:p>IA P199</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Index13</text:p>
          </table:table-cell>
          <table:table-cell table:style-name="ce112" office:value-type="string" calcext:value-type="string">
            <text:p>聯繫/一般</text:p>
          </table:table-cell>
          <table:table-cell table:style-name="ce112" office:value-type="float" office:value="50" calcext:value-type="float">
            <text:p>50</text:p>
          </table:table-cell>
          <table:table-cell table:style-name="ce112" office:value-type="string" calcext:value-type="string">
            <text:p>阿爾弗雷德·J·考德威爾</text:p>
          </table:table-cell>
          <table:table-cell table:style-name="ce114" office:value-type="string" calcext:value-type="string">
            <text:p>1/劇本</text:p>
          </table:table-cell>
          <table:table-cell table:style-name="ce117" office:value-type="string" calcext:value-type="string">
            <text:p>考德威爾博士交付給有緣之人，刻著1至13時的謎之懷錶。據說，時間已經接近了該到來的日子。除了考德威爾博士以外，誰也不知道那個什麼時候會發生什麼。雖然指針基本上都是停止的，但有時會不知不覺地突然走動起來。</text:p>
          </table:table-cell>
          <table:table-cell table:style-name="ce116" office:value-type="string" calcext:value-type="string">
            <text:p>你進行的&lt;RC&gt;判定骰數+2個。</text:p>
          </table:table-cell>
          <table:table-cell table:style-name="ce116" office:value-type="string" calcext:value-type="string">
            <text:p>先攻階段使用，你立即執行主要階段，這個主要階段即使是已行動也可以進行，且不會變為已行動，該主要階段結束後，你的侵蝕率+10。</text:p>
            <text:p>該效果一劇本可以使用一次。</text:p>
          </table:table-cell>
          <table:table-cell table:style-name="ce112" office:value-type="string" calcext:value-type="string">
            <text:p>IA P199</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約翰·C·考德威爾</text:p>
          </table:table-cell>
          <table:table-cell table:style-name="ce112" office:value-type="string" calcext:value-type="string">
            <text:p>聯繫/關聯</text:p>
          </table:table-cell>
          <table:table-cell table:style-name="ce112" office:value-type="float" office:value="10" calcext:value-type="float">
            <text:p>10</text:p>
          </table:table-cell>
          <table:table-cell table:style-name="ce112" office:value-type="string" calcext:value-type="string">
            <text:p>約翰·C·考德威爾</text:p>
          </table:table-cell>
          <table:table-cell table:style-name="ce112" office:value-type="string" calcext:value-type="string">
            <text:p>-</text:p>
          </table:table-cell>
          <table:table-cell table:style-name="ce116" office:value-type="string" calcext:value-type="string">
            <text:p>表示你與自稱是考德威爾博士兒子，幽魂之主之一的約翰的聯繫。其與戰鬥狂相稱的存在方式，讓他對許多超越者來說是恐怖的象徵。或許是因為其暴虐的性格，他對強大的對手很執著。不管是敵人還是夥伴，中意的對手絕不會放開。對約翰的這種喜愛，只有抱著不幸的心情來習慣這件事了。</text:p>
          </table:table-cell>
          <table:table-cell table:style-name="ce119" office:value-type="string" calcext:value-type="string">
            <text:p>你進行的&lt;情報：FH&gt;判定骰數+3個。</text:p>
            <text:p>稀有道具。</text:p>
          </table:table-cell>
          <table:table-cell table:style-name="ce116" office:value-type="string" calcext:value-type="string">
            <text:p>你的最大HP+7，你的侵蝕率基本值+2。</text:p>
            <text:p>若REC是在遊戲過程中才取得而非作為固定Lois存在時，最大HP會+7（當前HP不會因HP上限的增長而恢復），侵蝕值+2。</text:p>
          </table:table-cell>
          <table:table-cell table:style-name="ce112" office:value-type="string" calcext:value-type="string">
            <text:p>IA P200</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ε夾克</text:p>
          </table:table-cell>
          <table:table-cell table:style-name="ce112" office:value-type="string" calcext:value-type="string">
            <text:p>聯繫/防具</text:p>
          </table:table-cell>
          <table:table-cell table:style-name="ce112" office:value-type="float" office:value="15" calcext:value-type="float">
            <text:p>15</text:p>
          </table:table-cell>
          <table:table-cell table:style-name="ce112" office:value-type="string" calcext:value-type="string">
            <text:p>約翰·C·考德威爾</text:p>
          </table:table-cell>
          <table:table-cell table:style-name="ce112" office:value-type="string" calcext:value-type="string">
            <text:p>1/劇本</text:p>
          </table:table-cell>
          <table:table-cell table:style-name="ce116" office:value-type="string" calcext:value-type="string">
            <text:p>約翰平時愛穿的白色夾克，有時會送給他中意的對手。使用連約翰操縱的火焰也能耐受的特殊素材製作。因為是用訂做的手工品，保養也很周到，傳達了穿著者的喜愛，穿上後仿彿能體會到他燃燒的鬥志。</text:p>
          </table:table-cell>
          <table:table-cell table:style-name="ce116" office:value-type="string" calcext:value-type="string">
            <text:p>閃避：-1 行動值：-1 裝甲值：5</text:p>
            <text:p>你所（預定）受到的HP傷害-3。</text:p>
          </table:table-cell>
          <table:table-cell table:style-name="ce116" office:value-type="string" calcext:value-type="string">
            <text:p>次要動作使用，取消你受到的所有骰數減少效果。</text:p>
            <text:p>該效果一劇本可以使用一次。</text:p>
          </table:table-cell>
          <table:table-cell table:style-name="ce112" office:value-type="string" calcext:value-type="string">
            <text:p>IA P200</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約翰特選</text:p>
          </table:table-cell>
          <table:table-cell table:style-name="ce112" office:value-type="string" calcext:value-type="string">
            <text:p>聯繫/一般</text:p>
          </table:table-cell>
          <table:table-cell table:style-name="ce112" office:value-type="float" office:value="5" calcext:value-type="float">
            <text:p>5</text:p>
          </table:table-cell>
          <table:table-cell table:style-name="ce112" office:value-type="string" calcext:value-type="string">
            <text:p>約翰·C·考德威爾</text:p>
          </table:table-cell>
          <table:table-cell table:style-name="ce112" office:value-type="string" calcext:value-type="string">
            <text:p>3/劇本</text:p>
            <text:p>1/劇本</text:p>
          </table:table-cell>
          <table:table-cell table:style-name="ce116" office:value-type="string" calcext:value-type="string">
            <text:p>總結了附近甜品評價的神秘筆記本。等級分為一星到三星，沒有和洋區分，寫得非常細緻，其評價確實是值得信賴的內容。如果去買其中評價很高的店鋪的甜品，雖然其表面會吐槽，但嘴角似乎會稍微上揚一點。</text:p>
          </table:table-cell>
          <table:table-cell table:style-name="ce116" office:value-type="string" calcext:value-type="string">
            <text:p>你進行&lt;情報：流言&gt;判定前使用，該判定的達成值+2。</text:p>
            <text:p>該效果一劇本可以使用三次。</text:p>
          </table:table-cell>
          <table:table-cell table:style-name="ce116" office:value-type="string" calcext:value-type="string">
            <text:p>你進行&lt;情報：FH&gt;判定前使用，該判定達成值+5，但你需消耗3點財產點數。</text:p>
            <text:p>該效果一劇本可以使用一次。</text:p>
          </table:table-cell>
          <table:table-cell table:style-name="ce112" office:value-type="string" calcext:value-type="string">
            <text:p>IA P200</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春日恭二</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春日恭二</text:p>
          </table:table-cell>
          <table:table-cell table:style-name="ce112" office:value-type="string" calcext:value-type="string">
            <text:p>1/劇本</text:p>
          </table:table-cell>
          <table:table-cell table:style-name="ce116" office:value-type="string" calcext:value-type="string">
            <text:p>表示你與FH原精英特工春日恭二的聯繫。出身名門春日一族，擁有幹練手腕和值得誇耀的戰鬥經歷的優秀特工——這樣的評價已經完全是過去的事情了。雖然他是個屢敗屢戰的人物，但潛在實力非常高。或許你們有著可說是“孽緣”的關係，但絕不是能夠疏忽大意、輕視對付的對象……大概吧。</text:p>
          </table:table-cell>
          <table:table-cell table:style-name="ce116" office:value-type="string" calcext:value-type="string">
            <text:p>你進行的&lt;情報：FH&gt;判定骰數+2個。</text:p>
            <text:p>稀有道具。</text:p>
          </table:table-cell>
          <table:table-cell table:style-name="ce116" office:value-type="string" calcext:value-type="string">
            <text:p>你進行&lt;情報：FH&gt;判定前使用，判定骰數+3個。</text:p>
            <text:p>該效果一劇本可以使用一次。</text:p>
          </table:table-cell>
          <table:table-cell table:style-name="ce112" office:value-type="string" calcext:value-type="string">
            <text:p>IA P200</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春日大計</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春日恭二</text:p>
          </table:table-cell>
          <table:table-cell table:style-name="ce112" office:value-type="string" calcext:value-type="string">
            <text:p>-</text:p>
          </table:table-cell>
          <table:table-cell table:style-name="ce116" office:value-type="string" calcext:value-type="string">
            <text:p>春日恭二所建立的萬全計劃。雖說乍看也沒有發現什麼巨大的漏洞或是對戰力的過分低估，但就總是讓人產生“肯定有哪裡不能順利進行”的預感。如果是很瞭解春日恭二的人，或許能做到進行對預想以外事態的追蹤也說不定。</text:p>
          </table:table-cell>
          <table:table-cell table:style-name="ce116" office:value-type="string" calcext:value-type="string">
            <text:p>任何時候均可使用，該場景間，你的攻擊力和【行動值】+3，受該效果影響期間，你進行的所有判定暴擊值+2。</text:p>
          </table:table-cell>
          <table:table-cell table:style-name="ce116" office:value-type="string" calcext:value-type="string">
            <text:p>你不會因通常效果而導致暴擊值增加。</text:p>
          </table:table-cell>
          <table:table-cell table:style-name="ce112" office:value-type="string" calcext:value-type="string">
            <text:p>IA P200</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春日一族的妄執</text:p>
          </table:table-cell>
          <table:table-cell table:style-name="ce112" office:value-type="string" calcext:value-type="string">
            <text:p>聯繫/一般</text:p>
          </table:table-cell>
          <table:table-cell table:style-name="ce112" office:value-type="float" office:value="30" calcext:value-type="float">
            <text:p>30</text:p>
          </table:table-cell>
          <table:table-cell table:style-name="ce112" office:value-type="string" calcext:value-type="string">
            <text:p>春日恭二</text:p>
          </table:table-cell>
          <table:table-cell table:style-name="ce112" office:value-type="string" calcext:value-type="string">
            <text:p>1/劇本</text:p>
            <text:p>1/劇本</text:p>
          </table:table-cell>
          <table:table-cell table:style-name="ce116" office:value-type="string" calcext:value-type="string">
            <text:p>表示你作為春日一族的關係者擁有強大意志力的道具。無論春日恭二被打倒多少次，那不滅的生命力和執念都體現出“他來自春日一族”的出身。那個執念有將周圍全都捲入並加以改變的特質。</text:p>
          </table:table-cell>
          <table:table-cell table:style-name="ce116" office:value-type="string" calcext:value-type="string">
            <text:p>你從戰鬥不能中回復時使用，該回合間，你進行的判定的骰數+5個。</text:p>
            <text:p>該效果一劇本可以使用一次。</text:p>
          </table:table-cell>
          <table:table-cell table:style-name="ce116" office:value-type="string" calcext:value-type="string">
            <text:p>你陷入戰鬥不能時使用，解除你的戰鬥不能狀態並將HP回復至1點。</text:p>
            <text:p>該效果一劇本可以使用一次。</text:p>
          </table:table-cell>
          <table:table-cell table:style-name="ce112" office:value-type="string" calcext:value-type="string">
            <text:p>IA P200</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墓守清正</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墓守清正</text:p>
          </table:table-cell>
          <table:table-cell table:style-name="ce112" office:value-type="string" calcext:value-type="string">
            <text:p>1/劇本</text:p>
          </table:table-cell>
          <table:table-cell table:style-name="ce116" office:value-type="string" calcext:value-type="string">
            <text:p>你與FH的"墓碑之主"有著聯繫。他本身就是十分強大的尊主特工，擁有訪問大多數資訊的權限，而他的搭檔“老鼠”也是在信息收集和隱蔽方面十分優秀的特工。得到他們的幫助，即使是機密性很高的情報也能夠入手吧。</text:p>
          </table:table-cell>
          <table:table-cell table:style-name="ce116" office:value-type="string" calcext:value-type="string">
            <text:p>你進行&lt;情報：●●&gt;或&lt;知識：●●&gt;判定後使用，該判定達成值+3。</text:p>
            <text:p>該效果一劇本可以使用一次。</text:p>
            <text:p>稀有道具。</text:p>
          </table:table-cell>
          <table:table-cell table:style-name="ce116" office:value-type="string" calcext:value-type="string">
            <text:p>通常效果的達成值修正，由+3變為+5。此外，當你進行試圖隱蔽某個物件或情報，或進行試圖消除行動痕跡的判定時（所使用的技能請與GM商議），也可以使用該道具。</text:p>
          </table:table-cell>
          <table:table-cell table:style-name="ce112" office:value-type="string" calcext:value-type="string">
            <text:p>IA P201</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LBIA</text:p>
          </table:table-cell>
          <table:table-cell table:style-name="ce112" office:value-type="string" calcext:value-type="string">
            <text:p>聯繫/一般</text:p>
          </table:table-cell>
          <table:table-cell table:style-name="ce112" office:value-type="float" office:value="40" calcext:value-type="float">
            <text:p>40</text:p>
          </table:table-cell>
          <table:table-cell table:style-name="ce112" office:value-type="string" calcext:value-type="string">
            <text:p>墓守清正</text:p>
          </table:table-cell>
          <table:table-cell table:style-name="ce112" office:value-type="string" calcext:value-type="string">
            <text:p>1/劇本</text:p>
          </table:table-cell>
          <table:table-cell table:style-name="ce116" office:value-type="string" calcext:value-type="string">
            <text:p>全名為LookBackInAnger。你曾經和墓守清正協力行動，或是作為敵人交鋒過，接觸了他驚人的執念和生命力，你體內寄宿的背教者病毒變得能夠在緊急時刻發揮特別的力量。該道具表示著“背教者病毒”具有的性質，並非具有實體。</text:p>
          </table:table-cell>
          <table:table-cell table:style-name="ce116" office:value-type="string" calcext:value-type="string">
            <text:p>於你使用Titus效果從戰鬥不能狀態回復時使用，你的HP回復至[【肉體】+25]點，此時可超過你的HP上限，此外，直至場景結束前，你進行的所有判定達成值+1。</text:p>
            <text:p>該效果一劇本可以使用一次。</text:p>
          </table:table-cell>
          <table:table-cell table:style-name="ce116" office:value-type="string" calcext:value-type="string">
            <text:p>通常效果的回復量提升至[【肉體】+40]點，達成值增益從+1提升至+2。</text:p>
          </table:table-cell>
          <table:table-cell table:style-name="ce112" office:value-type="string" calcext:value-type="string">
            <text:p>IA P201</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鼠之牢獄</text:p>
          </table:table-cell>
          <table:table-cell table:style-name="ce112" office:value-type="string" calcext:value-type="string">
            <text:p>聯繫/消耗品</text:p>
          </table:table-cell>
          <table:table-cell table:style-name="ce112" office:value-type="float" office:value="25" calcext:value-type="float">
            <text:p>25</text:p>
          </table:table-cell>
          <table:table-cell table:style-name="ce112" office:value-type="string" calcext:value-type="string">
            <text:p>墓守清正 or 老鼠</text:p>
          </table:table-cell>
          <table:table-cell table:style-name="ce112" office:value-type="string" calcext:value-type="string">
            <text:p>消耗品</text:p>
          </table:table-cell>
          <table:table-cell table:style-name="ce116" office:value-type="string" calcext:value-type="string">
            <text:p>你持有著高級點心工廠“奧林匹斯”生產的超限定方糖——那是一年只生產12個的貴重品。當那方糖被高高舉起時，你將會見識到墓守清正的搭檔“老鼠”真正的能力——《Virtual Light Incognito》。</text:p>
          </table:table-cell>
          <table:table-cell table:style-name="ce116" office:value-type="string" calcext:value-type="string">
            <text:p>任何時候均可使用，以視野內單體作為對象，令其直接從場景退場。若是對象希望的話，其可於下個回合的準備階段時，在其退場時所處的接戰區域重新登場，此外，對象在退場時所受到的效果、不良狀態等不會因為這個退場而解除。</text:p>
          </table:table-cell>
          <table:table-cell table:style-name="ce116" office:value-type="string" calcext:value-type="string">
            <text:p>通常效果的對象變更為「範圍（選擇）」。</text:p>
          </table:table-cell>
          <table:table-cell table:style-name="ce112" office:value-type="string" calcext:value-type="string">
            <text:p>IA P201</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黑須左京</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黑須左京</text:p>
          </table:table-cell>
          <table:table-cell table:style-name="ce112" office:value-type="string" calcext:value-type="string">
            <text:p>-</text:p>
          </table:table-cell>
          <table:table-cell table:style-name="ce116" office:value-type="string" calcext:value-type="string">
            <text:p>與幽魂之主其中之一，黑須左京的連接。比起組織更喜歡個人活動的黑須左京，以獨有的手段進行信息收集，因此有可能持有UGN和FH無法掌握的信息。同時，左京也可能會預測事件，追加有用的信息交付，即使所屬UGN的情況下也可以使用黑須左京的連接。這種情況下，則是以交易的形式向你提供情報。</text:p>
          </table:table-cell>
          <table:table-cell table:style-name="ce116" office:value-type="string" calcext:value-type="string">
            <text:p>你進行的&lt;情報：FH&gt;和&lt;情報：流言&gt;判定骰數+2個。</text:p>
            <text:p>稀有道具。</text:p>
          </table:table-cell>
          <table:table-cell table:style-name="ce116" office:value-type="string" calcext:value-type="string">
            <text:p>你進行的回應動作，達成值+2。</text:p>
          </table:table-cell>
          <table:table-cell table:style-name="ce112" office:value-type="string" calcext:value-type="string">
            <text:p>IA P201</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裂開的眼鏡</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黑須左京</text:p>
          </table:table-cell>
          <table:table-cell table:style-name="ce112" office:value-type="string" calcext:value-type="string">
            <text:p>1/劇本</text:p>
          </table:table-cell>
          <table:table-cell table:style-name="ce116" office:value-type="string" calcext:value-type="string">
            <text:p>黑須左京的眼鏡，鏡片開裂，已經不能作為眼鏡使用了。是在戰鬥中落下的？遺忘在什麼地方？還是你從他手裡接下的？你可以自由決定你是怎麼得到的，至今還未歸還的理由也是自由的。不過黑須左京早已經把眼鏡換成新的了，歸還裂開的眼鏡說不定反而徒增麻煩。</text:p>
          </table:table-cell>
          <table:table-cell table:style-name="ce116" office:value-type="string" calcext:value-type="string">
            <text:p>取得時選擇一項技能，使用所選技能進行的判定，達成值+3。</text:p>
          </table:table-cell>
          <table:table-cell table:style-name="ce116" office:value-type="string" calcext:value-type="string">
            <text:p>任何時候均可使用，取消你受到的[不良狀態：暴走（包括變異暴走）]。</text:p>
            <text:p>該效果一劇本可以使用一次。</text:p>
          </table:table-cell>
          <table:table-cell table:style-name="ce112" office:value-type="string" calcext:value-type="string">
            <text:p>IA P201</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十束劍的斷罪</text:p>
          </table:table-cell>
          <table:table-cell table:style-name="ce112" office:value-type="string" calcext:value-type="string">
            <text:p>聯繫/一般</text:p>
          </table:table-cell>
          <table:table-cell table:style-name="ce112" office:value-type="float" office:value="30" calcext:value-type="float">
            <text:p>30</text:p>
          </table:table-cell>
          <table:table-cell table:style-name="ce112" office:value-type="string" calcext:value-type="string">
            <text:p>黑須左京 or 愛麗莎·托茨卡</text:p>
          </table:table-cell>
          <table:table-cell table:style-name="ce112" office:value-type="string" calcext:value-type="string">
            <text:p>1/劇本</text:p>
          </table:table-cell>
          <table:table-cell table:style-name="ce116" office:value-type="string" calcext:value-type="string">
            <text:p>呼喚處置FH叛徒的【處刑人】艾莉莎，用她那把巨劍將敵人一刀兩斷。通常那把劍只會對著FH的叛徒，不過，對FH的敵人和丟失自豪的超越者等也會毫不留情地揮下。當然，如果你騙了她或是利用了她，以艾莉莎的驕傲來說，下一個被“清掃”的人就是你了吧。</text:p>
          </table:table-cell>
          <table:table-cell table:style-name="ce116" office:value-type="string" calcext:value-type="string">
            <text:p>你進行傷害擲骰前使用，該攻擊造成的傷害+3D10。</text:p>
            <text:p>該效果一劇本可以使用一次。</text:p>
          </table:table-cell>
          <table:table-cell table:style-name="ce116" office:value-type="string" calcext:value-type="string">
            <text:p>通常效果的傷害提升由3D10增加至5D10。</text:p>
          </table:table-cell>
          <table:table-cell table:style-name="ce112" office:value-type="string" calcext:value-type="string">
            <text:p>IA P201</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都築京香</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都築京香</text:p>
          </table:table-cell>
          <table:table-cell table:style-name="ce112" office:value-type="string" calcext:value-type="string">
            <text:p>1/劇本</text:p>
          </table:table-cell>
          <table:table-cell table:style-name="ce116" office:value-type="string" calcext:value-type="string">
            <text:p>表示你與Xenos的領導者都築京香互為協力的關係。生活千年以上的她正是知識的化身，但想要從她口中得到希望的智慧是非常困難的。就算能順利地得到建議，結果也還是會成為被她的計劃所操弄的一部分吧。即便如此，繼續留在這個怪人的身邊還是能夠得到巨大的恩惠。</text:p>
          </table:table-cell>
          <table:table-cell table:style-name="ce116" office:value-type="string" calcext:value-type="string">
            <text:p>你進行的任意&lt;情報：●●&gt;判定前使用，該判定骰數+5個。</text:p>
            <text:p>該效果一劇本可以使用一次。</text:p>
            <text:p>稀有道具。</text:p>
          </table:table-cell>
          <table:table-cell table:style-name="ce116" office:value-type="string" calcext:value-type="string">
            <text:p>你可以於任意判定前發動通常效果來使“判定骰數增加”的效果。</text:p>
          </table:table-cell>
          <table:table-cell table:style-name="ce112" office:value-type="string" calcext:value-type="string">
            <text:p>IA P202</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進化的預兆</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都築京香</text:p>
          </table:table-cell>
          <table:table-cell table:style-name="ce112" office:value-type="string" calcext:value-type="string">
            <text:p>1/劇本</text:p>
            <text:p>1/劇本</text:p>
          </table:table-cell>
          <table:table-cell table:style-name="ce116" office:value-type="string" calcext:value-type="string">
            <text:p>書寫著關於超越者進化的神秘書籍。如果能讀懂沈睡其中的睿智就能夠得到進化，實現所有的願望——但從旁注視著“計劃者”深遠思考的你卻明白，這其實是為了收集實驗體而拋出的誘餌。</text:p>
          </table:table-cell>
          <table:table-cell table:style-name="ce116" office:value-type="string" calcext:value-type="string">
            <text:p>任何時候均可使用，從任意能力值（肉體/感覺/精神/社會）之中選擇一個，該劇本間，你所選擇的能力值+3，你的侵蝕率+30。</text:p>
            <text:p>該效果一劇本中可以使用一次。</text:p>
          </table:table-cell>
          <table:table-cell table:style-name="ce116" office:value-type="string" calcext:value-type="string">
            <text:p>準備階段時使用，從任意能力值（肉體/感覺/精神/社會）之中選擇一個，該場景間，你選擇的能力值額外+3；你的侵蝕率+10。</text:p>
            <text:p>該效果一劇本可以使用一次。</text:p>
          </table:table-cell>
          <table:table-cell table:style-name="ce112" office:value-type="string" calcext:value-type="string">
            <text:p>IA P202</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千年石</text:p>
          </table:table-cell>
          <table:table-cell table:style-name="ce112" office:value-type="string" calcext:value-type="string">
            <text:p>聯繫/一般</text:p>
          </table:table-cell>
          <table:table-cell table:style-name="ce112" office:value-type="float" office:value="25" calcext:value-type="float">
            <text:p>25</text:p>
          </table:table-cell>
          <table:table-cell table:style-name="ce112" office:value-type="string" calcext:value-type="string">
            <text:p>都築京香</text:p>
          </table:table-cell>
          <table:table-cell table:style-name="ce112" office:value-type="string" calcext:value-type="string">
            <text:p>1/回合</text:p>
            <text:p>1/場景</text:p>
          </table:table-cell>
          <table:table-cell table:style-name="ce116" office:value-type="string" calcext:value-type="string">
            <text:p>能使人不老不死的神秘石頭，據說其出身與都築京香有關。這塊石頭有提高持有者生命力的作用，即使只是拿在手上也能緩慢地回復傷口。</text:p>
          </table:table-cell>
          <table:table-cell table:style-name="ce116" office:value-type="string" calcext:value-type="string">
            <text:p>次要動作使用，你的HP恢復2D10點，你的侵蝕率+2。</text:p>
            <text:p>該效果一回合可以使用一次。</text:p>
          </table:table-cell>
          <table:table-cell table:style-name="ce116" office:value-type="string" calcext:value-type="string">
            <text:p>結算階段使用，你的HP恢復5D10點，你的侵蝕率+4。</text:p>
            <text:p>該效果一場景可以使用一次。</text:p>
          </table:table-cell>
          <table:table-cell table:style-name="ce112" office:value-type="string" calcext:value-type="string">
            <text:p>IA P202</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青峰深雪</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青峰深雪</text:p>
          </table:table-cell>
          <table:table-cell table:style-name="ce112" office:value-type="string" calcext:value-type="string">
            <text:p>-</text:p>
          </table:table-cell>
          <table:table-cell table:style-name="ce116" office:value-type="string" calcext:value-type="string">
            <text:p>表示你與出入Xenos的法外特工少女青峰深雪有所聯繫。以前從屬_xffff_FH，經過圍繞“至高天”展開的戰鬥，她擁有的知識不是普通與背教者病毒有關的人能相比的。除了沉睡在Xenos之中的豐富知識以外，藉由過往經歷遇到的人，她也能提供自己所知道的背教者病毒的信息。</text:p>
          </table:table-cell>
          <table:table-cell table:style-name="ce116" office:value-type="string" calcext:value-type="string">
            <text:p>你進行的&lt;情報：Xenos&gt;和&lt;知識：背教者&gt;判定骰數+2個。</text:p>
            <text:p>稀有道具。</text:p>
          </table:table-cell>
          <table:table-cell table:style-name="ce116" office:value-type="string" calcext:value-type="string">
            <text:p>你進行的&lt;情報：Xenos&gt;和&lt;知識：背教者&gt;判定達成值+3。</text:p>
          </table:table-cell>
          <table:table-cell table:style-name="ce112" office:value-type="string" calcext:value-type="string">
            <text:p>IA P202</text:p>
          </table:table-cell>
          <table:table-cell table:style-name="ce112"/>
          <table:table-cell table:style-name="ce109" table:number-columns-repeated="16"/>
          <table:table-cell table:number-columns-repeated="998"/>
        </table:table-row>
        <table:table-row table:style-name="ro9">
          <table:table-cell table:style-name="ce108" office:value-type="string" calcext:value-type="string">
            <text:p>九鬼的援助</text:p>
          </table:table-cell>
          <table:table-cell table:style-name="ce113" office:value-type="string" calcext:value-type="string">
            <text:p>聯繫/一般</text:p>
          </table:table-cell>
          <table:table-cell table:style-name="ce113" office:value-type="float" office:value="10" calcext:value-type="float">
            <text:p>10</text:p>
          </table:table-cell>
          <table:table-cell table:style-name="ce113" office:value-type="string" calcext:value-type="string">
            <text:p>青峰深雪 or 九鬼</text:p>
          </table:table-cell>
          <table:table-cell table:style-name="ce113" office:value-type="string" calcext:value-type="string">
            <text:p>1/劇本</text:p>
          </table:table-cell>
          <table:table-cell table:style-name="ce116" office:value-type="string" calcext:value-type="string">
            <text:p>得到被稱作最強的男人‧九鬼的幫助。他持有的人工智能“忒修斯”所擁有的廣泛知識和九鬼自身的戰鬥力，無論面臨什麼局面都能成為你有力的依靠。現在他從事著保鏢行業，如果是熟人請求，大部分情況都會爽快幫助。特別是有關孩子的案件，幾乎不會被拒絕。</text:p>
          </table:table-cell>
          <table:table-cell table:style-name="ce116" office:value-type="string" calcext:value-type="string">
            <text:p>你進行【肉體】【感覺】【精神】判定前使用，判定骰數+2個。</text:p>
            <text:p>該效果一劇本可以使用一次。</text:p>
          </table:table-cell>
          <table:table-cell table:style-name="ce116" office:value-type="string" calcext:value-type="string">
            <text:p>使用了通常效果來進行攻擊判定時，該攻擊的攻擊力+10。</text:p>
          </table:table-cell>
          <table:table-cell table:style-name="ce112" office:value-type="string" calcext:value-type="string">
            <text:p>IA P202</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朱香的護衛術</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青峰深雪 or 大門寺朱香</text:p>
          </table:table-cell>
          <table:table-cell table:style-name="ce112" office:value-type="string" calcext:value-type="string">
            <text:p>1/劇本</text:p>
          </table:table-cell>
          <table:table-cell table:style-name="ce116" office:value-type="string" calcext:value-type="string">
            <text:p>大門寺朱香直傳的護衛術。如果是深雪的請求，或者是朱香自己友人的委託，無論什麼時候她都願意成為協助訓練的對手吧。或者，你作為大門寺朱香的敵人，說不定已經親身體會過了她的實力。有著什麼特別的因緣的話，熱心的朱香或許會超越組織的藩籬來保護你。</text:p>
          </table:table-cell>
          <table:table-cell table:style-name="ce116" office:value-type="string" calcext:value-type="string">
            <text:p>你進行的格擋，格擋值+3。</text:p>
          </table:table-cell>
          <table:table-cell table:style-name="ce116" office:value-type="string" calcext:value-type="string">
            <text:p>你進行格擋時使用，該格擋的格擋值+10。</text:p>
            <text:p>該效果一劇本可以使用一次。</text:p>
          </table:table-cell>
          <table:table-cell table:style-name="ce112" office:value-type="string" calcext:value-type="string">
            <text:p>IA P202</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鷺乃宮香</text:p>
          </table:table-cell>
          <table:table-cell table:style-name="ce112" office:value-type="string" calcext:value-type="string">
            <text:p>聯繫/關聯</text:p>
          </table:table-cell>
          <table:table-cell table:style-name="ce112" office:value-type="float" office:value="10" calcext:value-type="float">
            <text:p>10</text:p>
          </table:table-cell>
          <table:table-cell table:style-name="ce112" office:value-type="string" calcext:value-type="string">
            <text:p>鷺乃宮香</text:p>
          </table:table-cell>
          <table:table-cell table:style-name="ce112" office:value-type="string" calcext:value-type="string">
            <text:p>1/劇本</text:p>
          </table:table-cell>
          <table:table-cell table:style-name="ce116" office:value-type="string" calcext:value-type="string">
            <text:p>表示你與鷺乃宮香有所關聯。僅僅是“你與鷺乃宮家的家主有所交情”一事，便足以在各個業界具備影響力。此外，你也可以透過阿香來獲取（對於阿香來說）微不足道的支援。</text:p>
          </table:table-cell>
          <table:table-cell table:style-name="ce116" office:value-type="string" calcext:value-type="string">
            <text:p>你使用[關聯：對要人的恩情]進行判定時，骰數+2個（合計+5個）。</text:p>
            <text:p>稀有道具。</text:p>
          </table:table-cell>
          <table:table-cell table:style-name="ce116" office:value-type="string" calcext:value-type="string">
            <text:p>你進行&lt;籌措&gt;判定前使用，該判定的達成值+10。</text:p>
            <text:p>該效果一劇本可以使用一次。</text:p>
          </table:table-cell>
          <table:table-cell table:style-name="ce112" office:value-type="string" calcext:value-type="string">
            <text:p>IA P203</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鷺乃宮家特製女僕裝</text:p>
          </table:table-cell>
          <table:table-cell table:style-name="ce112" office:value-type="string" calcext:value-type="string">
            <text:p>聯繫/防具</text:p>
          </table:table-cell>
          <table:table-cell table:style-name="ce112" office:value-type="float" office:value="20" calcext:value-type="float">
            <text:p>20</text:p>
          </table:table-cell>
          <table:table-cell table:style-name="ce112" office:value-type="string" calcext:value-type="string">
            <text:p>鷺乃宮香</text:p>
          </table:table-cell>
          <table:table-cell table:style-name="ce112" office:value-type="string" calcext:value-type="string">
            <text:p>-</text:p>
          </table:table-cell>
          <table:table-cell table:style-name="ce116" office:value-type="string" calcext:value-type="string">
            <text:p>發配給鷺乃宮家部分女僕的特殊女僕裝，也存在著男性用的管家服。是為鷺乃宮家傭之中擔當保鏢者所備之物；若是有誰在你面前受傷，那便無異於使鷺乃宮家顏面掃地吧。</text:p>
          </table:table-cell>
          <table:table-cell table:style-name="ce116" office:value-type="string" calcext:value-type="string">
            <text:p>閃避：0 行動值：-1 裝甲值：7</text:p>
            <text:p>你進行掩護時，該防具視為[裝甲值：20]來進行傷害計算。</text:p>
          </table:table-cell>
          <table:table-cell table:style-name="ce116" office:value-type="string" calcext:value-type="string">
            <text:p>你進行掩護時，不會因為此次掩護的攻擊而受到不良狀態。</text:p>
          </table:table-cell>
          <table:table-cell table:style-name="ce112" office:value-type="string" calcext:value-type="string">
            <text:p>IA P203</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阿香和陽光小夥伴</text:p>
          </table:table-cell>
          <table:table-cell table:style-name="ce112" office:value-type="string" calcext:value-type="string">
            <text:p>聯繫/一般</text:p>
          </table:table-cell>
          <table:table-cell table:style-name="ce112" office:value-type="float" office:value="30" calcext:value-type="float">
            <text:p>30</text:p>
          </table:table-cell>
          <table:table-cell table:style-name="ce112" office:value-type="string" calcext:value-type="string">
            <text:p>鷺乃宮香 or 藤堂林琳花 or 藤堂鬥月 or 雲雀風見</text:p>
          </table:table-cell>
          <table:table-cell table:style-name="ce112" office:value-type="string" calcext:value-type="string">
            <text:p>1/劇本</text:p>
          </table:table-cell>
          <table:table-cell table:style-name="ce116" office:value-type="string" calcext:value-type="string">
            <text:p>表示你與鷺乃宮香與其夥伴們——藤堂凜凜花、藤堂鬥月、雲雀風見等人——是朋友一事。</text:p>
          </table:table-cell>
          <table:table-cell table:style-name="ce116" office:value-type="string" calcext:value-type="string">
            <text:p>準備階段使用，該回合間，你和該場景間登場的任意角色進行的判定，骰數+3個。</text:p>
            <text:p>該效果只有在舞臺為白鷺市，或是GM允許使用時才能生效，一劇本可以使用一次。</text:p>
          </table:table-cell>
          <table:table-cell table:style-name="ce116" office:value-type="string" calcext:value-type="string">
            <text:p>【強化效果1】受通常效果影響中的角色進行的傷害擲骰+3D10，所受到的HP傷害-3D10。</text:p>
            <text:p>【強化效果2】該效果只能於取得了所有該道具「REC」角色為Lois時生效。受通常效果影響中的角色進行的攻擊判定，暴擊值-1。</text:p>
          </table:table-cell>
          <table:table-cell table:style-name="ce112" office:value-type="string" calcext:value-type="string">
            <text:p>IA P203</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芬·布思羅伊德</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芬·布思羅伊德</text:p>
          </table:table-cell>
          <table:table-cell table:style-name="ce112" office:value-type="string" calcext:value-type="string">
            <text:p>1/劇本</text:p>
          </table:table-cell>
          <table:table-cell table:style-name="ce116" office:value-type="string" calcext:value-type="string">
            <text:p>你與原MI6情報部隊成員芬·布思羅伊德有所關聯。通過他所介紹的豐富人脈，想必你也能通過最佳方式來進行調查了吧。</text:p>
          </table:table-cell>
          <table:table-cell table:style-name="ce116" office:value-type="string" calcext:value-type="string">
            <text:p>場景中登場的任一角色進行情報收集或是購入判定前使用，該判定的達成值+5。</text:p>
            <text:p>該道具可以和其他「種類：關聯」道具同時使用，該效果一劇本可以使用一次。</text:p>
            <text:p>稀有道具。</text:p>
          </table:table-cell>
          <table:table-cell table:style-name="ce116" office:value-type="string" calcext:value-type="string">
            <text:p>通常效果的達成值修正變為+10，受該效果影響的角色判定失敗時，不會消耗通常效果的使用次數。</text:p>
          </table:table-cell>
          <table:table-cell table:style-name="ce112" office:value-type="string" calcext:value-type="string">
            <text:p>IA P203</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S器具</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芬·布思羅伊德</text:p>
          </table:table-cell>
          <table:table-cell table:style-name="ce112" office:value-type="string" calcext:value-type="string">
            <text:p>1/劇本</text:p>
          </table:table-cell>
          <table:table-cell table:style-name="ce116" office:value-type="string" calcext:value-type="string">
            <text:p>你持有芬·布思羅伊德的發明品，其發明品向來有著很高的質量，但有時也會因服役時代的舊習作祟，無視可用性地製造出一些詭妙的器具，你所持的，正是那種器具的其中之一。</text:p>
          </table:table-cell>
          <table:table-cell table:style-name="ce116" office:value-type="string" calcext:value-type="string">
            <text:p>選擇一件你所常備化的道具（關聯道具除外），從以下兩種效果中選擇其中之一：</text:p>
            <text:p>【1】判定骰數+2個</text:p>
            <text:p>【2】傷害擲骰+2D10</text:p>
            <text:p>你進行判定或傷害擲骰前使用，使用後，你的侵蝕率+3，且該道具會被破壞。</text:p>
            <text:p>該效果一劇本可以使用一次。</text:p>
          </table:table-cell>
          <table:table-cell table:style-name="ce116" office:value-type="string" calcext:value-type="string">
            <text:p>將通常效果提升為：</text:p>
            <text:p>【1】判定骰數+4個</text:p>
            <text:p>【2】傷害擲骰+4D10</text:p>
          </table:table-cell>
          <table:table-cell table:style-name="ce112" office:value-type="string" calcext:value-type="string">
            <text:p>IA P203</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神話魔方</text:p>
          </table:table-cell>
          <table:table-cell table:style-name="ce112" office:value-type="string" calcext:value-type="string">
            <text:p>聯繫/一般</text:p>
          </table:table-cell>
          <table:table-cell table:style-name="ce112" office:value-type="float" office:value="100" calcext:value-type="float">
            <text:p>100</text:p>
          </table:table-cell>
          <table:table-cell table:style-name="ce112" office:value-type="string" calcext:value-type="string">
            <text:p>芬·布思羅伊德</text:p>
          </table:table-cell>
          <table:table-cell table:style-name="ce112" office:value-type="string" calcext:value-type="string">
            <text:p>-</text:p>
          </table:table-cell>
          <table:table-cell table:style-name="ce116" office:value-type="string" calcext:value-type="string">
            <text:p>你從芬·布思羅伊德處接受了超古代文明的“遺產”的託付，那是他于年輕時發現，並一直以未解析狀態保管著的物品，其形狀為漆黑的立方體，尺寸為能放置於手掌上的大小，無論使用什麼手段都無法將其破壞。</text:p>
          </table:table-cell>
          <table:table-cell table:style-name="ce116" office:value-type="string" calcext:value-type="string">
            <text:p>你使用與「D-lois：起源種」相同的侵蝕率效果表；若已經取得了“起源種”作為D-lois，則使各階段的異能等級加成+1（即，侵蝕率為0~79%時異能等級+1，80~99%時異能等級+2，以此類推），你的侵蝕率基本值+3。</text:p>
          </table:table-cell>
          <table:table-cell table:style-name="ce116" office:value-type="string" calcext:value-type="string">
            <text:p>【強化效果1】各階段的異能等級加成額外+1，你的侵蝕率基本值從+3提升至+6。</text:p>
            <text:p>【強化效果2】回歸結果確定你會變為原菌時自動生效，你不會變為原菌，而是立即死亡，屍體會在數秒後分解消失。</text:p>
          </table:table-cell>
          <table:table-cell table:style-name="ce112" office:value-type="string" calcext:value-type="string">
            <text:p>IA P203</text:p>
          </table:table-cell>
          <table:table-cell table:style-name="ce112"/>
          <table:table-cell table:style-name="ce109" table:number-columns-repeated="16"/>
          <table:table-cell table:number-columns-repeated="998"/>
        </table:table-row>
        <table:table-row table:style-name="ro9">
          <table:table-cell table:style-name="ce107" office:value-type="string" calcext:value-type="string">
            <text:p>關聯：羅薩·巴斯克維爾</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羅薩·巴斯克維爾</text:p>
          </table:table-cell>
          <table:table-cell table:style-name="ce112" office:value-type="string" calcext:value-type="string">
            <text:p>1/劇本</text:p>
          </table:table-cell>
          <table:table-cell table:style-name="ce116" office:value-type="string" calcext:value-type="string">
            <text:p>表示你與UGN日本支部副支部長兼監察官羅薩·巴斯克維爾有所關聯，她被稱為“異端審問官”的氣場也對你有所影響。</text:p>
          </table:table-cell>
          <table:table-cell table:style-name="ce116" office:value-type="string" calcext:value-type="string">
            <text:p>你進行&lt;情報：UGN&gt;前使用，該判定達成值+2。</text:p>
            <text:p>稀有道具。</text:p>
          </table:table-cell>
          <table:table-cell table:style-name="ce116" office:value-type="string" calcext:value-type="string">
            <text:p>準備階段使用，選擇場景內登場的任意角色為對象，該回合間對象使用主要動作進行的判定骰數-3個。</text:p>
            <text:p>該效果一劇本可以使用一次。</text:p>
          </table:table-cell>
          <table:table-cell table:style-name="ce112" office:value-type="string" calcext:value-type="string">
            <text:p>IA P204</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審問官的刻印</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羅薩·巴斯克維爾</text:p>
          </table:table-cell>
          <table:table-cell table:style-name="ce112" office:value-type="string" calcext:value-type="string">
            <text:p>1/場景</text:p>
          </table:table-cell>
          <table:table-cell table:style-name="ce116" office:value-type="string" calcext:value-type="string">
            <text:p>表示你接受了羅薩·巴斯克維爾特殊命令的REC道具，她會將監察任務的一部分以密令的形式交由其他特工代行，作為接受任務的證明，你的身份證或裝備上會被授予薔薇刻印，可以根據你的意志隱藏或浮現。</text:p>
          </table:table-cell>
          <table:table-cell table:style-name="ce116" office:value-type="string" calcext:value-type="string">
            <text:p>任何時候都可以使用，該場景間你進行的攻擊，攻擊力+5。</text:p>
            <text:p>該效果一場景可以使用一次。</text:p>
          </table:table-cell>
          <table:table-cell table:style-name="ce116" office:value-type="string" calcext:value-type="string">
            <text:p>你使用通常效果期間進行攻擊的攻擊力額外+5，但該效果僅對身份或本職為[UGN]相關的角色生效，具體由GM決定。</text:p>
          </table:table-cell>
          <table:table-cell table:style-name="ce112" office:value-type="string" calcext:value-type="string">
            <text:p>IA P204</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上級監察權限</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羅薩·巴斯克維爾</text:p>
          </table:table-cell>
          <table:table-cell table:style-name="ce112" office:value-type="string" calcext:value-type="string">
            <text:p>1/劇本</text:p>
            <text:p>1/劇本</text:p>
          </table:table-cell>
          <table:table-cell table:style-name="ce116" office:value-type="string" calcext:value-type="string">
            <text:p>監察官擁有的抑制權限，不服從時最壞會受到拘束處分，身為日本支部監察官、原本部特工的羅薩的監察令許多特工感到恐懼，尤其是其排除感情論徹底的追擊被人稱為“巴斯克維爾的剃刀”。</text:p>
          </table:table-cell>
          <table:table-cell table:style-name="ce116" office:value-type="string" calcext:value-type="string">
            <text:p>你進行&lt;情報：UGN&gt;前使用，該判定達成值+10。</text:p>
            <text:p>該效果一劇本可以使用一次。</text:p>
          </table:table-cell>
          <table:table-cell table:style-name="ce116" office:value-type="string" calcext:value-type="string">
            <text:p>將通常效果改變如下：</text:p>
            <text:p>職業或本職為[UGN]相關的角色（具體由GM決定）進行判定前使用，使其該判定骰數-10個。</text:p>
            <text:p>該效果一劇本可以使用一次。</text:p>
          </table:table-cell>
          <table:table-cell table:style-name="ce112" office:value-type="string" calcext:value-type="string">
            <text:p>IA P204</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藤崎弦一</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藤崎弦一</text:p>
          </table:table-cell>
          <table:table-cell table:style-name="ce112" office:value-type="string" calcext:value-type="string">
            <text:p>1/劇本</text:p>
          </table:table-cell>
          <table:table-cell table:style-name="ce116" office:value-type="string" calcext:value-type="string">
            <text:p>表示你與本部特工藤崎弦一有所關聯，從屬本部的他為了監察支援各支部輾轉各地，如有必要則會派遣“值得信賴”的特工代替自己。因其任務大多是緊急案件，他（和他身邊的人）必然需要迅速做出判斷。</text:p>
          </table:table-cell>
          <table:table-cell table:style-name="ce116" office:value-type="string" calcext:value-type="string">
            <text:p>你進行&lt;情報：UGN&gt;前使用，判定骰數+2個。</text:p>
            <text:p>稀有道具。</text:p>
          </table:table-cell>
          <table:table-cell table:style-name="ce116" office:value-type="string" calcext:value-type="string">
            <text:p>準備階段使用，選擇場景內登場你以外的任意角色為對象，該回合間對象行動值+3，對象可以拒絕該效果。</text:p>
            <text:p>該效果一劇本可以使用一次。</text:p>
          </table:table-cell>
          <table:table-cell table:style-name="ce112" office:value-type="string" calcext:value-type="string">
            <text:p>IA P204</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清掃通行證</text:p>
          </table:table-cell>
          <table:table-cell table:style-name="ce112" office:value-type="string" calcext:value-type="string">
            <text:p>聯繫/防具</text:p>
          </table:table-cell>
          <table:table-cell table:style-name="ce112" office:value-type="float" office:value="15" calcext:value-type="float">
            <text:p>15</text:p>
          </table:table-cell>
          <table:table-cell table:style-name="ce112" office:value-type="string" calcext:value-type="string">
            <text:p>藤崎弦一、高崎隼人</text:p>
          </table:table-cell>
          <table:table-cell table:style-name="ce112" office:value-type="string" calcext:value-type="string">
            <text:p>-</text:p>
          </table:table-cell>
          <table:table-cell table:style-name="ce116" office:value-type="string" calcext:value-type="string">
            <text:p>表示身為藤崎弦一部下的制服夾克，也是為了彰顯本部支援而特別製作的（也可以是藤崎直屬特工送來的）。以特別紡織技術織入的部隊章，在各國的支部進行移動、連攜時，可以代替通行證使用。不過因為過於庸俗的設計，不少穿戴者表達過不滿，但擅自改造會招來藤崎的嚴密注意。</text:p>
          </table:table-cell>
          <table:table-cell table:style-name="ce116" office:value-type="string" calcext:value-type="string">
            <text:p>閃避：0 行動值：0 裝甲值：7</text:p>
            <text:p>你進行【社會】判定骰數+1個，該效果在戰鬥中無效。</text:p>
          </table:table-cell>
          <table:table-cell table:style-name="ce116" office:value-type="string" calcext:value-type="string">
            <text:p>你進行的【社會】判定骰數額外+2（即，與通常效果合計後+3），該效果在戰鬥中無效。</text:p>
          </table:table-cell>
          <table:table-cell table:style-name="ce112" office:value-type="string" calcext:value-type="string">
            <text:p>IA P204</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古舊的照片</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藤崎弦一、霧谷雄吾</text:p>
          </table:table-cell>
          <table:table-cell table:style-name="ce112" office:value-type="string" calcext:value-type="string">
            <text:p>1/場景</text:p>
          </table:table-cell>
          <table:table-cell table:style-name="ce116" office:value-type="string" calcext:value-type="string">
            <text:p>聚集了UGN日本支部成立時主要人物的照片，同樣拍到了年輕時的霧穀和藤崎。給藤崎看後他會一邊走一邊跟你談起曾經的日常與前輩的教導，但也有人說其中包含機密情報最好處理掉。</text:p>
          </table:table-cell>
          <table:table-cell table:style-name="ce116" office:value-type="string" calcext:value-type="string">
            <text:p>你進行的&lt;意志&gt;判定，達成值+3。</text:p>
          </table:table-cell>
          <table:table-cell table:style-name="ce116" office:value-type="string" calcext:value-type="string">
            <text:p>你以外的角色進行傷害擲骰前使用，該攻擊傷害+[你的【精神】]。</text:p>
            <text:p>該效果一場景可以使用一次。</text:p>
          </table:table-cell>
          <table:table-cell table:style-name="ce112" office:value-type="string" calcext:value-type="string">
            <text:p>IA P204</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姬宮由裡香</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姬宮由裡香</text:p>
          </table:table-cell>
          <table:table-cell table:style-name="ce112" office:value-type="string" calcext:value-type="string">
            <text:p>-</text:p>
          </table:table-cell>
          <table:table-cell table:style-name="ce116" office:value-type="string" calcext:value-type="string">
            <text:p>表示你與姬宮由裡香有所關聯，她是UGN日本支部R實驗室的研究怪人。眾所周知，雖然她所屬的日本支部R實驗室實行著連人體實驗也可以積極進行的過激方針，但至少她不是那種實驗不獲得同意也要強行推進的過激人物；雖然也無法否定她有“只要獲得同意，隨便什麼實驗都能做”這種想法就是了。</text:p>
          </table:table-cell>
          <table:table-cell table:style-name="ce116" office:value-type="string" calcext:value-type="string">
            <text:p>你進行&lt;情報：UGN&gt;和&lt;知識：背教者&gt;判定前使用，判定骰數+1個。</text:p>
            <text:p>稀有道具。</text:p>
          </table:table-cell>
          <table:table-cell table:style-name="ce116" office:value-type="string" calcext:value-type="string">
            <text:p>你進行&lt;知識：背教者&gt;前使用，該判定骰數額外+3個，使用該效果時，你的侵蝕率+3。</text:p>
          </table:table-cell>
          <table:table-cell table:style-name="ce112" office:value-type="string" calcext:value-type="string">
            <text:p>IA P205</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豔花的誘惑</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姬宮由裡香</text:p>
          </table:table-cell>
          <table:table-cell table:style-name="ce112" office:value-type="string" calcext:value-type="string">
            <text:p>-</text:p>
          </table:table-cell>
          <table:table-cell table:style-name="ce116" office:value-type="string" calcext:value-type="string">
            <text:p>表示姬宮由裡香持有的謎之交涉力的道具。作為象徵她的傳說經歷，她從名門姬宮家出走，隻身加入UGN成為研究者，直至當今構築起現在的地位。身為名門出身的她，在作為研究者的同時，還很擅長組織內部的政治交涉。根據交涉情況來看，只要利害一致，她就能成為非常可靠的同伴。</text:p>
          </table:table-cell>
          <table:table-cell table:style-name="ce116" office:value-type="string" calcext:value-type="string">
            <text:p>你的常備化點數+5。</text:p>
          </table:table-cell>
          <table:table-cell table:style-name="ce116" office:value-type="string" calcext:value-type="string">
            <text:p>你進行的&lt;交涉&gt;判定達成值+3。</text:p>
          </table:table-cell>
          <table:table-cell table:style-name="ce112" office:value-type="string" calcext:value-type="string">
            <text:p>IA P205</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博士的異常熱愛</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姬宮由裡香</text:p>
          </table:table-cell>
          <table:table-cell table:style-name="ce112" office:value-type="string" calcext:value-type="string">
            <text:p>1/劇本</text:p>
          </table:table-cell>
          <table:table-cell table:style-name="ce116" office:value-type="string" calcext:value-type="string">
            <text:p>表示你是姬宮由裡香手中的試驗體的道具。對於向研究傾注心血的她來說，只有少數人能引起她的興趣：實驗體，以及她自己。只要你需要力量，這份關係就對雙方有利。現在正是你需要她的知識、她需要你的身體之時。</text:p>
          </table:table-cell>
          <table:table-cell table:style-name="ce116" office:value-type="string" calcext:value-type="string">
            <text:p>你的HP最大值+10，侵蝕率基本值+4。</text:p>
          </table:table-cell>
          <table:table-cell table:style-name="ce116" office:value-type="string" calcext:value-type="string">
            <text:p>任何時候都可以使用，你取得的[一場景可以使用X次]的異能使用次數+1。</text:p>
            <text:p>該效果一劇本可以使用一次。</text:p>
          </table:table-cell>
          <table:table-cell table:style-name="ce112" office:value-type="string" calcext:value-type="string">
            <text:p>IA P205</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千城寺薰</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千城寺薰</text:p>
          </table:table-cell>
          <table:table-cell table:style-name="ce112" office:value-type="string" calcext:value-type="string">
            <text:p>-</text:p>
          </table:table-cell>
          <table:table-cell table:style-name="ce116" office:value-type="string" calcext:value-type="string">
            <text:p>表示你與UGN特工兼研究者的千城寺薰有所關聯，他是與德蕾絲·布魯姆評議員站在相近立場的特工，也是在背教者相關知識上進行輔佐的，如同觀測者般的存在。與德蕾絲評議員帶來的重要案件相關的他，在UGN內部持有非常稀少的數據。雖然其奇妙的言行很受人矚目，但不用懷疑其知識的重要性。</text:p>
          </table:table-cell>
          <table:table-cell table:style-name="ce116" office:value-type="string" calcext:value-type="string">
            <text:p>你進行&lt;情報：UGN&gt;和&lt;知識：背教者&gt;前使用，判定骰數+1個。</text:p>
            <text:p>稀有道具。</text:p>
          </table:table-cell>
          <table:table-cell table:style-name="ce116" office:value-type="string" calcext:value-type="string">
            <text:p>你進行&lt;知識：背教者&gt;前使用，該判定達成值+1D10，使用該效果時，你的侵蝕率+3。</text:p>
          </table:table-cell>
          <table:table-cell table:style-name="ce112" office:value-type="string" calcext:value-type="string">
            <text:p>IA P205</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聖喬治之城</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千城寺薰</text:p>
          </table:table-cell>
          <table:table-cell table:style-name="ce112" office:value-type="string" calcext:value-type="string">
            <text:p>1/劇本</text:p>
          </table:table-cell>
          <table:table-cell table:style-name="ce116" office:value-type="string" calcext:value-type="string">
            <text:p>表示千城寺薰持有的謎之資金和人手後援。支持著作為研究者的薰下場行動的，便是其雄厚資金和能從任何地方出現的研究人員們。據說他們是連德蕾絲也不清楚的，來自薰本人的資產；如此充滿謎團的後援，他本人聲稱是從“聖喬治之城”來的，實際真相不明。</text:p>
          </table:table-cell>
          <table:table-cell table:style-name="ce116" office:value-type="string" calcext:value-type="string">
            <text:p>你與該場景中登場的任意角色進行的判定，骰數+3個，該效果在戰鬥中無效。</text:p>
            <text:p>該效果一劇本可以使用一次。</text:p>
          </table:table-cell>
          <table:table-cell table:style-name="ce116" office:value-type="string" calcext:value-type="string">
            <text:p>在通常效果基礎上，你與該場景中登場的角色的HP回復3D10點。</text:p>
          </table:table-cell>
          <table:table-cell table:style-name="ce112" office:value-type="string" calcext:value-type="string">
            <text:p>IA P205</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閃耀小宇宙</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千城寺薰</text:p>
          </table:table-cell>
          <table:table-cell table:style-name="ce112" office:value-type="string" calcext:value-type="string">
            <text:p>1/劇本</text:p>
          </table:table-cell>
          <table:table-cell table:style-name="ce116" office:value-type="string" calcext:value-type="string">
            <text:p>由千城寺薰親辦的能力分析。對他來說，找出超越者隱藏的素質與異能傾向是一眼便能看穿的順便之事，雖然實際在現場見他定評的樣子時難以想像，但其診斷結果即使在UGN內部也是出類拔萃的精確。雖然很多受驗者記不太清，但他們都說“仿佛看到了小宇宙”。</text:p>
          </table:table-cell>
          <table:table-cell table:style-name="ce116" office:value-type="string" calcext:value-type="string">
            <text:p>你為了決定異能效果而進行判定後使用，使其中一個擲骰點數變為1或10。</text:p>
            <text:p>該效果一劇本可以使用一次。</text:p>
          </table:table-cell>
          <table:table-cell table:style-name="ce116" office:value-type="string" calcext:value-type="string">
            <text:p>使用通常效果時，你最多可以選擇三個擲骰點數變為1或10。</text:p>
          </table:table-cell>
          <table:table-cell table:style-name="ce112" office:value-type="string" calcext:value-type="string">
            <text:p>IA P205</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天船巴</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天船巴</text:p>
          </table:table-cell>
          <table:table-cell table:style-name="ce112" office:value-type="string" calcext:value-type="string">
            <text:p>-</text:p>
          </table:table-cell>
          <table:table-cell table:style-name="ce116" office:value-type="string" calcext:value-type="string">
            <text:p>表示你與天船巴有所關聯。對身為尊主特工陰謀家的她來說，萬物只有利用與排除兩條路。儘管這樣的人作為協助者是個過於危險的存在，但其影響力無法估量；要與她建立關聯的話最好不要深入——當然這都是以“還沒有太晚”為前提的話了。</text:p>
          </table:table-cell>
          <table:table-cell table:style-name="ce116" office:value-type="string" calcext:value-type="string">
            <text:p>你進行&lt;情報：FH&gt;判定前使用，該判定骰數+2個。</text:p>
            <text:p>稀有道具。</text:p>
          </table:table-cell>
          <table:table-cell table:style-name="ce116" office:value-type="string" calcext:value-type="string">
            <text:p>將通常效果變更如下：</text:p>
            <text:p>你進行【社會】判定前使用，判定骰數+2個，你的侵蝕率基本值+6。</text:p>
          </table:table-cell>
          <table:table-cell table:style-name="ce112" office:value-type="string" calcext:value-type="string">
            <text:p>IA P206</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惡德的榮耀</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天船巴</text:p>
          </table:table-cell>
          <table:table-cell table:style-name="ce112" office:value-type="string" calcext:value-type="string">
            <text:p>-</text:p>
          </table:table-cell>
          <table:table-cell table:style-name="ce116" office:value-type="string" calcext:value-type="string">
            <text:p>表示你受到黑幕之主謀略影響，你曾從旁目擊過她的行事手段，其結果便是你理解了弱肉強食的哲學，邪惡的思想正在慢慢侵蝕你的人生觀，不知何時你就會淪為與她相似的外道。</text:p>
          </table:table-cell>
          <table:table-cell table:style-name="ce116" office:value-type="string" calcext:value-type="string">
            <text:p>你的常備化點數+3。</text:p>
          </table:table-cell>
          <table:table-cell table:style-name="ce116" office:value-type="string" calcext:value-type="string">
            <text:p>你的HP最大值和行動值+5，侵蝕率基本值+4。</text:p>
          </table:table-cell>
          <table:table-cell table:style-name="ce112" office:value-type="string" calcext:value-type="string">
            <text:p>IA P206</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美德的不幸</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天船巴</text:p>
          </table:table-cell>
          <table:table-cell table:style-name="ce112" office:value-type="string" calcext:value-type="string">
            <text:p>1/劇本</text:p>
          </table:table-cell>
          <table:table-cell table:style-name="ce116" office:value-type="string" calcext:value-type="string">
            <text:p>表示你被掌握了某些弱點而無法違抗天船巴，這個弱點可能是情報或人質，不過你依然在等待著起死回生的機會，這樣的執著維繫著你的生命。</text:p>
          </table:table-cell>
          <table:table-cell table:style-name="ce116" office:value-type="string" calcext:value-type="string">
            <text:p>選擇一個你已取得的除天船巴以外的Lois，該Lois被Titus化時，你的侵蝕率+1D10。</text:p>
          </table:table-cell>
          <table:table-cell table:style-name="ce116" office:value-type="string" calcext:value-type="string">
            <text:p>你受到HP回復效果時使用，該效果+20。</text:p>
            <text:p>該效果只能在取得通常效果中指定的Lois期間使用，該效果一劇本可以使用一次。</text:p>
          </table:table-cell>
          <table:table-cell table:style-name="ce112" office:value-type="string" calcext:value-type="string">
            <text:p>IA P206</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織戶靜馬</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織戶靜馬</text:p>
          </table:table-cell>
          <table:table-cell table:style-name="ce112" office:value-type="string" calcext:value-type="string">
            <text:p>-</text:p>
          </table:table-cell>
          <table:table-cell table:style-name="ce116" office:value-type="string" calcext:value-type="string">
            <text:p>表示你和無雙暗殺者、FH法外者、“屠殺”織戶靜馬有所關聯，傳說他在成為超越者以前曾經徒手殺死原菌，在UGN內部有“一旦遭遇，立刻撤退”命令的傳說級別危險人物，而與他緊密關聯的你，即便不想也聽說過他在黑社會的動向，而其達人般的技巧，更是烙印在你的腦中。</text:p>
          </table:table-cell>
          <table:table-cell table:style-name="ce116" office:value-type="string" calcext:value-type="string">
            <text:p>你進行&lt;情報：黑社會&gt;判定前使用，該判定達成值+2。</text:p>
            <text:p>稀有道具。</text:p>
          </table:table-cell>
          <table:table-cell table:style-name="ce116" office:value-type="string" calcext:value-type="string">
            <text:p>你進行的&lt;近戰&gt;判定，達成值+2。</text:p>
          </table:table-cell>
          <table:table-cell table:style-name="ce112" office:value-type="string" calcext:value-type="string">
            <text:p>IA P206</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修羅之拳</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織戶靜馬</text:p>
          </table:table-cell>
          <table:table-cell table:style-name="ce112" office:value-type="string" calcext:value-type="string">
            <text:p>-</text:p>
          </table:table-cell>
          <table:table-cell table:style-name="ce116" office:value-type="string" calcext:value-type="string">
            <text:p>表示織戶靜馬使用的暗殺格鬥術，但這個名字並非由他命名而是通稱，這種格鬥術是他從各種格鬥術中獨自創造出的，不知你通過何種手段繼承了其極意的一部分，也許是織戶隨意傳授於你，又或者是你憑藉超越者的超感知偷學而來。剩下的技藝只能再去從他那裡奪過來。</text:p>
          </table:table-cell>
          <table:table-cell table:style-name="ce116" office:value-type="string" calcext:value-type="string">
            <text:p>你的空手數據變化如下：</text:p>
            <text:p>技能：近戰  命中：0  攻擊力：0  格擋值：0  射程：至近</text:p>
          </table:table-cell>
          <table:table-cell table:style-name="ce116" office:value-type="string" calcext:value-type="string">
            <text:p>通常效果中的空手數據變為[攻擊力：7]，該效果只有在你的&lt;近戰&gt;為LV6以上時生效。</text:p>
          </table:table-cell>
          <table:table-cell table:style-name="ce112" office:value-type="string" calcext:value-type="string">
            <text:p>IA P206</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殺戮的秘奧</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織戶靜馬</text:p>
          </table:table-cell>
          <table:table-cell table:style-name="ce112" office:value-type="string" calcext:value-type="string">
            <text:p>1/劇本</text:p>
          </table:table-cell>
          <table:table-cell table:style-name="ce116" office:value-type="string" calcext:value-type="string">
            <text:p>表示你是織戶靜馬直傳弟子，不過並非是普通的師徒關係。你在生死邊緣苟延殘喘活了下來，並抵達了某種境地，在那之後你與織戶靜馬的關係是否繼續由你自由決定。</text:p>
          </table:table-cell>
          <table:table-cell table:style-name="ce116" office:value-type="string" calcext:value-type="string">
            <text:p>你的HP最大值+10。</text:p>
          </table:table-cell>
          <table:table-cell table:style-name="ce116" office:value-type="string" calcext:value-type="string">
            <text:p>你使用空手進行近戰攻擊前使用，該攻擊的攻擊力+[HP最大值-現在HP值]（最大30）。</text:p>
            <text:p>該效果一劇本可以使用一次。</text:p>
          </table:table-cell>
          <table:table-cell table:style-name="ce112" office:value-type="string" calcext:value-type="string">
            <text:p>IA P206</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塞薩裡奧</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塞薩裡奧</text:p>
          </table:table-cell>
          <table:table-cell table:style-name="ce112" office:value-type="string" calcext:value-type="string">
            <text:p>-</text:p>
          </table:table-cell>
          <table:table-cell table:style-name="ce116" office:value-type="string" calcext:value-type="string">
            <text:p>表示你和“塞薩裡奧”有所關聯，她是寄宿於名為星野聖音的少女體內的協力型背教者生命體，平時不會干涉宿主的意志，但一旦感知到原菌的存在就會“自動”來到“表層”。將自己定義為“為殺死原菌而存在”的她，與其他組織（主要是UGN）共同戰鬥的情況也不算少。只要你是原菌的敵人，她就是你值得信賴的夥伴。</text:p>
          </table:table-cell>
          <table:table-cell table:style-name="ce116" office:value-type="string" calcext:value-type="string">
            <text:p>你進行&lt;情報：流言&gt;和&lt;知識：背教者&gt;前使用，判定骰數+2個。</text:p>
            <text:p>稀有道具。</text:p>
          </table:table-cell>
          <table:table-cell table:style-name="ce116" office:value-type="string" calcext:value-type="string">
            <text:p>你進行攻擊的攻擊力+3，該效果只在對象為超越者，且對象侵蝕率超過100%時生效。</text:p>
          </table:table-cell>
          <table:table-cell table:style-name="ce112" office:value-type="string" calcext:value-type="string">
            <text:p>IA P207</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放學後的約定</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塞薩裡奧</text:p>
          </table:table-cell>
          <table:table-cell table:style-name="ce112" office:value-type="string" calcext:value-type="string">
            <text:p>-</text:p>
          </table:table-cell>
          <table:table-cell table:style-name="ce116" office:value-type="string" calcext:value-type="string">
            <text:p>表示你和“塞薩裡奧”定下了一同調查的約定。也許可以說你有“事故體質”，你經常會和她遭遇，那時“塞薩裡奧”在對手面前來到了“表層”，也就是說你當時正在調查當中，偶爾她會以協助者身份與你一同前往現場，偶爾也會用意味深長的忠告或難以理解的謎語勸你遠離事件，也許那其實是在暗中尋求你對於案件解決的覺悟。</text:p>
          </table:table-cell>
          <table:table-cell table:style-name="ce116" office:value-type="string" calcext:value-type="string">
            <text:p>你進行的&lt;情報：●●&gt;和&lt;意志&gt;判定，骰數+2個。</text:p>
          </table:table-cell>
          <table:table-cell table:style-name="ce116" office:value-type="string" calcext:value-type="string">
            <text:p>次要動作使用，直到劇本結束前，該道具通常效果無法使用，你的行動值+5。</text:p>
          </table:table-cell>
          <table:table-cell table:style-name="ce112" office:value-type="string" calcext:value-type="string">
            <text:p>IA P207</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最初的作品</text:p>
          </table:table-cell>
          <table:table-cell table:style-name="ce112" office:value-type="string" calcext:value-type="string">
            <text:p>聯繫/一般</text:p>
          </table:table-cell>
          <table:table-cell table:style-name="ce112" office:value-type="float" office:value="20" calcext:value-type="float">
            <text:p>20</text:p>
          </table:table-cell>
          <table:table-cell table:style-name="ce112" office:value-type="string" calcext:value-type="string">
            <text:p>塞薩裡奧</text:p>
          </table:table-cell>
          <table:table-cell table:style-name="ce112" office:value-type="string" calcext:value-type="string">
            <text:p>1/劇本</text:p>
          </table:table-cell>
          <table:table-cell table:style-name="ce116" office:value-type="string" calcext:value-type="string">
            <text:p>表示“塞薩裡奧”將協助和友情的證明交給了你，據說是莎士比亞最初作品集的舊書。如果是真貨的話十分珍貴，但可惜真偽不明。雖說書本身只是友情的證明，但如果你願意和她討論作品的話，她會非常高興。只要持有就會受到“塞薩裡奧”的助力，通常來說沒有一直隨身攜帶的必要。</text:p>
          </table:table-cell>
          <table:table-cell table:style-name="ce116" office:value-type="string" calcext:value-type="string">
            <text:p>主要動作使用，你進行的&lt;知識：莎士比亞&gt;判定骰數+5個，該效果持續到劇本結束。</text:p>
          </table:table-cell>
          <table:table-cell table:style-name="ce116" office:value-type="string" calcext:value-type="string">
            <text:p>場景中登場的一名角色進行判定前使用，判定骰數-8個。</text:p>
            <text:p>該效果一劇本可以使用一次。</text:p>
          </table:table-cell>
          <table:table-cell table:style-name="ce112" office:value-type="string" calcext:value-type="string">
            <text:p>IA P207</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阪月那岐</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阪月那岐</text:p>
          </table:table-cell>
          <table:table-cell table:style-name="ce112" office:value-type="string" calcext:value-type="string">
            <text:p>-</text:p>
          </table:table-cell>
          <table:table-cell table:style-name="ce116" office:value-type="string" calcext:value-type="string">
            <text:p>表示你和Xenos成員阪月那岐有所關聯，她是體內寄宿協力型背教者生命體“密涅瓦”的卓越戰鬥員，原本也是被認定古流劍術免許皆傳的實力者；而“密涅瓦”則是有著“希望以鬥爭理解人類”的特性，相似的兩者共同構成了一名修羅，在Xenos中的實力也是出類拔萃，看起來像是戰鬥狂的人物，與她的關係想必充滿了緊張和刺激感。</text:p>
          </table:table-cell>
          <table:table-cell table:style-name="ce116" office:value-type="string" calcext:value-type="string">
            <text:p>你進行&lt;情報：Xenos&gt;和&lt;知識：劍術&gt;前使用，判定骰數+2個。</text:p>
            <text:p>稀有道具。</text:p>
          </table:table-cell>
          <table:table-cell table:style-name="ce116" office:value-type="string" calcext:value-type="string">
            <text:p>你進行的格擋的格擋值+2。</text:p>
          </table:table-cell>
          <table:table-cell table:style-name="ce112" office:value-type="string" calcext:value-type="string">
            <text:p>IA P207</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密涅瓦的加護</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阪月那岐</text:p>
          </table:table-cell>
          <table:table-cell table:style-name="ce112" office:value-type="string" calcext:value-type="string">
            <text:p>-</text:p>
          </table:table-cell>
          <table:table-cell table:style-name="ce116" office:value-type="string" calcext:value-type="string">
            <text:p>表示你受到阪月那岐的夥伴、協力型背教者生命體“密涅瓦”的協助。“密涅瓦”平時不會來到“表層”，但也有自己的意志。和那岐一樣，對你很中意，偶爾也會借你力量；不過偶爾也會要求一場嚴酷的戰鬥作為回報。</text:p>
          </table:table-cell>
          <table:table-cell table:style-name="ce116" office:value-type="string" calcext:value-type="string">
            <text:p>次要動作使用，你使用主要動作進行的【精神】判定達成值+2，使用該效果時，你的侵蝕率+2。</text:p>
          </table:table-cell>
          <table:table-cell table:style-name="ce116" office:value-type="string" calcext:value-type="string">
            <text:p>你進行近戰攻擊的傷害+1D10，使用該效果時，你的侵蝕率+2。</text:p>
          </table:table-cell>
          <table:table-cell table:style-name="ce112" office:value-type="string" calcext:value-type="string">
            <text:p>IA P207</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死線開眼</text:p>
          </table:table-cell>
          <table:table-cell table:style-name="ce112" office:value-type="string" calcext:value-type="string">
            <text:p>聯繫/一般</text:p>
          </table:table-cell>
          <table:table-cell table:style-name="ce112" office:value-type="float" office:value="25" calcext:value-type="float">
            <text:p>25</text:p>
          </table:table-cell>
          <table:table-cell table:style-name="ce112" office:value-type="string" calcext:value-type="string">
            <text:p>阪月那岐</text:p>
          </table:table-cell>
          <table:table-cell table:style-name="ce112" office:value-type="string" calcext:value-type="string">
            <text:p>-</text:p>
          </table:table-cell>
          <table:table-cell table:style-name="ce116" office:value-type="string" calcext:value-type="string">
            <text:p>表示你因與阪月那岐進行過死鬥導致異能變化。與阪月那岐的死鬥是一場難以想像的體驗，但你們已經如戀人般互相深刻瞭解對方，而這種理解也讓你的異能發生了巨大改變。</text:p>
          </table:table-cell>
          <table:table-cell table:style-name="ce116" office:value-type="string" calcext:value-type="string">
            <text:p>你組合《集中：●●》進行的近戰判定骰數+3個。</text:p>
          </table:table-cell>
          <table:table-cell table:style-name="ce116" office:value-type="string" calcext:value-type="string">
            <text:p>你取得的《集中：●●》變為“暴擊值下限為6，該異能一劇本可以使用三次”。</text:p>
          </table:table-cell>
          <table:table-cell table:style-name="ce112" office:value-type="string" calcext:value-type="string">
            <text:p>IA P207</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神城早月</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神城早月</text:p>
          </table:table-cell>
          <table:table-cell table:style-name="ce112" office:value-type="string" calcext:value-type="string">
            <text:p>-</text:p>
          </table:table-cell>
          <table:table-cell table:style-name="ce116" office:value-type="string" calcext:value-type="string">
            <text:p>表示你和神城集團會長神城早月有所關聯。她優異的才能讓她尚未成年就成了世界級企業的領導者，也是神城這一最大的民間“背教者”研究組織的首領。作為如何獲取困難的背教者病毒的對策，早月與UGN建立了協調路線以確保利益；最近卻因為與UGN的關係導致組織中產生了分裂而頭疼。對於因優秀人才相繼背叛而遭到孤立的她來說，值得信賴的超越者是相當貴重的存在。</text:p>
          </table:table-cell>
          <table:table-cell table:style-name="ce116" office:value-type="string" calcext:value-type="string">
            <text:p>你進行&lt;情報：商務&gt;前使用，該判定骰數+2個。</text:p>
            <text:p>稀有道具。</text:p>
          </table:table-cell>
          <table:table-cell table:style-name="ce116" office:value-type="string" calcext:value-type="string">
            <text:p>你的財產點數+3。</text:p>
          </table:table-cell>
          <table:table-cell table:style-name="ce112" office:value-type="string" calcext:value-type="string">
            <text:p>IA P208</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秘書西裝</text:p>
          </table:table-cell>
          <table:table-cell table:style-name="ce112" office:value-type="string" calcext:value-type="string">
            <text:p>聯繫/防具</text:p>
          </table:table-cell>
          <table:table-cell table:style-name="ce112" office:value-type="float" office:value="15" calcext:value-type="float">
            <text:p>15</text:p>
          </table:table-cell>
          <table:table-cell table:style-name="ce112" office:value-type="string" calcext:value-type="string">
            <text:p>神城早月</text:p>
          </table:table-cell>
          <table:table-cell table:style-name="ce112" office:value-type="string" calcext:value-type="string">
            <text:p>-</text:p>
          </table:table-cell>
          <table:table-cell table:style-name="ce116" office:value-type="string" calcext:value-type="string">
            <text:p>表示以會長秘書身份特別定做的西裝和員工證套裝，穿的人在立場上是秘書，實際上是直接接受神城早月命令活動的超越者特工。在非常時以外的工作沒有特別指定，有作為秘書或護衛活躍的，也有緊急時才被召集的；雖然人數較少，卻是每個人都能單獨解決事件的精英集團。</text:p>
          </table:table-cell>
          <table:table-cell table:style-name="ce116" office:value-type="string" calcext:value-type="string">
            <text:p>閃避：0 行動值：0 裝甲值：6</text:p>
            <text:p>取得時選擇一項技能，使用該技能進行判定時，達成值+2。</text:p>
          </table:table-cell>
          <table:table-cell table:style-name="ce116" office:value-type="string" calcext:value-type="string">
            <text:p>通常效果中的技能判定，達成值額外+3（合計+5）。</text:p>
          </table:table-cell>
          <table:table-cell table:style-name="ce112" office:value-type="string" calcext:value-type="string">
            <text:p>IA P208</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黎明的使役者</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神城早月</text:p>
          </table:table-cell>
          <table:table-cell table:style-name="ce112" office:value-type="string" calcext:value-type="string">
            <text:p>1/劇本</text:p>
            <text:p>3/劇本</text:p>
          </table:table-cell>
          <table:table-cell table:style-name="ce116" office:value-type="string" calcext:value-type="string">
            <text:p>表示你和神城早月在SNS上互關，基本上是私人賬號，主要公開給熟人，因為每天業務很多所以發言很少，但會以一定頻率搭話的程度進行回復。因為本質上她是個好人，所以萬一真的需要幫助，她也會抽出時間協助你。</text:p>
          </table:table-cell>
          <table:table-cell table:style-name="ce116" office:value-type="string" calcext:value-type="string">
            <text:p>你進行【精神】和【社會】判定後使用，該判定達成值+5。</text:p>
            <text:p>該效果一劇本可以使用一次。</text:p>
          </table:table-cell>
          <table:table-cell table:style-name="ce116" office:value-type="string" calcext:value-type="string">
            <text:p>通常效果的使用次數變為“一劇本可以使用三次”。</text:p>
          </table:table-cell>
          <table:table-cell table:style-name="ce112" office:value-type="string" calcext:value-type="string">
            <text:p>IA P208</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辰巳狛江</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辰巳狛江</text:p>
          </table:table-cell>
          <table:table-cell table:style-name="ce112" office:value-type="string" calcext:value-type="string">
            <text:p>-</text:p>
          </table:table-cell>
          <table:table-cell table:style-name="ce116" office:value-type="string" calcext:value-type="string">
            <text:p>表示你與曾從屬FH的謎之格鬥家辰巳狛江有所關聯，現在正在為修行自己獨創的"背教者空手道"而在各地流浪，有很多種說法但重要的是無職。會介入背教者相關的各種事件，有時會基於自己的信念以UGN和FH雙方為對手行動，也有會為錢接下保鏢工作的情況。</text:p>
          </table:table-cell>
          <table:table-cell table:style-name="ce116" office:value-type="string" calcext:value-type="string">
            <text:p>任何時候都可以使用，消費1點財產點數。消費該財產點數時，直到劇本結束，你進行的&lt;情報：UGN&gt;和&lt;情報：FH&gt;判定骰數+1個。</text:p>
            <text:p>稀有道具。</text:p>
          </table:table-cell>
          <table:table-cell table:style-name="ce116" office:value-type="string" calcext:value-type="string">
            <text:p>以通常效果消費財產點數時，增加的判定骰數額外+1個（總計+2個）。</text:p>
          </table:table-cell>
          <table:table-cell table:style-name="ce112" office:value-type="string" calcext:value-type="string">
            <text:p>IA P208</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友情的胴著</text:p>
          </table:table-cell>
          <table:table-cell table:style-name="ce112" office:value-type="string" calcext:value-type="string">
            <text:p>聯繫/防具</text:p>
          </table:table-cell>
          <table:table-cell table:style-name="ce112" office:value-type="float" office:value="5" calcext:value-type="float">
            <text:p>5</text:p>
          </table:table-cell>
          <table:table-cell table:style-name="ce112" office:value-type="string" calcext:value-type="string">
            <text:p>辰巳狛江</text:p>
          </table:table-cell>
          <table:table-cell table:style-name="ce112" office:value-type="string" calcext:value-type="string">
            <text:p>-</text:p>
          </table:table-cell>
          <table:table-cell table:style-name="ce116" office:value-type="string" calcext:value-type="string">
            <text:p>作為友情之證被半強硬塞給你的素色襯襖，並非通常空手道用，而是為了“背教者空手道”特地製作的，不過也不知真假。狛江說當它被血汗與友情浸染之時，才能發揮其真正的力量。</text:p>
          </table:table-cell>
          <table:table-cell table:style-name="ce116" office:value-type="string" calcext:value-type="string">
            <text:p>閃避：0 行動值：0 裝甲值：1</text:p>
            <text:p>你使用空手進行近戰攻擊時，攻擊力+2。</text:p>
          </table:table-cell>
          <table:table-cell table:style-name="ce116" office:value-type="string" calcext:value-type="string">
            <text:p>通常效果變更如下：</text:p>
            <text:p>你使用空手進行近戰攻擊時，攻擊力+[&lt;近戰&gt;LV（上限5）]，該效果只在你的&lt;近戰&gt;等級為LV4以上時生效。</text:p>
          </table:table-cell>
          <table:table-cell table:style-name="ce112" office:value-type="string" calcext:value-type="string">
            <text:p>IA P208</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真円的一擊</text:p>
          </table:table-cell>
          <table:table-cell table:style-name="ce112" office:value-type="string" calcext:value-type="string">
            <text:p>聯繫/一般</text:p>
          </table:table-cell>
          <table:table-cell table:style-name="ce112" office:value-type="float" office:value="15" calcext:value-type="float">
            <text:p>15</text:p>
          </table:table-cell>
          <table:table-cell table:style-name="ce112" office:value-type="string" calcext:value-type="string">
            <text:p>辰巳狛江</text:p>
          </table:table-cell>
          <table:table-cell table:style-name="ce112" office:value-type="string" calcext:value-type="string">
            <text:p>1/劇本</text:p>
          </table:table-cell>
          <table:table-cell table:style-name="ce116" office:value-type="string" calcext:value-type="string">
            <text:p>不知從何而來，穿著空手道服的謎之超越者前來助你一臂之力。這個神出鬼沒的傢伙雖然不常見到，但她絕不會忘記一度接受過的恩惠與友情。</text:p>
          </table:table-cell>
          <table:table-cell table:style-name="ce116" office:value-type="string" calcext:value-type="string">
            <text:p>準備階段使用，消費3點財產點數，該回合間，你下一次給予的傷害+3D10。</text:p>
            <text:p>該效果一劇本可以使用一次。</text:p>
          </table:table-cell>
          <table:table-cell table:style-name="ce116" office:value-type="string" calcext:value-type="string">
            <text:p>你使用通常效果時，即使不消費財產點數，也能使傷害擲骰效果生效。</text:p>
          </table:table-cell>
          <table:table-cell table:style-name="ce112" office:value-type="string" calcext:value-type="string">
            <text:p>IA P208</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八重樫若菜</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八重樫若菜</text:p>
          </table:table-cell>
          <table:table-cell table:style-name="ce112" office:value-type="string" calcext:value-type="string">
            <text:p>1/劇本</text:p>
          </table:table-cell>
          <table:table-cell table:style-name="ce116" office:value-type="string" calcext:value-type="string">
            <text:p>表示你與N市公立高中學生會長八重樫若菜有所關聯。作為學生會長的她，為了讓學校生活更加快樂，也為了解決學校內的問題，總會身先士卒，是一位人望與行動力兼備的人氣學生會長。某種意義上，她從不放過事件或者問題學生，這一性格和行動力成了讓非日常住民們煩惱的優點。放任不管的話，她早晚會牽扯到“背教者”相關的事件中，是個沒法置之不理的人物。</text:p>
          </table:table-cell>
          <table:table-cell table:style-name="ce116" office:value-type="string" calcext:value-type="string">
            <text:p>你進行&lt;情報：流言&gt;和&lt;知識：學問&gt;前使用，判定骰數+2個。</text:p>
            <text:p>稀有道具。</text:p>
          </table:table-cell>
          <table:table-cell table:style-name="ce116" office:value-type="string" calcext:value-type="string">
            <text:p>你進行判定前使用，判定骰數+3個。</text:p>
            <text:p>該效果一劇本可以使用一次。</text:p>
          </table:table-cell>
          <table:table-cell table:style-name="ce112" office:value-type="string" calcext:value-type="string">
            <text:p>IA P209</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N高意見箱</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八重樫若菜</text:p>
          </table:table-cell>
          <table:table-cell table:style-name="ce112" office:value-type="string" calcext:value-type="string">
            <text:p>-</text:p>
          </table:table-cell>
          <table:table-cell table:style-name="ce116" office:value-type="string" calcext:value-type="string">
            <text:p>經由八重樫若菜提議，在N市公立高中設立的意見箱。值得信賴的她和她的人脈每個月都能收到大量困擾和亟待解決的委託。本來內部只會打開給學生會相關成員看，但和若菜約好一同協力解決事件的人也得到了特別閱覽許可。其中不僅有深刻的問題討論，也能作為收集學校周邊事件情報的手段。</text:p>
          </table:table-cell>
          <table:table-cell table:style-name="ce116" office:value-type="string" calcext:value-type="string">
            <text:p>你進行的&lt;情報：●●&gt;判定骰數+2個。</text:p>
          </table:table-cell>
          <table:table-cell table:style-name="ce116" office:value-type="string" calcext:value-type="string">
            <text:p>任何時候都可以使用，通常效果對場景中登場的任意角色全員生效，且判定骰數額外+1個（總計+3個）。</text:p>
          </table:table-cell>
          <table:table-cell table:style-name="ce112" office:value-type="string" calcext:value-type="string">
            <text:p>IA P209</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學校總動員</text:p>
          </table:table-cell>
          <table:table-cell table:style-name="ce112" office:value-type="string" calcext:value-type="string">
            <text:p>聯繫/一般</text:p>
          </table:table-cell>
          <table:table-cell table:style-name="ce112" office:value-type="float" office:value="30" calcext:value-type="float">
            <text:p>30</text:p>
          </table:table-cell>
          <table:table-cell table:style-name="ce112" office:value-type="string" calcext:value-type="string">
            <text:p>八重樫若菜</text:p>
          </table:table-cell>
          <table:table-cell table:style-name="ce112" office:value-type="string" calcext:value-type="string">
            <text:p>1/劇本</text:p>
          </table:table-cell>
          <table:table-cell table:style-name="ce116" office:value-type="string" calcext:value-type="string">
            <text:p>在八重樫若菜的呼籲下對全校學生發出協助請求，個人無法解決的問題只要通力合作也許就能搞定。當然回應請求的大多都是普通學生，無法直接成為力量，但他們的應援一定會成為最後的助力。</text:p>
          </table:table-cell>
          <table:table-cell table:style-name="ce116" office:value-type="string" calcext:value-type="string">
            <text:p>準備階段使用，場景中登場的你和你指定的任意角色使用主要動作進行的判定，骰數+2個。</text:p>
            <text:p>該效果一劇本可以使用一次。</text:p>
          </table:table-cell>
          <table:table-cell table:style-name="ce116" office:value-type="string" calcext:value-type="string">
            <text:p>使用通常效果時，指定的所有角色HP回復到最大值，可以拒絕該效果。</text:p>
          </table:table-cell>
          <table:table-cell table:style-name="ce112" office:value-type="string" calcext:value-type="string">
            <text:p>IA P209</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關聯：貓川美亞</text:p>
          </table:table-cell>
          <table:table-cell table:style-name="ce112" office:value-type="string" calcext:value-type="string">
            <text:p>聯繫/關聯</text:p>
          </table:table-cell>
          <table:table-cell table:style-name="ce112" office:value-type="float" office:value="5" calcext:value-type="float">
            <text:p>5</text:p>
          </table:table-cell>
          <table:table-cell table:style-name="ce112" office:value-type="string" calcext:value-type="string">
            <text:p>貓川美亞</text:p>
          </table:table-cell>
          <table:table-cell table:style-name="ce112" office:value-type="string" calcext:value-type="string">
            <text:p>-</text:p>
          </table:table-cell>
          <table:table-cell table:style-name="ce116" office:value-type="string" calcext:value-type="string">
            <text:p>表示你與自由情報商貓川美亞有所關聯。她是個愛錢又吵鬧的自信家，但因此常常在最後關頭掉鏈子——這就是她作為情報商的一般評價，據說這評價實際有一半是恰如其分的。不過她有著和年齡不相稱的黑客技術和廣泛的關聯，在迅速收集情報這方面無可置評，平常在當學生的美亞隨時歡迎新的委託。</text:p>
          </table:table-cell>
          <table:table-cell table:style-name="ce116" office:value-type="string" calcext:value-type="string">
            <text:p>你進行&lt;情報：網絡&gt;和&lt;知識：機械工學&gt;判定前使用，判定骰數+1個。</text:p>
            <text:p>稀有道具。</text:p>
          </table:table-cell>
          <table:table-cell table:style-name="ce116" office:value-type="string" calcext:value-type="string">
            <text:p>任何時候都可以消費1財產點數使用，直到劇本結束為止，通常效果的判定骰數變為+2個。</text:p>
          </table:table-cell>
          <table:table-cell table:style-name="ce112" office:value-type="string" calcext:value-type="string">
            <text:p>IA P209</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行走如貓</text:p>
          </table:table-cell>
          <table:table-cell table:style-name="ce112" office:value-type="string" calcext:value-type="string">
            <text:p>聯繫/一般</text:p>
          </table:table-cell>
          <table:table-cell table:style-name="ce112" office:value-type="float" office:value="10" calcext:value-type="float">
            <text:p>10</text:p>
          </table:table-cell>
          <table:table-cell table:style-name="ce112" office:value-type="string" calcext:value-type="string">
            <text:p>貓川美亞</text:p>
          </table:table-cell>
          <table:table-cell table:style-name="ce112" office:value-type="string" calcext:value-type="string">
            <text:p>-</text:p>
          </table:table-cell>
          <table:table-cell table:style-name="ce116" office:value-type="string" calcext:value-type="string">
            <text:p>表示身為優秀黑客的貓川美亞的技術。她那什麼情報都能迅速搞到手的實力毫無疑問貨真價實；雖然偶爾會馬虎，但還是很受人喜歡，只要理解這點就能構築起理想的信賴關係。不常為人所知的是，用變異魔獸異能變成動物收集情報是她的底牌之一。</text:p>
          </table:table-cell>
          <table:table-cell table:style-name="ce116" office:value-type="string" calcext:value-type="string">
            <text:p>你進行情報收集判定時可以消費1點財產點數，使判定達成值+2。</text:p>
            <text:p>該效果一次判定最多可以使用1點財產點數。</text:p>
          </table:table-cell>
          <table:table-cell table:style-name="ce116" office:value-type="string" calcext:value-type="string">
            <text:p>使用通常效果時可以消費最多3點財產點數（即，最多使達成值+6）。</text:p>
          </table:table-cell>
          <table:table-cell table:style-name="ce112" office:value-type="string" calcext:value-type="string">
            <text:p>IA P209</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table-cell table:style-name="ce107" office:value-type="string" calcext:value-type="string">
            <text:p>守護天貓</text:p>
          </table:table-cell>
          <table:table-cell table:style-name="ce112" office:value-type="string" calcext:value-type="string">
            <text:p>聯繫/一般</text:p>
          </table:table-cell>
          <table:table-cell table:style-name="ce112" office:value-type="float" office:value="25" calcext:value-type="float">
            <text:p>25</text:p>
          </table:table-cell>
          <table:table-cell table:style-name="ce112" office:value-type="string" calcext:value-type="string">
            <text:p>貓川美亞</text:p>
          </table:table-cell>
          <table:table-cell table:style-name="ce112" office:value-type="string" calcext:value-type="string">
            <text:p>1/劇本</text:p>
          </table:table-cell>
          <table:table-cell table:style-name="ce116" office:value-type="string" calcext:value-type="string">
            <text:p>以網絡為媒介獲得貓川美亞的黑客支援。到事件解決為止的支援本來是工作外的內容，但她似乎令人意外地富有責任感，會一直幫到最後。這種時候，她會讓親手製作的貓型形象顯現在各種顯示器上進行協助。另外，正確來說Meerkat（ミーアキャット）不是貓而是貓鼬，但這一點被她無視了（譯注：ミーア=美亞，キャット=貓，組合起來正好是美亞貓貓；但ミーアキャット實際上是貓鼬，美亞自己搞錯了但是死不承認）。</text:p>
          </table:table-cell>
          <table:table-cell table:style-name="ce116" office:value-type="string" calcext:value-type="string">
            <text:p>準備階段使用，該場景間你進行的&lt;知識：機械工學&gt;判定骰數+2個。</text:p>
            <text:p>該效果一劇本可以使用一次。</text:p>
          </table:table-cell>
          <table:table-cell table:style-name="ce116" office:value-type="string" calcext:value-type="string">
            <text:p>使用通常效果時追加效果：你使用主要動作進行的判定骰數+3個，行動值+5。</text:p>
          </table:table-cell>
          <table:table-cell table:style-name="ce112" office:value-type="string" calcext:value-type="string">
            <text:p>IA P209</text:p>
          </table:table-cell>
          <table:table-cell table:style-name="ce112" office:value-type="string" calcext:value-type="string">
            <text:p>IA新增</text:p>
          </table:table-cell>
          <table:table-cell table:style-name="ce109" table:number-columns-repeated="16"/>
          <table:table-cell table:number-columns-repeated="998"/>
        </table:table-row>
        <table:table-row table:style-name="ro9" table:number-rows-repeated="918">
          <table:table-cell table:style-name="ce109" table:number-columns-repeated="5"/>
          <table:table-cell table:style-name="ce118" table:number-columns-repeated="3"/>
          <table:table-cell table:style-name="ce42"/>
          <table:table-cell table:style-name="ce109" table:number-columns-repeated="17"/>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REPLAY道具" table:style-name="ta11">
        <table:table-column table:style-name="co51" table:default-cell-style-name="Default"/>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2" table:default-cell-style-name="Default"/>
        <table:table-column table:style-name="co58" table:default-cell-style-name="Default"/>
        <table:table-column table:style-name="co59" table:default-cell-style-name="Default"/>
        <table:table-column table:style-name="co60" table:default-cell-style-name="Default"/>
        <table:table-column table:style-name="co11" table:default-cell-style-name="Default"/>
        <table:table-column table:style-name="co60" table:number-columns-repeated="13" table:default-cell-style-name="Default"/>
        <table:table-column table:style-name="co5" table:number-columns-repeated="998" table:default-cell-style-name="Default"/>
        <table:table-row table:style-name="ro5">
          <table:table-cell table:style-name="ce122" office:value-type="string" calcext:value-type="string">
            <text:p>名稱</text:p>
          </table:table-cell>
          <table:table-cell table:style-name="ce122" office:value-type="string" calcext:value-type="string">
            <text:p>種類</text:p>
          </table:table-cell>
          <table:table-cell table:style-name="ce122" office:value-type="string" calcext:value-type="string">
            <text:p>必要經驗點</text:p>
          </table:table-cell>
          <table:table-cell table:style-name="ce122" office:value-type="string" calcext:value-type="string">
            <text:p>技能</text:p>
          </table:table-cell>
          <table:table-cell table:style-name="ce122" office:value-type="string" calcext:value-type="string">
            <text:p>次數</text:p>
          </table:table-cell>
          <table:table-cell table:style-name="ce122" office:value-type="string" calcext:value-type="string">
            <text:p>解說</text:p>
          </table:table-cell>
          <table:table-cell table:style-name="ce122" office:value-type="string" calcext:value-type="string">
            <text:p>效果</text:p>
          </table:table-cell>
          <table:table-cell table:style-name="ce122" office:value-type="string" calcext:value-type="string">
            <text:p>參照</text:p>
          </table:table-cell>
          <table:table-cell table:style-name="ce127" table:number-columns-repeated="2"/>
          <table:table-cell table:style-name="ce129"/>
          <table:table-cell table:style-name="ce122" table:number-columns-repeated="2"/>
          <table:table-cell table:style-name="ce130" table:number-columns-repeated="13"/>
          <table:table-cell table:number-columns-repeated="998"/>
        </table:table-row>
        <table:table-row table:style-name="ro5">
          <table:table-cell table:style-name="ce123" office:value-type="string" calcext:value-type="string" table:number-columns-spanned="13" table:number-rows-spanned="1">
            <text:p>Chronicle</text:p>
          </table:table-cell>
          <table:covered-table-cell table:number-columns-repeated="12" table:style-name="ce75"/>
          <table:table-cell table:style-name="ce130" table:number-columns-repeated="13"/>
          <table:table-cell table:number-columns-repeated="998"/>
        </table:table-row>
        <table:table-row table:style-name="ro5">
          <table:table-cell table:style-name="ce124" office:value-type="string" calcext:value-type="string">
            <text:p>關聯：鈴木和美</text:p>
          </table:table-cell>
          <table:table-cell table:style-name="ce124" office:value-type="string" calcext:value-type="string">
            <text:p>關聯</text:p>
          </table:table-cell>
          <table:table-cell table:style-name="ce124" office:value-type="float" office:value="2" calcext:value-type="float">
            <text:p>2</text:p>
          </table:table-cell>
          <table:table-cell table:style-name="ce124" office:value-type="string" calcext:value-type="string">
            <text:p>&lt;情報：●●&gt;</text:p>
          </table:table-cell>
          <table:table-cell table:style-name="ce124" office:value-type="string" calcext:value-type="string">
            <text:p>1/劇本</text:p>
          </table:table-cell>
          <table:table-cell table:style-name="ce17" office:value-type="string" calcext:value-type="string">
            <text:p>你與UGN特工鈴木和美有所聯繫。鈴木和美是擅長收集信息，尤其擅長操弄情報的特工。不論何種場所，她都神出鬼沒，切實地履行著工作職責。</text:p>
          </table:table-cell>
          <table:table-cell table:style-name="ce17" office:value-type="string" calcext:value-type="string">
            <text:p>你進行的&lt;情報：●●&gt;判定骰數+5個，該效果一劇本可以使用一次。</text:p>
            <text:p>稀有道具。</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關聯：普遍機關</text:p>
          </table:table-cell>
          <table:table-cell table:style-name="ce124" office:value-type="string" calcext:value-type="string">
            <text:p>關聯</text:p>
          </table:table-cell>
          <table:table-cell table:style-name="ce124" office:value-type="float" office:value="2" calcext:value-type="float">
            <text:p>2</text:p>
          </table:table-cell>
          <table:table-cell table:style-name="ce124" office:value-type="string" calcext:value-type="string">
            <text:p>參照解說</text:p>
          </table:table-cell>
          <table:table-cell table:style-name="ce124" office:value-type="string" calcext:value-type="string">
            <text:p>1/劇本</text:p>
          </table:table-cell>
          <table:table-cell table:style-name="ce17" office:value-type="string" calcext:value-type="string">
            <text:p>據信八阪十字所在的神秘組織“普遍機關”。該組織的“計劃”便是引導你的行動走向成功。其實也許只是你的運氣稍微好一點點而已，但至少八阪十字對“組織”的計劃深信不疑。</text:p>
          </table:table-cell>
          <table:table-cell table:style-name="ce17" office:value-type="string" calcext:value-type="string">
            <text:p>你進行任意判定前使用，則該判定不進行擲骰，其達成值直接為10，該效果一劇本可以使用一次。</text:p>
            <text:p>稀有道具。</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記憶繼承</text:p>
          </table:table-cell>
          <table:table-cell table:style-name="ce124" office:value-type="string" calcext:value-type="string">
            <text:p>一般</text:p>
          </table:table-cell>
          <table:table-cell table:style-name="ce124" office:value-type="float" office:value="2" calcext:value-type="float">
            <text:p>2</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你從其他超越者那裡繼承了記憶。你可以利用記憶中的知識或者人脈。</text:p>
          </table:table-cell>
          <table:table-cell table:style-name="ce17" office:value-type="string" calcext:value-type="string">
            <text:p>取得時從能力值（肉體/感知/精神/社會）中選擇一種。使用了所選能力值的判定前使用，此次判定的骰數+2個，該效果一場景中可以使用一次。該道具只有D-lois為「NO.10 傳承者」的角色才能取得。</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反異能系統</text:p>
            <text:p>（アンチエフェクトシステム）</text:p>
          </table:table-cell>
          <table:table-cell table:style-name="ce124" office:value-type="string" calcext:value-type="string">
            <text:p>一般</text:p>
          </table:table-cell>
          <table:table-cell table:style-name="ce124" office:value-type="float" office:value="5" calcext:value-type="float">
            <text:p>5</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由被“幽魂之主”（マスターレイス，master wraith）毀滅的企業開發的，對超越者專用裝置。能夠發出抑制超越者的，特殊的聲音。</text:p>
          </table:table-cell>
          <table:table-cell table:style-name="ce17" office:value-type="string" calcext:value-type="string">
            <text:p>準備階段時使用，場景中登場的超越者全員的判定骰數-2個，該效果一劇本可以使用一次。</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ε印記</text:p>
            <text:p>（イプシロンマーカー）</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表示你是“幽魂之主05”約翰·C·考德威爾部下的貼紙，往往都會好好地貼在防具或者載具上。</text:p>
          </table:table-cell>
          <table:table-cell table:style-name="ce17" office:value-type="string" calcext:value-type="string">
            <text:p>你取得對「約翰·C·考德威爾」的Lois期間，所有判定的骰數+1個。</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同僚相殺</text:p>
            <text:p>（同僚殺し）</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表示由於你的暴走導致以前的同事遭遇不幸的道具。</text:p>
          </table:table-cell>
          <table:table-cell table:style-name="ce17" office:value-type="string" calcext:value-type="string">
            <text:p>僅在你持有紋章道具時生效。你攻擊的對象裝備或持有與你相同組織的紋章時，你的攻擊的攻擊力+10。</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十束劍的低語</text:p>
            <text:p>（トツカの囁き）</text:p>
          </table:table-cell>
          <table:table-cell table:style-name="ce124" office:value-type="string" calcext:value-type="string">
            <text:p>一般</text:p>
          </table:table-cell>
          <table:table-cell table:style-name="ce124" office:value-type="float" office:value="10" calcext:value-type="float">
            <text:p>10</text:p>
          </table:table-cell>
          <table:table-cell table:style-name="ce124" office:value-type="string" calcext:value-type="string">
            <text:p>-</text:p>
          </table:table-cell>
          <table:table-cell table:style-name="ce124" office:value-type="string" calcext:value-type="string">
            <text:p>3/劇本</text:p>
          </table:table-cell>
          <table:table-cell table:style-name="ce17" office:value-type="string" calcext:value-type="string">
            <text:p>表示你是繼承了FH道具“十束劍”的“十束劍一族”的成員。你可以利用寄宿在十束劍中的知識。</text:p>
          </table:table-cell>
          <table:table-cell table:style-name="ce17" office:value-type="string" calcext:value-type="string">
            <text:p>只有當你裝備著十束劍時才能使用，你進行判定前使用，判定骰數+3個，該效果一劇本可以使用三次。</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夢之指引</text:p>
            <text:p>（夢の導き）</text:p>
          </table:table-cell>
          <table:table-cell table:style-name="ce124" office:value-type="string" calcext:value-type="string">
            <text:p>一般</text:p>
          </table:table-cell>
          <table:table-cell table:style-name="ce124" office:value-type="float" office:value="15" calcext:value-type="float">
            <text:p>15</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表示你擁有能以夢境為媒介使超越者暴走的能力。</text:p>
          </table:table-cell>
          <table:table-cell table:style-name="ce17" office:value-type="string" calcext:value-type="string">
            <text:p>你使用異能前使用，該異能的對象獲得[不良狀態：暴走]，但該攻擊會變成[對象：單體]，該效果一場景可以使用一次。</text:p>
          </table:table-cell>
          <table:table-cell table:style-name="ce124" office:value-type="string" calcext:value-type="string">
            <text:p>IA P188</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3" office:value-type="string" calcext:value-type="string" table:number-columns-spanned="13" table:number-rows-spanned="1">
            <text:p>菊池Replay</text:p>
          </table:table-cell>
          <table:covered-table-cell table:number-columns-repeated="12" table:style-name="ce75"/>
          <table:table-cell table:style-name="ce130" table:number-columns-repeated="13"/>
          <table:table-cell table:number-columns-repeated="998"/>
        </table:table-row>
        <table:table-row table:style-name="ro5">
          <table:table-cell table:style-name="ce124" office:value-type="string" calcext:value-type="string">
            <text:p>特別調整體：運動</text:p>
          </table:table-cell>
          <table:table-cell table:style-name="ce124" office:value-type="string" calcext:value-type="string">
            <text:p>一般</text:p>
          </table:table-cell>
          <table:table-cell table:style-name="ce124" office:value-type="float" office:value="3" calcext:value-type="float">
            <text:p>3</text:p>
          </table:table-cell>
          <table:table-cell table:number-columns-repeated="2" table:style-name="ce124" office:value-type="string" calcext:value-type="string">
            <text:p>-</text:p>
          </table:table-cell>
          <table:table-cell table:style-name="ce17" office:value-type="string" calcext:value-type="string">
            <text:p>由神崎博士進行，你作為運動強化型複製體，接受了特別調整程序。</text:p>
          </table:table-cell>
          <table:table-cell table:style-name="ce17" office:value-type="string" calcext:value-type="string">
            <text:p>你進行的使用了【肉體】的判定達成值+1，但對攻擊判定無效。該道具只有取得了「D-Lois：複製體」的角色可以取得，該效果最多可疊加至3個。</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特別調整體：精神</text:p>
          </table:table-cell>
          <table:table-cell table:style-name="ce124" office:value-type="string" calcext:value-type="string">
            <text:p>一般</text:p>
          </table:table-cell>
          <table:table-cell table:style-name="ce124" office:value-type="float" office:value="3" calcext:value-type="float">
            <text:p>3</text:p>
          </table:table-cell>
          <table:table-cell table:number-columns-repeated="2" table:style-name="ce124" office:value-type="string" calcext:value-type="string">
            <text:p>-</text:p>
          </table:table-cell>
          <table:table-cell table:style-name="ce17" office:value-type="string" calcext:value-type="string">
            <text:p>由神崎博士進行，你作為精神強化型複製體，接受了特別調整程序。</text:p>
          </table:table-cell>
          <table:table-cell table:style-name="ce17" office:value-type="string" calcext:value-type="string">
            <text:p>你進行的&lt;意志&gt;判定達成值+2。該道具只有取得了「D-Lois：複製體」的角色可以取得，該效果最多可以疊加至3個。</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特別調整體：戰鬥</text:p>
          </table:table-cell>
          <table:table-cell table:style-name="ce124" office:value-type="string" calcext:value-type="string">
            <text:p>一般</text:p>
          </table:table-cell>
          <table:table-cell table:style-name="ce124" office:value-type="float" office:value="3" calcext:value-type="float">
            <text:p>3</text:p>
          </table:table-cell>
          <table:table-cell table:number-columns-repeated="2" table:style-name="ce124" office:value-type="string" calcext:value-type="string">
            <text:p>-</text:p>
          </table:table-cell>
          <table:table-cell table:style-name="ce17" office:value-type="string" calcext:value-type="string">
            <text:p>由神崎博士進行，你作為戰鬥用複製體，接受了特別調整程序。</text:p>
          </table:table-cell>
          <table:table-cell table:style-name="ce17" office:value-type="string" calcext:value-type="string">
            <text:p>你進行的攻擊判定達成值+1。該道具只有取得了「D-Lois：複製體」的角色可以取得，該效果最多可以疊加至3個。</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特別調整體：調查</text:p>
          </table:table-cell>
          <table:table-cell table:style-name="ce124" office:value-type="string" calcext:value-type="string">
            <text:p>一般</text:p>
          </table:table-cell>
          <table:table-cell table:style-name="ce124" office:value-type="float" office:value="3" calcext:value-type="float">
            <text:p>3</text:p>
          </table:table-cell>
          <table:table-cell table:number-columns-repeated="2" table:style-name="ce124" office:value-type="string" calcext:value-type="string">
            <text:p>-</text:p>
          </table:table-cell>
          <table:table-cell table:style-name="ce17" office:value-type="string" calcext:value-type="string">
            <text:p>由神崎博士進行，你作為調查、搜查用複製體，接受了特別調整程序。</text:p>
          </table:table-cell>
          <table:table-cell table:style-name="ce17" office:value-type="string" calcext:value-type="string">
            <text:p>你進行的&lt;情報:●●&gt;判定達成值+2。該道具只有取得了「D-Lois：複製體」的角色可以取得，該效果最多可以疊加至3個。</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艱難困苦之心</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表示你有個自由奔放的兄長，或者UGN支部全滅——總之，你曾體驗了極為艱難的環境……或者此時此刻依然在體驗這一點。為了克服這樣的環境，你學會了在社會中得以生存的技術，或是認識了可信賴的熟人。</text:p>
          </table:table-cell>
          <table:table-cell table:style-name="ce17" office:value-type="string" calcext:value-type="string">
            <text:p>你進行的&lt;籌措&gt;和&lt;情報:●●&gt;判定骰數+1個。</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記憶的載體</text:p>
            <text:p>（記憶の運び手）</text:p>
          </table:table-cell>
          <table:table-cell table:style-name="ce124" office:value-type="string" calcext:value-type="string">
            <text:p>一般</text:p>
          </table:table-cell>
          <table:table-cell table:style-name="ce124" office:value-type="float" office:value="15" calcext:value-type="float">
            <text:p>15</text:p>
          </table:table-cell>
          <table:table-cell table:number-columns-repeated="2" table:style-name="ce124" office:value-type="string" calcext:value-type="string">
            <text:p>-</text:p>
          </table:table-cell>
          <table:table-cell table:style-name="ce17" office:value-type="string" calcext:value-type="string">
            <text:p>表示你從“世界的支配者”繼承了記憶。在記憶中，你持有支配世界的力量。該記憶侵蝕著世界，構築著你所期望的狀況。</text:p>
          </table:table-cell>
          <table:table-cell table:style-name="ce17" office:value-type="string" calcext:value-type="string">
            <text:p>你的《結界化》效果中，該場景內登場的角色進行判定前使用，判定骰數+2個。該道具只有取得了「D-Lois：起源種」的角色可以取得，該效果一回合可以使用一次。</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支配者的紋章</text:p>
          </table:table-cell>
          <table:table-cell table:style-name="ce124" office:value-type="string" calcext:value-type="string">
            <text:p>一般</text:p>
          </table:table-cell>
          <table:table-cell table:style-name="ce124" office:value-type="float" office:value="15" calcext:value-type="float">
            <text:p>15</text:p>
          </table:table-cell>
          <table:table-cell table:number-columns-repeated="2" table:style-name="ce124" office:value-type="string" calcext:value-type="string">
            <text:p>-</text:p>
          </table:table-cell>
          <table:table-cell table:style-name="ce17" office:value-type="string" calcext:value-type="string">
            <text:p>你持有“世界的支配者”的因子。藉由使用該因子，你侵蝕著世界，構築著妨害他人的狀況。</text:p>
          </table:table-cell>
          <table:table-cell table:style-name="ce17" office:value-type="string" calcext:value-type="string">
            <text:p>你的《結界化》效果中，該場景內登場的角色進行判定前使用，該判定的骰數-2個。該道具只有取得了「D-Lois：古代種」的角色可以取得，該效果一回合可以使用一次。</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支配者的微笑</text:p>
          </table:table-cell>
          <table:table-cell table:style-name="ce124" office:value-type="string" calcext:value-type="string">
            <text:p>一般</text:p>
          </table:table-cell>
          <table:table-cell table:style-name="ce124" office:value-type="float" office:value="30" calcext:value-type="float">
            <text:p>30</text:p>
          </table:table-cell>
          <table:table-cell table:number-columns-repeated="2" table:style-name="ce124" office:value-type="string" calcext:value-type="string">
            <text:p>-</text:p>
          </table:table-cell>
          <table:table-cell table:style-name="ce17" office:value-type="string" calcext:value-type="string">
            <text:p>表示你持有“世界的支配者”，使見到的人成為同伴的魅力。</text:p>
          </table:table-cell>
          <table:table-cell table:style-name="ce17" office:value-type="string" calcext:value-type="string">
            <text:p>主要動作使用，與該場景內登場的一個角色進行&lt;交涉&gt;對決，你勝出時，該劇本間，在該效果的對決中落敗的角色在對象包含你的判定中骰數-2個。</text:p>
          </table:table-cell>
          <table:table-cell table:style-name="ce124" office:value-type="string" calcext:value-type="string">
            <text:p>IA P189</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3" office:value-type="string" calcext:value-type="string" table:number-columns-spanned="13" table:number-rows-spanned="1">
            <text:p>Breakup</text:p>
          </table:table-cell>
          <table:covered-table-cell table:number-columns-repeated="12" table:style-name="ce75"/>
          <table:table-cell table:style-name="ce130" table:number-columns-repeated="13"/>
          <table:table-cell table:number-columns-repeated="998"/>
        </table:table-row>
        <table:table-row table:style-name="ro5">
          <table:table-cell table:style-name="ce124" office:value-type="string" calcext:value-type="string">
            <text:p>猩紅之卵</text:p>
            <text:p>（クリムソンエッグ）</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表示你的從者擁有能散佈“Σ變換”（Σ-Trans，能將人超越者化）的器官的獨特道具。從者形狀多為如血一般赤紅的卵。</text:p>
          </table:table-cell>
          <table:table-cell table:style-name="ce17" office:value-type="string" calcext:value-type="string">
            <text:p>你的從者在主要階段使用，與該從者處於同一接戰區域的一名超越者下次進行的主要動作的判定暴擊值-1（最小為6）。使用了這個效果的從者，在其主要階段結束後HP變為0。</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從者引爆</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表示你擁有可以隨時引爆從者的能力。</text:p>
          </table:table-cell>
          <table:table-cell table:style-name="ce17" office:value-type="string" calcext:value-type="string">
            <text:p>鮮血真祖症候可以取得。先攻階段使用，使你一個該場景中登場的從者進行主要階段，該主要階段間，從者無法進行戰鬥移動和全力移動，且主要動作只能進行組合了《暗夜的詛咒》的判定。</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從者引爆II</text:p>
          </table:table-cell>
          <table:table-cell table:style-name="ce124" office:value-type="string" calcext:value-type="string">
            <text:p>一般</text:p>
          </table:table-cell>
          <table:table-cell table:style-name="ce124" office:value-type="float" office:value="10" calcext:value-type="float">
            <text:p>10</text:p>
          </table:table-cell>
          <table:table-cell table:number-columns-repeated="2" table:style-name="ce124" office:value-type="string" calcext:value-type="string">
            <text:p>-</text:p>
          </table:table-cell>
          <table:table-cell table:style-name="ce17" office:value-type="string" calcext:value-type="string">
            <text:p>表示你從者的爆炸能夠破壞建築物或載具。</text:p>
          </table:table-cell>
          <table:table-cell table:style-name="ce17" office:value-type="string" calcext:value-type="string">
            <text:p>你的從者使用《暗夜的詛咒》時，可以將進行攻擊替換為破壞該從者所在接戰區域中的一棟建築物或是一輛載具，建築物具體破壞到什麼程度由GM決定。你進行組合了《暗夜的詛咒》的判定時，決定是否應用這個效果。</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適合者的因子</text:p>
          </table:table-cell>
          <table:table-cell table:style-name="ce124" office:value-type="string" calcext:value-type="string">
            <text:p>一般</text:p>
          </table:table-cell>
          <table:table-cell table:style-name="ce124" office:value-type="float" office:value="10" calcext:value-type="float">
            <text:p>10</text:p>
          </table:table-cell>
          <table:table-cell table:number-columns-repeated="2" table:style-name="ce124" office:value-type="string" calcext:value-type="string">
            <text:p>-</text:p>
          </table:table-cell>
          <table:table-cell table:style-name="ce17" office:value-type="string" calcext:value-type="string">
            <text:p>表示你是以“賢者之石”的適應者作為原型被創造出來的複製體。</text:p>
          </table:table-cell>
          <table:table-cell table:style-name="ce17" office:value-type="string" calcext:value-type="string">
            <text:p>你與取得了「D-Lois：賢者之石」的角色處於同一接戰區時，你所有判定骰數+1個。該道具只有取得了「D-Lois：複製體」的角色才可以取得。</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成長之石</text:p>
            <text:p>（グローイングストーン）</text:p>
          </table:table-cell>
          <table:table-cell table:style-name="ce124" office:value-type="string" calcext:value-type="string">
            <text:p>一般</text:p>
          </table:table-cell>
          <table:table-cell table:style-name="ce124" office:value-type="float" office:value="30" calcext:value-type="float">
            <text:p>30</text:p>
          </table:table-cell>
          <table:table-cell table:number-columns-repeated="2" table:style-name="ce124" office:value-type="string" calcext:value-type="string">
            <text:p>-</text:p>
          </table:table-cell>
          <table:table-cell table:style-name="ce17" office:value-type="string" calcext:value-type="string">
            <text:p>表示你的賢者之石吸收了其他賢者之石，或者克服了困難得以成長。</text:p>
          </table:table-cell>
          <table:table-cell table:style-name="ce17" office:value-type="string" calcext:value-type="string">
            <text:p>你取得的「D-Lois：賢者之石」的使用次數+1次。這個道具只有取得了「D-Lois：賢者之石」的角色才可以取得。</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高位：地球</text:p>
            <text:p>（プライメイト：アース）</text:p>
          </table:table-cell>
          <table:table-cell table:style-name="ce124" office:value-type="string" calcext:value-type="string">
            <text:p>一般</text:p>
          </table:table-cell>
          <table:table-cell table:style-name="ce124" office:value-type="float" office:value="200" calcext:value-type="float">
            <text:p>20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表示你是與地球同化了的高位超越者的獨特道具。地球上所有的生命亦是你的生命。</text:p>
          </table:table-cell>
          <table:table-cell table:style-name="ce17" office:value-type="string" calcext:value-type="string">
            <text:p>主要動作使用，使該場景中登場了的所有未取得D-Lois或E-Lois的角色全數HP歸零，同時你的HP回復至最大值，該效果一劇本可以使用一次。該道具只有取得了道具“成長之石”的角色才能取得。</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高位：永恆</text:p>
            <text:p>（プライメイト：エターナル）</text:p>
          </table:table-cell>
          <table:table-cell table:style-name="ce124" office:value-type="string" calcext:value-type="string">
            <text:p>一般</text:p>
          </table:table-cell>
          <table:table-cell table:style-name="ce124" office:value-type="float" office:value="200" calcext:value-type="float">
            <text:p>200</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表示你是獲得了永恆生命的高位超越者的獨特道具。</text:p>
          </table:table-cell>
          <table:table-cell table:style-name="ce17" office:value-type="string" calcext:value-type="string">
            <text:p>場景內登場的角色陷入戰鬥不能時使用，解除該角色的[戰鬥不能]狀態並將其HP回復至最大值，該效果一場景可以使用一次。該道具只有取得了道具“成長之石”的角色才能取得。</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高位：回歸</text:p>
            <text:p>（プライメイト：リターンズ）</text:p>
          </table:table-cell>
          <table:table-cell table:style-name="ce124" office:value-type="string" calcext:value-type="string">
            <text:p>一般</text:p>
          </table:table-cell>
          <table:table-cell table:style-name="ce124" office:value-type="float" office:value="200" calcext:value-type="float">
            <text:p>20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表示你是已經回歸日常生活的高位超越者的獨特道具。</text:p>
          </table:table-cell>
          <table:table-cell table:style-name="ce17" office:value-type="string" calcext:value-type="string">
            <text:p>任何時候均可使用，選擇100點以下的任意點數，你的侵蝕率立即上升這個數值，同時該場景中登場的，除你以外所有角色的侵蝕率下降與之相同的數值，該效果一劇本可以使用一次。該道具只有取得了道具“成長之石”的角色才能取得。</text:p>
          </table:table-cell>
          <table:table-cell table:style-name="ce124" office:value-type="string" calcext:value-type="string">
            <text:p>IA P190</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3" office:value-type="string" calcext:value-type="string" table:number-columns-spanned="13" table:number-rows-spanned="1">
            <text:p>Origin</text:p>
          </table:table-cell>
          <table:covered-table-cell table:number-columns-repeated="12" table:style-name="ce75"/>
          <table:table-cell table:style-name="ce130" table:number-columns-repeated="13"/>
          <table:table-cell table:number-columns-repeated="998"/>
        </table:table-row>
        <table:table-row table:style-name="ro5">
          <table:table-cell table:style-name="ce124" office:value-type="string" calcext:value-type="string">
            <text:p>未完的情歌</text:p>
            <text:p>（未完のラブソング）</text:p>
          </table:table-cell>
          <table:table-cell table:style-name="ce124" office:value-type="string" calcext:value-type="string">
            <text:p>一般</text:p>
          </table:table-cell>
          <table:table-cell table:style-name="ce124" office:value-type="float" office:value="2" calcext:value-type="float">
            <text:p>2</text:p>
          </table:table-cell>
          <table:table-cell table:number-columns-repeated="2" table:style-name="ce124" office:value-type="string" calcext:value-type="string">
            <text:p>-</text:p>
          </table:table-cell>
          <table:table-cell table:style-name="ce17" office:value-type="string" calcext:value-type="string">
            <text:p>你為了表達對什麼人的戀心而自創的情歌。雖然因為還沒有完成所以沒有給人聽過，但一旦完成的話，這首歌想必會贏得對方的心吧。</text:p>
          </table:table-cell>
          <table:table-cell table:style-name="ce17" office:value-type="string" calcext:value-type="string">
            <text:p>你取得的Lois中，正面情感為[純愛]的角色登場期間，你進行的主要動作的判定骰數+2個，回應動作的判定骰數-1個。</text:p>
          </table:table-cell>
          <table:table-cell table:style-name="ce124" office:value-type="string" calcext:value-type="string">
            <text:p>IA P191</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引用的助言</text:p>
            <text:p>（引用による助言）</text:p>
          </table:table-cell>
          <table:table-cell table:style-name="ce124" office:value-type="string" calcext:value-type="string">
            <text:p>一般</text:p>
          </table:table-cell>
          <table:table-cell table:style-name="ce124" office:value-type="float" office:value="3" calcext:value-type="float">
            <text:p>3</text:p>
          </table:table-cell>
          <table:table-cell table:style-name="ce124" office:value-type="string" calcext:value-type="string">
            <text:p>-</text:p>
          </table:table-cell>
          <table:table-cell table:style-name="ce124" office:value-type="string" calcext:value-type="string">
            <text:p>3/劇本</text:p>
          </table:table-cell>
          <table:table-cell table:style-name="ce17" office:value-type="string" calcext:value-type="string">
            <text:p>從莎士比亞選集之類的作品裡引用的臺詞或者話語，能為對象提供建言。</text:p>
          </table:table-cell>
          <table:table-cell table:style-name="ce17" office:value-type="string" calcext:value-type="string">
            <text:p>場景中登場的你以外的角色進行判定前使用，判定骰數+1個，該效果一劇本可以使用三次。</text:p>
          </table:table-cell>
          <table:table-cell table:style-name="ce124" office:value-type="string" calcext:value-type="string">
            <text:p>IA P191</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衛星之眼</text:p>
            <text:p>（サテライトアイ）</text:p>
          </table:table-cell>
          <table:table-cell table:style-name="ce124" office:value-type="string" calcext:value-type="string">
            <text:p>一般</text:p>
          </table:table-cell>
          <table:table-cell table:style-name="ce124" office:value-type="float" office:value="3" calcext:value-type="float">
            <text:p>3</text:p>
          </table:table-cell>
          <table:table-cell table:style-name="ce124" office:value-type="string" calcext:value-type="string">
            <text:p>-</text:p>
          </table:table-cell>
          <table:table-cell table:style-name="ce124" office:value-type="string" calcext:value-type="string">
            <text:p>3/劇本</text:p>
          </table:table-cell>
          <table:table-cell table:style-name="ce17" office:value-type="string" calcext:value-type="string">
            <text:p>你接受了來自“衛星軌道支部長”大宙ヒカル的援助。由於她的支援，你的行動變得有利。</text:p>
          </table:table-cell>
          <table:table-cell table:style-name="ce17" office:value-type="string" calcext:value-type="string">
            <text:p>你進行判定前使用，該判定的達成值+2，該效果一劇本可以使用三次。</text:p>
          </table:table-cell>
          <table:table-cell table:style-name="ce124" office:value-type="string" calcext:value-type="string">
            <text:p>IA P191</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超越者導師</text:p>
            <text:p>（オーヴァードメンター）</text:p>
          </table:table-cell>
          <table:table-cell table:style-name="ce124" office:value-type="string" calcext:value-type="string">
            <text:p>一般</text:p>
          </table:table-cell>
          <table:table-cell table:style-name="ce124" office:value-type="float" office:value="5" calcext:value-type="float">
            <text:p>5</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表示你有對超越者進行教育的知識。</text:p>
          </table:table-cell>
          <table:table-cell table:style-name="ce17" office:value-type="string" calcext:value-type="string">
            <text:p>場景中登場的你以外的角色進行組合了異能的判定前使用，判定骰數+2個，該效果一劇本可以使用一次。</text:p>
          </table:table-cell>
          <table:table-cell table:style-name="ce124" office:value-type="string" calcext:value-type="string">
            <text:p>IA P191</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復仇的標簽</text:p>
            <text:p>（復讐のタグ）</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被什麼人殺害的同伴的遺物標簽。你向著標簽，立下了復仇的誓言。</text:p>
          </table:table-cell>
          <table:table-cell table:style-name="ce17" office:value-type="string" calcext:value-type="string">
            <text:p>你進行的攻擊的攻擊力+3，但你進行攻擊時侵蝕率+1。</text:p>
          </table:table-cell>
          <table:table-cell table:style-name="ce124" office:value-type="string" calcext:value-type="string">
            <text:p>IA P191</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超量對抗</text:p>
            <text:p>（オーバーカウンター）</text:p>
          </table:table-cell>
          <table:table-cell table:style-name="ce124" office:value-type="string" calcext:value-type="string">
            <text:p>一般</text:p>
          </table:table-cell>
          <table:table-cell table:style-name="ce124" office:value-type="float" office:value="10" calcext:value-type="float">
            <text:p>10</text:p>
          </table:table-cell>
          <table:table-cell table:number-columns-repeated="2" table:style-name="ce124" office:value-type="string" calcext:value-type="string">
            <text:p>-</text:p>
          </table:table-cell>
          <table:table-cell table:style-name="ce17" office:value-type="string" calcext:value-type="string">
            <text:p>表示你身為對抗種的力量過於強大，甚至會傷害自己。</text:p>
          </table:table-cell>
          <table:table-cell table:style-name="ce17" office:value-type="string" calcext:value-type="string">
            <text:p>你對超越者造成的傷害+2D10，但使用這個效果會讓你在該主要階段結束時失去2D10點HP。該道具只有取得了「D-Lois：對抗種」的角色才能取得。</text:p>
          </table:table-cell>
          <table:table-cell table:style-name="ce124" office:value-type="string" calcext:value-type="string">
            <text:p>IA P191</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回憶的照片</text:p>
            <text:p>（思い出の寫真）</text:p>
          </table:table-cell>
          <table:table-cell table:style-name="ce124" office:value-type="string" calcext:value-type="string">
            <text:p>一般</text:p>
          </table:table-cell>
          <table:table-cell table:style-name="ce124" office:value-type="float" office:value="15" calcext:value-type="float">
            <text:p>15</text:p>
          </table:table-cell>
          <table:table-cell table:number-columns-repeated="2" table:style-name="ce124" office:value-type="string" calcext:value-type="string">
            <text:p>-</text:p>
          </table:table-cell>
          <table:table-cell table:style-name="ce17" office:value-type="string" calcext:value-type="string">
            <text:p>成為了你的回憶的一張照片。這張照片將你的心與日常生活相連結。</text:p>
          </table:table-cell>
          <table:table-cell table:style-name="ce17" office:value-type="string" calcext:value-type="string">
            <text:p>你進行回歸判定時，侵蝕率額外-4。該道具只能取得1個。</text:p>
          </table:table-cell>
          <table:table-cell table:style-name="ce124" office:value-type="string" calcext:value-type="string">
            <text:p>IA P191</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戴因斯雷夫程序</text:p>
            <text:p>（ダインスレイフプログラム）</text:p>
          </table:table-cell>
          <table:table-cell table:style-name="ce124" office:value-type="string" calcext:value-type="string">
            <text:p>一般</text:p>
          </table:table-cell>
          <table:table-cell table:style-name="ce124" office:value-type="float" office:value="30" calcext:value-type="float">
            <text:p>30</text:p>
          </table:table-cell>
          <table:table-cell table:number-columns-repeated="2" table:style-name="ce124" office:value-type="string" calcext:value-type="string">
            <text:p>-</text:p>
          </table:table-cell>
          <table:table-cell table:style-name="ce17" office:value-type="string" calcext:value-type="string">
            <text:p>在你的腦海中為解決當前問題而創造並運作必要的模擬人格的程序。模擬人格總體來說無情而冷酷，強大程度與你捨棄的牽絆互成比例是其特徵。</text:p>
          </table:table-cell>
          <table:table-cell table:style-name="ce17" office:value-type="string" calcext:value-type="string">
            <text:p>所有判定的骰數+[(7-[當前的Lois數])×2]個，[當前的Lois數]不包括Titus化的Lois、D-Lois和E-lois。</text:p>
          </table:table-cell>
          <table:table-cell table:style-name="ce124" office:value-type="string" calcext:value-type="string">
            <text:p>IA P191</text:p>
          </table:table-cell>
          <table:table-cell table:style-name="ce124" table:number-columns-repeated="2"/>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3" office:value-type="string" calcext:value-type="string" table:number-columns-spanned="13" table:number-rows-spanned="1">
            <text:p>Alive</text:p>
          </table:table-cell>
          <table:covered-table-cell table:number-columns-repeated="12" table:style-name="ce75"/>
          <table:table-cell table:style-name="ce130" table:number-columns-repeated="13"/>
          <table:table-cell table:number-columns-repeated="998"/>
        </table:table-row>
        <table:table-row table:style-name="ro5">
          <table:table-cell table:style-name="ce124" office:value-type="string" calcext:value-type="string">
            <text:p>點銀石：金星</text:p>
          </table:table-cell>
          <table:table-cell table:style-name="ce124" office:value-type="string" calcext:value-type="string">
            <text:p>一般</text:p>
          </table:table-cell>
          <table:table-cell table:style-name="ce124" office:value-type="float" office:value="0" calcext:value-type="float">
            <text:p>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你具有對“金星”的適應性。</text:p>
          </table:table-cell>
          <table:table-cell table:style-name="ce17" office:value-type="string" calcext:value-type="string">
            <text:p>你取得的「D-Lois：賢者之石」效果變更為如下效果：</text:p>
            <text:p>先攻階段使用，對場景中登場了的任意角色全員造成8D10點HP傷害，該效果沒有命中判定，對象無法執行回應動作，使用了這個效果的先攻階段結束時，你的侵蝕率+1D10，該效果一劇本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點銀石：土星</text:p>
          </table:table-cell>
          <table:table-cell table:style-name="ce124" office:value-type="string" calcext:value-type="string">
            <text:p>一般</text:p>
          </table:table-cell>
          <table:table-cell table:style-name="ce124" office:value-type="float" office:value="0" calcext:value-type="float">
            <text:p>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你具有對“土星”的適應性。</text:p>
          </table:table-cell>
          <table:table-cell table:style-name="ce17" office:value-type="string" calcext:value-type="string">
            <text:p>你取得的「D-Lois：賢者之石」效果變更為如下效果：</text:p>
            <text:p>場景中登場的角色陷入戰鬥不能或死亡時使用，解除其戰鬥不能或死亡，並將其HP回復至最大值，使用了這個效果的主要階段結束時，你的侵蝕率+1D10，該效果一劇本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點銀石：太陽</text:p>
          </table:table-cell>
          <table:table-cell table:style-name="ce124" office:value-type="string" calcext:value-type="string">
            <text:p>一般</text:p>
          </table:table-cell>
          <table:table-cell table:style-name="ce124" office:value-type="float" office:value="0" calcext:value-type="float">
            <text:p>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你具有對“太陽”的適應性。</text:p>
          </table:table-cell>
          <table:table-cell table:style-name="ce17" office:value-type="string" calcext:value-type="string">
            <text:p>你取得的「D-Lois：賢者之石」效果變更為如下效果：</text:p>
            <text:p>準備階段使用，該回合間，你取得的所有異能LV+2，此時可以超過其最大等級，但不會因此而增加使用次數，使用了該效果的回合的結算階段時，你的侵蝕率+1D10，該效果一劇本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點銀石：木星</text:p>
          </table:table-cell>
          <table:table-cell table:style-name="ce124" office:value-type="string" calcext:value-type="string">
            <text:p>一般</text:p>
          </table:table-cell>
          <table:table-cell table:style-name="ce124" office:value-type="float" office:value="0" calcext:value-type="float">
            <text:p>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你具有對“木星”的適應性。</text:p>
          </table:table-cell>
          <table:table-cell table:style-name="ce17" office:value-type="string" calcext:value-type="string">
            <text:p>你取得的「D-Lois：賢者之石」效果變更為如下效果：</text:p>
            <text:p>場景中登場的角色執行傷害擲骰後使用，使該傷害擲骰的結果-10D10（最低降至0點），但不能對不通過骰子決定的傷害生效，使用了該效果的主要階段結束時，你的侵蝕率+1D10。該效果一劇本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點銀石：水星</text:p>
          </table:table-cell>
          <table:table-cell table:style-name="ce124" office:value-type="string" calcext:value-type="string">
            <text:p>一般</text:p>
          </table:table-cell>
          <table:table-cell table:style-name="ce124" office:value-type="float" office:value="0" calcext:value-type="float">
            <text:p>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你具有對“水星”的適應性。</text:p>
          </table:table-cell>
          <table:table-cell table:style-name="ce17" office:value-type="string" calcext:value-type="string">
            <text:p>你取得的「D-Lois：賢者之石」效果變更為如下效果：</text:p>
            <text:p>你進行判定後使用，此次判定的達成值+20，該效果在對決判定中可以于對手的達成值計算完畢之後才使用，使用了這個效果的主要階段結束時，你的侵蝕率+1D10，該效果一劇本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點銀石：火星</text:p>
          </table:table-cell>
          <table:table-cell table:style-name="ce124" office:value-type="string" calcext:value-type="string">
            <text:p>一般</text:p>
          </table:table-cell>
          <table:table-cell table:style-name="ce124" office:value-type="float" office:value="0" calcext:value-type="float">
            <text:p>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你具有對“火星”的適應性。</text:p>
          </table:table-cell>
          <table:table-cell table:style-name="ce17" office:value-type="string" calcext:value-type="string">
            <text:p>你取得的「D-Lois：賢者之石」效果變更為如下效果：</text:p>
            <text:p>你進行傷害擲骰前使用，該傷害+5D10，但不能對不通過骰子決定的傷害生效，使用了該效果的主要階段結束時，你的侵蝕率+1D10，該效果一劇本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點銀石：月亮</text:p>
          </table:table-cell>
          <table:table-cell table:style-name="ce124" office:value-type="string" calcext:value-type="string">
            <text:p>一般</text:p>
          </table:table-cell>
          <table:table-cell table:style-name="ce124" office:value-type="float" office:value="0" calcext:value-type="float">
            <text:p>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你具有對“月亮”的適應性。</text:p>
          </table:table-cell>
          <table:table-cell table:style-name="ce17" office:value-type="string" calcext:value-type="string">
            <text:p>你取得的「D-Lois：賢者之石」效果變更為如下效果：</text:p>
            <text:p>你進行判定前使用，判定骰數+20個，使用了該效果的主要階段結束時，你的侵蝕率+2D10，該效果一劇本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統合者</text:p>
          </table:table-cell>
          <table:table-cell table:style-name="ce124" office:value-type="string" calcext:value-type="string">
            <text:p>一般</text:p>
          </table:table-cell>
          <table:table-cell table:style-name="ce124" office:value-type="float" office:value="10" calcext:value-type="float">
            <text:p>10</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表示你擁有統合點銀石的能力，存在覺醒成為高位超越者的可能性。</text:p>
          </table:table-cell>
          <table:table-cell table:style-name="ce17" office:value-type="string" calcext:value-type="string">
            <text:p>任何時候均可使用，從你入手的「點銀石：●●」中選擇一個，該場景間，你取得的「D-Lois：賢者之石」的效果變為與你所選的「點銀石：●●」相同，該效果一場景可以使用一次。</text:p>
          </table:table-cell>
          <table:table-cell table:style-name="ce124" office:value-type="string" calcext:value-type="string">
            <text:p>IA P192</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3" office:value-type="string" calcext:value-type="string" table:number-columns-spanned="13" table:number-rows-spanned="1">
            <text:p>Exodus</text:p>
          </table:table-cell>
          <table:covered-table-cell table:number-columns-repeated="12" table:style-name="ce75"/>
          <table:table-cell table:style-name="ce130" table:number-columns-repeated="13"/>
          <table:table-cell table:number-columns-repeated="998"/>
        </table:table-row>
        <table:table-row table:style-name="ro5">
          <table:table-cell table:style-name="ce124" office:value-type="string" calcext:value-type="string">
            <text:p>流砂守禦者</text:p>
            <text:p>（サンドブロッカー）</text:p>
          </table:table-cell>
          <table:table-cell table:style-name="ce124" office:value-type="string" calcext:value-type="string">
            <text:p>武器/近戰</text:p>
          </table:table-cell>
          <table:table-cell table:style-name="ce124" office:value-type="float" office:value="15" calcext:value-type="float">
            <text:p>15</text:p>
          </table:table-cell>
          <table:table-cell table:style-name="ce124" office:value-type="string" calcext:value-type="string">
            <text:p>&lt;RC&gt;</text:p>
          </table:table-cell>
          <table:table-cell table:style-name="ce124" office:value-type="string" calcext:value-type="string">
            <text:p>1/回合</text:p>
          </table:table-cell>
          <table:table-cell table:style-name="ce17" office:value-type="string" calcext:value-type="string">
            <text:p>以“X02沙人”的防禦能力數據為基礎開發的EX背教者病毒砂及其控制單元。能讀取使用者的思想，自由變換形態。</text:p>
          </table:table-cell>
          <table:table-cell table:style-name="ce17" office:value-type="string" calcext:value-type="string">
            <text:p>命中：-2  攻擊力：2  格擋值：5  射程：至近</text:p>
            <text:p>進行掩護前使用，該掩護格擋值+2D10，使用該效果時侵蝕率+2，該效果一回合可以使用一次。</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死亡收割者</text:p>
            <text:p>（デスリーパー）</text:p>
          </table:table-cell>
          <table:table-cell table:style-name="ce124" office:value-type="string" calcext:value-type="string">
            <text:p>武器/近戰</text:p>
          </table:table-cell>
          <table:table-cell table:style-name="ce124" office:value-type="float" office:value="15" calcext:value-type="float">
            <text:p>15</text:p>
          </table:table-cell>
          <table:table-cell table:style-name="ce124" office:value-type="string" calcext:value-type="string">
            <text:p>&lt;近戰&gt;</text:p>
          </table:table-cell>
          <table:table-cell table:style-name="ce124" office:value-type="string" calcext:value-type="string">
            <text:p>-</text:p>
          </table:table-cell>
          <table:table-cell table:style-name="ce17" office:value-type="string" calcext:value-type="string">
            <text:p>以“X08死之引導者”的對背教者能力數據為基礎開發的鐮刀型武器。搭載了能使背教者病毒毀滅的機能。</text:p>
          </table:table-cell>
          <table:table-cell table:style-name="ce17" office:value-type="string" calcext:value-type="string">
            <text:p>命中：-4  攻擊力：13  格擋值：1  射程：至近</text:p>
            <text:p>使用該武器的近戰攻擊對象為超越者（包括原菌）時，該攻擊的傷害+1D10，使用該武器的主要階段結束時，你失去2點HP。</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多才多異</text:p>
            <text:p>（マルチエフェクター）</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以“X10整合”控制多個症候的能力數據為基礎開發的EX背教者回路。在體內植入的話，就會變得能使用自身症候以外的異能了。然而由於尚未完成開發，其實用性很低。</text:p>
          </table:table-cell>
          <table:table-cell table:style-name="ce17" office:value-type="string" calcext:value-type="string">
            <text:p>取得時，從你的症候以外的症候中選擇一個，你可以取得該症候群的簡單異能，但取得時仍需為其支付經驗點。</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超限單元</text:p>
            <text:p>（イクシードユニット）</text:p>
          </table:table-cell>
          <table:table-cell table:style-name="ce124" office:value-type="string" calcext:value-type="string">
            <text:p>一般</text:p>
          </table:table-cell>
          <table:table-cell table:style-name="ce124" office:value-type="float" office:value="15" calcext:value-type="float">
            <text:p>15</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以“X03超限”的強化能力為基礎開發的納米機械。與使用者的肉體融合，可以提供強化身體能力、反射速度，為思考提供輔助之類的作用。</text:p>
          </table:table-cell>
          <table:table-cell table:style-name="ce17" office:value-type="string" calcext:value-type="string">
            <text:p>取得時從基本能力值（肉體/感覺/精神/社會）中選擇一項。準備階段使用，該場景間，使用了所選能力值的判定骰數+3個，該效果一劇本可以使用一次。</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風靈領域</text:p>
            <text:p>（シルフィードレルム）</text:p>
          </table:table-cell>
          <table:table-cell table:style-name="ce124" office:value-type="string" calcext:value-type="string">
            <text:p>一般</text:p>
          </table:table-cell>
          <table:table-cell table:style-name="ce124" office:value-type="float" office:value="15" calcext:value-type="float">
            <text:p>15</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以“X05風靈”的廣域殲滅能力為基礎開發的手鐲型裝置。一經啟動，便能將異能的效果向周圍傳播。</text:p>
          </table:table-cell>
          <table:table-cell table:style-name="ce17" office:value-type="string" calcext:value-type="string">
            <text:p>你使用異能前使用，使該異能變為[對象：範圍（選擇）]，使用該效果時侵蝕率+3，該效果一劇本可以使用一次。</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滯止裝置</text:p>
            <text:p>（ステイシスデバイス）</text:p>
          </table:table-cell>
          <table:table-cell table:style-name="ce124" office:value-type="string" calcext:value-type="string">
            <text:p>一般</text:p>
          </table:table-cell>
          <table:table-cell table:style-name="ce124" office:value-type="float" office:value="15" calcext:value-type="float">
            <text:p>15</text:p>
          </table:table-cell>
          <table:table-cell table:style-name="ce124" office:value-type="string" calcext:value-type="string">
            <text:p>-</text:p>
          </table:table-cell>
          <table:table-cell table:style-name="ce124" office:value-type="string" calcext:value-type="string">
            <text:p>3/劇本</text:p>
          </table:table-cell>
          <table:table-cell table:style-name="ce17" office:value-type="string" calcext:value-type="string">
            <text:p>以“X07滯止”的動能停止能力為基礎開發的吊墜型裝置。一經啟動，便可讓敵人的行動暫時停滯下來。</text:p>
          </table:table-cell>
          <table:table-cell table:style-name="ce17" office:value-type="string" calcext:value-type="string">
            <text:p>場景中登場的角色進行判定前使用，判定骰數-3個，使用該效果時侵蝕率+2，該效果一劇本可以使用三次。</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皮克小寶</text:p>
            <text:p>（ピクシーギズモ）</text:p>
          </table:table-cell>
          <table:table-cell table:style-name="ce124" office:value-type="string" calcext:value-type="string">
            <text:p>一般</text:p>
          </table:table-cell>
          <table:table-cell table:style-name="ce124" office:value-type="float" office:value="15" calcext:value-type="float">
            <text:p>15</text:p>
          </table:table-cell>
          <table:table-cell table:number-columns-repeated="2" table:style-name="ce124" office:value-type="string" calcext:value-type="string">
            <text:p>-</text:p>
          </table:table-cell>
          <table:table-cell table:style-name="ce17" office:value-type="string" calcext:value-type="string">
            <text:p>以“X06皮克精”的電子戰能力為基礎開發的便攜終端。其內置的AI程序，能以網絡為媒介，瞬間搜集各種各樣的信息和知識。另外，AI的性格和外形可以自由設定。</text:p>
          </table:table-cell>
          <table:table-cell table:style-name="ce17" office:value-type="string" calcext:value-type="string">
            <text:p>你進行的&lt;情報：●●&gt;和&lt;知識：●●&gt;判定骰數+2個。</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野獸之心</text:p>
            <text:p>（ビーストハート）</text:p>
          </table:table-cell>
          <table:table-cell table:style-name="ce124" office:value-type="string" calcext:value-type="string">
            <text:p>一般</text:p>
          </table:table-cell>
          <table:table-cell table:style-name="ce124" office:value-type="float" office:value="15" calcext:value-type="float">
            <text:p>15</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以“X04百獸之王”的身體強化能力為基礎開發的藥品。使用後會強化肉體，獲得驚人的耐久力。</text:p>
          </table:table-cell>
          <table:table-cell table:style-name="ce17" office:value-type="string" calcext:value-type="string">
            <text:p>準備階段時使用，你的HP+20，此時HP可以超過上限，所增加的HP持續至正常失去或該場景結束，使用該效果時侵蝕率+5，該效果一劇本可以使用一次。</text:p>
          </table:table-cell>
          <table:table-cell table:style-name="ce124" office:value-type="string" calcext:value-type="string">
            <text:p>IA P193</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克隆軀體</text:p>
            <text:p>（クローンボディ）</text:p>
          </table:table-cell>
          <table:table-cell table:style-name="ce124" office:value-type="string" calcext:value-type="string">
            <text:p>一般</text:p>
          </table:table-cell>
          <table:table-cell table:style-name="ce124" office:value-type="float" office:value="30" calcext:value-type="float">
            <text:p>30</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與自身幾乎擁有完全相同性能的軀體。本體死亡時，自動傳輸記憶，使同一個體實現復活。</text:p>
          </table:table-cell>
          <table:table-cell table:style-name="ce126" office:value-type="string" calcext:value-type="string">
            <text:p>你陷入戰鬥不能時使用，解除你的戰鬥不能，並將HP回復至1點，此外還會同時解除你受到的所有不利效果，從不良狀態到減少骰數等，具體適用到什麼範圍由GM決定，該效果一劇本可以使用一次。</text:p>
          </table:table-cell>
          <table:table-cell table:style-name="ce124" office:value-type="string" calcext:value-type="string">
            <text:p>IA P194</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進化微晶</text:p>
            <text:p>（エボルフラグション）</text:p>
          </table:table-cell>
          <table:table-cell table:style-name="ce124" office:value-type="string" calcext:value-type="string">
            <text:p>一般</text:p>
          </table:table-cell>
          <table:table-cell table:style-name="ce124" office:value-type="float" office:value="50" calcext:value-type="float">
            <text:p>50</text:p>
          </table:table-cell>
          <table:table-cell table:number-columns-repeated="2" table:style-name="ce124" office:value-type="string" calcext:value-type="string">
            <text:p>-</text:p>
          </table:table-cell>
          <table:table-cell table:style-name="ce17" office:value-type="string" calcext:value-type="string">
            <text:p>由“X09”諏訪原真也的力量進化的背教者病毒結晶體，適合的超越者可以藉此發現更加強力的異能。</text:p>
          </table:table-cell>
          <table:table-cell table:style-name="ce17" office:value-type="string" calcext:value-type="string">
            <text:p>取得時，從你取得的「一回合可以使用一次」的異能中選擇一個，所選異能的使用次數限制變為「一回合可以使用三次」，但所選異能的侵蝕值+2。</text:p>
          </table:table-cell>
          <table:table-cell table:style-name="ce124" office:value-type="string" calcext:value-type="string">
            <text:p>IA P194</text:p>
          </table:table-cell>
          <table:table-cell table:style-name="ce124" table:number-columns-repeated="5"/>
          <table:table-cell table:style-name="ce130" table:number-columns-repeated="13"/>
          <table:table-cell table:number-columns-repeated="998"/>
        </table:table-row>
        <table:table-row table:style-name="ro5">
          <table:table-cell table:style-name="ce124" office:value-type="string" calcext:value-type="string">
            <text:p>阿瑪珈藥物</text:p>
            <text:p>（アマガドラッグ）</text:p>
          </table:table-cell>
          <table:table-cell table:style-name="ce124" office:value-type="string" calcext:value-type="string">
            <text:p>消耗品</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阿瑪珈教授開發的超越者強化藥。和效果相比，其副作用過於嚴重，因此沒有量產，但據稱初期生產的份至今依然保存在什麼地方。</text:p>
          </table:table-cell>
          <table:table-cell table:style-name="ce17" office:value-type="string" calcext:value-type="string">
            <text:p>次要動作使用，該場景間，組合了異能的判定骰數+1個，使用該效果時侵蝕率+1D10。該道具可以一次性使用多個，效果將會疊加。該道具最多可以取得至3個。</text:p>
          </table:table-cell>
          <table:table-cell table:style-name="ce124" office:value-type="string" calcext:value-type="string">
            <text:p>IA P194</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3" office:value-type="string" calcext:value-type="string" table:number-columns-spanned="13" table:number-rows-spanned="1">
            <text:p>Desire</text:p>
          </table:table-cell>
          <table:covered-table-cell table:number-columns-repeated="12" table:style-name="ce75"/>
          <table:table-cell table:style-name="ce130" table:number-columns-repeated="13"/>
          <table:table-cell table:number-columns-repeated="998"/>
        </table:table-row>
        <table:table-row table:style-name="ro5">
          <table:table-cell table:style-name="ce124" office:value-type="string" calcext:value-type="string">
            <text:p>素材適合者</text:p>
          </table:table-cell>
          <table:table-cell table:style-name="ce124" office:value-type="string" calcext:value-type="string">
            <text:p>一般</text:p>
          </table:table-cell>
          <table:table-cell table:style-name="ce124" office:value-type="float" office:value="5" calcext:value-type="float">
            <text:p>5</text:p>
          </table:table-cell>
          <table:table-cell table:number-columns-repeated="2" table:style-name="ce124" office:value-type="string" calcext:value-type="string">
            <text:p>-</text:p>
          </table:table-cell>
          <table:table-cell table:style-name="ce17" office:value-type="string" calcext:value-type="string">
            <text:p>表示你是能夠與素材同化的適合者。</text:p>
          </table:table-cell>
          <table:table-cell table:style-name="ce17" office:value-type="string" calcext:value-type="string">
            <text:p>你能夠使用持有的「素材：●●」的效果；即使此時並非【取得該道具】的狀態，也可以受到素材效果的影響。</text:p>
          </table:table-cell>
          <table:table-cell table:style-name="ce124" office:value-type="string" calcext:value-type="string">
            <text:p>IA P194</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心臟</text:p>
          </table:table-cell>
          <table:table-cell table:style-name="ce124" office:value-type="string" calcext:value-type="string">
            <text:p>一般</text:p>
          </table:table-cell>
          <table:table-cell table:style-name="ce124" office:value-type="float" office:value="25" calcext:value-type="float">
            <text:p>25</text:p>
          </table:table-cell>
          <table:table-cell table:number-columns-repeated="2" table:style-name="ce124" office:value-type="string" calcext:value-type="string">
            <text:p>-</text:p>
          </table:table-cell>
          <table:table-cell table:style-name="ce17" office:value-type="string" calcext:value-type="string">
            <text:p>與你的心臟同化的素材。強化過的心臟令強力的血液流遍你的全身。</text:p>
          </table:table-cell>
          <table:table-cell table:style-name="ce17" office:value-type="string" calcext:value-type="string">
            <text:p>你的所有能力值+5，你的侵蝕率基本值+10。</text:p>
          </table:table-cell>
          <table:table-cell table:style-name="ce124" office:value-type="string" calcext:value-type="string">
            <text:p>IA P194</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脊椎</text:p>
          </table:table-cell>
          <table:table-cell table:style-name="ce124" office:value-type="string" calcext:value-type="string">
            <text:p>一般</text:p>
          </table:table-cell>
          <table:table-cell table:style-name="ce124" office:value-type="float" office:value="25" calcext:value-type="float">
            <text:p>25</text:p>
          </table:table-cell>
          <table:table-cell table:number-columns-repeated="2" table:style-name="ce124" office:value-type="string" calcext:value-type="string">
            <text:p>-</text:p>
          </table:table-cell>
          <table:table-cell table:style-name="ce17" office:value-type="string" calcext:value-type="string">
            <text:p>與你的脊椎同化的素材。能以脊椎為中心，提高身體能力。</text:p>
          </table:table-cell>
          <table:table-cell table:style-name="ce17" office:value-type="string" calcext:value-type="string">
            <text:p>結算階段使用，你的HP回復40點，使用該效果時侵蝕率+10。</text:p>
          </table:table-cell>
          <table:table-cell table:style-name="ce124" office:value-type="string" calcext:value-type="string">
            <text:p>IA P194</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腦髓</text:p>
          </table:table-cell>
          <table:table-cell table:style-name="ce124" office:value-type="string" calcext:value-type="string">
            <text:p>一般</text:p>
          </table:table-cell>
          <table:table-cell table:style-name="ce124" office:value-type="float" office:value="25" calcext:value-type="float">
            <text:p>25</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與你的大腦同化的素材。通過完全發揮腦潛能，你能進行精細的思考。</text:p>
          </table:table-cell>
          <table:table-cell table:style-name="ce17" office:value-type="string" calcext:value-type="string">
            <text:p>你進行判定前使用，判定中使用的&lt;技能&gt;的等級+2D10，該判定結束時，你需要進行衝動判定。該效果一場景可以使用一次。</text:p>
          </table:table-cell>
          <table:table-cell table:style-name="ce124" office:value-type="string" calcext:value-type="string">
            <text:p>IA P194</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肺</text:p>
          </table:table-cell>
          <table:table-cell table:style-name="ce124" office:value-type="string" calcext:value-type="string">
            <text:p>一般</text:p>
          </table:table-cell>
          <table:table-cell table:style-name="ce124" office:value-type="float" office:value="25" calcext:value-type="float">
            <text:p>25</text:p>
          </table:table-cell>
          <table:table-cell table:style-name="ce124" office:value-type="string" calcext:value-type="string">
            <text:p>-</text:p>
          </table:table-cell>
          <table:table-cell table:style-name="ce124" office:value-type="string" calcext:value-type="string">
            <text:p>1/劇本</text:p>
          </table:table-cell>
          <table:table-cell table:style-name="ce17" office:value-type="string" calcext:value-type="string">
            <text:p>與你的肺同化的素材。強化過的心肺功能可以活化你的肉體。</text:p>
          </table:table-cell>
          <table:table-cell table:style-name="ce17" office:value-type="string" calcext:value-type="string">
            <text:p>你陷入戰鬥不能或死亡時使用，解除戰鬥不能或死亡，並完全回復HP，該效果一劇本可以使用一次。此外，你的侵蝕率基本值+10。</text:p>
          </table:table-cell>
          <table:table-cell table:style-name="ce124" office:value-type="string" calcext:value-type="string">
            <text:p>IA P194</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左腳</text:p>
          </table:table-cell>
          <table:table-cell table:style-name="ce124" office:value-type="string" calcext:value-type="string">
            <text:p>一般</text:p>
          </table:table-cell>
          <table:table-cell table:style-name="ce124" office:value-type="float" office:value="25" calcext:value-type="float">
            <text:p>25</text:p>
          </table:table-cell>
          <table:table-cell table:number-columns-repeated="2" table:style-name="ce124" office:value-type="string" calcext:value-type="string">
            <text:p>-</text:p>
          </table:table-cell>
          <table:table-cell table:style-name="ce17" office:value-type="string" calcext:value-type="string">
            <text:p>與你的左腳同化的素材。能以視線所不能及的高速行動。</text:p>
          </table:table-cell>
          <table:table-cell table:style-name="ce17" office:value-type="string" calcext:value-type="string">
            <text:p>任何時候都可以使用，進入隱蔽狀態，以該效果進入隱蔽狀態時，在為「發覺你的隱蔽狀態」而進行的對決中，對手的判定骰數-4個，使用該效果時侵蝕率+10。</text:p>
          </table:table-cell>
          <table:table-cell table:style-name="ce124" office:value-type="string" calcext:value-type="string">
            <text:p>IA P195</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左手</text:p>
          </table:table-cell>
          <table:table-cell table:style-name="ce124" office:value-type="string" calcext:value-type="string">
            <text:p>一般</text:p>
          </table:table-cell>
          <table:table-cell table:style-name="ce124" office:value-type="float" office:value="25" calcext:value-type="float">
            <text:p>25</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與你的左手同化的素材。左手能使背教者病毒停止運作。</text:p>
          </table:table-cell>
          <table:table-cell table:style-name="ce17" office:value-type="string" calcext:value-type="string">
            <text:p>任何時候都可以使用，使用時，場景中登場的角色全員受到的除「素材：心臟」以外的「素材：●●」的效果，以及「時機：常駐」以外的正持續生效著的所有異能效果全部取消，使用該效果時，你的侵蝕率+1D10，該效果一場景可以使用一次。</text:p>
          </table:table-cell>
          <table:table-cell table:style-name="ce124" office:value-type="string" calcext:value-type="string">
            <text:p>IA P195</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左眼</text:p>
          </table:table-cell>
          <table:table-cell table:style-name="ce124" office:value-type="string" calcext:value-type="string">
            <text:p>一般</text:p>
          </table:table-cell>
          <table:table-cell table:style-name="ce124" office:value-type="float" office:value="25" calcext:value-type="float">
            <text:p>25</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與你的左眼同化的素材。左眼能使你預見惡兆。</text:p>
          </table:table-cell>
          <table:table-cell table:style-name="ce17" office:value-type="string" calcext:value-type="string">
            <text:p>對你的傷害結算完畢時使用，將該傷害無效化，並取消（預定的）因該攻擊而受到的不良狀態、骰數減少等效果，該判定結束時，你需要進行衝動判定，該效果一場景可以使用一次。</text:p>
          </table:table-cell>
          <table:table-cell table:style-name="ce124" office:value-type="string" calcext:value-type="string">
            <text:p>IA P195</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右腳</text:p>
          </table:table-cell>
          <table:table-cell table:style-name="ce124" office:value-type="string" calcext:value-type="string">
            <text:p>一般</text:p>
          </table:table-cell>
          <table:table-cell table:style-name="ce124" office:value-type="float" office:value="25" calcext:value-type="float">
            <text:p>25</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與你的右腳同化的素材。異常的腳力能賜予你猶如瞬間移動一般的爆發力。</text:p>
          </table:table-cell>
          <table:table-cell table:style-name="ce17" office:value-type="string" calcext:value-type="string">
            <text:p>以次要動作執行戰鬥移動時使用；則該戰鬥移動可以移動至場景內的任意位置，且該主要階段進行近戰攻擊時，攻擊對象無法閃避，該效果一場景可以使用一次。</text:p>
          </table:table-cell>
          <table:table-cell table:style-name="ce124" office:value-type="string" calcext:value-type="string">
            <text:p>IA P195</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右手</text:p>
          </table:table-cell>
          <table:table-cell table:style-name="ce124" office:value-type="string" calcext:value-type="string">
            <text:p>一般</text:p>
          </table:table-cell>
          <table:table-cell table:style-name="ce124" office:value-type="float" office:value="25" calcext:value-type="float">
            <text:p>25</text:p>
          </table:table-cell>
          <table:table-cell table:style-name="ce124" office:value-type="string" calcext:value-type="string">
            <text:p>-</text:p>
          </table:table-cell>
          <table:table-cell table:style-name="ce124" office:value-type="string" calcext:value-type="string">
            <text:p>1/場景</text:p>
          </table:table-cell>
          <table:table-cell table:style-name="ce17" office:value-type="string" calcext:value-type="string">
            <text:p>與你的右手同化的素材。</text:p>
          </table:table-cell>
          <table:table-cell table:style-name="ce126" office:value-type="string" calcext:value-type="string">
            <text:p>你進行攻擊判定時使用，該攻擊無法格擋，且該攻擊無視裝甲值，傷害+3D10，使用該效果的主要階段結束後，你需要進行衝動判定，該效果一場景可以使用一次。</text:p>
          </table:table-cell>
          <table:table-cell table:style-name="ce124" office:value-type="string" calcext:value-type="string">
            <text:p>IA P195</text:p>
          </table:table-cell>
          <table:table-cell table:style-name="ce7"/>
          <table:table-cell table:style-name="ce124"/>
          <table:table-cell table:style-name="ce17"/>
          <table:table-cell table:style-name="ce124" table:number-columns-repeated="2"/>
          <table:table-cell table:style-name="ce130" table:number-columns-repeated="13"/>
          <table:table-cell table:number-columns-repeated="998"/>
        </table:table-row>
        <table:table-row table:style-name="ro5">
          <table:table-cell table:style-name="ce124" office:value-type="string" calcext:value-type="string">
            <text:p>素材：右眼</text:p>
          </table:table-cell>
          <table:table-cell table:style-name="ce124" office:value-type="string" calcext:value-type="string">
            <text:p>一般</text:p>
          </table:table-cell>
          <table:table-cell table:style-name="ce124" office:value-type="float" office:value="25" calcext:value-type="float">
            <text:p>25</text:p>
          </table:table-cell>
          <table:table-cell table:number-columns-repeated="2" table:style-name="ce124" office:value-type="string" calcext:value-type="string">
            <text:p>-</text:p>
          </table:table-cell>
          <table:table-cell table:style-name="ce17" office:value-type="string" calcext:value-type="string">
            <text:p>與你的右眼同化的素材。右眼能使你預見福報。</text:p>
          </table:table-cell>
          <table:table-cell table:style-name="ce17" office:value-type="string" calcext:value-type="string">
            <text:p>你以主要動作進行擲骰前使用，最初的判定結果中所有骰子均視為骰出了10，該主要階段結束後，你需要進行衝動判定。</text:p>
          </table:table-cell>
          <table:table-cell table:style-name="ce124" office:value-type="string" calcext:value-type="string">
            <text:p>IA P195</text:p>
          </table:table-cell>
          <table:table-cell table:style-name="ce128" table:number-columns-repeated="5"/>
          <table:table-cell table:style-name="ce130" table:number-columns-repeated="13"/>
          <table:table-cell table:number-columns-repeated="998"/>
        </table:table-row>
        <table:table-row table:style-name="ro5" table:number-rows-repeated="26">
          <table:table-cell table:style-name="ce124" table:number-columns-repeated="5"/>
          <table:table-cell table:style-name="ce125"/>
          <table:table-cell table:style-name="ce17"/>
          <table:table-cell table:style-name="ce124" table:number-columns-repeated="6"/>
          <table:table-cell table:style-name="ce130" table:number-columns-repeated="13"/>
          <table:table-cell table:number-columns-repeated="998"/>
        </table:table-row>
        <table:table-row table:style-name="ro5" table:number-rows-repeated="6">
          <table:table-cell table:style-name="ce124" table:number-columns-repeated="5"/>
          <table:table-cell table:style-name="ce125"/>
          <table:table-cell table:style-name="ce17"/>
          <table:table-cell table:style-name="ce124" table:number-columns-repeated="19"/>
          <table:table-cell table:number-columns-repeated="998"/>
        </table:table-row>
        <table:table-row table:style-name="ro5">
          <table:table-cell table:style-name="ce124" table:number-columns-repeated="5"/>
          <table:table-cell table:style-name="ce125"/>
          <table:table-cell table:style-name="ce17"/>
          <table:table-cell table:style-name="ce124"/>
          <table:table-cell table:style-name="ce7" table:number-columns-repeated="2"/>
          <table:table-cell table:style-name="ce17"/>
          <table:table-cell table:style-name="ce124" table:number-columns-repeated="2"/>
          <table:table-cell table:style-name="ce130" table:number-columns-repeated="13"/>
          <table:table-cell table:number-columns-repeated="998"/>
        </table:table-row>
        <table:table-row table:style-name="ro5" table:number-rows-repeated="897">
          <table:table-cell table:style-name="ce124" table:number-columns-repeated="5"/>
          <table:table-cell table:style-name="ce125"/>
          <table:table-cell table:style-name="ce17"/>
          <table:table-cell table:style-name="ce124"/>
          <table:table-cell table:style-name="ce7" table:number-columns-repeated="2"/>
          <table:table-cell table:style-name="ce17"/>
          <table:table-cell table:style-name="ce124" table:number-columns-repeated="2"/>
          <table:table-cell table:style-name="ce130" table:number-columns-repeated="13"/>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異能力道具" table:style-name="ta12">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7" table:default-cell-style-name="Default"/>
        <table:table-column table:style-name="co10" table:default-cell-style-name="Default"/>
        <table:table-column table:style-name="co41" table:default-cell-style-name="Default"/>
        <table:table-column table:style-name="co65" table:number-columns-repeated="2" table:default-cell-style-name="Default"/>
        <table:table-column table:style-name="co17" table:default-cell-style-name="Default"/>
        <table:table-column table:style-name="co66" table:default-cell-style-name="Default"/>
        <table:table-column table:style-name="co67" table:default-cell-style-name="Default"/>
        <table:table-column table:style-name="co19" table:default-cell-style-name="Default"/>
        <table:table-column table:style-name="co5" table:number-columns-repeated="1011" table:default-cell-style-name="Default"/>
        <table:table-row table:style-name="ro16">
          <table:table-cell table:style-name="ce131" office:value-type="string" calcext:value-type="string">
            <text:p>名稱</text:p>
          </table:table-cell>
          <table:table-cell table:style-name="ce131" office:value-type="string" calcext:value-type="string">
            <text:p>種類</text:p>
          </table:table-cell>
          <table:table-cell table:style-name="ce131" office:value-type="string" calcext:value-type="string">
            <text:p>技能</text:p>
          </table:table-cell>
          <table:table-cell table:style-name="ce131" office:value-type="string" calcext:value-type="string">
            <text:p>命中</text:p>
          </table:table-cell>
          <table:table-cell table:style-name="ce131" office:value-type="string" calcext:value-type="string">
            <text:p>攻擊力</text:p>
          </table:table-cell>
          <table:table-cell table:style-name="ce131" office:value-type="string" calcext:value-type="string">
            <text:p>格擋值</text:p>
          </table:table-cell>
          <table:table-cell table:style-name="ce131" office:value-type="string" calcext:value-type="string">
            <text:p>射程</text:p>
          </table:table-cell>
          <table:table-cell table:style-name="ce131" office:value-type="string" calcext:value-type="string">
            <text:p>迴避</text:p>
          </table:table-cell>
          <table:table-cell table:style-name="ce131" office:value-type="string" calcext:value-type="string">
            <text:p>行動</text:p>
          </table:table-cell>
          <table:table-cell table:style-name="ce131" office:value-type="string" calcext:value-type="string">
            <text:p>裝甲值</text:p>
          </table:table-cell>
          <table:table-cell table:style-name="ce131" office:value-type="string" calcext:value-type="string">
            <text:p>全力移動</text:p>
          </table:table-cell>
          <table:table-cell table:style-name="ce131" office:value-type="string" calcext:value-type="string">
            <text:p>購入難度/常備化</text:p>
          </table:table-cell>
          <table:table-cell table:style-name="ce135" office:value-type="string" calcext:value-type="string">
            <text:p>解說</text:p>
          </table:table-cell>
          <table:table-cell table:style-name="ce138" office:value-type="string" calcext:value-type="string">
            <text:p>參照</text:p>
          </table:table-cell>
          <table:table-cell table:number-columns-repeated="1010"/>
        </table:table-row>
        <table:table-row table:style-name="ro16">
          <table:table-cell table:style-name="ce131"/>
          <table:table-cell table:style-name="ce133" office:value-type="string" calcext:value-type="string" table:number-columns-spanned="12" table:number-rows-spanned="1">
            <text:p>《硬體連接》專用異能道具</text:p>
          </table:table-cell>
          <table:covered-table-cell table:number-columns-repeated="11"/>
          <table:table-cell table:style-name="ce139"/>
          <table:table-cell table:number-columns-repeated="1010"/>
        </table:table-row>
        <table:table-row table:style-name="ro16">
          <table:table-cell table:style-name="ce132" office:value-type="string" calcext:value-type="string">
            <text:p>臂藏式刀刃</text:p>
          </table:table-cell>
          <table:table-cell table:style-name="ce134" office:value-type="string" calcext:value-type="string">
            <text:p>近戰</text:p>
          </table:table-cell>
          <table:table-cell table:style-name="ce134" office:value-type="string" calcext:value-type="string">
            <text:p>&lt;近戰&gt;</text:p>
          </table:table-cell>
          <table:table-cell table:style-name="ce134" office:value-type="float" office:value="-1" calcext:value-type="float">
            <text:p>-1</text:p>
          </table:table-cell>
          <table:table-cell table:style-name="ce134" office:value-type="float" office:value="9" calcext:value-type="float">
            <text:p>9</text:p>
          </table:table-cell>
          <table:table-cell table:style-name="ce134" office:value-type="float" office:value="3" calcext:value-type="float">
            <text:p>3</text:p>
          </table:table-cell>
          <table:table-cell table:style-name="ce134" office:value-type="string" calcext:value-type="string">
            <text:p>至近</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在手臂安裝內藏式刀刃。非常銳利，連鐵都能輕鬆切斷，平常收納於手臂中</text:p>
            <text:p>可以於先制階段裝備，使用該武器攻擊的對象進行格擋時按照對象的格擋值-5計算傷害</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臂藏式打樁機</text:p>
          </table:table-cell>
          <table:table-cell table:style-name="ce134" office:value-type="string" calcext:value-type="string">
            <text:p>近戰</text:p>
          </table:table-cell>
          <table:table-cell table:style-name="ce134" office:value-type="string" calcext:value-type="string">
            <text:p>&lt;近戰&gt;</text:p>
          </table:table-cell>
          <table:table-cell table:style-name="ce134" office:value-type="float" office:value="-3" calcext:value-type="float">
            <text:p>-3</text:p>
          </table:table-cell>
          <table:table-cell table:style-name="ce134" office:value-type="float" office:value="15" calcext:value-type="float">
            <text:p>15</text:p>
          </table:table-cell>
          <table:table-cell table:style-name="ce134" office:value-type="float" office:value="1" calcext:value-type="float">
            <text:p>1</text:p>
          </table:table-cell>
          <table:table-cell table:style-name="ce134" office:value-type="string" calcext:value-type="string">
            <text:p>至近</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埋藏於雙臂的打樁機，平常是收納著的</text:p>
            <text:p>可以用次要動作展開並裝備，取得該裝備時按照《硬體連接》取得3件份的道具進行計算；使用該武器進行攻擊造成至少1點傷害時，對象受到[異常狀態：硬直]</text:p>
            <text:p>雙手持握</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振動鞭</text:p>
          </table:table-cell>
          <table:table-cell table:style-name="ce134" office:value-type="string" calcext:value-type="string">
            <text:p>近戰</text:p>
          </table:table-cell>
          <table:table-cell table:style-name="ce134" office:value-type="string" calcext:value-type="string">
            <text:p>&lt;近戰&gt;</text:p>
          </table:table-cell>
          <table:table-cell table:style-name="ce134" office:value-type="float" office:value="-2" calcext:value-type="float">
            <text:p>-2</text:p>
          </table:table-cell>
          <table:table-cell table:style-name="ce134" office:value-type="float" office:value="10" calcext:value-type="float">
            <text:p>10</text:p>
          </table:table-cell>
          <table:table-cell table:style-name="ce134" office:value-type="string" calcext:value-type="string">
            <text:p>-</text:p>
          </table:table-cell>
          <table:table-cell table:style-name="ce134" office:value-type="string" calcext:value-type="string">
            <text:p>10m</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埋藏在指尖的纜鞭，擁有高速振動機關，啟動後便能產生值得自豪的威脅性切斷力</text:p>
            <text:p>可以於先制階段裝備，取得該裝備時按照《硬體連接》取得3件份的道具進行計算；次要動作使用，該場景間該武器攻擊力+5</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閃電錨</text:p>
          </table:table-cell>
          <table:table-cell table:style-name="ce134" office:value-type="string" calcext:value-type="string">
            <text:p>近戰</text:p>
          </table:table-cell>
          <table:table-cell table:style-name="ce134" office:value-type="string" calcext:value-type="string">
            <text:p>&lt;近戰&gt;</text:p>
          </table:table-cell>
          <table:table-cell table:style-name="ce134" office:value-type="float" office:value="0" calcext:value-type="float">
            <text:p>0</text:p>
          </table:table-cell>
          <table:table-cell table:style-name="ce134" office:value-type="float" office:value="3" calcext:value-type="float">
            <text:p>3</text:p>
          </table:table-cell>
          <table:table-cell table:style-name="ce134" office:value-type="float" office:value="1" calcext:value-type="float">
            <text:p>1</text:p>
          </table:table-cell>
          <table:table-cell table:style-name="ce134" office:value-type="string" calcext:value-type="string">
            <text:p>5m</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可以捆住對方的電磁鞭，可以飛出複數纜鞭束縛目標</text:p>
            <text:p>使用該武器進行攻擊造成至少1點傷害時，對象受到[異常狀態：硬直]，該裝備隨時可以裝備，1場景可以使用1次</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植入式導彈</text:p>
          </table:table-cell>
          <table:table-cell table:style-name="ce134" office:value-type="string" calcext:value-type="string">
            <text:p>射擊</text:p>
          </table:table-cell>
          <table:table-cell table:style-name="ce134" office:value-type="string" calcext:value-type="string">
            <text:p>&lt;射擊&gt;</text:p>
          </table:table-cell>
          <table:table-cell table:style-name="ce134" office:value-type="float" office:value="-3" calcext:value-type="float">
            <text:p>-3</text:p>
          </table:table-cell>
          <table:table-cell table:style-name="ce134" office:value-type="float" office:value="12" calcext:value-type="float">
            <text:p>12</text:p>
          </table:table-cell>
          <table:table-cell table:style-name="ce134" office:value-type="string" calcext:value-type="string">
            <text:p>-</text:p>
          </table:table-cell>
          <table:table-cell table:style-name="ce134" office:value-type="string" calcext:value-type="string">
            <text:p>20m</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埋藏在手臂或腿部的小型導彈發射器，平常是收納著的</text:p>
            <text:p>可以於先制階段裝備，使用該武器進行的攻擊變為[對象：範圍（選擇）]，該效果的對象優先順序大於組合異能的對象，該武器1劇本可以使用1次，最多可以取得2個</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線性加農炮</text:p>
          </table:table-cell>
          <table:table-cell table:style-name="ce134" office:value-type="string" calcext:value-type="string">
            <text:p>射擊</text:p>
          </table:table-cell>
          <table:table-cell table:style-name="ce134" office:value-type="string" calcext:value-type="string">
            <text:p>&lt;射擊&gt;</text:p>
          </table:table-cell>
          <table:table-cell table:style-name="ce134" office:value-type="float" office:value="-2" calcext:value-type="float">
            <text:p>-2</text:p>
          </table:table-cell>
          <table:table-cell table:style-name="ce134" office:value-type="float" office:value="8" calcext:value-type="float">
            <text:p>8</text:p>
          </table:table-cell>
          <table:table-cell table:style-name="ce134" office:value-type="string" calcext:value-type="string">
            <text:p>-</text:p>
          </table:table-cell>
          <table:table-cell table:style-name="ce134" office:value-type="string" calcext:value-type="string">
            <text:p>50m</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在手臂安裝電磁加速式的槍，平常收納於手臂中</text:p>
            <text:p>可以於先制階段裝備，使用該武器進行攻擊時，對象閃避判定骰數-2個</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小型浮游炮</text:p>
          </table:table-cell>
          <table:table-cell table:style-name="ce134" office:value-type="string" calcext:value-type="string">
            <text:p>射擊</text:p>
          </table:table-cell>
          <table:table-cell table:style-name="ce134" office:value-type="string" calcext:value-type="string">
            <text:p>&lt;射擊&gt;</text:p>
          </table:table-cell>
          <table:table-cell table:style-name="ce134" office:value-type="float" office:value="-2" calcext:value-type="float">
            <text:p>-2</text:p>
          </table:table-cell>
          <table:table-cell table:style-name="ce134" office:value-type="float" office:value="5" calcext:value-type="float">
            <text:p>5</text:p>
          </table:table-cell>
          <table:table-cell table:style-name="ce134" office:value-type="string" calcext:value-type="string">
            <text:p>-</text:p>
          </table:table-cell>
          <table:table-cell table:style-name="ce134" office:value-type="string" calcext:value-type="string">
            <text:p>20m</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從身體發射出來的小型炮臺，發射後於空中浮游，可自由操控，平常收納於體內</text:p>
            <text:p>可以於先制階段裝備，取得該裝備時按照《硬體連接》取得3件份的道具進行計算；使用該武器進行的攻擊無視對象裝甲值計算傷害</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裝甲表皮</text:p>
          </table:table-cell>
          <table:table-cell table:style-name="ce134" office:value-type="string" calcext:value-type="string">
            <text:p>防具（輔助）</text:p>
          </table:table-cell>
          <table:table-cell table:style-name="ce134" table:number-columns-repeated="5"/>
          <table:table-cell table:number-columns-repeated="2" table:style-name="ce134" office:value-type="float" office:value="0" calcext:value-type="float">
            <text:p>0</text:p>
          </table:table-cell>
          <table:table-cell table:style-name="ce134" office:value-type="float" office:value="4" calcext:value-type="float">
            <text:p>4</text:p>
          </table:table-cell>
          <table:table-cell table:style-name="ce134"/>
          <table:table-cell table:style-name="ce134" office:value-type="string" calcext:value-type="string">
            <text:p>購入不可/不可</text:p>
          </table:table-cell>
          <table:table-cell table:style-name="ce136" office:value-type="string" calcext:value-type="string">
            <text:p>埋藏強化纖維後化作裝甲的皮膚，擁有讓衝擊有效率地被分散的效果。外表與一般的皮膚無異</text:p>
            <text:p>你受到HP傷害之前使用，你（預定）受到的HP傷害減少1D10，該效果1場景可以使用1次</text:p>
          </table:table-cell>
          <table:table-cell table:style-name="ce140" office:value-type="string" calcext:value-type="string">
            <text:p>IA P108</text:p>
          </table:table-cell>
          <table:table-cell table:number-columns-repeated="1010"/>
        </table:table-row>
        <table:table-row table:style-name="ro16">
          <table:table-cell table:style-name="ce132" office:value-type="string" calcext:value-type="string">
            <text:p>RC推進器</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埋藏在你身體裡的背教者控制輔助裝備</text:p>
            <text:p>你進行的&lt;RC&gt;判定達成值+2，重複取得時該道具效果可以累計</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R轉換器</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埋藏在你身體裡的，透過背教者使異能效率上升的裝置</text:p>
            <text:p>你使用&lt;RC&gt;進行的攻擊傷害+2，重複取得時該道具效果可以累計</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電離推進器</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埋藏在你身體裡的背教者控制輔助裝備</text:p>
            <text:p>你使用《離子漂浮》時飛行狀態持續到回合結束，處於該飛行狀態間你進行的攻擊與閃避判定骰數+1個，該效果1場景可以使用1次</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皮下金屬板</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埋藏在皮膚下方的裝甲板，能強化肉體的耐久力</text:p>
            <text:p>你的HP最大值+5，重複取得時該道具效果可以累計</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數據腦</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埋藏在腦內的資料庫</text:p>
            <text:p>你進行的&lt;知識：●●&gt;&lt;情報：●●&gt;判定達成值+2，重複取得時該道具效果可以累計</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戰鬥機動</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以特殊的程式使戰鬥動作優化</text:p>
            <text:p>你進行的近戰判定達成值+2，重複取得時該道具效果可以累計</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電磁屏障</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埋藏在你身體裡的，能以電磁波作出防護壁的裝置</text:p>
            <text:p>你進行格擋時格擋值+2，重複取得時該道具效果可以累計</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懶惰臂</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使用火箭或變形裝置伸長手臂的觸及範圍，進行遠距離攻擊的系統</text:p>
            <text:p>你進行近戰攻擊前使用，該攻擊變為[射程：視野]，該效果1劇本可以使用1次</text:p>
          </table:table-cell>
          <table:table-cell table:style-name="ce140" office:value-type="string" calcext:value-type="string">
            <text:p>IA P109</text:p>
          </table:table-cell>
          <table:table-cell table:number-columns-repeated="1010"/>
        </table:table-row>
        <table:table-row table:style-name="ro16">
          <table:table-cell table:style-name="ce132" office:value-type="string" calcext:value-type="string">
            <text:p>瞄準定位</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埋藏在知覺系統的照準機</text:p>
            <text:p>你進行的射擊判定達成值+2，重複取得時該道具效果可以累計</text:p>
          </table:table-cell>
          <table:table-cell table:style-name="ce140" office:value-type="string" calcext:value-type="string">
            <text:p>IA P109</text:p>
          </table:table-cell>
          <table:table-cell table:number-columns-repeated="1010"/>
        </table:table-row>
        <table:table-row table:style-name="ro16">
          <table:table-cell table:style-name="ce132"/>
          <table:table-cell table:style-name="ce133" office:value-type="string" calcext:value-type="string" table:number-columns-spanned="12" table:number-rows-spanned="1">
            <text:p>《愚者的兵裝》從者專用異能道具</text:p>
          </table:table-cell>
          <table:covered-table-cell table:number-columns-repeated="11"/>
          <table:table-cell table:style-name="ce140"/>
          <table:table-cell table:number-columns-repeated="1010"/>
        </table:table-row>
        <table:table-row table:style-name="ro16">
          <table:table-cell table:style-name="ce132" office:value-type="string" calcext:value-type="string">
            <text:p>從者之盾</text:p>
          </table:table-cell>
          <table:table-cell table:style-name="ce134" office:value-type="string" calcext:value-type="string">
            <text:p>近戰</text:p>
          </table:table-cell>
          <table:table-cell table:style-name="ce134" office:value-type="string" calcext:value-type="string">
            <text:p>&lt;近戰&gt;</text:p>
          </table:table-cell>
          <table:table-cell table:style-name="ce134" office:value-type="float" office:value="-2" calcext:value-type="float">
            <text:p>-2</text:p>
          </table:table-cell>
          <table:table-cell table:style-name="ce134" office:value-type="float" office:value="2" calcext:value-type="float">
            <text:p>2</text:p>
          </table:table-cell>
          <table:table-cell table:style-name="ce134" office:value-type="float" office:value="8" calcext:value-type="float">
            <text:p>8</text:p>
          </table:table-cell>
          <table:table-cell table:style-name="ce134" office:value-type="string" calcext:value-type="string">
            <text:p>至近</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由從者身體的一部分變化成的盾。形狀隨從者的主人所想而定。</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之爪</text:p>
          </table:table-cell>
          <table:table-cell table:style-name="ce134" office:value-type="string" calcext:value-type="string">
            <text:p>近戰</text:p>
          </table:table-cell>
          <table:table-cell table:style-name="ce134" office:value-type="string" calcext:value-type="string">
            <text:p>&lt;近戰&gt;</text:p>
          </table:table-cell>
          <table:table-cell table:style-name="ce134" office:value-type="float" office:value="0" calcext:value-type="float">
            <text:p>0</text:p>
          </table:table-cell>
          <table:table-cell table:style-name="ce134" office:value-type="float" office:value="8" calcext:value-type="float">
            <text:p>8</text:p>
          </table:table-cell>
          <table:table-cell table:style-name="ce134" office:value-type="float" office:value="3" calcext:value-type="float">
            <text:p>3</text:p>
          </table:table-cell>
          <table:table-cell table:style-name="ce134" office:value-type="string" calcext:value-type="string">
            <text:p>至近</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由從者身體的一部分變化成的武器。形狀可以是爪、劍或長槍等等，隨從者的主人所想而定。</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之弓</text:p>
          </table:table-cell>
          <table:table-cell table:style-name="ce134" office:value-type="string" calcext:value-type="string">
            <text:p>射擊</text:p>
          </table:table-cell>
          <table:table-cell table:style-name="ce134" office:value-type="string" calcext:value-type="string">
            <text:p>&lt;射擊&gt;</text:p>
          </table:table-cell>
          <table:table-cell table:style-name="ce134" office:value-type="float" office:value="-1" calcext:value-type="float">
            <text:p>-1</text:p>
          </table:table-cell>
          <table:table-cell table:style-name="ce134" office:value-type="float" office:value="7" calcext:value-type="float">
            <text:p>7</text:p>
          </table:table-cell>
          <table:table-cell table:style-name="ce134" office:value-type="string" calcext:value-type="string">
            <text:p>-</text:p>
          </table:table-cell>
          <table:table-cell table:style-name="ce134" office:value-type="string" calcext:value-type="string">
            <text:p>視野</text:p>
          </table:table-cell>
          <table:table-cell table:style-name="ce134" table:number-columns-repeated="4"/>
          <table:table-cell table:style-name="ce134" office:value-type="string" calcext:value-type="string">
            <text:p>購入不可/不可</text:p>
          </table:table-cell>
          <table:table-cell table:style-name="ce136" office:value-type="string" calcext:value-type="string">
            <text:p>由從者身體的一部分變化成的武器。形狀可以是弓、槍或針等等，隨從者的主人所想而定。</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的甲冑</text:p>
          </table:table-cell>
          <table:table-cell table:style-name="ce134" office:value-type="string" calcext:value-type="string">
            <text:p>防具</text:p>
          </table:table-cell>
          <table:table-cell table:style-name="ce134" table:number-columns-repeated="5"/>
          <table:table-cell table:style-name="ce134" office:value-type="float" office:value="-5" calcext:value-type="float">
            <text:p>-5</text:p>
          </table:table-cell>
          <table:table-cell table:style-name="ce134" office:value-type="float" office:value="-3" calcext:value-type="float">
            <text:p>-3</text:p>
          </table:table-cell>
          <table:table-cell table:style-name="ce134" office:value-type="float" office:value="10" calcext:value-type="float">
            <text:p>10</text:p>
          </table:table-cell>
          <table:table-cell table:style-name="ce134"/>
          <table:table-cell table:style-name="ce134" office:value-type="string" calcext:value-type="string">
            <text:p>購入不可/不可</text:p>
          </table:table-cell>
          <table:table-cell table:style-name="ce136" office:value-type="string" calcext:value-type="string">
            <text:p>由從者的身體變化成的甲冑。能獲得很高的防禦效果，但動作速度會變得非常低下。</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的回路</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將從者的體內變成容易控制背教者的模樣</text:p>
            <text:p>從者進行的&lt;RC&gt;判定達成值+2，重複取得時該道具效果可以累計</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的本領</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給予從者知識，使其預先掌握技術</text:p>
            <text:p>取得時選擇一項技能，使從者的該技能變成LV2；重複取得該道具並選擇同一技能時，則使LV額外+1</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之衣</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如鎧甲般強化從者的皮膚</text:p>
            <text:p>從者的裝甲值+2，重複取得時該道具效果可以累計</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的區別</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調整從者的能力，使其預先成為優秀的個體</text:p>
            <text:p>取得時選擇一項能力值（肉體/感覺/精神/社會），從者的該能力值+1，重複取得時該道具效果可以累計</text:p>
          </table:table-cell>
          <table:table-cell table:style-name="ce140" office:value-type="string" calcext:value-type="string">
            <text:p>IA P110</text:p>
          </table:table-cell>
          <table:table-cell table:number-columns-repeated="1010"/>
        </table:table-row>
        <table:table-row table:style-name="ro16">
          <table:table-cell table:style-name="ce132" office:value-type="string" calcext:value-type="string">
            <text:p>從者的身軀</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使從者的身體大型化，強化耐久力</text:p>
            <text:p>從者的HP最大值+5，重複取得時該道具效果可以累計</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從者之蹄</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表示你的從者可以快速地動作</text:p>
            <text:p>從者的行動值+2，重複取得時該道具效果可以累計</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從者的安寧</text:p>
          </table:table-cell>
          <table:table-cell table:style-name="ce134" office:value-type="string" calcext:value-type="string">
            <text:p>一般</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表示你的從者擁有緩和背教者侵蝕的機能</text:p>
            <text:p>持有的從者進行的主要動作中組合的異能合計侵蝕值-1（最低1），重複取得時該道具效果可以累計</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毒素血液</text:p>
          </table:table-cell>
          <table:table-cell table:style-name="ce134" office:value-type="string" calcext:value-type="string">
            <text:p>消耗品</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于從者的體內生成的毒。可透過變化自己身體的攻擊注入對方</text:p>
            <text:p>次要動作使用，該主要階段使用《愚者的兵裝》取得的武器進行攻擊命中時，該回合間對象進行的判定骰數-2個</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牢籠血液</text:p>
          </table:table-cell>
          <table:table-cell table:style-name="ce134" office:value-type="string" calcext:value-type="string">
            <text:p>消耗品</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使從者的形狀變化成可堵住去路的模樣的藥</text:p>
            <text:p>先制階段使用，封鎖從者所在的接戰區域，從者進行的判定骰數+1個，該效果持續到從者移動或解除從者為止</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戰鬥血液</text:p>
          </table:table-cell>
          <table:table-cell table:style-name="ce134" office:value-type="string" calcext:value-type="string">
            <text:p>消耗品</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暫時增強從者戰鬥力的血液製劑</text:p>
            <text:p>從者進行攻擊判定前使用，該攻擊的傷害+5</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護盾血液</text:p>
          </table:table-cell>
          <table:table-cell table:style-name="ce134" office:value-type="string" calcext:value-type="string">
            <text:p>消耗品</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使從者身體的一部分瞬間硬化的藥</text:p>
            <text:p>從者進行格擋前使用，該格擋的格擋值+5</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體能血液</text:p>
          </table:table-cell>
          <table:table-cell table:style-name="ce134" office:value-type="string" calcext:value-type="string">
            <text:p>消耗品</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暫時提高從者的能力的藥</text:p>
            <text:p>從者進行判定前使用，該判定骰數+2個</text:p>
          </table:table-cell>
          <table:table-cell table:style-name="ce140" office:value-type="string" calcext:value-type="string">
            <text:p>IA P111</text:p>
          </table:table-cell>
          <table:table-cell table:number-columns-repeated="1010"/>
        </table:table-row>
        <table:table-row table:style-name="ro16">
          <table:table-cell table:style-name="ce132" office:value-type="string" calcext:value-type="string">
            <text:p>最終血液</text:p>
          </table:table-cell>
          <table:table-cell table:style-name="ce134" office:value-type="string" calcext:value-type="string">
            <text:p>消耗品</text:p>
          </table:table-cell>
          <table:table-cell table:style-name="ce134" table:number-columns-repeated="9"/>
          <table:table-cell table:style-name="ce134" office:value-type="string" calcext:value-type="string">
            <text:p>購入不可/不可</text:p>
          </table:table-cell>
          <table:table-cell table:style-name="ce136" office:value-type="string" calcext:value-type="string">
            <text:p>帶給從者超越自己極限的力量的藥</text:p>
            <text:p>從者進行判定前使用，該判定骰數+5個，使用該道具的角色在主要階段結束後HP變為0</text:p>
          </table:table-cell>
          <table:table-cell table:style-name="ce140" office:value-type="string" calcext:value-type="string">
            <text:p>IA P111</text:p>
          </table:table-cell>
          <table:table-cell table:number-columns-repeated="1010"/>
        </table:table-row>
        <table:table-row table:style-name="ro16">
          <table:table-cell table:style-name="ce132"/>
          <table:table-cell table:style-name="ce133" office:value-type="string" calcext:value-type="string" table:number-columns-spanned="12" table:number-rows-spanned="1">
            <text:p>《載具變換》專用異能道具</text:p>
          </table:table-cell>
          <table:covered-table-cell table:number-columns-repeated="11"/>
          <table:table-cell table:style-name="ce140"/>
          <table:table-cell table:number-columns-repeated="1010"/>
        </table:table-row>
        <table:table-row table:style-name="ro16">
          <table:table-cell table:style-name="ce132" office:value-type="string" calcext:value-type="string">
            <text:p>變換機車</text:p>
          </table:table-cell>
          <table:table-cell table:style-name="ce134" office:value-type="string" calcext:value-type="string">
            <text:p>載具</text:p>
          </table:table-cell>
          <table:table-cell table:style-name="ce134" office:value-type="string" calcext:value-type="string">
            <text:p>&lt;駕駛：二輪&gt;</text:p>
          </table:table-cell>
          <table:table-cell table:style-name="ce134"/>
          <table:table-cell table:style-name="ce134" office:value-type="float" office:value="8" calcext:value-type="float">
            <text:p>8</text:p>
          </table:table-cell>
          <table:table-cell table:style-name="ce134" table:number-columns-repeated="3"/>
          <table:table-cell table:style-name="ce134" office:value-type="float" office:value="0" calcext:value-type="float">
            <text:p>0</text:p>
          </table:table-cell>
          <table:table-cell table:style-name="ce134" office:value-type="string" calcext:value-type="string">
            <text:p>-</text:p>
          </table:table-cell>
          <table:table-cell table:style-name="ce134" office:value-type="string" calcext:value-type="string">
            <text:p>250m</text:p>
          </table:table-cell>
          <table:table-cell table:style-name="ce134" office:value-type="string" calcext:value-type="string">
            <text:p>購入不可/不可</text:p>
          </table:table-cell>
          <table:table-cell table:style-name="ce136" office:value-type="string" calcext:value-type="string">
            <text:p>以《載具變換》作出的二輪摩托車，詳細外觀隨製作者所想</text:p>
          </table:table-cell>
          <table:table-cell table:style-name="ce140" office:value-type="string" calcext:value-type="string">
            <text:p>IA P112</text:p>
          </table:table-cell>
          <table:table-cell table:number-columns-repeated="1010"/>
        </table:table-row>
        <table:table-row table:style-name="ro16">
          <table:table-cell table:style-name="ce132" office:value-type="string" calcext:value-type="string">
            <text:p>變換汽車</text:p>
          </table:table-cell>
          <table:table-cell table:style-name="ce134" office:value-type="string" calcext:value-type="string">
            <text:p>載具</text:p>
          </table:table-cell>
          <table:table-cell table:style-name="ce134" office:value-type="string" calcext:value-type="string">
            <text:p>&lt;駕駛：四輪&gt;</text:p>
          </table:table-cell>
          <table:table-cell table:style-name="ce134"/>
          <table:table-cell table:style-name="ce134" office:value-type="float" office:value="10" calcext:value-type="float">
            <text:p>10</text:p>
          </table:table-cell>
          <table:table-cell table:style-name="ce134" table:number-columns-repeated="3"/>
          <table:table-cell table:style-name="ce134" office:value-type="float" office:value="-2" calcext:value-type="float">
            <text:p>-2</text:p>
          </table:table-cell>
          <table:table-cell table:style-name="ce134" office:value-type="float" office:value="8" calcext:value-type="float">
            <text:p>8</text:p>
          </table:table-cell>
          <table:table-cell table:style-name="ce134" office:value-type="string" calcext:value-type="string">
            <text:p>100m</text:p>
          </table:table-cell>
          <table:table-cell table:style-name="ce134" office:value-type="string" calcext:value-type="string">
            <text:p>購入不可/不可</text:p>
          </table:table-cell>
          <table:table-cell table:style-name="ce136" office:value-type="string" calcext:value-type="string">
            <text:p>以《載具變換》作出的汽車，詳細外觀隨製作者所想</text:p>
          </table:table-cell>
          <table:table-cell table:style-name="ce140" office:value-type="string" calcext:value-type="string">
            <text:p>IA P112</text:p>
          </table:table-cell>
          <table:table-cell table:number-columns-repeated="1010"/>
        </table:table-row>
        <table:table-row table:style-name="ro16">
          <table:table-cell table:style-name="ce132" office:value-type="string" calcext:value-type="string">
            <text:p>變換直升機</text:p>
          </table:table-cell>
          <table:table-cell table:style-name="ce134" office:value-type="string" calcext:value-type="string">
            <text:p>載具</text:p>
          </table:table-cell>
          <table:table-cell table:style-name="ce134" office:value-type="string" calcext:value-type="string">
            <text:p>&lt;駕駛：航空器&gt;</text:p>
          </table:table-cell>
          <table:table-cell table:style-name="ce134"/>
          <table:table-cell table:style-name="ce134" office:value-type="float" office:value="7" calcext:value-type="float">
            <text:p>7</text:p>
          </table:table-cell>
          <table:table-cell table:style-name="ce134" table:number-columns-repeated="3"/>
          <table:table-cell table:style-name="ce134" office:value-type="float" office:value="0" calcext:value-type="float">
            <text:p>0</text:p>
          </table:table-cell>
          <table:table-cell table:style-name="ce134" office:value-type="string" calcext:value-type="string">
            <text:p>-</text:p>
          </table:table-cell>
          <table:table-cell table:style-name="ce134" office:value-type="string" calcext:value-type="string">
            <text:p>100m</text:p>
          </table:table-cell>
          <table:table-cell table:style-name="ce134" office:value-type="string" calcext:value-type="string">
            <text:p>購入不可/不可</text:p>
          </table:table-cell>
          <table:table-cell table:style-name="ce136" office:value-type="string" calcext:value-type="string">
            <text:p>以《載具變換》作出的直升機，詳細外觀隨製作者所想</text:p>
            <text:p>你和同乘者進入飛行狀態</text:p>
          </table:table-cell>
          <table:table-cell table:style-name="ce140" office:value-type="string" calcext:value-type="string">
            <text:p>IA P112</text:p>
          </table:table-cell>
          <table:table-cell table:number-columns-repeated="1010"/>
        </table:table-row>
        <table:table-row table:style-name="ro16">
          <table:table-cell table:style-name="ce132" office:value-type="string" calcext:value-type="string">
            <text:p>變換船隻</text:p>
          </table:table-cell>
          <table:table-cell table:style-name="ce134" office:value-type="string" calcext:value-type="string">
            <text:p>載具</text:p>
          </table:table-cell>
          <table:table-cell table:style-name="ce134" office:value-type="string" calcext:value-type="string">
            <text:p>&lt;駕駛：船舶&gt;</text:p>
          </table:table-cell>
          <table:table-cell table:style-name="ce134"/>
          <table:table-cell table:style-name="ce134" office:value-type="float" office:value="9" calcext:value-type="float">
            <text:p>9</text:p>
          </table:table-cell>
          <table:table-cell table:style-name="ce134" table:number-columns-repeated="3"/>
          <table:table-cell table:style-name="ce134" office:value-type="float" office:value="0" calcext:value-type="float">
            <text:p>0</text:p>
          </table:table-cell>
          <table:table-cell table:style-name="ce134" office:value-type="string" calcext:value-type="string">
            <text:p>-</text:p>
          </table:table-cell>
          <table:table-cell table:style-name="ce134" office:value-type="string" calcext:value-type="string">
            <text:p>150m</text:p>
          </table:table-cell>
          <table:table-cell table:style-name="ce134" office:value-type="string" calcext:value-type="string">
            <text:p>購入不可/不可</text:p>
          </table:table-cell>
          <table:table-cell table:style-name="ce136" office:value-type="string" calcext:value-type="string">
            <text:p>以《載具變換》作出的摩托艇，詳細外觀隨製作者所想</text:p>
            <text:p>只能在水中使用</text:p>
          </table:table-cell>
          <table:table-cell table:style-name="ce140" office:value-type="string" calcext:value-type="string">
            <text:p>IA P112</text:p>
          </table:table-cell>
          <table:table-cell table:number-columns-repeated="1010"/>
        </table:table-row>
        <table:table-row table:style-name="ro16">
          <table:table-cell table:style-name="ce132" office:value-type="string" calcext:value-type="string">
            <text:p>變換機車II</text:p>
          </table:table-cell>
          <table:table-cell table:style-name="ce134" office:value-type="string" calcext:value-type="string">
            <text:p>載具</text:p>
          </table:table-cell>
          <table:table-cell table:style-name="ce134" office:value-type="string" calcext:value-type="string">
            <text:p>&lt;駕駛：二輪&gt;</text:p>
          </table:table-cell>
          <table:table-cell table:style-name="ce134"/>
          <table:table-cell table:style-name="ce134" office:value-type="float" office:value="11" calcext:value-type="float">
            <text:p>11</text:p>
          </table:table-cell>
          <table:table-cell table:style-name="ce134" table:number-columns-repeated="3"/>
          <table:table-cell table:style-name="ce134" office:value-type="float" office:value="0" calcext:value-type="float">
            <text:p>0</text:p>
          </table:table-cell>
          <table:table-cell table:style-name="ce134" office:value-type="string" calcext:value-type="string">
            <text:p>-</text:p>
          </table:table-cell>
          <table:table-cell table:style-name="ce134" office:value-type="string" calcext:value-type="string">
            <text:p>300m</text:p>
          </table:table-cell>
          <table:table-cell table:style-name="ce134" office:value-type="string" calcext:value-type="string">
            <text:p>購入不可/不可</text:p>
          </table:table-cell>
          <table:table-cell table:style-name="ce136" office:value-type="string" calcext:value-type="string">
            <text:p>以《載具變換》作出的高性能二輪摩托車，詳細外觀隨製作者所想</text:p>
            <text:p>《載具變換》LV3以上才能製作</text:p>
          </table:table-cell>
          <table:table-cell table:style-name="ce140" office:value-type="string" calcext:value-type="string">
            <text:p>IA P112</text:p>
          </table:table-cell>
          <table:table-cell table:number-columns-repeated="1010"/>
        </table:table-row>
        <table:table-row table:style-name="ro16">
          <table:table-cell table:style-name="ce132" office:value-type="string" calcext:value-type="string">
            <text:p>變換汽車II</text:p>
          </table:table-cell>
          <table:table-cell table:style-name="ce134" office:value-type="string" calcext:value-type="string">
            <text:p>載具</text:p>
          </table:table-cell>
          <table:table-cell table:style-name="ce134" office:value-type="string" calcext:value-type="string">
            <text:p>&lt;駕駛：四輪&gt;</text:p>
          </table:table-cell>
          <table:table-cell table:style-name="ce134"/>
          <table:table-cell table:style-name="ce134" office:value-type="float" office:value="12" calcext:value-type="float">
            <text:p>12</text:p>
          </table:table-cell>
          <table:table-cell table:style-name="ce134" table:number-columns-repeated="3"/>
          <table:table-cell table:style-name="ce134" office:value-type="float" office:value="-2" calcext:value-type="float">
            <text:p>-2</text:p>
          </table:table-cell>
          <table:table-cell table:style-name="ce134" office:value-type="float" office:value="12" calcext:value-type="float">
            <text:p>12</text:p>
          </table:table-cell>
          <table:table-cell table:style-name="ce134" office:value-type="string" calcext:value-type="string">
            <text:p>150m</text:p>
          </table:table-cell>
          <table:table-cell table:style-name="ce134" office:value-type="string" calcext:value-type="string">
            <text:p>購入不可/不可</text:p>
          </table:table-cell>
          <table:table-cell table:style-name="ce136" office:value-type="string" calcext:value-type="string">
            <text:p>以《載具變換》作出的高性能汽車，詳細外觀隨製作者所想</text:p>
            <text:p>《載具變換》LV3以上才能製作</text:p>
          </table:table-cell>
          <table:table-cell table:style-name="ce140" office:value-type="string" calcext:value-type="string">
            <text:p>IA P112</text:p>
          </table:table-cell>
          <table:table-cell table:number-columns-repeated="1010"/>
        </table:table-row>
        <table:table-row table:style-name="ro16">
          <table:table-cell table:style-name="ce132" office:value-type="string" calcext:value-type="string">
            <text:p>變換直升機II</text:p>
          </table:table-cell>
          <table:table-cell table:style-name="ce134" office:value-type="string" calcext:value-type="string">
            <text:p>載具</text:p>
          </table:table-cell>
          <table:table-cell table:style-name="ce134" office:value-type="string" calcext:value-type="string">
            <text:p>&lt;駕駛：航空器&gt;</text:p>
          </table:table-cell>
          <table:table-cell table:style-name="ce134"/>
          <table:table-cell table:style-name="ce134" office:value-type="float" office:value="9" calcext:value-type="float">
            <text:p>9</text:p>
          </table:table-cell>
          <table:table-cell table:style-name="ce134" table:number-columns-repeated="3"/>
          <table:table-cell table:style-name="ce134" office:value-type="float" office:value="0" calcext:value-type="float">
            <text:p>0</text:p>
          </table:table-cell>
          <table:table-cell table:style-name="ce134" office:value-type="string" calcext:value-type="string">
            <text:p>-</text:p>
          </table:table-cell>
          <table:table-cell table:style-name="ce134" office:value-type="string" calcext:value-type="string">
            <text:p>150m</text:p>
          </table:table-cell>
          <table:table-cell table:style-name="ce134" office:value-type="string" calcext:value-type="string">
            <text:p>購入不可/不可</text:p>
          </table:table-cell>
          <table:table-cell table:style-name="ce136" office:value-type="string" calcext:value-type="string">
            <text:p>以《載具變換》作出的高性能直升機，詳細外觀隨製作者所想</text:p>
            <text:p>《載具變換》LV3以上才能製作，你和同乘者進入飛行狀態</text:p>
          </table:table-cell>
          <table:table-cell table:style-name="ce140" office:value-type="string" calcext:value-type="string">
            <text:p>IA P112</text:p>
          </table:table-cell>
          <table:table-cell table:number-columns-repeated="1010"/>
        </table:table-row>
        <table:table-row table:style-name="ro16">
          <table:table-cell table:style-name="ce132" office:value-type="string" calcext:value-type="string">
            <text:p>變換機器人</text:p>
          </table:table-cell>
          <table:table-cell table:style-name="ce134" office:value-type="string" calcext:value-type="string">
            <text:p>載具</text:p>
          </table:table-cell>
          <table:table-cell table:style-name="ce134" office:value-type="string" calcext:value-type="string">
            <text:p>參照解說</text:p>
          </table:table-cell>
          <table:table-cell table:style-name="ce134"/>
          <table:table-cell table:style-name="ce134" office:value-type="float" office:value="15" calcext:value-type="float">
            <text:p>15</text:p>
          </table:table-cell>
          <table:table-cell table:style-name="ce134" table:number-columns-repeated="3"/>
          <table:table-cell table:style-name="ce134" office:value-type="float" office:value="-3" calcext:value-type="float">
            <text:p>-3</text:p>
          </table:table-cell>
          <table:table-cell table:style-name="ce134" office:value-type="float" office:value="18" calcext:value-type="float">
            <text:p>18</text:p>
          </table:table-cell>
          <table:table-cell table:style-name="ce134" office:value-type="string" calcext:value-type="string">
            <text:p>50m</text:p>
          </table:table-cell>
          <table:table-cell table:style-name="ce134" office:value-type="string" calcext:value-type="string">
            <text:p>購入不可/不可</text:p>
          </table:table-cell>
          <table:table-cell table:style-name="ce136" office:value-type="string" calcext:value-type="string">
            <text:p>以《載具變換》作出的機器人，二足型或履帶型都可以，詳細外觀隨製作者所想</text:p>
            <text:p>《載具變換》LV5以上才能製作，使用的&lt;駕駛：●●&gt;由你在製作時決定</text:p>
          </table:table-cell>
          <table:table-cell table:style-name="ce140" office:value-type="string" calcext:value-type="string">
            <text:p>IA P112</text:p>
          </table:table-cell>
          <table:table-cell table:number-columns-repeated="1010"/>
        </table:table-row>
        <table:table-row table:style-name="ro16">
          <table:table-cell table:style-name="ce131" office:value-type="string" calcext:value-type="string">
            <text:p>弑神之刃專用道具</text:p>
          </table:table-cell>
          <table:table-cell table:style-name="ce133" office:value-type="string" calcext:value-type="string" table:number-columns-spanned="12" table:number-rows-spanned="1">
            <text:p>長青魔劍的異能《弑神之刃》可以製作的武器，只有取得該異能才能使用、裝備，一個角色只能取得一個元型，數據上視為異能創造的武器。</text:p>
          </table:table-cell>
          <table:covered-table-cell table:number-columns-repeated="11"/>
          <table:table-cell table:style-name="ce141"/>
          <table:table-cell table:number-columns-repeated="1010"/>
        </table:table-row>
        <table:table-row table:style-name="ro16">
          <table:table-cell table:style-name="ce132" office:value-type="string" calcext:value-type="string">
            <text:p>元型：投擲武器</text:p>
          </table:table-cell>
          <table:table-cell table:style-name="ce134" office:value-type="string" calcext:value-type="string">
            <text:p>近戰/射擊/元型</text:p>
          </table:table-cell>
          <table:table-cell table:style-name="ce134" office:value-type="string" calcext:value-type="string">
            <text:p>&lt;近戰&gt;/&lt;射擊&gt;</text:p>
          </table:table-cell>
          <table:table-cell table:style-name="ce134" office:value-type="float" office:value="0" calcext:value-type="float">
            <text:p>0</text:p>
          </table:table-cell>
          <table:table-cell table:style-name="ce134" office:value-type="string" calcext:value-type="string">
            <text:p>[LV×2+4]</text:p>
          </table:table-cell>
          <table:table-cell table:style-name="ce134" office:value-type="float" office:value="1" calcext:value-type="float">
            <text:p>1</text:p>
          </table:table-cell>
          <table:table-cell table:style-name="ce134" office:value-type="string" calcext:value-type="string">
            <text:p>至近/20m</text:p>
          </table:table-cell>
          <table:table-cell table:number-columns-repeated="5"/>
          <table:table-cell table:style-name="ce136" office:value-type="string" calcext:value-type="string">
            <text:p>《弑神之刃》作出的可以投擲用的近戰武器。有短劍或圓月輪等形態。</text:p>
            <text:p>使用[類別：射擊]時，採用斜杠右側的數據。</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近戰武器</text:p>
          </table:table-cell>
          <table:table-cell table:style-name="ce134" office:value-type="string" calcext:value-type="string">
            <text:p>近戰/元型</text:p>
          </table:table-cell>
          <table:table-cell table:style-name="ce134" office:value-type="string" calcext:value-type="string">
            <text:p>&lt;近戰&gt;</text:p>
          </table:table-cell>
          <table:table-cell table:style-name="ce134" office:value-type="float" office:value="0" calcext:value-type="float">
            <text:p>0</text:p>
          </table:table-cell>
          <table:table-cell table:style-name="ce134" office:value-type="string" calcext:value-type="string">
            <text:p>[LV×2+9]</text:p>
          </table:table-cell>
          <table:table-cell table:style-name="ce134" office:value-type="float" office:value="3" calcext:value-type="float">
            <text:p>3</text:p>
          </table:table-cell>
          <table:table-cell table:style-name="ce134" office:value-type="string" calcext:value-type="string">
            <text:p>至近</text:p>
          </table:table-cell>
          <table:table-cell table:number-columns-repeated="5"/>
          <table:table-cell table:style-name="ce136" office:value-type="string" calcext:value-type="string">
            <text:p>《弑神之刃》作出的近戰武器。單雙手都可以方便地使用。</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大型武器</text:p>
          </table:table-cell>
          <table:table-cell table:style-name="ce134" office:value-type="string" calcext:value-type="string">
            <text:p>近戰/元型</text:p>
          </table:table-cell>
          <table:table-cell table:style-name="ce134" office:value-type="string" calcext:value-type="string">
            <text:p>&lt;近戰&gt;</text:p>
          </table:table-cell>
          <table:table-cell table:style-name="ce134" office:value-type="float" office:value="-2" calcext:value-type="float">
            <text:p>-2</text:p>
          </table:table-cell>
          <table:table-cell table:style-name="ce134" office:value-type="string" calcext:value-type="string">
            <text:p>[LV×3+9]</text:p>
          </table:table-cell>
          <table:table-cell table:style-name="ce134" office:value-type="float" office:value="5" calcext:value-type="float">
            <text:p>5</text:p>
          </table:table-cell>
          <table:table-cell table:style-name="ce134" office:value-type="string" calcext:value-type="string">
            <text:p>至近</text:p>
          </table:table-cell>
          <table:table-cell table:number-columns-repeated="5"/>
          <table:table-cell table:style-name="ce136" office:value-type="string" calcext:value-type="string">
            <text:p>《弑神之刃》作出的兩手用武器。形態為大劍或長槍等巨大的武器。</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格鬥武器</text:p>
          </table:table-cell>
          <table:table-cell table:style-name="ce134" office:value-type="string" calcext:value-type="string">
            <text:p>近戰/元型</text:p>
          </table:table-cell>
          <table:table-cell table:style-name="ce134" office:value-type="string" calcext:value-type="string">
            <text:p>&lt;近戰&gt;</text:p>
          </table:table-cell>
          <table:table-cell table:style-name="ce134" office:value-type="float" office:value="0" calcext:value-type="float">
            <text:p>0</text:p>
          </table:table-cell>
          <table:table-cell table:style-name="ce134" office:value-type="string" calcext:value-type="string">
            <text:p>[LV×2+8]</text:p>
          </table:table-cell>
          <table:table-cell table:style-name="ce134" office:value-type="float" office:value="2" calcext:value-type="float">
            <text:p>2</text:p>
          </table:table-cell>
          <table:table-cell table:style-name="ce134" office:value-type="string" calcext:value-type="string">
            <text:p>至近</text:p>
          </table:table-cell>
          <table:table-cell table:number-columns-repeated="5"/>
          <table:table-cell table:style-name="ce136" office:value-type="string" calcext:value-type="string">
            <text:p>《弑神之刃》作出的格鬥用武器。兩手的手指變為刀刃，或籠手等形狀。</text:p>
            <text:p>選擇此武器時，《弑神之刃》的效果中你的空手數據變更為此武器數據。</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機關武器</text:p>
          </table:table-cell>
          <table:table-cell table:style-name="ce134" office:value-type="string" calcext:value-type="string">
            <text:p>近戰/元型</text:p>
          </table:table-cell>
          <table:table-cell table:style-name="ce134" office:value-type="string" calcext:value-type="string">
            <text:p>&lt;近戰&gt;</text:p>
          </table:table-cell>
          <table:table-cell table:style-name="ce134" office:value-type="float" office:value="-4" calcext:value-type="float">
            <text:p>-4</text:p>
          </table:table-cell>
          <table:table-cell table:style-name="ce134" office:value-type="float" office:value="13" calcext:value-type="float">
            <text:p>13</text:p>
          </table:table-cell>
          <table:table-cell table:style-name="ce134" office:value-type="float" office:value="6" calcext:value-type="float">
            <text:p>6</text:p>
          </table:table-cell>
          <table:table-cell table:style-name="ce134" office:value-type="string" calcext:value-type="string">
            <text:p>至近</text:p>
          </table:table-cell>
          <table:table-cell table:number-columns-repeated="5"/>
          <table:table-cell table:style-name="ce136" office:value-type="string" calcext:value-type="string">
            <text:p>《弑神之刃》作出的巨大的機械式近戰武器。形狀為打樁機或電鋸等在機械結構上搭載了開關的武器，攻擊的出力也會因此提高。</text:p>
            <text:p>次要動作使用。在這一主要階段間，武器的攻擊力+[LV×3]。兩手用。</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盾</text:p>
          </table:table-cell>
          <table:table-cell table:style-name="ce134" office:value-type="string" calcext:value-type="string">
            <text:p>近戰/元型</text:p>
          </table:table-cell>
          <table:table-cell table:style-name="ce134" office:value-type="string" calcext:value-type="string">
            <text:p>&lt;近戰&gt;</text:p>
          </table:table-cell>
          <table:table-cell table:style-name="ce134" office:value-type="float" office:value="-2" calcext:value-type="float">
            <text:p>-2</text:p>
          </table:table-cell>
          <table:table-cell table:style-name="ce134" office:value-type="float" office:value="5" calcext:value-type="float">
            <text:p>5</text:p>
          </table:table-cell>
          <table:table-cell table:style-name="ce134" office:value-type="string" calcext:value-type="string">
            <text:p>[LV×3+5]</text:p>
          </table:table-cell>
          <table:table-cell table:style-name="ce134" office:value-type="string" calcext:value-type="string">
            <text:p>至近</text:p>
          </table:table-cell>
          <table:table-cell table:number-columns-repeated="5"/>
          <table:table-cell table:style-name="ce136" office:value-type="string" calcext:value-type="string">
            <text:p>《弑神之刃》作出的盾或善於防禦攻擊的武器。</text:p>
            <text:p>作成時視為兩手裝備，這時武器的攻擊力與格擋值+3。</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魔像</text:p>
            <text:p>（アーキタイプ：ゴーレム）</text:p>
          </table:table-cell>
          <table:table-cell table:style-name="ce134" office:value-type="string" calcext:value-type="string">
            <text:p>近戰/元型</text:p>
          </table:table-cell>
          <table:table-cell table:style-name="ce134" office:value-type="string" calcext:value-type="string">
            <text:p>《神威的幻想》</text:p>
          </table:table-cell>
          <table:table-cell table:style-name="ce134" office:value-type="float" office:value="-2" calcext:value-type="float">
            <text:p>-2</text:p>
          </table:table-cell>
          <table:table-cell table:style-name="ce134" office:value-type="string" calcext:value-type="string">
            <text:p>[LV×3+8]</text:p>
          </table:table-cell>
          <table:table-cell table:style-name="ce134" office:value-type="float" office:value="6" calcext:value-type="float">
            <text:p>6</text:p>
          </table:table-cell>
          <table:table-cell table:style-name="ce134" office:value-type="string" calcext:value-type="string">
            <text:p>至近</text:p>
          </table:table-cell>
          <table:table-cell table:number-columns-repeated="5"/>
          <table:table-cell table:style-name="ce136" office:value-type="string" calcext:value-type="string">
            <text:p>《弑神之刃》作出的會聽從你的命令的巨大人偶。有時人偶的外觀也可以是野獸和龍等。</text:p>
            <text:p>使用《神威的幻想》時可以使用，武器的攻擊視為近戰攻擊。</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手槍</text:p>
            <text:p>（アーキタイプ：ピストル）</text:p>
          </table:table-cell>
          <table:table-cell table:style-name="ce134" office:value-type="string" calcext:value-type="string">
            <text:p>射擊/元型</text:p>
          </table:table-cell>
          <table:table-cell table:style-name="ce134" office:value-type="string" calcext:value-type="string">
            <text:p>&lt;射擊&gt;</text:p>
          </table:table-cell>
          <table:table-cell table:style-name="ce134" office:value-type="float" office:value="0" calcext:value-type="float">
            <text:p>0</text:p>
          </table:table-cell>
          <table:table-cell table:style-name="ce134" office:value-type="string" calcext:value-type="string">
            <text:p>[LV×2+6]</text:p>
          </table:table-cell>
          <table:table-cell table:style-name="ce134" office:value-type="string" calcext:value-type="string">
            <text:p>-</text:p>
          </table:table-cell>
          <table:table-cell table:style-name="ce134" office:value-type="string" calcext:value-type="string">
            <text:p>20m</text:p>
          </table:table-cell>
          <table:table-cell table:number-columns-repeated="5"/>
          <table:table-cell table:style-name="ce136" office:value-type="string" calcext:value-type="string">
            <text:p>《弑神之刃》作出的手槍。至近距離也可以方便使用的射擊用武器元型。</text:p>
          </table:table-cell>
          <table:table-cell table:style-name="ce140" office:value-type="string" calcext:value-type="string">
            <text:p>UAP26</text:p>
          </table:table-cell>
          <table:table-cell table:number-columns-repeated="1010"/>
        </table:table-row>
        <table:table-row table:style-name="ro16">
          <table:table-cell table:style-name="ce132" office:value-type="string" calcext:value-type="string">
            <text:p>元型：來福槍</text:p>
            <text:p>（アーキタイプ：ライフル）</text:p>
          </table:table-cell>
          <table:table-cell table:style-name="ce134" office:value-type="string" calcext:value-type="string">
            <text:p>射擊/元型</text:p>
          </table:table-cell>
          <table:table-cell table:style-name="ce134" office:value-type="string" calcext:value-type="string">
            <text:p>&lt;射擊&gt;</text:p>
          </table:table-cell>
          <table:table-cell table:style-name="ce134" office:value-type="float" office:value="-1" calcext:value-type="float">
            <text:p>-1</text:p>
          </table:table-cell>
          <table:table-cell table:style-name="ce134" office:value-type="string" calcext:value-type="string">
            <text:p>[LV×2+8]</text:p>
          </table:table-cell>
          <table:table-cell table:style-name="ce134" office:value-type="string" calcext:value-type="string">
            <text:p>-</text:p>
          </table:table-cell>
          <table:table-cell table:style-name="ce134" office:value-type="string" calcext:value-type="string">
            <text:p>100m</text:p>
          </table:table-cell>
          <table:table-cell table:number-columns-repeated="5"/>
          <table:table-cell table:style-name="ce136" office:value-type="string" calcext:value-type="string">
            <text:p>《弑神之刃》作出的火槍。射程距離長，火力高的射擊武器元型。</text:p>
            <text:p>次要動作使用。在這一主要階段中，這個武器的攻擊判定達成值+5。不可攻擊至近距離。</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弓</text:p>
          </table:table-cell>
          <table:table-cell table:style-name="ce134" office:value-type="string" calcext:value-type="string">
            <text:p>射擊/元型</text:p>
          </table:table-cell>
          <table:table-cell table:style-name="ce134" office:value-type="string" calcext:value-type="string">
            <text:p>&lt;射擊&gt;</text:p>
          </table:table-cell>
          <table:table-cell table:style-name="ce134" office:value-type="float" office:value="-2" calcext:value-type="float">
            <text:p>-2</text:p>
          </table:table-cell>
          <table:table-cell table:style-name="ce134" office:value-type="string" calcext:value-type="string">
            <text:p>[LV×3+7]</text:p>
          </table:table-cell>
          <table:table-cell table:style-name="ce134" office:value-type="string" calcext:value-type="string">
            <text:p>-</text:p>
          </table:table-cell>
          <table:table-cell table:style-name="ce134" office:value-type="string" calcext:value-type="string">
            <text:p>200m</text:p>
          </table:table-cell>
          <table:table-cell table:number-columns-repeated="5"/>
          <table:table-cell table:style-name="ce136" office:value-type="string" calcext:value-type="string">
            <text:p>《弑神之刃》作出的弓箭形的元型。不方便使用，但威力很高。</text:p>
            <text:p>兩手裝備。不可攻擊至近距離。</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火炮</text:p>
          </table:table-cell>
          <table:table-cell table:style-name="ce134" office:value-type="string" calcext:value-type="string">
            <text:p>射擊/元型</text:p>
          </table:table-cell>
          <table:table-cell table:style-name="ce134" office:value-type="string" calcext:value-type="string">
            <text:p>&lt;射擊&gt;</text:p>
          </table:table-cell>
          <table:table-cell table:style-name="ce134" office:value-type="float" office:value="-4" calcext:value-type="float">
            <text:p>-4</text:p>
          </table:table-cell>
          <table:table-cell table:style-name="ce134" office:value-type="string" calcext:value-type="string">
            <text:p>[LV×3+12]</text:p>
          </table:table-cell>
          <table:table-cell table:style-name="ce134" office:value-type="string" calcext:value-type="string">
            <text:p>-</text:p>
          </table:table-cell>
          <table:table-cell table:style-name="ce134" office:value-type="string" calcext:value-type="string">
            <text:p>200m</text:p>
          </table:table-cell>
          <table:table-cell table:number-columns-repeated="5"/>
          <table:table-cell table:style-name="ce136" office:value-type="string" calcext:value-type="string">
            <text:p>《弑神之刃》作出的炮擊用重火器。雖然有壓倒性的火力，但打出一擊就會粉碎。</text:p>
            <text:p>攻擊後武器會被破壞。兩手裝備。不可攻擊至近距離。</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光線槍</text:p>
          </table:table-cell>
          <table:table-cell table:style-name="ce134" office:value-type="string" calcext:value-type="string">
            <text:p>射擊/元型</text:p>
          </table:table-cell>
          <table:table-cell table:style-name="ce134" office:value-type="string" calcext:value-type="string">
            <text:p>&lt;射擊&gt;</text:p>
          </table:table-cell>
          <table:table-cell table:style-name="ce134" office:value-type="float" office:value="0" calcext:value-type="float">
            <text:p>0</text:p>
          </table:table-cell>
          <table:table-cell table:style-name="ce134" office:value-type="string" calcext:value-type="string">
            <text:p>[LV×2]</text:p>
          </table:table-cell>
          <table:table-cell table:style-name="ce134" office:value-type="string" calcext:value-type="string">
            <text:p>-</text:p>
          </table:table-cell>
          <table:table-cell table:style-name="ce134" office:value-type="string" calcext:value-type="string">
            <text:p>視野</text:p>
          </table:table-cell>
          <table:table-cell table:number-columns-repeated="5"/>
          <table:table-cell table:style-name="ce136" office:value-type="string" calcext:value-type="string">
            <text:p>《弑神之刃》作出的能夠發射光線或火焰的槍。具備非常長的射程，可以部分地無效化裝甲。</text:p>
            <text:p>使用此武器攻擊時，對象的裝甲值-5。不可攻擊至近距離。</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火焰</text:p>
          </table:table-cell>
          <table:table-cell table:style-name="ce134" office:value-type="string" calcext:value-type="string">
            <text:p>射擊/元型</text:p>
          </table:table-cell>
          <table:table-cell table:style-name="ce134" office:value-type="string" calcext:value-type="string">
            <text:p>《神威的幻想》</text:p>
          </table:table-cell>
          <table:table-cell table:style-name="ce134" office:value-type="float" office:value="0" calcext:value-type="float">
            <text:p>0</text:p>
          </table:table-cell>
          <table:table-cell table:style-name="ce134" office:value-type="string" calcext:value-type="string">
            <text:p>[LV×3+4]</text:p>
          </table:table-cell>
          <table:table-cell table:style-name="ce134" office:value-type="string" calcext:value-type="string">
            <text:p>-</text:p>
          </table:table-cell>
          <table:table-cell table:style-name="ce134" office:value-type="string" calcext:value-type="string">
            <text:p>20m</text:p>
          </table:table-cell>
          <table:table-cell table:number-columns-repeated="5"/>
          <table:table-cell table:style-name="ce136" office:value-type="string" calcext:value-type="string">
            <text:p>《弑神之刃》作出的火焰一般的破壞性能量。也可以生出冷氣或電擊等其他形式的能量。</text:p>
            <text:p>使用《神威的幻想》時可以使用，武器的攻擊視為射擊攻擊。</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武裝防具</text:p>
          </table:table-cell>
          <table:table-cell table:style-name="ce134" office:value-type="string" calcext:value-type="string">
            <text:p>防具/元型</text:p>
          </table:table-cell>
          <table:table-cell table:style-name="ce134" table:number-columns-repeated="5"/>
          <table:table-cell table:number-columns-repeated="2" table:style-name="ce134" office:value-type="float" office:value="0" calcext:value-type="float">
            <text:p>0</text:p>
          </table:table-cell>
          <table:table-cell table:style-name="ce134" office:value-type="string" calcext:value-type="string">
            <text:p>[LV×2+6]</text:p>
          </table:table-cell>
          <table:table-cell table:number-columns-repeated="2"/>
          <table:table-cell table:style-name="ce136" office:value-type="string" calcext:value-type="string">
            <text:p>《弑神之刃》作出的保護全身的防具。方便行動，拳頭的裝甲也可以作為打擊用武器。</text:p>
            <text:p>空手的攻擊力+[LV+5]，空手視為[類別：元型]的武器。</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重鎧</text:p>
          </table:table-cell>
          <table:table-cell table:style-name="ce134" office:value-type="string" calcext:value-type="string">
            <text:p>防具/元型</text:p>
          </table:table-cell>
          <table:table-cell table:style-name="ce134" table:number-columns-repeated="5"/>
          <table:table-cell table:number-columns-repeated="2" table:style-name="ce134" office:value-type="float" office:value="-2" calcext:value-type="float">
            <text:p>-2</text:p>
          </table:table-cell>
          <table:table-cell table:style-name="ce134" office:value-type="string" calcext:value-type="string">
            <text:p>[LV×3+8]</text:p>
          </table:table-cell>
          <table:table-cell table:number-columns-repeated="2"/>
          <table:table-cell table:style-name="ce136" office:value-type="string" calcext:value-type="string">
            <text:p>《弑神之刃》作出的包裹全身的鎧甲形元型。</text:p>
            <text:p>雖然沉重遲鈍，但保護使用者的性能極強。</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車輛</text:p>
          </table:table-cell>
          <table:table-cell table:style-name="ce134" office:value-type="string" calcext:value-type="string">
            <text:p>載具/元型</text:p>
          </table:table-cell>
          <table:table-cell table:style-name="ce134" office:value-type="string" calcext:value-type="string">
            <text:p>參照解說</text:p>
          </table:table-cell>
          <table:table-cell table:style-name="ce134"/>
          <table:table-cell table:style-name="ce134" office:value-type="float" office:value="13" calcext:value-type="float">
            <text:p>13</text:p>
          </table:table-cell>
          <table:table-cell table:style-name="ce134" table:number-columns-repeated="3"/>
          <table:table-cell table:style-name="ce134" office:value-type="float" office:value="0" calcext:value-type="float">
            <text:p>0</text:p>
          </table:table-cell>
          <table:table-cell table:style-name="ce134" office:value-type="float" office:value="12" calcext:value-type="float">
            <text:p>12</text:p>
          </table:table-cell>
          <table:table-cell table:number-columns-repeated="2"/>
          <table:table-cell table:style-name="ce136" office:value-type="string" calcext:value-type="string">
            <text:p>《弑神之刃》作出的摩托車或機動車數據。</text:p>
            <text:p>製作時選擇&lt;駕駛：二輪&gt;或&lt;駕駛：四輪&gt;，此載具的攻擊力和裝甲值+LV，全力移動為250m。</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裝甲兵器</text:p>
          </table:table-cell>
          <table:table-cell table:style-name="ce134" office:value-type="string" calcext:value-type="string">
            <text:p>載具/元型</text:p>
          </table:table-cell>
          <table:table-cell table:style-name="ce134" office:value-type="string" calcext:value-type="string">
            <text:p>參照解說</text:p>
          </table:table-cell>
          <table:table-cell table:style-name="ce134"/>
          <table:table-cell table:style-name="ce134" office:value-type="float" office:value="15" calcext:value-type="float">
            <text:p>15</text:p>
          </table:table-cell>
          <table:table-cell table:style-name="ce134" table:number-columns-repeated="3"/>
          <table:table-cell table:style-name="ce134" office:value-type="float" office:value="-3" calcext:value-type="float">
            <text:p>-3</text:p>
          </table:table-cell>
          <table:table-cell table:style-name="ce134" office:value-type="float" office:value="20" calcext:value-type="float">
            <text:p>20</text:p>
          </table:table-cell>
          <table:table-cell table:number-columns-repeated="2"/>
          <table:table-cell table:style-name="ce136" office:value-type="string" calcext:value-type="string">
            <text:p>《弑神之刃》作出的可以乘坐的巨大兵器。是可以用壓倒性的裝甲蹂躪敵人的弑神武器形元型。</text:p>
            <text:p>製作時決定判定時使用的&lt;駕駛：●●&gt;，此載具可以裝備LV個搭載火器，全力移動為50m。</text:p>
          </table:table-cell>
          <table:table-cell table:style-name="ce140" office:value-type="string" calcext:value-type="string">
            <text:p>UAP27</text:p>
          </table:table-cell>
          <table:table-cell table:number-columns-repeated="1010"/>
        </table:table-row>
        <table:table-row table:style-name="ro16">
          <table:table-cell table:style-name="ce132" office:value-type="string" calcext:value-type="string">
            <text:p>元型：大槌</text:p>
          </table:table-cell>
          <table:table-cell table:style-name="ce134" office:value-type="string" calcext:value-type="string">
            <text:p>近戰/元型</text:p>
          </table:table-cell>
          <table:table-cell table:style-name="ce134" office:value-type="string" calcext:value-type="string">
            <text:p>&lt;近戰&gt;</text:p>
          </table:table-cell>
          <table:table-cell table:style-name="ce134" office:value-type="float" office:value="-3" calcext:value-type="float">
            <text:p>-3</text:p>
          </table:table-cell>
          <table:table-cell table:style-name="ce134" office:value-type="string" calcext:value-type="string">
            <text:p>[LV×3+6]</text:p>
          </table:table-cell>
          <table:table-cell table:style-name="ce134" office:value-type="float" office:value="4" calcext:value-type="float">
            <text:p>4</text:p>
          </table:table-cell>
          <table:table-cell table:style-name="ce134" office:value-type="string" calcext:value-type="string">
            <text:p>至近</text:p>
          </table:table-cell>
          <table:table-cell table:style-name="ce134" table:number-columns-repeated="3"/>
          <table:table-cell table:number-columns-repeated="2"/>
          <table:table-cell table:style-name="ce136" office:value-type="string" calcext:value-type="string">
            <text:p>《弑神之刃》作出的大槌狀元型。在以此武器進行攻擊的前使用。若該次攻擊命中，則可使目標移動5m。移動目的地由你決定，且可無視交戰狀態與封鎖進行移動。此效果每場景僅可使用1次。此武器為雙手持用。</text:p>
          </table:table-cell>
          <table:table-cell table:style-name="ce140" office:value-type="string" calcext:value-type="string">
            <text:p>DFP17</text:p>
          </table:table-cell>
          <table:table-cell table:number-columns-repeated="1010"/>
        </table:table-row>
        <table:table-row table:style-name="ro16">
          <table:table-cell table:style-name="ce132" office:value-type="string" calcext:value-type="string">
            <text:p>元型：鞭</text:p>
          </table:table-cell>
          <table:table-cell table:style-name="ce134" office:value-type="string" calcext:value-type="string">
            <text:p>近戰/元型</text:p>
          </table:table-cell>
          <table:table-cell table:style-name="ce134" office:value-type="string" calcext:value-type="string">
            <text:p>&lt;近戰&gt;</text:p>
          </table:table-cell>
          <table:table-cell table:style-name="ce134" office:value-type="float" office:value="-2" calcext:value-type="float">
            <text:p>-2</text:p>
          </table:table-cell>
          <table:table-cell table:style-name="ce134" office:value-type="string" calcext:value-type="string">
            <text:p>[LV×2+4]</text:p>
          </table:table-cell>
          <table:table-cell table:style-name="ce134" office:value-type="float" office:value="1" calcext:value-type="float">
            <text:p>1</text:p>
          </table:table-cell>
          <table:table-cell table:style-name="ce134" office:value-type="string" calcext:value-type="string">
            <text:p>20m</text:p>
          </table:table-cell>
          <table:table-cell table:style-name="ce134" table:number-columns-repeated="3"/>
          <table:table-cell table:number-columns-repeated="2"/>
          <table:table-cell table:style-name="ce136" office:value-type="string" calcext:value-type="string">
            <text:p>《弑神之刃》作出的的鞭狀元型，也可能呈現為繩索或細線等形態。若以此武器進行的攻擊命中，目標將承受[異常狀態：硬直]。</text:p>
          </table:table-cell>
          <table:table-cell table:style-name="ce140" office:value-type="string" calcext:value-type="string">
            <text:p>DFP17</text:p>
          </table:table-cell>
          <table:table-cell table:number-columns-repeated="1010"/>
        </table:table-row>
        <table:table-row table:style-name="ro16">
          <table:table-cell table:style-name="ce132" office:value-type="string" calcext:value-type="string">
            <text:p>元型：自動火器</text:p>
          </table:table-cell>
          <table:table-cell table:style-name="ce134" office:value-type="string" calcext:value-type="string">
            <text:p>射擊/元型</text:p>
          </table:table-cell>
          <table:table-cell table:style-name="ce134" office:value-type="string" calcext:value-type="string">
            <text:p>&lt;射擊&gt;</text:p>
          </table:table-cell>
          <table:table-cell table:style-name="ce134" office:value-type="float" office:value="-1" calcext:value-type="float">
            <text:p>-1</text:p>
          </table:table-cell>
          <table:table-cell table:style-name="ce134" office:value-type="string" calcext:value-type="string">
            <text:p>[LV×2+7]</text:p>
          </table:table-cell>
          <table:table-cell table:style-name="ce134" office:value-type="string" calcext:value-type="string">
            <text:p>-</text:p>
          </table:table-cell>
          <table:table-cell table:style-name="ce134" office:value-type="string" calcext:value-type="string">
            <text:p>50m</text:p>
          </table:table-cell>
          <table:table-cell table:style-name="ce134" table:number-columns-repeated="3"/>
          <table:table-cell table:number-columns-repeated="2"/>
          <table:table-cell table:style-name="ce136" office:value-type="string" calcext:value-type="string">
            <text:p>《弑神之刃》作出的射擊武器資料。具備優異的連射性能，能夠在短時間內傾瀉大量子彈。在以此武器進行攻擊前使用。該次攻擊的「對象」改為「對象：範圍」。此效果每個劇本最多可使用LV次。此武器不可用於至近距離。</text:p>
          </table:table-cell>
          <table:table-cell table:style-name="ce140" office:value-type="string" calcext:value-type="string">
            <text:p>DFP17</text:p>
          </table:table-cell>
          <table:table-cell table:number-columns-repeated="1010"/>
        </table:table-row>
        <table:table-row table:style-name="ro16">
          <table:table-cell table:style-name="ce132" office:value-type="string" calcext:value-type="string">
            <text:p>元型：筆</text:p>
          </table:table-cell>
          <table:table-cell table:style-name="ce134" office:value-type="string" calcext:value-type="string">
            <text:p>射擊/元型</text:p>
          </table:table-cell>
          <table:table-cell table:style-name="ce134" office:value-type="string" calcext:value-type="string">
            <text:p>《神威的幻想》</text:p>
          </table:table-cell>
          <table:table-cell table:style-name="ce134" office:value-type="float" office:value="-1" calcext:value-type="float">
            <text:p>-1</text:p>
          </table:table-cell>
          <table:table-cell table:style-name="ce134" office:value-type="string" calcext:value-type="string">
            <text:p>[LV×3+6]</text:p>
          </table:table-cell>
          <table:table-cell table:style-name="ce134" office:value-type="string" calcext:value-type="string">
            <text:p>-</text:p>
          </table:table-cell>
          <table:table-cell table:style-name="ce134" office:value-type="string" calcext:value-type="string">
            <text:p>20m</text:p>
          </table:table-cell>
          <table:table-cell table:style-name="ce134" table:number-columns-repeated="3"/>
          <table:table-cell table:number-columns-repeated="2"/>
          <table:table-cell table:style-name="ce136" office:value-type="string" calcext:value-type="string">
            <text:p>《弑神之刃》作出的筆狀元型資料。藉由長青魔劍的力量，將描繪於虛空中的事物實體化。使用《神威的幻想》時，可將此武器作為攻擊手段。以此武器進行的攻擊視為射擊攻擊。</text:p>
          </table:table-cell>
          <table:table-cell table:style-name="ce140" office:value-type="string" calcext:value-type="string">
            <text:p>DFP17</text:p>
          </table:table-cell>
          <table:table-cell table:number-columns-repeated="1010"/>
        </table:table-row>
        <table:table-row table:style-name="ro16">
          <table:table-cell table:style-name="ce132" office:value-type="string" calcext:value-type="string">
            <text:p>元型：書</text:p>
          </table:table-cell>
          <table:table-cell table:style-name="ce134" office:value-type="string" calcext:value-type="string">
            <text:p>射擊/元型</text:p>
          </table:table-cell>
          <table:table-cell table:style-name="ce134" office:value-type="string" calcext:value-type="string">
            <text:p>《神威的幻想》</text:p>
          </table:table-cell>
          <table:table-cell table:style-name="ce134" office:value-type="float" office:value="0" calcext:value-type="float">
            <text:p>0</text:p>
          </table:table-cell>
          <table:table-cell table:style-name="ce134" office:value-type="string" calcext:value-type="string">
            <text:p>[LV×3+2]</text:p>
          </table:table-cell>
          <table:table-cell table:style-name="ce134" office:value-type="string" calcext:value-type="string">
            <text:p>-</text:p>
          </table:table-cell>
          <table:table-cell table:style-name="ce134" office:value-type="string" calcext:value-type="string">
            <text:p>50m</text:p>
          </table:table-cell>
          <table:table-cell table:style-name="ce134" table:number-columns-repeated="3"/>
          <table:table-cell table:number-columns-repeated="2"/>
          <table:table-cell table:style-name="ce136" office:value-type="string" calcext:value-type="string">
            <text:p>《弑神之刃》作出的書本形態元型。書中記載的事項或描繪的圖像將獲得實體，有時文字與插畫會保持原樣，直接向敵人襲擊而去。使用《神威的幻想》時，可將此武器作為攻擊手段。以此武器進行的攻擊視為射擊攻擊。</text:p>
          </table:table-cell>
          <table:table-cell table:style-name="ce140" office:value-type="string" calcext:value-type="string">
            <text:p>DFP17</text:p>
          </table:table-cell>
          <table:table-cell table:number-columns-repeated="1010"/>
        </table:table-row>
        <table:table-row table:style-name="ro16">
          <table:table-cell table:style-name="ce132" office:value-type="string" calcext:value-type="string">
            <text:p>元型：戰鬥禮裝</text:p>
          </table:table-cell>
          <table:table-cell table:style-name="ce134" office:value-type="string" calcext:value-type="string">
            <text:p>防具/元型</text:p>
          </table:table-cell>
          <table:table-cell table:style-name="ce134" table:number-columns-repeated="5"/>
          <table:table-cell table:style-name="ce134" office:value-type="float" office:value="0" calcext:value-type="float">
            <text:p>0</text:p>
          </table:table-cell>
          <table:table-cell table:style-name="ce134" office:value-type="float" office:value="-1" calcext:value-type="float">
            <text:p>-1</text:p>
          </table:table-cell>
          <table:table-cell table:style-name="ce134" office:value-type="string" calcext:value-type="string">
            <text:p>[LV×2+2]</text:p>
          </table:table-cell>
          <table:table-cell table:number-columns-repeated="2"/>
          <table:table-cell table:style-name="ce136" office:value-type="string" calcext:value-type="string">
            <text:p>《弑神之刃》作出的衣裝形態元型。裝備期間，你進行的所有攻擊，其命中判定骰數＋2D。</text:p>
          </table:table-cell>
          <table:table-cell table:style-name="ce140" office:value-type="string" calcext:value-type="string">
            <text:p>DFP17</text:p>
          </table:table-cell>
          <table:table-cell table:number-columns-repeated="1010"/>
        </table:table-row>
        <table:table-row table:style-name="ro16">
          <table:table-cell table:style-name="ce132" office:value-type="string" calcext:value-type="string">
            <text:p>元型：靴</text:p>
          </table:table-cell>
          <table:table-cell table:style-name="ce134" office:value-type="string" calcext:value-type="string">
            <text:p>防具（輔助）/元型</text:p>
          </table:table-cell>
          <table:table-cell table:style-name="ce134" table:number-columns-repeated="5"/>
          <table:table-cell table:number-columns-repeated="2" table:style-name="ce134" office:value-type="float" office:value="0" calcext:value-type="float">
            <text:p>0</text:p>
          </table:table-cell>
          <table:table-cell table:style-name="ce134" office:value-type="string" calcext:value-type="string">
            <text:p>[LV+1]</text:p>
          </table:table-cell>
          <table:table-cell table:number-columns-repeated="2"/>
          <table:table-cell table:style-name="ce136" office:value-type="string" calcext:value-type="string">
            <text:p>《弑神之刃》作出的裝著於足部的元型。於先攻階段使用。你可在飛行狀態下進行戰鬥移動或離脫。此效果每個劇本最多可使用LV次。</text:p>
          </table:table-cell>
          <table:table-cell table:style-name="ce140" office:value-type="string" calcext:value-type="string">
            <text:p>DFP17</text:p>
          </table:table-cell>
          <table:table-cell table:number-columns-repeated="1010"/>
        </table:table-row>
        <table:table-row table:style-name="ro16">
          <table:table-cell table:style-name="ce132" office:value-type="string" calcext:value-type="string">
            <text:p>元型：戰獸</text:p>
          </table:table-cell>
          <table:table-cell table:style-name="ce134" office:value-type="string" calcext:value-type="string">
            <text:p>載具/元型</text:p>
          </table:table-cell>
          <table:table-cell table:style-name="ce134" office:value-type="string" calcext:value-type="string">
            <text:p>&lt;駕駛：騎乘動物&gt;</text:p>
          </table:table-cell>
          <table:table-cell table:style-name="ce134"/>
          <table:table-cell table:style-name="ce134" office:value-type="float" office:value="10" calcext:value-type="float">
            <text:p>10</text:p>
          </table:table-cell>
          <table:table-cell table:style-name="ce134" table:number-columns-repeated="3"/>
          <table:table-cell table:style-name="ce134" office:value-type="float" office:value="-1" calcext:value-type="float">
            <text:p>-1</text:p>
          </table:table-cell>
          <table:table-cell table:style-name="ce134" office:value-type="float" office:value="12" calcext:value-type="float">
            <text:p>12</text:p>
          </table:table-cell>
          <table:table-cell table:style-name="ce134" office:value-type="string" calcext:value-type="string">
            <text:p>100m</text:p>
          </table:table-cell>
          <table:table-cell/>
          <table:table-cell table:style-name="ce136" office:value-type="string" calcext:value-type="string">
            <text:p>《弑神之刃》作出的動物外型元型資料。裝備期間，你進行的所有攻擊，其攻擊力＋[LV×2]。全力移動為100m。</text:p>
          </table:table-cell>
          <table:table-cell table:style-name="ce140" office:value-type="string" calcext:value-type="string">
            <text:p>DFP17</text:p>
          </table:table-cell>
          <table:table-cell table:number-columns-repeated="1010"/>
        </table:table-row>
        <table:table-row table:style-name="ro16">
          <table:table-cell table:style-name="ce131" office:value-type="string" calcext:value-type="string">
            <text:p>理念持有者專用道具</text:p>
          </table:table-cell>
          <table:table-cell table:style-name="ce133" office:value-type="string" calcext:value-type="string" table:number-columns-spanned="12" table:number-rows-spanned="1">
            <text:p>長青魔劍異能《理念持有者》專屬道具，只有取得者可以使用，其中一部分需要特定的血統或症候群才能取得。</text:p>
          </table:table-cell>
          <table:covered-table-cell table:number-columns-repeated="11"/>
          <table:table-cell table:style-name="ce141"/>
          <table:table-cell table:number-columns-repeated="1010"/>
        </table:table-row>
        <table:table-row table:style-name="ro16">
          <table:table-cell table:style-name="ce132" office:value-type="string" calcext:value-type="string">
            <text:p>銳刃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極為銳利，具有適於奪取生命的形狀。</text:p>
            <text:p>《弑神之刃》所選擇的“元型：●●”的攻擊力+2。複數取得此理念時，效果最多疊加到5個。</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強甲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或防具非常結實，適合保護。</text:p>
            <text:p>《弑神之刃》所選擇的“元型：●●”的格擋或裝甲值+3。複數取得此理念時，效果最多疊加到5個。</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雙刃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同時生出複數個武器。</text:p>
            <text:p>只有《弑神之刃》選擇“元型：近戰武器”或“元型：手槍”時可以使用。製作兩個具備《弑神之刃》效果的武器，但兩把武器分別攻擊力-3。侵蝕率視為使用兩次《弑神之刃》。</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萬能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教導給你各種知識與技術。</text:p>
            <text:p>純血種專用，你取得的《天惠的魔劍》可以額外適用於另外一個技能。複數取得此理念時，不可選擇同一個技能。最大可以取得5個。</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光背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釋放出耀眼的光芒，能夠排除敵人的妨礙。</text:p>
            <text:p>天使光環專用。使用《弑神之刃》所選擇的“元型：●●”的射擊攻擊不會受到他人造成的減少判定骰或達成值效果影響。</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斥力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能夠彈飛一切傷害。</text:p>
            <text:p>重力魔眼專用。使用《弑神之刃》所選擇的“元型：●●”格擋時，格擋值+10。</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無限機關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啟動後可以持續自行行動。</text:p>
            <text:p>雷擊黑犬專用。《弑神之刃》所選擇的“元型：機關武器”或“元型：來福槍”的次要階段效果可以持續一場景。</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吸血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增強了吸血的力量。</text:p>
            <text:p>鮮血真祖專用。製作《弑神之刃》所選擇的“元型：●●”時，消耗3點以下的任意HP，武器的攻擊力+[消耗的HP×2]，此時製作的武器視為以《赫之劍》的效果製作。</text:p>
          </table:table-cell>
          <table:table-cell table:style-name="ce136" office:value-type="string" calcext:value-type="string">
            <text:p>UAP28</text:p>
          </table:table-cell>
          <table:table-cell table:number-columns-repeated="1010"/>
        </table:table-row>
        <table:table-row table:style-name="ro16">
          <table:table-cell table:style-name="ce132" office:value-type="string" calcext:value-type="string">
            <text:p>剛力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提高了你的野性之力。</text:p>
            <text:p>變異魔獸專用。《弑神之刃》所選擇的“元型：●●”為空手或兩手時，使用此武器造成的傷害+2D。</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長手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攻擊距離極長。</text:p>
            <text:p>畸變流體專用。使用《弑神之刃》所選擇的“元型：●●”的攻擊距離變為視野。</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空走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如同生出風一般輕盈。</text:p>
            <text:p>疾速靈猿專用。裝備《弑神之刃》所選擇的“元型：●●”時，你的判定骰子+2個。</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煉成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具備無法折斷的強度。</text:p>
            <text:p>煉金化形專用。使用《弑神之刃》所選擇的“元型：●●”格擋時，不會受到其他角色的減少或無視格擋值和裝甲值的效果影響。</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理力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在思考下才能發揮出真正的價值。</text:p>
            <text:p>神腦演算專用。使用《弑神之刃》所選擇的“元型：●●”進行的攻擊使用【精神】判定時，骰子+2個。</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幸運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會為你帶來微小的幸運。</text:p>
            <text:p>冥府領域專用。《弑神之刃》所選擇的“元型：●●”使用的1個攻擊判定骰子可以重擲。1判定最多使用1次此效果。</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粉碎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能夠粉碎、貫穿敵人的防具。</text:p>
            <text:p>冰炎奇蜥專用。使用《弑神之刃》所選擇的“元型：●●”的武器攻擊無視對象的裝甲值，但攻擊力-3。</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賦活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可以將你的生命力活性化。</text:p>
            <text:p>幻象惑星專用。裝備《弑神之刃》所選擇的“元型：●●”期間，在你從無法戰鬥回復時使用，回復20點HP。此效果1劇本最多使用1次。</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影奪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武器能夠奪取敵人的影子。</text:p>
            <text:p>噬身影蛇專用。裝備《弑神之刃》所選擇的“元型：●●”期間，《無形之影》的每輪使用次數增加1次。</text:p>
          </table:table-cell>
          <table:table-cell table:style-name="ce136" office:value-type="string" calcext:value-type="string">
            <text:p>UAP29</text:p>
          </table:table-cell>
          <table:table-cell table:number-columns-repeated="1010"/>
        </table:table-row>
        <table:table-row table:style-name="ro16">
          <table:table-cell table:style-name="ce132" office:value-type="string" calcext:value-type="string">
            <text:p>雲耀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提高了你察覺攻擊的能力。</text:p>
            <text:p>裝備《弑神之刃》所選擇的“元型：●●”時，當你的【行動值】在10以上時，你所進行的回避達成值+3。取得複數個此道具時，效果最多重複3次。</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英傑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能夠提升你自身的能力。</text:p>
            <text:p>取得時選擇一個能力值。《弑神之刃》所選擇的“元型：●●”裝備中，你使用所選能力值進行的判定骰數+2個。</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解縛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能夠提高你的復原能力。</text:p>
            <text:p>只有裝備《弑神之刃》所選擇的“元型：●●”時，才能在結算階段使用。你所受到的暴走之外的異常狀態全部解除。這個效果一場景最多使用一次。</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刺客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適合只打倒瞄準的目標。</text:p>
            <text:p>使用《弑神之刃》選擇的“元型：●●”進行「對象：單體」的攻擊時，攻擊力+3。取得複數個此道具時，效果最多重複3次。</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鷹目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適合狙擊遠處的敵人。</text:p>
            <text:p>裝備《弑神之刃》選擇的“元型：●●”時，你進行的攻擊的攻擊力+4。這個效果只能以不與你接戰的角色為對象。</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奮起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會在你受到攻擊時活性化。</text:p>
            <text:p>裝備《弑神之刃》選擇的“元型：●●”時，當你受到因攻擊造成的HP傷害時，你的下一次攻擊的攻擊力+5。</text:p>
            <text:p>攻擊者擁有偽神天鎖症候群時，攻擊的傷害再+1D10。</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防壁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適合抵禦大規模的攻擊。</text:p>
            <text:p>裝備《弑神之刃》所選擇的“元型：●●”時，受到「對象：單體」之外的攻擊時，你受到的傷害-5。</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無縫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生出的元型當你在最好的狀態時能夠發揮出真正的價值。</text:p>
            <text:p>裝備《弑神之刃》所選擇的「類別：防具」時，如果你沒有受到異常狀態，那麼攻擊的命中判定的達成值+3。取得複數個此道具時，效果最多重複3次。</text:p>
          </table:table-cell>
          <table:table-cell table:style-name="ce136" office:value-type="string" calcext:value-type="string">
            <text:p>SSS6P45</text:p>
          </table:table-cell>
          <table:table-cell table:number-columns-repeated="1010"/>
        </table:table-row>
        <table:table-row table:style-name="ro16">
          <table:table-cell table:style-name="ce132" office:value-type="string" calcext:value-type="string">
            <text:p>樂器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出的元型同時具備樂器的機能，其形狀與設計中亦會反映出樂器的特徵。</text:p>
            <text:p>在使用《弑神之刃》所選擇的“元型：●●”武器進行攻擊前使用。若該次攻擊命中，目標將承受異常狀態【重壓】。此理念最多可取得3個，每一個各自於每個劇本中最多可使用1次。</text:p>
          </table:table-cell>
          <table:table-cell table:style-name="ce136" office:value-type="string" calcext:value-type="string">
            <text:p>DFP18</text:p>
          </table:table-cell>
          <table:table-cell table:number-columns-repeated="1010"/>
        </table:table-row>
        <table:table-row table:style-name="ro16">
          <table:table-cell table:style-name="ce132" office:value-type="string" calcext:value-type="string">
            <text:p>假面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出的元型上浮現出假面的意象。你能與這些假面共享視野。</text:p>
            <text:p>裝備《弑神之刃》所選擇的“元型：●●”期間，你進行的所有使用【感覺】的判定，其達成值＋2。</text:p>
            <text:p>取得複數個此道具時，效果最多重複3次。</text:p>
          </table:table-cell>
          <table:table-cell table:style-name="ce136" office:value-type="string" calcext:value-type="string">
            <text:p>DFP18</text:p>
          </table:table-cell>
          <table:table-cell table:number-columns-repeated="1010"/>
        </table:table-row>
        <table:table-row table:style-name="ro16">
          <table:table-cell table:style-name="ce132" office:value-type="string" calcext:value-type="string">
            <text:p>騎兵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出的元型適合於載具之上的戰鬥。</text:p>
            <text:p>在裝備《弑神之刃》所選擇的“元型：●●”，且你處於操縱者或同乘者狀態時進行的攻擊，其攻擊力＋3。若重複取得，本效果最多可重疊3次。</text:p>
          </table:table-cell>
          <table:table-cell table:style-name="ce136" office:value-type="string" calcext:value-type="string">
            <text:p>DFP18</text:p>
          </table:table-cell>
          <table:table-cell table:number-columns-repeated="1010"/>
        </table:table-row>
        <table:table-row table:style-name="ro16">
          <table:table-cell table:style-name="ce132" office:value-type="string" calcext:value-type="string">
            <text:p>裁縫師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成的元型帶有針、線、縫紉機等裁縫用具的意象。其攻擊彷彿將敵人縫死在原地。</text:p>
            <text:p>在使用《弑神之刃》所選擇的“元型：●●”武器進行攻擊的直前使用。若該次攻擊命中，對象受到[異常狀態：硬直]。此理念最多可取得3個，每一個各自於每個劇本中最多可使用1次。</text:p>
          </table:table-cell>
          <table:table-cell table:style-name="ce136" office:value-type="string" calcext:value-type="string">
            <text:p>DFP18</text:p>
          </table:table-cell>
          <table:table-cell table:number-columns-repeated="1010"/>
        </table:table-row>
        <table:table-row table:style-name="ro16">
          <table:table-cell table:style-name="ce132" office:value-type="string" calcext:value-type="string">
            <text:p>刺客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成的元型適合用來精確擊倒被鎖定的單一目標。</text:p>
            <text:p>使用《弑神之刃》所選擇的“元型：●●”武器進行「目標：單體」的攻擊時，該次攻擊的攻擊力＋3。</text:p>
            <text:p>若重複取得，效果最多重複3次。</text:p>
          </table:table-cell>
          <table:table-cell table:style-name="ce136" office:value-type="string" calcext:value-type="string">
            <text:p>DFP18</text:p>
          </table:table-cell>
          <table:table-cell table:number-columns-repeated="1010"/>
        </table:table-row>
        <table:table-row table:style-name="ro16">
          <table:table-cell table:style-name="ce132" office:value-type="string" calcext:value-type="string">
            <text:p>廚師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成的元型帶有菜刀、平底鍋等料理用具的意匠。</text:p>
            <text:p>裝備《弑神之刃》所選擇的“元型：●●”期間，你進行的所有攻擊，其攻擊力＋3。</text:p>
            <text:p>若重複取得，效果最多重複［你已取得的、用於料理的〈藝術〉技能中，等級最高者］次。</text:p>
          </table:table-cell>
          <table:table-cell table:style-name="ce136" office:value-type="string" calcext:value-type="string">
            <text:p>DFP19</text:p>
          </table:table-cell>
          <table:table-cell table:number-columns-repeated="1010"/>
        </table:table-row>
        <table:table-row table:style-name="ro16">
          <table:table-cell table:style-name="ce132" office:value-type="string" calcext:value-type="string">
            <text:p>翼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成的元型擁有翅膀，並適合於空中戰鬥。</text:p>
            <text:p>裝備《弑神之刃》所選擇的「種別：防具」之“元型：●●”期間，當你處於飛行狀態進行攻擊時，該次攻擊的攻擊力＋3。此外，當你進入飛行狀態時，其持續時間延長至「原本的持續時間」或「主要階段結束時」兩者之中較長者。</text:p>
            <text:p>若重複取得，效果最多重複3次。</text:p>
          </table:table-cell>
          <table:table-cell table:style-name="ce136" office:value-type="string" calcext:value-type="string">
            <text:p>DFP19</text:p>
          </table:table-cell>
          <table:table-cell table:number-columns-repeated="1010"/>
        </table:table-row>
        <table:table-row table:style-name="ro16">
          <table:table-cell table:style-name="ce132" office:value-type="string" calcext:value-type="string">
            <text:p>時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成的元型具備操縱時間的能力。元型上會浮現圓盤時鐘、沙漏等時間相關的意象。</text:p>
            <text:p>裝備《弑神之刃》所選擇的“元型：●●”期間，於準備階段使用。在該回合內，選擇場景中的一名角色，其【行動值】+6。</text:p>
            <text:p>此理念最多可取得3個，各自每個劇本限使用1次。</text:p>
          </table:table-cell>
          <table:table-cell table:style-name="ce136" office:value-type="string" calcext:value-type="string">
            <text:p>DFP19</text:p>
          </table:table-cell>
          <table:table-cell table:number-columns-repeated="1010"/>
        </table:table-row>
        <table:table-row table:style-name="ro16">
          <table:table-cell table:style-name="ce132" office:value-type="string" calcext:value-type="string">
            <text:p>花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成的元型會散發擾亂精神的幻覺物質。元型上會浮現花朵的意象。</text:p>
            <text:p>裝備《弑神之刃》所選擇的“元型：●●”之武器期間，以〈交涉〉進行的攻擊，其造成的傷害值＋［裝備中的任一元型的攻擊力］。</text:p>
          </table:table-cell>
          <table:table-cell table:style-name="ce136" office:value-type="string" calcext:value-type="string">
            <text:p>DFP19</text:p>
          </table:table-cell>
          <table:table-cell table:number-columns-repeated="1010"/>
        </table:table-row>
        <table:table-row table:style-name="ro16">
          <table:table-cell table:style-name="ce132" office:value-type="string" calcext:value-type="string">
            <text:p>分離的理念</text:p>
          </table:table-cell>
          <table:table-cell table:style-name="ce134" office:value-type="string" calcext:value-type="string">
            <text:p>一般</text:p>
          </table:table-cell>
          <table:table-cell table:number-columns-repeated="10"/>
          <table:table-cell table:style-name="ce136" office:value-type="string" calcext:value-type="string">
            <text:p>表示你所生成的元型由多個零件構成，於攻擊時會彼此分離。</text:p>
            <text:p>使用《弑神之刃》所選擇的“元型：●●”之武器進行攻擊時，對該攻擊進行的閃避判定骰數－2D。</text:p>
          </table:table-cell>
          <table:table-cell table:style-name="ce136" office:value-type="string" calcext:value-type="string">
            <text:p>DFP19</text:p>
          </table:table-cell>
          <table:table-cell table:number-columns-repeated="1010"/>
        </table:table-row>
        <table:table-row table:style-name="ro16">
          <table:table-cell table:style-name="ce132"/>
          <table:table-cell table:style-name="ce134"/>
          <table:table-cell table:number-columns-repeated="10"/>
          <table:table-cell table:style-name="ce136"/>
          <table:table-cell table:style-name="ce141"/>
          <table:table-cell table:number-columns-repeated="1010"/>
        </table:table-row>
        <table:table-row table:style-name="ro16" table:number-rows-repeated="899">
          <table:table-cell table:number-columns-repeated="12"/>
          <table:table-cell table:style-name="ce137"/>
          <table:table-cell table:style-name="ce141"/>
          <table:table-cell table:number-columns-repeated="1010"/>
        </table:table-row>
        <table:table-row table:style-name="ro4" table:number-rows-repeated="1047567">
          <table:table-cell table:number-columns-repeated="1024"/>
        </table:table-row>
        <table:table-row table:style-name="ro4">
          <table:table-cell table:number-columns-repeated="1024"/>
        </table:table-row>
      </table:table>
      <table:table table:name="道具自定義項" table:style-name="ta13">
        <table:table-column table:style-name="co6" table:default-cell-style-name="Default"/>
        <table:table-column table:style-name="co68" table:default-cell-style-name="Default"/>
        <table:table-column table:style-name="co1" table:default-cell-style-name="Default"/>
        <table:table-column table:style-name="co22" table:default-cell-style-name="Default"/>
        <table:table-column table:style-name="co4" table:default-cell-style-name="Default"/>
        <table:table-column table:style-name="co5" table:number-columns-repeated="1019" table:default-cell-style-name="Default"/>
        <table:table-row table:style-name="ro6">
          <table:table-cell table:style-name="ce142" office:value-type="string" calcext:value-type="string">
            <text:p>名稱</text:p>
          </table:table-cell>
          <table:table-cell table:style-name="ce142" office:value-type="string" calcext:value-type="string">
            <text:p>種類</text:p>
          </table:table-cell>
          <table:table-cell table:style-name="ce52" office:value-type="string" calcext:value-type="string">
            <text:p>必要經驗值</text:p>
          </table:table-cell>
          <table:table-cell table:style-name="ce142" office:value-type="string" calcext:value-type="string">
            <text:p>解說</text:p>
          </table:table-cell>
          <table:table-cell table:style-name="ce142" office:value-type="string" calcext:value-type="string">
            <text:p>參照</text:p>
          </table:table-cell>
          <table:table-cell table:style-name="ce12" table:number-columns-repeated="21"/>
          <table:table-cell table:number-columns-repeated="998"/>
        </table:table-row>
        <table:table-row table:style-name="ro6">
          <table:table-cell table:style-name="ce42" office:value-type="string" calcext:value-type="string">
            <text:p>裝飾品</text:p>
          </table:table-cell>
          <table:table-cell table:style-name="ce54" office:value-type="string" calcext:value-type="string">
            <text:p>自定義（武器）</text:p>
          </table:table-cell>
          <table:table-cell table:style-name="ce143" office:value-type="float" office:value="0" calcext:value-type="float">
            <text:p>0</text:p>
          </table:table-cell>
          <table:table-cell table:style-name="ce49" office:value-type="string" calcext:value-type="string">
            <text:p>在武器本身或是鞘上附加獨特的裝飾，能夠表現出擁有者的個性。</text:p>
            <text:p>將異能道具指定為原型時每次製作都能附加。</text:p>
          </table:table-cell>
          <table:table-cell table:style-name="ce143" office:value-type="string" calcext:value-type="string">
            <text:p>IA P49</text:p>
          </table:table-cell>
          <table:table-cell table:style-name="ce143" table:number-columns-repeated="5"/>
          <table:table-cell table:style-name="ce144"/>
          <table:table-cell table:style-name="ce145"/>
          <table:table-cell table:style-name="ce143"/>
          <table:table-cell table:style-name="ce12" table:number-columns-repeated="13"/>
          <table:table-cell table:number-columns-repeated="998"/>
        </table:table-row>
        <table:table-row table:style-name="ro6">
          <table:table-cell table:style-name="ce42" office:value-type="string" calcext:value-type="string">
            <text:p>命名</text:p>
          </table:table-cell>
          <table:table-cell table:style-name="ce54" office:value-type="string" calcext:value-type="string">
            <text:p>自定義（武器）</text:p>
          </table:table-cell>
          <table:table-cell table:style-name="ce143" office:value-type="float" office:value="0" calcext:value-type="float">
            <text:p>0</text:p>
          </table:table-cell>
          <table:table-cell table:style-name="ce49" office:value-type="string" calcext:value-type="string">
            <text:p>為自定義武器賦予獨特的名字，通常來說自己用的道具名字可以自己決定，但該自定義表示其名字受他人所知曉，比如日本刀擁有“虎徹”、“村正”等有名的刀銘，或是“髭切丸”等傳說別名。</text:p>
          </table:table-cell>
          <table:table-cell table:style-name="ce143" office:value-type="string" calcext:value-type="string">
            <text:p>IA P49</text:p>
          </table:table-cell>
          <table:table-cell table:style-name="ce12" table:number-columns-repeated="21"/>
          <table:table-cell table:number-columns-repeated="998"/>
        </table:table-row>
        <table:table-row table:style-name="ro6">
          <table:table-cell table:style-name="ce42" office:value-type="string" calcext:value-type="string">
            <text:p>歷史</text:p>
          </table:table-cell>
          <table:table-cell table:style-name="ce54" office:value-type="string" calcext:value-type="string">
            <text:p>自定義（武器）</text:p>
          </table:table-cell>
          <table:table-cell table:style-name="ce143" office:value-type="float" office:value="0" calcext:value-type="float">
            <text:p>0</text:p>
          </table:table-cell>
          <table:table-cell table:style-name="ce49" office:value-type="string" calcext:value-type="string">
            <text:p>該自定義武器在你獲得前已經經歷的相當久遠的年月，不只是在你手上的歷史，它可能也曾被他人使用過，它不會告訴你曾被什麼人為何揮舞、最後又守護了什麼，但其思念已然寄宿其中。</text:p>
          </table:table-cell>
          <table:table-cell table:style-name="ce143" office:value-type="string" calcext:value-type="string">
            <text:p>IA P49</text:p>
          </table:table-cell>
          <table:table-cell table:style-name="ce12" table:number-columns-repeated="21"/>
          <table:table-cell table:number-columns-repeated="998"/>
        </table:table-row>
        <table:table-row table:style-name="ro6">
          <table:table-cell table:style-name="ce42" office:value-type="string" calcext:value-type="string">
            <text:p>美感異能</text:p>
          </table:table-cell>
          <table:table-cell table:style-name="ce54" office:value-type="string" calcext:value-type="string">
            <text:p>自定義（武器）</text:p>
          </table:table-cell>
          <table:table-cell table:style-name="ce143" office:value-type="float" office:value="2" calcext:value-type="float">
            <text:p>2</text:p>
          </table:table-cell>
          <table:table-cell table:style-name="ce49" office:value-type="string" calcext:value-type="string">
            <text:p>該自定義武器可以感應使用的異能並做出獨特的反應。</text:p>
            <text:p>場景內使用異能時該道具會呈現特殊的反應，效果由你決定，如刀身浮現謎一樣的盧恩文字、刀鍔自鳴、不知從哪滴血等。</text:p>
          </table:table-cell>
          <table:table-cell table:style-name="ce143" office:value-type="string" calcext:value-type="string">
            <text:p>IA P49</text:p>
          </table:table-cell>
          <table:table-cell table:style-name="ce12" table:number-columns-repeated="21"/>
          <table:table-cell table:number-columns-repeated="998"/>
        </table:table-row>
        <table:table-row table:style-name="ro6">
          <table:table-cell table:style-name="ce42" office:value-type="string" calcext:value-type="string">
            <text:p>迷彩</text:p>
          </table:table-cell>
          <table:table-cell table:style-name="ce54" office:value-type="string" calcext:value-type="string">
            <text:p>自定義（武器）</text:p>
          </table:table-cell>
          <table:table-cell table:style-name="ce143" office:value-type="float" office:value="3" calcext:value-type="float">
            <text:p>3</text:p>
          </table:table-cell>
          <table:table-cell table:style-name="ce49" office:value-type="string" calcext:value-type="string">
            <text:p>該自定義武器帶有能讓其一眼看上去不像武器的迷彩，也可以是適合該道具的偽裝性箱子或鞘等。</text:p>
            <text:p>你為了隱藏該武器進行的判定骰數+1個。</text:p>
          </table:table-cell>
          <table:table-cell table:style-name="ce143" office:value-type="string" calcext:value-type="string">
            <text:p>IA P49</text:p>
          </table:table-cell>
          <table:table-cell table:style-name="ce12" table:number-columns-repeated="21"/>
          <table:table-cell table:number-columns-repeated="998"/>
        </table:table-row>
        <table:table-row table:style-name="ro6">
          <table:table-cell table:style-name="ce42" office:value-type="string" calcext:value-type="string">
            <text:p>高科技</text:p>
          </table:table-cell>
          <table:table-cell table:style-name="ce54" office:value-type="string" calcext:value-type="string">
            <text:p>自定義（武器）</text:p>
          </table:table-cell>
          <table:table-cell table:style-name="ce143" office:value-type="float" office:value="5" calcext:value-type="float">
            <text:p>5</text:p>
          </table:table-cell>
          <table:table-cell table:style-name="ce49" office:value-type="string" calcext:value-type="string">
            <text:p>該自定義武器應用了最新的科學技術和背教者技術。</text:p>
            <text:p>取得時選擇一項技能，你進行該技能判定達成值+1。</text:p>
          </table:table-cell>
          <table:table-cell table:style-name="ce143" office:value-type="string" calcext:value-type="string">
            <text:p>IA P49</text:p>
          </table:table-cell>
          <table:table-cell table:style-name="ce12" table:number-columns-repeated="21"/>
          <table:table-cell table:number-columns-repeated="998"/>
        </table:table-row>
        <table:table-row table:style-name="ro6">
          <table:table-cell table:style-name="ce42" office:value-type="string" calcext:value-type="string">
            <text:p>附魔</text:p>
          </table:table-cell>
          <table:table-cell table:style-name="ce54" office:value-type="string" calcext:value-type="string">
            <text:p>自定義（武器）</text:p>
          </table:table-cell>
          <table:table-cell table:style-name="ce143" office:value-type="float" office:value="10" calcext:value-type="float">
            <text:p>10</text:p>
          </table:table-cell>
          <table:table-cell table:style-name="ce49" office:value-type="string" calcext:value-type="string">
            <text:p>該自定義武器能夠強化特定異能，常常伴有“銳利”、“流血的”、“運送者”之類的異名。</text:p>
            <text:p>取得時選擇一個異能，使用該武器與該異能組合進行的攻擊判定骰數+2個。</text:p>
          </table:table-cell>
          <table:table-cell table:style-name="ce143" office:value-type="string" calcext:value-type="string">
            <text:p>IA P49</text:p>
          </table:table-cell>
          <table:table-cell table:style-name="ce12" table:number-columns-repeated="21"/>
          <table:table-cell table:number-columns-repeated="998"/>
        </table:table-row>
        <table:table-row table:style-name="ro6">
          <table:table-cell table:style-name="ce42" office:value-type="string" calcext:value-type="string">
            <text:p>史詩</text:p>
          </table:table-cell>
          <table:table-cell table:style-name="ce54" office:value-type="string" calcext:value-type="string">
            <text:p>自定義（武器）</text:p>
          </table:table-cell>
          <table:table-cell table:style-name="ce143" office:value-type="float" office:value="15" calcext:value-type="float">
            <text:p>15</text:p>
          </table:table-cell>
          <table:table-cell table:style-name="ce49" office:value-type="string" calcext:value-type="string">
            <text:p>該自定義武器曾在傳說中登場。</text:p>
            <text:p>取得時選擇攻擊力或格擋值中的一項+2。另外，你使用異能效果使該道具破壞時，可以使破壞效果無效，該效果一劇本可以使用一次。</text:p>
          </table:table-cell>
          <table:table-cell table:style-name="ce143" office:value-type="string" calcext:value-type="string">
            <text:p>IA P49</text:p>
          </table:table-cell>
          <table:table-cell table:style-name="ce12" table:number-columns-repeated="21"/>
          <table:table-cell table:number-columns-repeated="998"/>
        </table:table-row>
        <table:table-row table:style-name="ro6">
          <table:table-cell table:style-name="ce42" office:value-type="string" calcext:value-type="string">
            <text:p>UG設計</text:p>
          </table:table-cell>
          <table:table-cell table:style-name="ce54" office:value-type="string" calcext:value-type="string">
            <text:p>自定義（防具）</text:p>
          </table:table-cell>
          <table:table-cell table:style-name="ce143" office:value-type="float" office:value="0" calcext:value-type="float">
            <text:p>0</text:p>
          </table:table-cell>
          <table:table-cell table:style-name="ce49" office:value-type="string" calcext:value-type="string">
            <text:p>你穿的衣服是相同款式的流水線產品，不引人矚目就是好，只不過出門可能會撞衫。</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年輕便服</text:p>
          </table:table-cell>
          <table:table-cell table:style-name="ce54" office:value-type="string" calcext:value-type="string">
            <text:p>自定義（防具）</text:p>
          </table:table-cell>
          <table:table-cell table:style-name="ce143" office:value-type="float" office:value="0" calcext:value-type="float">
            <text:p>0</text:p>
          </table:table-cell>
          <table:table-cell table:style-name="ce49" office:value-type="string" calcext:value-type="string">
            <text:p>你穿的衣服是面向年輕人設計的產品，有可愛或街頭等多種風格，一部分UGN支部的年輕超越者很喜歡，類似的改造也被許可了。</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專屬制服</text:p>
          </table:table-cell>
          <table:table-cell table:style-name="ce54" office:value-type="string" calcext:value-type="string">
            <text:p>自定義（防具）</text:p>
          </table:table-cell>
          <table:table-cell table:style-name="ce143" office:value-type="float" office:value="0" calcext:value-type="float">
            <text:p>0</text:p>
          </table:table-cell>
          <table:table-cell table:style-name="ce49" office:value-type="string" calcext:value-type="string">
            <text:p>你穿的衣服是所屬組織提供的制服，雖然各組織團體之間制服設計差異很大，總之你還是穿上了他們的制服。</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狂野破洞</text:p>
          </table:table-cell>
          <table:table-cell table:style-name="ce54" office:value-type="string" calcext:value-type="string">
            <text:p>自定義（防具）</text:p>
          </table:table-cell>
          <table:table-cell table:style-name="ce143" office:value-type="float" office:value="2" calcext:value-type="float">
            <text:p>2</text:p>
          </table:table-cell>
          <table:table-cell table:style-name="ce49" office:value-type="string" calcext:value-type="string">
            <text:p>該防具因為長期使用而變得破破爛爛，但你覺得它很帥。</text:p>
            <text:p>該道具裝甲值-1，你進行的&lt;意志&gt;判定達成值+1。</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設計師系</text:p>
          </table:table-cell>
          <table:table-cell table:style-name="ce54" office:value-type="string" calcext:value-type="string">
            <text:p>自定義（防具）</text:p>
          </table:table-cell>
          <table:table-cell table:style-name="ce143" office:value-type="float" office:value="5" calcext:value-type="float">
            <text:p>5</text:p>
          </table:table-cell>
          <table:table-cell table:style-name="ce49" office:value-type="string" calcext:value-type="string">
            <text:p>你穿的衣服是時尚設計師製作的定制款，有不少超越者喜歡這種渾身時尚的感覺。</text:p>
            <text:p>你進行的&lt;交涉&gt;判定骰數+1個。</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金屬馬甲</text:p>
          </table:table-cell>
          <table:table-cell table:style-name="ce54" office:value-type="string" calcext:value-type="string">
            <text:p>自定義（防具）</text:p>
          </table:table-cell>
          <table:table-cell table:style-name="ce143" office:value-type="float" office:value="5" calcext:value-type="float">
            <text:p>5</text:p>
          </table:table-cell>
          <table:table-cell table:style-name="ce49" office:value-type="string" calcext:value-type="string">
            <text:p>該防具外側覆蓋了大量鐵板和鑲釘，不僅防禦性能強大，時尚水準也很獨特。</text:p>
            <text:p>該道具裝甲值+2，行動值-1。</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變身素材</text:p>
          </table:table-cell>
          <table:table-cell table:style-name="ce54" office:value-type="string" calcext:value-type="string">
            <text:p>自定義（防具）</text:p>
          </table:table-cell>
          <table:table-cell table:style-name="ce143" office:value-type="float" office:value="10" calcext:value-type="float">
            <text:p>10</text:p>
          </table:table-cell>
          <table:table-cell table:style-name="ce49" office:value-type="string" calcext:value-type="string">
            <text:p>該防具能根據異能變化成不同的形態，不管是背教者之力或是科技之力，它能讓你實現自己的變身願望。</text:p>
            <text:p>該道具裝甲值+2，任何時候都可以使用。你裝備該道具時，可與已裝備的道具交換，該效果一劇本可以使用一次。</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耐衝擊性能</text:p>
          </table:table-cell>
          <table:table-cell table:style-name="ce54" office:value-type="string" calcext:value-type="string">
            <text:p>自定義（防具）</text:p>
          </table:table-cell>
          <table:table-cell table:style-name="ce143" office:value-type="float" office:value="15" calcext:value-type="float">
            <text:p>15</text:p>
          </table:table-cell>
          <table:table-cell table:style-name="ce49" office:value-type="string" calcext:value-type="string">
            <text:p>該防具加裝了衝擊吸收素材和傷害分散機能。</text:p>
            <text:p>你使用[你受到的傷害-N]異能時，受到的傷害額外-5。</text:p>
          </table:table-cell>
          <table:table-cell table:style-name="ce143" office:value-type="string" calcext:value-type="string">
            <text:p>IA P50</text:p>
          </table:table-cell>
          <table:table-cell table:style-name="ce12" table:number-columns-repeated="21"/>
          <table:table-cell table:number-columns-repeated="998"/>
        </table:table-row>
        <table:table-row table:style-name="ro6">
          <table:table-cell table:style-name="ce42" office:value-type="string" calcext:value-type="string">
            <text:p>尖錐車身</text:p>
          </table:table-cell>
          <table:table-cell table:style-name="ce54" office:value-type="string" calcext:value-type="string">
            <text:p>自定義（載具）</text:p>
          </table:table-cell>
          <table:table-cell table:style-name="ce143" office:value-type="float" office:value="0" calcext:value-type="float">
            <text:p>0</text:p>
          </table:table-cell>
          <table:table-cell table:style-name="ce49" office:value-type="string" calcext:value-type="string">
            <text:p>在車身上加裝了鐵制鑲釘或尖刺等狂野裝飾，能讓自己的愛車表現得極具攻擊性，但是不會讓攻擊力變化。</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6">
          <table:table-cell table:style-name="ce42" office:value-type="string" calcext:value-type="string">
            <text:p>霓虹車身</text:p>
          </table:table-cell>
          <table:table-cell table:style-name="ce54" office:value-type="string" calcext:value-type="string">
            <text:p>自定義（載具）</text:p>
          </table:table-cell>
          <table:table-cell table:style-name="ce143" office:value-type="float" office:value="0" calcext:value-type="float">
            <text:p>0</text:p>
          </table:table-cell>
          <table:table-cell table:style-name="ce49" office:value-type="string" calcext:value-type="string">
            <text:p>在車身上加裝了電流裝飾或霓虹光條等裝飾，可以自由調節亮度，全部打開的話在晚上非常顯眼。</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6">
          <table:table-cell table:style-name="ce42" office:value-type="string" calcext:value-type="string">
            <text:p>彩繪車身</text:p>
          </table:table-cell>
          <table:table-cell table:style-name="ce54" office:value-type="string" calcext:value-type="string">
            <text:p>自定義（載具）</text:p>
          </table:table-cell>
          <table:table-cell table:style-name="ce143" office:value-type="float" office:value="0" calcext:value-type="float">
            <text:p>0</text:p>
          </table:table-cell>
          <table:table-cell table:style-name="ce49" office:value-type="string" calcext:value-type="string">
            <text:p>在車身上佈滿繪畫、噴漆或貼紙，充分表現了你的感性，也有不少使用動漫角色繪畫的痛車。</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6">
          <table:table-cell table:style-name="ce42" office:value-type="string" calcext:value-type="string">
            <text:p>加裝馬達</text:p>
          </table:table-cell>
          <table:table-cell table:style-name="ce54" office:value-type="string" calcext:value-type="string">
            <text:p>自定義（載具）</text:p>
          </table:table-cell>
          <table:table-cell table:style-name="ce143" office:value-type="float" office:value="2" calcext:value-type="float">
            <text:p>2</text:p>
          </table:table-cell>
          <table:table-cell table:style-name="ce49" office:value-type="string" calcext:value-type="string">
            <text:p>加裝馬達強化動力。</text:p>
            <text:p>該道具為全力移動中含有【肉體】的載具時變為[全力移動：50m]。</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6">
          <table:table-cell table:style-name="ce42" office:value-type="string" calcext:value-type="string">
            <text:p>變色龍車身</text:p>
          </table:table-cell>
          <table:table-cell table:style-name="ce54" office:value-type="string" calcext:value-type="string">
            <text:p>自定義（載具）</text:p>
          </table:table-cell>
          <table:table-cell table:style-name="ce143" office:value-type="float" office:value="5" calcext:value-type="float">
            <text:p>5</text:p>
          </table:table-cell>
          <table:table-cell table:style-name="ce49" office:value-type="string" calcext:value-type="string">
            <text:p>可以隱蔽載具讓它看起來像是普通車輛。</text:p>
            <text:p>該道具處於搭乘狀態或同乘狀態時你為隱藏該道具進行的判定骰數+1個。</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6">
          <table:table-cell table:style-name="ce42" office:value-type="string" calcext:value-type="string">
            <text:p>飛行組件</text:p>
          </table:table-cell>
          <table:table-cell table:style-name="ce54" office:value-type="string" calcext:value-type="string">
            <text:p>自定義（載具）</text:p>
          </table:table-cell>
          <table:table-cell table:style-name="ce143" office:value-type="float" office:value="5" calcext:value-type="float">
            <text:p>5</text:p>
          </table:table-cell>
          <table:table-cell table:style-name="ce49" office:value-type="string" calcext:value-type="string">
            <text:p>改造的載具可以飛行。</text:p>
            <text:p>次要動作使用，該場景間你和同乘者進入飛行狀態，該效果一劇本可以使用一次。</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6">
          <table:table-cell table:style-name="ce42" office:value-type="string" calcext:value-type="string">
            <text:p>雷光機械</text:p>
          </table:table-cell>
          <table:table-cell table:style-name="ce54" office:value-type="string" calcext:value-type="string">
            <text:p>自定義（載具）</text:p>
          </table:table-cell>
          <table:table-cell table:style-name="ce143" office:value-type="float" office:value="10" calcext:value-type="float">
            <text:p>10</text:p>
          </table:table-cell>
          <table:table-cell table:style-name="ce49" office:value-type="string" calcext:value-type="string">
            <text:p>能讓載具突破加速極限的機器。</text:p>
            <text:p>你使用異能增加行動值時，額外+3。</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24">
          <table:table-cell table:style-name="ce42" office:value-type="string" calcext:value-type="string">
            <text:p>R8引擎</text:p>
          </table:table-cell>
          <table:table-cell table:style-name="ce54" office:value-type="string" calcext:value-type="string">
            <text:p>自定義（載具）</text:p>
          </table:table-cell>
          <table:table-cell table:style-name="ce143" office:value-type="float" office:value="15" calcext:value-type="float">
            <text:p>15</text:p>
          </table:table-cell>
          <table:table-cell table:style-name="ce49" office:value-type="string" calcext:value-type="string">
            <text:p>讓載具搭載被背教者感染的噴火怪物引擎。</text:p>
            <text:p>該道具攻擊力+2，全力移動+20m。</text:p>
          </table:table-cell>
          <table:table-cell table:style-name="ce143" office:value-type="string" calcext:value-type="string">
            <text:p>IA P51</text:p>
          </table:table-cell>
          <table:table-cell table:style-name="ce12" table:number-columns-repeated="21"/>
          <table:table-cell table:number-columns-repeated="998"/>
        </table:table-row>
        <table:table-row table:style-name="ro6">
          <table:table-cell table:style-name="ce42" office:value-type="string" calcext:value-type="string">
            <text:p>APP遊戲</text:p>
          </table:table-cell>
          <table:table-cell table:style-name="ce54" office:value-type="string" calcext:value-type="string">
            <text:p>自定義（一般）</text:p>
          </table:table-cell>
          <table:table-cell table:style-name="ce143" office:value-type="float" office:value="0" calcext:value-type="float">
            <text:p>0</text:p>
          </table:table-cell>
          <table:table-cell table:style-name="ce49" office:value-type="string" calcext:value-type="string">
            <text:p>主要用於手機或平板的應用或遊戲，也有購買時長的類型。</text:p>
            <text:p>次要動作使用，消費1點財富點數，該主要階段間你進行的&lt;藝術：遊戲&gt;判定達成值+1。</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社交服務</text:p>
          </table:table-cell>
          <table:table-cell table:style-name="ce54" office:value-type="string" calcext:value-type="string">
            <text:p>自定義（一般）</text:p>
          </table:table-cell>
          <table:table-cell table:style-name="ce143" office:value-type="float" office:value="0" calcext:value-type="float">
            <text:p>0</text:p>
          </table:table-cell>
          <table:table-cell table:style-name="ce49" office:value-type="string" calcext:value-type="string">
            <text:p>主要用於手機或平板的社交軟件。</text:p>
            <text:p>主要動作使用，可以發送日常記錄的文章或照片，也可以接收其他人發來的相同信息。</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專屬道具</text:p>
          </table:table-cell>
          <table:table-cell table:style-name="ce54" office:value-type="string" calcext:value-type="string">
            <text:p>自定義（一般）</text:p>
          </table:table-cell>
          <table:table-cell table:style-name="ce143" office:value-type="float" office:value="2" calcext:value-type="float">
            <text:p>2</text:p>
          </table:table-cell>
          <table:table-cell table:style-name="ce49" office:value-type="string" calcext:value-type="string">
            <text:p>該道具是你的專用工具，因為是專門為你設計的，其他人用起來總會不太順手。</text:p>
            <text:p>該道具只能由你使用。</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充滿回憶</text:p>
          </table:table-cell>
          <table:table-cell table:style-name="ce54" office:value-type="string" calcext:value-type="string">
            <text:p>自定義（一般）</text:p>
          </table:table-cell>
          <table:table-cell table:style-name="ce143" office:value-type="float" office:value="5" calcext:value-type="float">
            <text:p>5</text:p>
          </table:table-cell>
          <table:table-cell table:style-name="ce49" office:value-type="string" calcext:value-type="string">
            <text:p>該道具包含著與其他人或物的回憶，當然回憶可能有好有壞。</text:p>
            <text:p>取得時選擇你露易絲列表中的一名角色，你與該角色進行的&lt;交涉&gt;判定骰數+1個。</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豪華</text:p>
          </table:table-cell>
          <table:table-cell table:style-name="ce54" office:value-type="string" calcext:value-type="string">
            <text:p>自定義（一般）</text:p>
          </table:table-cell>
          <table:table-cell table:style-name="ce143" office:value-type="float" office:value="0" calcext:value-type="float">
            <text:p>0</text:p>
          </table:table-cell>
          <table:table-cell table:style-name="ce49" office:value-type="string" calcext:value-type="string">
            <text:p>該道具是你根據興趣選擇的嗜好品，例如高價的酒。煙或古董，這些東西能夠滿足你的饑渴和佔有欲。</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裹身毛毯</text:p>
          </table:table-cell>
          <table:table-cell table:style-name="ce54" office:value-type="string" calcext:value-type="string">
            <text:p>自定義（一般）</text:p>
          </table:table-cell>
          <table:table-cell table:style-name="ce143" office:value-type="float" office:value="1" calcext:value-type="float">
            <text:p>1</text:p>
          </table:table-cell>
          <table:table-cell table:style-name="ce49" office:value-type="string" calcext:value-type="string">
            <text:p>該道具是你難以捨棄的精神依存，不一定必須是毛毯。</text:p>
            <text:p>你進行的&lt;意志&gt;判定達成值+1，但你未持有該道具時進行的&lt;意志&gt;判定達成值-1。</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特工工具</text:p>
          </table:table-cell>
          <table:table-cell table:style-name="ce54" office:value-type="string" calcext:value-type="string">
            <text:p>自定義（一般）</text:p>
          </table:table-cell>
          <table:table-cell table:style-name="ce143" office:value-type="float" office:value="10" calcext:value-type="float">
            <text:p>10</text:p>
          </table:table-cell>
          <table:table-cell table:style-name="ce49" office:value-type="string" calcext:value-type="string">
            <text:p>該道具是特別定做的道具。</text:p>
            <text:p>取得時選擇任意3個技能，使用選擇的技能進行的判定達成值+2，該效果無法在戰鬥中使用。該道具無法獲得複數個。</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VIP賬號</text:p>
          </table:table-cell>
          <table:table-cell table:style-name="ce54" office:value-type="string" calcext:value-type="string">
            <text:p>自定義（一般）</text:p>
          </table:table-cell>
          <table:table-cell table:style-name="ce143" office:value-type="float" office:value="15" calcext:value-type="float">
            <text:p>15</text:p>
          </table:table-cell>
          <table:table-cell table:style-name="ce49" office:value-type="string" calcext:value-type="string">
            <text:p>你的手機或平板擁有最高級VIP會員。</text:p>
            <text:p>你進行的&lt;交涉&gt;判定達成值+4。該道具無法獲得複數個。</text:p>
          </table:table-cell>
          <table:table-cell table:style-name="ce143" office:value-type="string" calcext:value-type="string">
            <text:p>IA P52</text:p>
          </table:table-cell>
          <table:table-cell table:style-name="ce12" table:number-columns-repeated="21"/>
          <table:table-cell table:number-columns-repeated="998"/>
        </table:table-row>
        <table:table-row table:style-name="ro6">
          <table:table-cell table:style-name="ce42" office:value-type="string" calcext:value-type="string">
            <text:p>情報通</text:p>
          </table:table-cell>
          <table:table-cell table:style-name="ce54" office:value-type="string" calcext:value-type="string">
            <text:p>自定義（關聯）</text:p>
          </table:table-cell>
          <table:table-cell table:style-name="ce143" office:value-type="float" office:value="0" calcext:value-type="float">
            <text:p>0</text:p>
          </table:table-cell>
          <table:table-cell table:style-name="ce49" office:value-type="string" calcext:value-type="string">
            <text:p>該關聯是一名情報通，但是太愛閒聊導致精度不一定准。</text:p>
            <text:p>你使用該道具進行的判定骰數+1個，達成值-1。</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table-cell table:style-name="ce42" office:value-type="string" calcext:value-type="string">
            <text:p>石頭</text:p>
          </table:table-cell>
          <table:table-cell table:style-name="ce54" office:value-type="string" calcext:value-type="string">
            <text:p>自定義（關聯）</text:p>
          </table:table-cell>
          <table:table-cell table:style-name="ce143" office:value-type="float" office:value="0" calcext:value-type="float">
            <text:p>0</text:p>
          </table:table-cell>
          <table:table-cell table:style-name="ce49" office:value-type="string" calcext:value-type="string">
            <text:p>該關聯是一名情報通，雖然信用度很高但是很難讓他開口。</text:p>
            <text:p>你使用該道具進行的判定骰數-1個，達成值+1。</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table-cell table:style-name="ce42" office:value-type="string" calcext:value-type="string">
            <text:p>侍從</text:p>
          </table:table-cell>
          <table:table-cell table:style-name="ce54" office:value-type="string" calcext:value-type="string">
            <text:p>自定義（關聯）</text:p>
          </table:table-cell>
          <table:table-cell table:style-name="ce143" office:value-type="float" office:value="2" calcext:value-type="float">
            <text:p>2</text:p>
          </table:table-cell>
          <table:table-cell table:style-name="ce49" office:value-type="string" calcext:value-type="string">
            <text:p>該關聯是你的部下。只要有你的命令，他也可以給其他人幫忙。</text:p>
            <text:p>該道具可以由你指定的角色使用，但該角色必須與你在同一場景中登場。</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table-cell table:style-name="ce42" office:value-type="string" calcext:value-type="string">
            <text:p>同族</text:p>
          </table:table-cell>
          <table:table-cell table:style-name="ce54" office:value-type="string" calcext:value-type="string">
            <text:p>自定義（關聯）</text:p>
          </table:table-cell>
          <table:table-cell table:style-name="ce143" office:value-type="float" office:value="5" calcext:value-type="float">
            <text:p>5</text:p>
          </table:table-cell>
          <table:table-cell table:style-name="ce49" office:value-type="string" calcext:value-type="string">
            <text:p>該關聯是你的血族或同盟，會協助你並成為你的力量。</text:p>
            <text:p>你的HP最大值+3，該道具可以獲得【社會】個，並且效果可以疊加。</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table-cell table:style-name="ce42" office:value-type="string" calcext:value-type="string">
            <text:p>雙面間諜</text:p>
          </table:table-cell>
          <table:table-cell table:style-name="ce54" office:value-type="string" calcext:value-type="string">
            <text:p>自定義（關聯）</text:p>
          </table:table-cell>
          <table:table-cell table:style-name="ce143" office:value-type="float" office:value="5" calcext:value-type="float">
            <text:p>5</text:p>
          </table:table-cell>
          <table:table-cell table:style-name="ce49" office:value-type="string" calcext:value-type="string">
            <text:p>該關聯是其他組織雇傭的間諜，身為雙面間諜你可以用自己組織的情報與其交換。</text:p>
            <text:p>你使用該道具進行的判定骰數+1個，為應對【社會】判定的反應判定骰數-1個。</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table-cell table:style-name="ce42" office:value-type="string" calcext:value-type="string">
            <text:p>靠山</text:p>
          </table:table-cell>
          <table:table-cell table:style-name="ce54" office:value-type="string" calcext:value-type="string">
            <text:p>自定義（關聯）</text:p>
          </table:table-cell>
          <table:table-cell table:style-name="ce143" office:value-type="float" office:value="5" calcext:value-type="float">
            <text:p>5</text:p>
          </table:table-cell>
          <table:table-cell table:style-name="ce49" office:value-type="string" calcext:value-type="string">
            <text:p>該關聯是你經濟上的支援者，但是也會要求報酬。</text:p>
            <text:p>你在導入時獲得的財富點數+2，但基礎侵蝕率+2。該道具可以獲得3個，效果可疊加。同一關聯可以使用複數個該道具。</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table-cell table:style-name="ce42" office:value-type="string" calcext:value-type="string">
            <text:p>蜥蜴尾</text:p>
          </table:table-cell>
          <table:table-cell table:style-name="ce54" office:value-type="string" calcext:value-type="string">
            <text:p>自定義（關聯）</text:p>
          </table:table-cell>
          <table:table-cell table:style-name="ce143" office:value-type="float" office:value="10" calcext:value-type="float">
            <text:p>10</text:p>
          </table:table-cell>
          <table:table-cell table:style-name="ce49" office:value-type="string" calcext:value-type="string">
            <text:p>該關聯是你的替身。</text:p>
            <text:p>你受到攻擊造成的傷害前使用，該傷害-5。該效果一劇本可以使用一次，使用該效果後到劇本結束為止無法再次使用該關聯。</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table-cell table:style-name="ce42" office:value-type="string" calcext:value-type="string">
            <text:p>精英路人</text:p>
          </table:table-cell>
          <table:table-cell table:style-name="ce54" office:value-type="string" calcext:value-type="string">
            <text:p>自定義（關聯）</text:p>
          </table:table-cell>
          <table:table-cell table:style-name="ce143" office:value-type="float" office:value="15" calcext:value-type="float">
            <text:p>15</text:p>
          </table:table-cell>
          <table:table-cell table:style-name="ce49" office:value-type="string" calcext:value-type="string">
            <text:p>該關聯是偶爾會像故事主人公一樣勤勞工作的人。</text:p>
            <text:p>你進行判定前使用，該判定骰數+5個，該效果一劇本可以使用一次。該道具不能重複取得。</text:p>
          </table:table-cell>
          <table:table-cell table:style-name="ce143" office:value-type="string" calcext:value-type="string">
            <text:p>IA P53</text:p>
          </table:table-cell>
          <table:table-cell table:style-name="ce12" table:number-columns-repeated="21"/>
          <table:table-cell table:number-columns-repeated="998"/>
        </table:table-row>
        <table:table-row table:style-name="ro6" table:number-rows-repeated="19">
          <table:table-cell table:style-name="ce42"/>
          <table:table-cell table:style-name="ce54"/>
          <table:table-cell table:style-name="ce143"/>
          <table:table-cell table:style-name="ce49"/>
          <table:table-cell table:style-name="ce143"/>
          <table:table-cell table:style-name="ce12" table:number-columns-repeated="21"/>
          <table:table-cell table:number-columns-repeated="998"/>
        </table:table-row>
        <table:table-row table:style-name="ro6" table:number-rows-repeated="940">
          <table:table-cell table:style-name="ce12" table:number-columns-repeated="26"/>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紋章" table:style-name="ta14">
        <table:table-column table:style-name="co69" table:default-cell-style-name="Default"/>
        <table:table-column table:style-name="co11" table:default-cell-style-name="Default"/>
        <table:table-column table:style-name="co59" table:default-cell-style-name="Default"/>
        <table:table-column table:style-name="co41"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5" table:number-columns-repeated="1016" table:default-cell-style-name="Default"/>
        <table:table-row table:style-name="ro16">
          <table:table-cell table:style-name="ce146" office:value-type="string" calcext:value-type="string">
            <text:p>名稱</text:p>
          </table:table-cell>
          <table:table-cell table:style-name="ce149" office:value-type="string" calcext:value-type="string">
            <text:p>種類</text:p>
          </table:table-cell>
          <table:table-cell table:style-name="ce146" office:value-type="string" calcext:value-type="string">
            <text:p>必要經驗點</text:p>
          </table:table-cell>
          <table:table-cell table:style-name="ce146" office:value-type="string" calcext:value-type="string">
            <text:p>次數</text:p>
          </table:table-cell>
          <table:table-cell table:style-name="ce149" office:value-type="string" calcext:value-type="string">
            <text:p>解說</text:p>
          </table:table-cell>
          <table:table-cell table:style-name="ce149" office:value-type="string" calcext:value-type="string">
            <text:p>效果</text:p>
          </table:table-cell>
          <table:table-cell table:style-name="ce146" office:value-type="string" calcext:value-type="string">
            <text:p>參照</text:p>
          </table:table-cell>
          <table:table-cell table:style-name="ce146" office:value-type="string" calcext:value-type="string">
            <text:p>備註</text:p>
          </table:table-cell>
          <table:table-cell table:number-columns-repeated="1016"/>
        </table:table-row>
        <table:table-row table:style-name="ro16">
          <table:table-cell table:style-name="ce147" office:value-type="string" calcext:value-type="string" table:number-columns-spanned="6" table:number-rows-spanned="1">
            <text:p>UGN特工 <text:s text:c="30"/>取得條件：職業為UGN特工A~D的角色</text:p>
          </table:table-cell>
          <table:covered-table-cell table:number-columns-repeated="5"/>
          <table:table-cell table:style-name="ce95" table:number-columns-repeated="2"/>
          <table:table-cell table:number-columns-repeated="1016"/>
        </table:table-row>
        <table:table-row table:style-name="ro16">
          <table:table-cell table:style-name="ce148" office:value-type="string" calcext:value-type="string">
            <text:p>衛戍之盾</text:p>
            <text:p>（ギャリソンズシールド）</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1/回合</text:p>
          </table:table-cell>
          <table:table-cell table:style-name="ce151" office:value-type="string" calcext:value-type="string">
            <text:p>執行護衛任務等，將自身置於危險也要守護他人的特工所愛用的盾</text:p>
          </table:table-cell>
          <table:table-cell table:style-name="ce151" office:value-type="string" calcext:value-type="string">
            <text:p>技能：&lt;近戰&gt;   命中：-3  攻擊力：2  格擋值：6  射程：至近</text:p>
            <text:p>進行掩護前使用，該掩護期間，你的格擋值+【精神】</text:p>
            <text:p>該效果一回合可以使用1次</text:p>
          </table:table-cell>
          <table:table-cell table:style-name="ce148" office:value-type="string" calcext:value-type="string">
            <text:p>IA P130</text:p>
          </table:table-cell>
          <table:table-cell table:style-name="ce148"/>
          <table:table-cell table:number-columns-repeated="1016"/>
        </table:table-row>
        <table:table-row table:style-name="ro16">
          <table:table-cell table:style-name="ce148" office:value-type="string" calcext:value-type="string">
            <text:p>暗殺者</text:p>
            <text:p>（アサシネイター）</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為主要執行暗殺和殲滅任務的特工開發的手槍，其內部藏有能夠感知對方因行動而產生的破綻的瞄準器</text:p>
          </table:table-cell>
          <table:table-cell table:style-name="ce151" office:value-type="string" calcext:value-type="string">
            <text:p>技能：&lt;射擊&gt;  命中：-1  攻擊力：7  格擋值：-   射程：20m</text:p>
            <text:p>以該武器進行的射擊攻擊的命中判定前使用，該判定的骰子數+3個；該效果只有在指定已行動的角色為對象時才能使用</text:p>
          </table:table-cell>
          <table:table-cell table:style-name="ce148" office:value-type="string" calcext:value-type="string">
            <text:p>IA P130</text:p>
          </table:table-cell>
          <table:table-cell table:style-name="ce148"/>
          <table:table-cell table:number-columns-repeated="1016"/>
        </table:table-row>
        <table:table-row table:style-name="ro16">
          <table:table-cell table:style-name="ce148" office:value-type="string" calcext:value-type="string">
            <text:p>緩衝裝束</text:p>
            <text:p>（アリベイトスーツ）</text:p>
          </table:table-cell>
          <table:table-cell table:style-name="ce93" office:value-type="string" calcext:value-type="string">
            <text:p>紋章/防具</text:p>
          </table:table-cell>
          <table:table-cell table:style-name="ce148" office:value-type="float" office:value="5" calcext:value-type="float">
            <text:p>5</text:p>
          </table:table-cell>
          <table:table-cell table:style-name="ce148" office:value-type="string" calcext:value-type="string">
            <text:p>1/回合</text:p>
          </table:table-cell>
          <table:table-cell table:style-name="ce151" office:value-type="string" calcext:value-type="string">
            <text:p>配發給立身于對超越者作戰最前線的頂級特工們的特殊裝束</text:p>
          </table:table-cell>
          <table:table-cell table:style-name="ce151" office:value-type="string" calcext:value-type="string">
            <text:p>閃避：-  行動值：-1  裝甲值：5</text:p>
            <text:p>組合了異能的攻擊對你造成的HP傷害計算完畢後使用，你（預定）受到的傷害-5</text:p>
            <text:p>該效果一回合可以使用1次</text:p>
          </table:table-cell>
          <table:table-cell table:style-name="ce148" office:value-type="string" calcext:value-type="string">
            <text:p>IA P130</text:p>
          </table:table-cell>
          <table:table-cell table:style-name="ce148"/>
          <table:table-cell table:number-columns-repeated="1016"/>
        </table:table-row>
        <table:table-row table:style-name="ro16">
          <table:table-cell table:style-name="ce148" office:value-type="string" calcext:value-type="string">
            <text:p>雨幕</text:p>
            <text:p>（インザレイン）</text:p>
          </table:table-cell>
          <table:table-cell table:style-name="ce93" office:value-type="string" calcext:value-type="string">
            <text:p>紋章/防具（輔助）</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預定用於大規模戰鬥的披巾型裝甲外套，能夠防禦破片或爆炸帶來的傷害效果</text:p>
          </table:table-cell>
          <table:table-cell table:style-name="ce151" office:value-type="string" calcext:value-type="string">
            <text:p>閃避：-  行動值：-1  裝甲值：3</text:p>
            <text:p>[對象：單體]以外的攻擊對你造成的傷害-5</text:p>
          </table:table-cell>
          <table:table-cell table:style-name="ce148" office:value-type="string" calcext:value-type="string">
            <text:p>IA P13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R鐵匠</text:p>
            <text:p>（Rスミス）</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精通武器的構造與材質，使用異能製作武器時能夠靈活應用的紋章</text:p>
          </table:table-cell>
          <table:table-cell table:style-name="ce151" office:value-type="string" calcext:value-type="string">
            <text:p>取得需要&lt;近戰&gt;或&lt;射擊&gt;LV4以上，你使用的製作武器的異能侵蝕值-1（最低1）複數製作異能組合的時候，將合計的侵蝕值-1</text:p>
          </table:table-cell>
          <table:table-cell table:style-name="ce148" office:value-type="string" calcext:value-type="string">
            <text:p>IA P13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靜謐死亡</text:p>
            <text:p>（サイレントデッ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接受了嚴酷隱秘作戰訓練的紋章，你如屍體般沉默，能夠隱藏自己</text:p>
          </table:table-cell>
          <table:table-cell table:style-name="ce151" office:value-type="string" calcext:value-type="string">
            <text:p>你的隱秘狀態不會因為受到HP傷害而解除</text:p>
          </table:table-cell>
          <table:table-cell table:style-name="ce148" office:value-type="string" calcext:value-type="string">
            <text:p>IA P13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卓越網路</text:p>
            <text:p>（スーペリアルネットワーク）</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只有擔當分析和收集超越者相關情報的特工知曉的獨家調查網，可以通過該調查網來得知針對特定症候的對策</text:p>
          </table:table-cell>
          <table:table-cell table:style-name="ce151" office:value-type="string" calcext:value-type="string">
            <text:p>導入階段選擇一種症候群，你進行的攻擊的對象為此症候群的持有者時，所造成的傷害+3。以次要動作使用，你可以對該道具所指定的症候群進行變更</text:p>
          </table:table-cell>
          <table:table-cell table:style-name="ce148" office:value-type="string" calcext:value-type="string">
            <text:p>IA P130</text:p>
          </table:table-cell>
          <table:table-cell table:style-name="ce148"/>
          <table:table-cell table:number-columns-repeated="1016"/>
        </table:table-row>
        <table:table-row table:style-name="ro16">
          <table:table-cell table:style-name="ce148" office:value-type="string" calcext:value-type="string">
            <text:p>白金導航</text:p>
            <text:p>（プラチナムナビ）</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以輔助各色車輛的駕駛為目標開發出來的高性能導航系統，其體積十分小巧，因此放到車裡就可以立即投入使用</text:p>
          </table:table-cell>
          <table:table-cell table:style-name="ce151" office:value-type="string" calcext:value-type="string">
            <text:p>你搭乘載具期間進行的任何判定，達成值+2</text:p>
          </table:table-cell>
          <table:table-cell table:style-name="ce148" office:value-type="string" calcext:value-type="string">
            <text:p>IA P130</text:p>
          </table:table-cell>
          <table:table-cell table:style-name="ce148"/>
          <table:table-cell table:number-columns-repeated="1016"/>
        </table:table-row>
        <table:table-row table:style-name="ro16">
          <table:table-cell table:style-name="ce148" office:value-type="string" calcext:value-type="string">
            <text:p>受訓行動</text:p>
            <text:p>（ディシプリンズアクト）</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在UGN中接受訓練，將得意領域磨練到了極致的特工的紋章。你在UGN內有著作為該領域專業人士的名氣</text:p>
          </table:table-cell>
          <table:table-cell table:style-name="ce151" office:value-type="string" calcext:value-type="string">
            <text:p>取得時選擇一個技能，以所選的技能進行的判定骰數+2個</text:p>
          </table:table-cell>
          <table:table-cell table:style-name="ce148" office:value-type="string" calcext:value-type="string">
            <text:p>IA P131</text:p>
          </table:table-cell>
          <table:table-cell table:style-name="ce148"/>
          <table:table-cell table:number-columns-repeated="1016"/>
        </table:table-row>
        <table:table-row table:style-name="ro16">
          <table:table-cell table:style-name="ce148" office:value-type="string" calcext:value-type="string">
            <text:p>信仰之力</text:p>
            <text:p>（フォースオブフェイス）</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能在盾牌周圍展開的飛行無人機</text:p>
          </table:table-cell>
          <table:table-cell table:style-name="ce151" office:value-type="string" calcext:value-type="string">
            <text:p>準備階段使用，該回合你第一次進行格擋的格擋值+5</text:p>
            <text:p>該效果1劇本可以使用3次</text:p>
          </table:table-cell>
          <table:table-cell table:style-name="ce148" office:value-type="string" calcext:value-type="string">
            <text:p>IA P13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X行動</text:p>
            <text:p>（オペレーションＸ）</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劇本</text:p>
          </table:table-cell>
          <table:table-cell table:style-name="ce151" office:value-type="string" calcext:value-type="string">
            <text:p>接受了組織後援的王牌任務計畫，若沒有身負高度技術的專家參與是不可能達成的。</text:p>
          </table:table-cell>
          <table:table-cell table:style-name="ce151" office:value-type="string" calcext:value-type="string">
            <text:p>你進行判定之後使用，該判定的達成值+10。該效果只有在判定中使用的技能LV達到5以上時才會生效</text:p>
            <text:p>該效果1劇本可以使用1次</text:p>
          </table:table-cell>
          <table:table-cell table:style-name="ce148" office:value-type="string" calcext:value-type="string">
            <text:p>IA P131</text:p>
          </table:table-cell>
          <table:table-cell table:style-name="ce148"/>
          <table:table-cell table:number-columns-repeated="1016"/>
        </table:table-row>
        <table:table-row table:style-name="ro16">
          <table:table-cell table:style-name="ce148" office:value-type="string" calcext:value-type="string">
            <text:p>一切就緒</text:p>
            <text:p>（エヴリシングレディ）</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場景</text:p>
          </table:table-cell>
          <table:table-cell table:style-name="ce151" office:value-type="string" calcext:value-type="string">
            <text:p>作為超一流的特工，安排好用以應對各種情形的裝備的危機管理能力。</text:p>
          </table:table-cell>
          <table:table-cell table:style-name="ce151" office:value-type="string" calcext:value-type="string">
            <text:p>準備階段使用，你立即取得一件想要的道具。無法取得購入不可的道具、特殊道具和以D-lois取得的道具。這件物品無法常備化，且會在場景結束時消失</text:p>
            <text:p>該效果1場景可以使用1次</text:p>
          </table:table-cell>
          <table:table-cell table:style-name="ce148" office:value-type="string" calcext:value-type="string">
            <text:p>IA P131</text:p>
          </table:table-cell>
          <table:table-cell table:style-name="ce148"/>
          <table:table-cell table:number-columns-repeated="1016"/>
        </table:table-row>
        <table:table-row table:style-name="ro16">
          <table:table-cell table:style-name="ce148" office:value-type="string" calcext:value-type="string">
            <text:p>關鍵點</text:p>
            <text:p>（フェイタルポイント）</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作為UGN內只有寥寥數人的頂級特工一路生存過來而獲得的底力。</text:p>
          </table:table-cell>
          <table:table-cell table:style-name="ce151" office:value-type="string" calcext:value-type="string">
            <text:p>你使用異能之前使用，此異能的LV+1，此時可以超過最大LV，但不會因此增加使用次數。組合了多個異能時，對所有異能均會生效</text:p>
            <text:p>該效果1劇本可以使用1次</text:p>
          </table:table-cell>
          <table:table-cell table:style-name="ce148" office:value-type="string" calcext:value-type="string">
            <text:p>IA P131</text:p>
          </table:table-cell>
          <table:table-cell table:style-name="ce148"/>
          <table:table-cell table:number-columns-repeated="1016"/>
        </table:table-row>
        <table:table-row table:style-name="ro16">
          <table:table-cell table:style-name="ce148" office:value-type="string" calcext:value-type="string">
            <text:p>力量之痛</text:p>
            <text:p>（パワーペイン）</text:p>
          </table:table-cell>
          <table:table-cell table:style-name="ce93" office:value-type="string" calcext:value-type="string">
            <text:p>紋章/消耗品</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雖然能強化身體但是負擔也很大的戰鬥藥物</text:p>
          </table:table-cell>
          <table:table-cell table:style-name="ce151" office:value-type="string" calcext:value-type="string">
            <text:p>次要動作使用，你受到[異常狀態：邪毒 1]，該邪毒未解除期間你進行的【肉體】判定骰數+3個</text:p>
          </table:table-cell>
          <table:table-cell table:style-name="ce148" office:value-type="string" calcext:value-type="string">
            <text:p>IA P13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回歸者的披風</text:p>
            <text:p>（リターナーズクローク）</text:p>
          </table:table-cell>
          <table:table-cell table:style-name="ce93" office:value-type="string" calcext:value-type="string">
            <text:p>核心紋章/防具</text:p>
          </table:table-cell>
          <table:table-cell table:style-name="ce148" office:value-type="float" office:value="35" calcext:value-type="float">
            <text:p>35</text:p>
          </table:table-cell>
          <table:table-cell table:style-name="ce148" office:value-type="string" calcext:value-type="string">
            <text:p>-</text:p>
          </table:table-cell>
          <table:table-cell table:style-name="ce151" office:value-type="string" calcext:value-type="string">
            <text:p>贈送給建立了無數勳功、戰鬥力強大的特工的戰鬥套裝，僅僅只是穿著就是自己攻防能力優秀的證明</text:p>
          </table:table-cell>
          <table:table-cell table:style-name="ce151" office:value-type="string" calcext:value-type="string">
            <text:p>閃避：-  行動值：-  裝甲值：12</text:p>
            <text:p>你進行攻擊造成的傷害與格擋的格擋值+2D10</text:p>
          </table:table-cell>
          <table:table-cell table:style-name="ce148" office:value-type="string" calcext:value-type="string">
            <text:p>IA P13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不動如山</text:p>
            <text:p>（エバースタンド）</text:p>
          </table:table-cell>
          <table:table-cell table:style-name="ce93" office:value-type="string" calcext:value-type="string">
            <text:p>核心紋章/一般</text:p>
          </table:table-cell>
          <table:table-cell table:style-name="ce148" office:value-type="float" office:value="10" calcext:value-type="float">
            <text:p>10</text:p>
          </table:table-cell>
          <table:table-cell table:style-name="ce148" office:value-type="string" calcext:value-type="string">
            <text:p>3/場景</text:p>
          </table:table-cell>
          <table:table-cell table:style-name="ce151" office:value-type="string" calcext:value-type="string">
            <text:p>對衛戍之盾實施的特殊改造，只有被選中的特工才能享受這種改裝。</text:p>
          </table:table-cell>
          <table:table-cell table:style-name="ce151" office:value-type="string" calcext:value-type="string">
            <text:p>使用衛戍之盾的效果時一同使用，格擋值額外再+10</text:p>
            <text:p>該效果1場景可以使用3次</text:p>
          </table:table-cell>
          <table:table-cell table:style-name="ce148" office:value-type="string" calcext:value-type="string">
            <text:p>IA P131</text:p>
          </table:table-cell>
          <table:table-cell table:style-name="ce148"/>
          <table:table-cell table:number-columns-repeated="1016"/>
        </table:table-row>
        <table:table-row table:style-name="ro16">
          <table:table-cell table:style-name="ce148" office:value-type="string" calcext:value-type="string">
            <text:p>匣中希望</text:p>
            <text:p>（ホープインザボックス）</text:p>
          </table:table-cell>
          <table:table-cell table:style-name="ce93" office:value-type="string" calcext:value-type="string">
            <text:p>核心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以奇跡般任務達成率為傲的特工才能被贈予的稱號紋章，專門贈予在絕望的狀況中也能從困難的作戰中生還之人</text:p>
          </table:table-cell>
          <table:table-cell table:style-name="ce151" office:value-type="string" calcext:value-type="string">
            <text:p>你擁有的“X行動”效果變為“1劇本可以使用3次”</text:p>
          </table:table-cell>
          <table:table-cell table:style-name="ce148" office:value-type="string" calcext:value-type="string">
            <text:p>IA P131</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UGN支部長 <text:s text:c="27"/>取得條件：職業為UGN支部長A~D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權威外套</text:p>
            <text:p>（マジェスティコート）</text:p>
          </table:table-cell>
          <table:table-cell table:style-name="ce93" office:value-type="string" calcext:value-type="string">
            <text:p>紋章/防具</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有著於立身支部頂端之人相配的威嚴的外套，在提起穿著者精神的同時，也會提升其他人的士氣，使其行動迅速起來。</text:p>
          </table:table-cell>
          <table:table-cell table:style-name="ce151" office:value-type="string" calcext:value-type="string">
            <text:p>閃避：0  行動值：0  裝甲值：3</text:p>
            <text:p>準備階段時使用，該場景間，與你身處同一接戰區域的任意角色全員【行動值】+3</text:p>
          </table:table-cell>
          <table:table-cell table:style-name="ce148" office:value-type="string" calcext:value-type="string">
            <text:p>IA P132</text:p>
          </table:table-cell>
          <table:table-cell table:style-name="ce148"/>
          <table:table-cell table:number-columns-repeated="1016"/>
        </table:table-row>
        <table:table-row table:style-name="ro16">
          <table:table-cell table:style-name="ce148" office:value-type="string" calcext:value-type="string">
            <text:p>移動指揮所</text:p>
            <text:p>（コマンドモービル）</text:p>
          </table:table-cell>
          <table:table-cell table:style-name="ce93" office:value-type="string" calcext:value-type="string">
            <text:p>紋章/載具</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只允許被選擇的支部長搭乘的特殊裝甲車。</text:p>
          </table:table-cell>
          <table:table-cell table:style-name="ce151" office:value-type="string" calcext:value-type="string">
            <text:p>技能：&lt;駕駛：四輪&gt;   攻擊力：12   行動值：-3   裝甲值：15   全力移動：180m</text:p>
            <text:p>準備階段時使用，你可以召喚並搭乘該載具</text:p>
            <text:p>此外，你可以在你以外的單位進行判定前宣言，使該判定的判定骰數+3個</text:p>
            <text:p>該效果在搭乘期間，1劇本可以使用3次</text:p>
          </table:table-cell>
          <table:table-cell table:style-name="ce148" office:value-type="string" calcext:value-type="string">
            <text:p>IA P132</text:p>
          </table:table-cell>
          <table:table-cell table:style-name="ce148"/>
          <table:table-cell table:number-columns-repeated="1016"/>
        </table:table-row>
        <table:table-row table:style-name="ro16">
          <table:table-cell table:style-name="ce148" office:value-type="string" calcext:value-type="string">
            <text:p>殺戮屋</text:p>
            <text:p>（キーリングハウス）</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表示你管理的支部記憶體在著假想各種實戰的戰鬥訓練設施的紋章，通過在此處進行平日的訓練，在戰鬥時能夠更有效率對友軍進行指揮。</text:p>
          </table:table-cell>
          <table:table-cell table:style-name="ce151" office:value-type="string" calcext:value-type="string">
            <text:p>你以外的單位所進行的攻擊的命中判定前使用，該攻擊的傷害+[你的【感覺】]</text:p>
            <text:p>該效果1劇本可以使用1次；該道具最多可以取得至3個</text:p>
          </table:table-cell>
          <table:table-cell table:style-name="ce148" office:value-type="string" calcext:value-type="string">
            <text:p>IA P132</text:p>
          </table:table-cell>
          <table:table-cell table:style-name="ce148"/>
          <table:table-cell table:number-columns-repeated="1016"/>
        </table:table-row>
        <table:table-row table:style-name="ro16">
          <table:table-cell table:style-name="ce148" office:value-type="string" calcext:value-type="string">
            <text:p>全方位報告</text:p>
            <text:p>（サラウンドレポート）</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將彙報給支部長的周邊事態整合到一起的資料庫，只要在上面過幾眼，任誰都可以輕鬆的進行情報整理。</text:p>
          </table:table-cell>
          <table:table-cell table:style-name="ce151" office:value-type="string" calcext:value-type="string">
            <text:p>場景中登場的角色進行的&lt;情報：●●&gt;判定的骰子數+1個；你也可以指定特定角色不受該道具的效果影響</text:p>
          </table:table-cell>
          <table:table-cell table:style-name="ce148" office:value-type="string" calcext:value-type="string">
            <text:p>IA P132</text:p>
          </table:table-cell>
          <table:table-cell table:style-name="ce148"/>
          <table:table-cell table:number-columns-repeated="1016"/>
        </table:table-row>
        <table:table-row table:style-name="ro16">
          <table:table-cell table:style-name="ce148" office:value-type="string" calcext:value-type="string">
            <text:p>領袖之證</text:p>
            <text:p>（リーダーズマーク）</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3/劇本</text:p>
          </table:table-cell>
          <table:table-cell table:style-name="ce151" office:value-type="string" calcext:value-type="string">
            <text:p>表示作為支部長有著很強的影響力的，徽章或是墜飾等造型的證明。此外，這個證明也體現著作為支部長的高度使命感。</text:p>
          </table:table-cell>
          <table:table-cell table:style-name="ce151" office:value-type="string" calcext:value-type="string">
            <text:p>取得時選擇一種能力值（肉體/感覺/精神/社會）。你進行使用了所選能力值的判定前使用，該判定的達成值+5</text:p>
            <text:p>該效果1劇本可以使用3次</text:p>
          </table:table-cell>
          <table:table-cell table:style-name="ce148" office:value-type="string" calcext:value-type="string">
            <text:p>IA P132</text:p>
          </table:table-cell>
          <table:table-cell table:style-name="ce148"/>
          <table:table-cell table:number-columns-repeated="1016"/>
        </table:table-row>
        <table:table-row table:style-name="ro16">
          <table:table-cell table:style-name="ce148" office:value-type="string" calcext:value-type="string">
            <text:p>完成者</text:p>
            <text:p>（アコンプリッジャ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1/劇本</text:p>
          </table:table-cell>
          <table:table-cell table:style-name="ce151" office:value-type="string" calcext:value-type="string">
            <text:p>表示你能不摻雜私情完成任務的紋章，有時你的判斷會被人說成冷酷無情，該道具是你失去部下的遺物，或者是象徵你為了任務不得不捨棄的象徵</text:p>
          </table:table-cell>
          <table:table-cell table:style-name="ce151" office:value-type="string" calcext:value-type="string">
            <text:p>次要動作使用，你在該主要階段間不會受到異常狀態</text:p>
            <text:p>該效果1劇本可以使用1次</text:p>
          </table:table-cell>
          <table:table-cell table:style-name="ce148" office:value-type="string" calcext:value-type="string">
            <text:p>IA P13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R研究所</text:p>
            <text:p>（Ｒインスティテュート）</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管理的支部記憶體在著獨立的背教者病毒研究設施的紋章。為此，你的支部對背教者有著更加深層的理解。</text:p>
          </table:table-cell>
          <table:table-cell table:style-name="ce151" office:value-type="string" calcext:value-type="string">
            <text:p>次要動作使用，該主要階段間，你進行的組合了異能的判定，骰子數+2個，每當使用該效果時，你的侵蝕率+3</text:p>
          </table:table-cell>
          <table:table-cell table:style-name="ce148" office:value-type="string" calcext:value-type="string">
            <text:p>IA P132</text:p>
          </table:table-cell>
          <table:table-cell table:style-name="ce148"/>
          <table:table-cell table:number-columns-repeated="1016"/>
        </table:table-row>
        <table:table-row table:style-name="ro16">
          <table:table-cell table:style-name="ce148" office:value-type="string" calcext:value-type="string">
            <text:p>幫手</text:p>
            <text:p>（サイドキック）</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的支部中所屬中有著支持你的各領域專家存在的紋章。</text:p>
          </table:table-cell>
          <table:table-cell table:style-name="ce151" office:value-type="string" calcext:value-type="string">
            <text:p>取得時選擇一項技能，以所選技能進行的判定前使用，所選判定的暴擊值-1（下限6），但你需消耗10點財富點數</text:p>
            <text:p>該效果1劇本可以使用1次</text:p>
          </table:table-cell>
          <table:table-cell table:style-name="ce148" office:value-type="string" calcext:value-type="string">
            <text:p>IA P132</text:p>
          </table:table-cell>
          <table:table-cell table:style-name="ce148"/>
          <table:table-cell table:number-columns-repeated="1016"/>
        </table:table-row>
        <table:table-row table:style-name="ro16">
          <table:table-cell table:style-name="ce148" office:value-type="string" calcext:value-type="string">
            <text:p>基地</text:p>
            <text:p>（ホームベース）</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的支部是能讓所屬全員感到溫暖的安逸場所的紋章</text:p>
          </table:table-cell>
          <table:table-cell table:style-name="ce151" office:value-type="string" calcext:value-type="string">
            <text:p>場景開始時使用，該場景登場的角色HP回復至最大值</text:p>
            <text:p>該效果1劇本可以使用1次</text:p>
          </table:table-cell>
          <table:table-cell table:style-name="ce148" office:value-type="string" calcext:value-type="string">
            <text:p>IA P13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特別代號</text:p>
            <text:p>（ユニークコード）</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贈予優秀支部或是部隊的代號，其命名大多是表現隊伍特色的名字。</text:p>
          </table:table-cell>
          <table:table-cell table:style-name="ce151" office:value-type="string" calcext:value-type="string">
            <text:p>準備階段時使用，該場景中登場的任意角色在該場景間進行的主要動作的判定，骰子數+2個</text:p>
            <text:p>該效果1劇本可以使用3次</text:p>
          </table:table-cell>
          <table:table-cell table:style-name="ce148" office:value-type="string" calcext:value-type="string">
            <text:p>IA P133</text:p>
          </table:table-cell>
          <table:table-cell table:style-name="ce148"/>
          <table:table-cell table:number-columns-repeated="1016"/>
        </table:table-row>
        <table:table-row table:style-name="ro16">
          <table:table-cell table:style-name="ce148" office:value-type="string" calcext:value-type="string">
            <text:p>亞歷山大港</text:p>
            <text:p>（アレクサンドリア）</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劇本</text:p>
          </table:table-cell>
          <table:table-cell table:style-name="ce151" office:value-type="string" calcext:value-type="string">
            <text:p>記錄了UGN過去無數任務行動的戰術支援用資料庫。</text:p>
          </table:table-cell>
          <table:table-cell table:style-name="ce151" office:value-type="string" calcext:value-type="string">
            <text:p>以場景中登場的任意角色為目標，以主要動作使用，使用時指定一項技能（可以為各個對象分別指定），該劇本間，該對象進行的使用了指定技能的判定，達成值+4</text:p>
            <text:p>該效果1劇本可以使用1次</text:p>
          </table:table-cell>
          <table:table-cell table:style-name="ce148" office:value-type="string" calcext:value-type="string">
            <text:p>IA P133</text:p>
          </table:table-cell>
          <table:table-cell table:style-name="ce148"/>
          <table:table-cell table:number-columns-repeated="1016"/>
        </table:table-row>
        <table:table-row table:style-name="ro16">
          <table:table-cell table:style-name="ce148" office:value-type="string" calcext:value-type="string">
            <text:p>掌舵手</text:p>
            <text:p>（ハンドルホルダー）</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場景</text:p>
          </table:table-cell>
          <table:table-cell table:style-name="ce151" office:value-type="string" calcext:value-type="string">
            <text:p>表示你作為部下們的抑制者，擁有能讓他們冷靜下來方法的紋章</text:p>
          </table:table-cell>
          <table:table-cell table:style-name="ce151" office:value-type="string" calcext:value-type="string">
            <text:p>場景中登場的你以外的角色受到[異常狀態：暴走]時使用，解除該暴走效果</text:p>
            <text:p>該效果1場景可以使用1次</text:p>
          </table:table-cell>
          <table:table-cell table:style-name="ce148" office:value-type="string" calcext:value-type="string">
            <text:p>IA P13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支援彈幕</text:p>
            <text:p>（サポートバラージ）</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1/劇本</text:p>
          </table:table-cell>
          <table:table-cell table:style-name="ce151" office:value-type="string" calcext:value-type="string">
            <text:p>使用支部的支援進行支援射擊阻止敵人前進的體制</text:p>
          </table:table-cell>
          <table:table-cell table:style-name="ce151" office:value-type="string" calcext:value-type="string">
            <text:p>準備階段使用，該回合間場景登場的任意一名角色行動值-1D10</text:p>
            <text:p>該效果1劇本可以使用1次</text:p>
          </table:table-cell>
          <table:table-cell table:style-name="ce148" office:value-type="string" calcext:value-type="string">
            <text:p>IA P13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不屈之志</text:p>
            <text:p>（アンイールティングウィル）</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作為支部長，有著絕不輕易倒下的不屈不撓之誓的紋章。</text:p>
          </table:table-cell>
          <table:table-cell table:style-name="ce151" office:value-type="string" calcext:value-type="string">
            <text:p>你陷入戰鬥不能時使用，你從戰鬥不能中恢復，且HP回復至1點</text:p>
            <text:p>該效果1劇本可以使用1次</text:p>
          </table:table-cell>
          <table:table-cell table:style-name="ce148" office:value-type="string" calcext:value-type="string">
            <text:p>IA P133</text:p>
          </table:table-cell>
          <table:table-cell table:style-name="ce148"/>
          <table:table-cell table:number-columns-repeated="1016"/>
        </table:table-row>
        <table:table-row table:style-name="ro16">
          <table:table-cell table:style-name="ce148" office:value-type="string" calcext:value-type="string">
            <text:p>指揮之證</text:p>
            <text:p>（コマンダーズマーク）</text:p>
          </table:table-cell>
          <table:table-cell table:style-name="ce93" office:value-type="string" calcext:value-type="string">
            <text:p>核心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發行後追加特別許可權與身份認證的領袖之證，因為統領大都市的立場、激戰區死守、長期保證地區安定等功績，你的領袖之證越發沉重</text:p>
          </table:table-cell>
          <table:table-cell table:style-name="ce151" office:value-type="string" calcext:value-type="string">
            <text:p>需要有“領袖之證”才能取得；你使用“領袖之證”選擇的能力值+3</text:p>
          </table:table-cell>
          <table:table-cell table:style-name="ce148" office:value-type="string" calcext:value-type="string">
            <text:p>IA P13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穹目</text:p>
            <text:p>（スカイアイ）</text:p>
          </table:table-cell>
          <table:table-cell table:style-name="ce93" office:value-type="string" calcext:value-type="string">
            <text:p>核心紋章/一般</text:p>
          </table:table-cell>
          <table:table-cell table:style-name="ce148" office:value-type="float" office:value="25" calcext:value-type="float">
            <text:p>25</text:p>
          </table:table-cell>
          <table:table-cell table:style-name="ce148" office:value-type="string" calcext:value-type="string">
            <text:p>1/劇本</text:p>
          </table:table-cell>
          <table:table-cell table:style-name="ce151" office:value-type="string" calcext:value-type="string">
            <text:p>證明你擁有用優秀的作戰方案將戰鬥引向勝利的功績的紋章，多數以俯瞰戰場的慧眼或鷹隼形狀的裝飾品贈送</text:p>
          </table:table-cell>
          <table:table-cell table:style-name="ce151" office:value-type="string" calcext:value-type="string">
            <text:p>準備階段使用，該回合間場景登場的你以外的任意角色行動值+10</text:p>
            <text:p>該效果1劇本可以使用1次</text:p>
          </table:table-cell>
          <table:table-cell table:style-name="ce148" office:value-type="string" calcext:value-type="string">
            <text:p>IA P13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終結夜晚者</text:p>
            <text:p>（ナイトエンダー）</text:p>
          </table:table-cell>
          <table:table-cell table:style-name="ce93" office:value-type="string" calcext:value-type="string">
            <text:p>核心紋章/一般</text:p>
          </table:table-cell>
          <table:table-cell table:style-name="ce148" office:value-type="float" office:value="35" calcext:value-type="float">
            <text:p>35</text:p>
          </table:table-cell>
          <table:table-cell table:style-name="ce148" office:value-type="string" calcext:value-type="string">
            <text:p>-</text:p>
          </table:table-cell>
          <table:table-cell table:style-name="ce151" office:value-type="string" calcext:value-type="string">
            <text:p>贈與擁有強大戰鬥力的支部長的特別部隊章，不僅是單純的強大，還有著能夠終結一切絕望，給他人帶來勇氣的功績</text:p>
          </table:table-cell>
          <table:table-cell table:style-name="ce151" office:value-type="string" calcext:value-type="string">
            <text:p>你受到的傷害-20，該效果在你受到異常狀態期間無效</text:p>
          </table:table-cell>
          <table:table-cell table:style-name="ce148" office:value-type="string" calcext:value-type="string">
            <text:p>IA P133</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UGN之子 <text:s text:c="30"/>取得條件：職業為UGN之子A~C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黃道兵裝</text:p>
            <text:p>（ゾディアックウェポン）</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只交給戰鬥能力優秀的UGN之子們的，僅有12把的大寶劍，其鋒利程度會因與使用者的背教者病毒產生反應而增加。</text:p>
          </table:table-cell>
          <table:table-cell table:style-name="ce151" office:value-type="string" calcext:value-type="string">
            <text:p>技能：&lt;近戰&gt;  命中：-3   攻擊力：11   格擋值：3   射程：至近</text:p>
            <text:p>使用了該武器的近戰攻擊的命中判定組合了異能時，該攻擊的傷害骰+1D10，但使用時你的侵蝕率會+2</text:p>
          </table:table-cell>
          <table:table-cell table:style-name="ce148" office:value-type="string" calcext:value-type="string">
            <text:p>IA P134</text:p>
          </table:table-cell>
          <table:table-cell table:style-name="ce148"/>
          <table:table-cell table:number-columns-repeated="1016"/>
        </table:table-row>
        <table:table-row table:style-name="ro16">
          <table:table-cell table:style-name="ce148" office:value-type="string" calcext:value-type="string">
            <text:p>戰鬥專精</text:p>
            <text:p>（コンバットフォーカス）</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作為UGN之子從小時候便被灌注了了大量有關戰鬥的知識和技能的紋章，為此，你有著卓越的戰鬥能力。</text:p>
          </table:table-cell>
          <table:table-cell table:style-name="ce151" office:value-type="string" calcext:value-type="string">
            <text:p>你進行的攻擊判定，達成值+2</text:p>
          </table:table-cell>
          <table:table-cell table:style-name="ce148" office:value-type="string" calcext:value-type="string">
            <text:p>IA P134</text:p>
          </table:table-cell>
          <table:table-cell table:style-name="ce148"/>
          <table:table-cell table:number-columns-repeated="1016"/>
        </table:table-row>
        <table:table-row table:style-name="ro16">
          <table:table-cell table:style-name="ce148" office:value-type="string" calcext:value-type="string">
            <text:p>空洞皮膚</text:p>
            <text:p>（ホールスキ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幾乎沒有負傷的戰鬥裝備紋章，一方面是你戰鬥能力強大的證明，另一方面也表示你害怕疼痛</text:p>
          </table:table-cell>
          <table:table-cell table:style-name="ce151" office:value-type="string" calcext:value-type="string">
            <text:p>你進行的判定骰數+1個，但你受到至少1點HP傷害時，中盤階段間該效果無效</text:p>
          </table:table-cell>
          <table:table-cell table:style-name="ce148" office:value-type="string" calcext:value-type="string">
            <text:p>IA P13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鋼鐵意志</text:p>
            <text:p>（スティールマイン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在UGN設施所學到的，一種接近於自我暗示的，無論任何情況都能完美控制自己感情的能力。</text:p>
          </table:table-cell>
          <table:table-cell table:style-name="ce151" office:value-type="string" calcext:value-type="string">
            <text:p>你進行的&lt;意志&gt;判定的骰子數+2個</text:p>
          </table:table-cell>
          <table:table-cell table:style-name="ce148" office:value-type="string" calcext:value-type="string">
            <text:p>IA P134</text:p>
          </table:table-cell>
          <table:table-cell table:style-name="ce148"/>
          <table:table-cell table:number-columns-repeated="1016"/>
        </table:table-row>
        <table:table-row table:style-name="ro16">
          <table:table-cell table:style-name="ce148" office:value-type="string" calcext:value-type="string">
            <text:p>承心之子</text:p>
            <text:p>（ハートベアラ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贈與在戰鬥中立下人道主義功績的UGN之子們的徽章，以動物為原型的勳章占大多數。</text:p>
          </table:table-cell>
          <table:table-cell table:style-name="ce151" office:value-type="string" calcext:value-type="string">
            <text:p>你進行的，攻擊以外的判定前使用，該判定的骰子數+2個</text:p>
            <text:p>該效果1劇本可以使用1次</text:p>
          </table:table-cell>
          <table:table-cell table:style-name="ce148" office:value-type="string" calcext:value-type="string">
            <text:p>IA P134</text:p>
          </table:table-cell>
          <table:table-cell table:style-name="ce148"/>
          <table:table-cell table:number-columns-repeated="1016"/>
        </table:table-row>
        <table:table-row table:style-name="ro16">
          <table:table-cell table:style-name="ce148" office:value-type="string" calcext:value-type="string">
            <text:p>強健之軀</text:p>
            <text:p>（ハードボディ）</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從小便通過飲食管理和藥物而打造出來的頑強肉體，這超越常人的肉體不會因為無足輕重的小傷而倒下</text:p>
          </table:table-cell>
          <table:table-cell table:style-name="ce151" office:value-type="string" calcext:value-type="string">
            <text:p>你的最大HP+5</text:p>
          </table:table-cell>
          <table:table-cell table:style-name="ce148" office:value-type="string" calcext:value-type="string">
            <text:p>IA P134</text:p>
          </table:table-cell>
          <table:table-cell table:style-name="ce148"/>
          <table:table-cell table:number-columns-repeated="1016"/>
        </table:table-row>
        <table:table-row table:style-name="ro16">
          <table:table-cell table:style-name="ce148" office:value-type="string" calcext:value-type="string">
            <text:p>模範之子</text:p>
            <text:p>（モデルチルドレ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在UGN之子當中擁有十分優秀成績的獎狀紋章，你的優秀被所有人認可，即便是與失敗的壓力戰鬥中也一如既往</text:p>
          </table:table-cell>
          <table:table-cell table:style-name="ce151" office:value-type="string" calcext:value-type="string">
            <text:p>你進行判定的達成值+2，但判定失敗時，中盤階段間該效果無效</text:p>
          </table:table-cell>
          <table:table-cell table:style-name="ce148" office:value-type="string" calcext:value-type="string">
            <text:p>IA P13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雷霆風暴</text:p>
            <text:p>（サンダーストーム）</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贈與從危險度極高的作戰中生還的UGN之子們的，以雷電為原型的徽章。</text:p>
          </table:table-cell>
          <table:table-cell table:style-name="ce151" office:value-type="string" calcext:value-type="string">
            <text:p>你受到的HP傷害降低5點</text:p>
          </table:table-cell>
          <table:table-cell table:style-name="ce148" office:value-type="string" calcext:value-type="string">
            <text:p>IA P134</text:p>
          </table:table-cell>
          <table:table-cell table:style-name="ce148"/>
          <table:table-cell table:number-columns-repeated="1016"/>
        </table:table-row>
        <table:table-row table:style-name="ro16">
          <table:table-cell table:style-name="ce148" office:value-type="string" calcext:value-type="string">
            <text:p>導師TIPS</text:p>
            <text:p>（チューターズTIPS）</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1/劇本</text:p>
          </table:table-cell>
          <table:table-cell table:style-name="ce151" office:value-type="string" calcext:value-type="string">
            <text:p>你從訓練教官處獲得的對戰鬥以外相關的助言或人生哲理，會在不經意間發揮作用</text:p>
          </table:table-cell>
          <table:table-cell table:style-name="ce151" office:value-type="string" calcext:value-type="string">
            <text:p>你進行判定前使用，該判定骰數+4個；該效果無法在戰鬥中使用</text:p>
            <text:p>該效果1劇本可以使用1次</text:p>
          </table:table-cell>
          <table:table-cell table:style-name="ce148" office:value-type="string" calcext:value-type="string">
            <text:p>IA P13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蹤跡消除</text:p>
            <text:p>（イレーストレイス）</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不止腳步，連氣息都能抹去的隱蔽能力，為此，你在UGN之子們當中也擔任著秘密行動任務的職責。</text:p>
          </table:table-cell>
          <table:table-cell table:style-name="ce151" office:value-type="string" calcext:value-type="string">
            <text:p>你隱秘狀態下進行的任意判定，骰子數+2個；隱秘狀態下進行的攻擊，攻擊力+5</text:p>
          </table:table-cell>
          <table:table-cell table:style-name="ce148" office:value-type="string" calcext:value-type="string">
            <text:p>IA P135</text:p>
          </table:table-cell>
          <table:table-cell table:style-name="ce148"/>
          <table:table-cell table:number-columns-repeated="1016"/>
        </table:table-row>
        <table:table-row table:style-name="ro16">
          <table:table-cell table:style-name="ce148" office:value-type="string" calcext:value-type="string">
            <text:p>並肩作戰</text:p>
            <text:p>（バディムーヴ）</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回合</text:p>
          </table:table-cell>
          <table:table-cell table:style-name="ce151" office:value-type="string" calcext:value-type="string">
            <text:p>作為其他UGN之子的夥伴一同協力培育的結果，你所得到的便是優秀的援護能力，對於身邊的戰友來說，你屬實是很能靠得住的存在。</text:p>
          </table:table-cell>
          <table:table-cell table:style-name="ce151" office:value-type="string" calcext:value-type="string">
            <text:p>場景中登場的，你以外的單位進行判定後使用；使該判定的達成值+3</text:p>
            <text:p>該效果一回合可以使用1次</text:p>
          </table:table-cell>
          <table:table-cell table:style-name="ce148" office:value-type="string" calcext:value-type="string">
            <text:p>IA P135</text:p>
          </table:table-cell>
          <table:table-cell table:style-name="ce148"/>
          <table:table-cell table:number-columns-repeated="1016"/>
        </table:table-row>
        <table:table-row table:style-name="ro16">
          <table:table-cell table:style-name="ce148" office:value-type="string" calcext:value-type="string">
            <text:p>天然背教者</text:p>
            <text:p>（レネゲイドナチュラル）</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表示你從記事之前就已經親近背教者之力，能靠直覺操縱背教者的紋章</text:p>
          </table:table-cell>
          <table:table-cell table:style-name="ce151" office:value-type="string" calcext:value-type="string">
            <text:p>你進行的攻擊判定達成值+&lt;RC&gt;（最大+10）</text:p>
          </table:table-cell>
          <table:table-cell table:style-name="ce148" office:value-type="string" calcext:value-type="string">
            <text:p>IA P13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預視之眼</text:p>
            <text:p>（フォアシーサイト）</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場景</text:p>
          </table:table-cell>
          <table:table-cell table:style-name="ce151" office:value-type="string" calcext:value-type="string">
            <text:p>在掌握了動態視力和距離感的UGN之子們當中亦是于射手而言脫穎而出的視力，宛如是預知了一般的捕捉著目標的動作。</text:p>
          </table:table-cell>
          <table:table-cell table:style-name="ce151" office:value-type="string" calcext:value-type="string">
            <text:p>你進行的射擊攻擊的命中判定前使用，針對該攻擊進行的回應動作暴擊值+1，且骰子數-2個</text:p>
            <text:p>該效果1場景可以使用1次</text:p>
          </table:table-cell>
          <table:table-cell table:style-name="ce148" office:value-type="string" calcext:value-type="string">
            <text:p>IA P135</text:p>
          </table:table-cell>
          <table:table-cell table:style-name="ce148"/>
          <table:table-cell table:number-columns-repeated="1016"/>
        </table:table-row>
        <table:table-row table:style-name="ro16">
          <table:table-cell table:style-name="ce148" office:value-type="string" calcext:value-type="string">
            <text:p>天然造物</text:p>
            <text:p>（ナチュラルクリエイション）</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被訓練至能夠像是操作雙手一般的操作以異能製造出的武器的紋章。</text:p>
          </table:table-cell>
          <table:table-cell table:style-name="ce151" office:value-type="string" calcext:value-type="string">
            <text:p>由你通過異能製造的武器攻擊力+5、格擋值+3</text:p>
          </table:table-cell>
          <table:table-cell table:style-name="ce148" office:value-type="string" calcext:value-type="string">
            <text:p>IA P135</text:p>
          </table:table-cell>
          <table:table-cell table:style-name="ce148"/>
          <table:table-cell table:number-columns-repeated="1016"/>
        </table:table-row>
        <table:table-row table:style-name="ro16">
          <table:table-cell table:style-name="ce148" office:value-type="string" calcext:value-type="string">
            <text:p>明星顯現</text:p>
            <text:p>（スターアリズン）</text:p>
          </table:table-cell>
          <table:table-cell table:style-name="ce93" office:value-type="string" calcext:value-type="string">
            <text:p>核心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的黃道兵裝發生了未知的進化的紋章，這把武器與你的異能同調，產生了獨一無二的變化</text:p>
          </table:table-cell>
          <table:table-cell table:style-name="ce151" office:value-type="string" calcext:value-type="string">
            <text:p>取得時選擇一個你取得的異能，裝備“黃道兵裝”期間，你使用該異能時視為LV+3；該效果可以超過LV上限，但不能增加異能使用次數</text:p>
          </table:table-cell>
          <table:table-cell table:style-name="ce148" office:value-type="string" calcext:value-type="string">
            <text:p>IA P13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特異體</text:p>
            <text:p>（特異體／イレギュラーブリード）</text:p>
          </table:table-cell>
          <table:table-cell table:style-name="ce93" office:value-type="string" calcext:value-type="string">
            <text:p>核心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你因為特殊試驗或天生體質等原因，發現了與已知血統不同形態的異能</text:p>
          </table:table-cell>
          <table:table-cell table:style-name="ce151" office:value-type="string" calcext:value-type="string">
            <text:p>選擇你已取得的症候群以外的一個異能取得LV1，但不能選擇[限制：純血種]和敵人異能（NPC異能）；你可以使用經驗值使該異能成長，此時該異能的最大等級按照異能記述，不受血統影響</text:p>
          </table:table-cell>
          <table:table-cell table:style-name="ce148" office:value-type="string" calcext:value-type="string">
            <text:p>IA P13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機密怪物</text:p>
            <text:p>（シークレットモンスター）</text:p>
          </table:table-cell>
          <table:table-cell table:style-name="ce93" office:value-type="string" calcext:value-type="string">
            <text:p>核心紋章/一般</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表示你的過去被封印的紋章，你在過去曾引發重大暴走事故，事故記錄已被處理為機密，只有很少人相關但無人瞭解</text:p>
          </table:table-cell>
          <table:table-cell table:style-name="ce151" office:value-type="string" calcext:value-type="string">
            <text:p>你受到[異常狀態：暴走]期間造成的傷害+3D10</text:p>
          </table:table-cell>
          <table:table-cell table:style-name="ce148" office:value-type="string" calcext:value-type="string">
            <text:p>IA P135</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UGN本部特工 <text:s text:c="23"/>取得條件：職業為UGN特工A~D、UGN支部長A~D、UGN之子A~C的角色 <text:s text:c="3"/>需要GM同意</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毀滅者</text:p>
            <text:p>（デストロイヤー）</text:p>
          </table:table-cell>
          <table:table-cell table:style-name="ce93" office:value-type="string" calcext:value-type="string">
            <text:p>紋章/射擊</text:p>
          </table:table-cell>
          <table:table-cell table:style-name="ce148" office:value-type="float" office:value="30" calcext:value-type="float">
            <text:p>30</text:p>
          </table:table-cell>
          <table:table-cell table:style-name="ce148" office:value-type="string" calcext:value-type="string">
            <text:p>道具：1/劇本</text:p>
          </table:table-cell>
          <table:table-cell table:style-name="ce151" office:value-type="string" calcext:value-type="string">
            <text:p>因本部命令而開發的對原菌步槍，難以上手，只有一部分人能夠使用。</text:p>
          </table:table-cell>
          <table:table-cell table:style-name="ce151" office:value-type="string" calcext:value-type="string">
            <text:p>技能：&lt;射擊&gt;   命中：-1   攻擊力：20   格擋值：-   射程：300m</text:p>
            <text:p>該武器只有&lt;射擊&gt;技能達到LV6以上的角色才能使用。目標無法針對使用該武器的射擊攻擊進行格擋；該武器的攻擊無視其裝甲值進行傷害計算</text:p>
            <text:p>該武器1劇本可以使用1次</text:p>
          </table:table-cell>
          <table:table-cell table:style-name="ce148" office:value-type="string" calcext:value-type="string">
            <text:p>IA P136</text:p>
          </table:table-cell>
          <table:table-cell table:style-name="ce148"/>
          <table:table-cell table:number-columns-repeated="1016"/>
        </table:table-row>
        <table:table-row table:style-name="ro16">
          <table:table-cell table:style-name="ce148" office:value-type="string" calcext:value-type="string">
            <text:p>學術衣裝</text:p>
            <text:p>（スカラーウェア）</text:p>
          </table:table-cell>
          <table:table-cell table:style-name="ce93" office:value-type="string" calcext:value-type="string">
            <text:p>紋章/防具</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在本部中參與了背教者研究的特工的制服，反映了最新的研究成果，能夠抑制穿著者的背教者病毒</text:p>
          </table:table-cell>
          <table:table-cell table:style-name="ce151" office:value-type="string" calcext:value-type="string">
            <text:p>閃避：0   行動值：0   裝甲值：8</text:p>
            <text:p>判定後使用，因該判定而上升的侵蝕值-2（最低0），在判定中組合了多個異能時，則合計完侵蝕值之後應用效果</text:p>
            <text:p>該效果1場景可以使用1次</text:p>
          </table:table-cell>
          <table:table-cell table:style-name="ce148" office:value-type="string" calcext:value-type="string">
            <text:p>IA P136</text:p>
          </table:table-cell>
          <table:table-cell table:style-name="ce148"/>
          <table:table-cell table:number-columns-repeated="1016"/>
        </table:table-row>
        <table:table-row table:style-name="ro16">
          <table:table-cell table:style-name="ce148" office:value-type="string" calcext:value-type="string">
            <text:p>硬化裝甲</text:p>
            <text:p>（ハーデンドアーマー）</text:p>
          </table:table-cell>
          <table:table-cell table:style-name="ce93" office:value-type="string" calcext:value-type="string">
            <text:p>紋章/防具（輔助）</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補強防具的同時改造為你專用的強化部件，對應異能攻擊能發揮更好的效果</text:p>
          </table:table-cell>
          <table:table-cell table:style-name="ce151" office:value-type="string" calcext:value-type="string">
            <text:p>閃避：0   行動值：0   裝甲值：5</text:p>
            <text:p>該防具只有在與其他防具同時裝備時，裝甲值和效果才能生效；</text:p>
            <text:p>組合異能的攻擊對你造成的傷害-5</text:p>
          </table:table-cell>
          <table:table-cell table:style-name="ce148" office:value-type="string" calcext:value-type="string">
            <text:p>IA P13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關聯：中樞評議員</text:p>
            <text:p>（コネ：アクシズ評議員）</text:p>
          </table:table-cell>
          <table:table-cell table:style-name="ce93" office:value-type="string" calcext:value-type="string">
            <text:p>紋章/關聯</text:p>
          </table:table-cell>
          <table:table-cell table:style-name="ce148" office:value-type="float" office:value="10" calcext:value-type="float">
            <text:p>10</text:p>
          </table:table-cell>
          <table:table-cell table:style-name="ce148" office:value-type="string" calcext:value-type="string">
            <text:p>3/劇本</text:p>
          </table:table-cell>
          <table:table-cell table:style-name="ce151" office:value-type="string" calcext:value-type="string">
            <text:p>位列UGN中樞評議會的評議員，你能夠暫借其強大的許可權</text:p>
          </table:table-cell>
          <table:table-cell table:style-name="ce151" office:value-type="string" calcext:value-type="string">
            <text:p>你進行【社會】判定前使用，該判定骰數+3</text:p>
            <text:p>該效果1劇本可以使用3次</text:p>
          </table:table-cell>
          <table:table-cell table:style-name="ce148" office:value-type="string" calcext:value-type="string">
            <text:p>IA P13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升級</text:p>
            <text:p>（アップグレー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從本部配發下來的，有著比平常更高性能的武器。存在著本部特工無法于各個支部處入手的後援體制。</text:p>
          </table:table-cell>
          <table:table-cell table:style-name="ce151" office:value-type="string" calcext:value-type="string">
            <text:p>取得時從你常備化的武器中選擇一件，所選的武器攻擊力+3</text:p>
          </table:table-cell>
          <table:table-cell table:style-name="ce148" office:value-type="string" calcext:value-type="string">
            <text:p>IA P136</text:p>
          </table:table-cell>
          <table:table-cell table:style-name="ce148"/>
          <table:table-cell table:number-columns-repeated="1016"/>
        </table:table-row>
        <table:table-row table:style-name="ro16">
          <table:table-cell table:style-name="ce148" office:value-type="string" calcext:value-type="string">
            <text:p>八面玲瓏</text:p>
            <text:p>（トランスディミナ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你是擔當與各個支部以及組織進行外交的特工，能夠在交涉時做到言行舉止隨機應變，通過時而高壓、時而平穩的手段來拉攏人心。</text:p>
          </table:table-cell>
          <table:table-cell table:style-name="ce151" office:value-type="string" calcext:value-type="string">
            <text:p>你進行的&lt;交涉&gt;和&lt;情報：●●&gt;判定的骰子數+1個</text:p>
          </table:table-cell>
          <table:table-cell table:style-name="ce148" office:value-type="string" calcext:value-type="string">
            <text:p>IA P136</text:p>
          </table:table-cell>
          <table:table-cell table:style-name="ce148"/>
          <table:table-cell table:number-columns-repeated="1016"/>
        </table:table-row>
        <table:table-row table:style-name="ro16">
          <table:table-cell table:style-name="ce148" office:value-type="string" calcext:value-type="string">
            <text:p>一應俱全</text:p>
            <text:p>（オールカインズ）</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3/劇本</text:p>
          </table:table-cell>
          <table:table-cell table:style-name="ce151" office:value-type="string" calcext:value-type="string">
            <text:p>用以應對任何任務、任何地區的7種秘密道具，其具體的組合則因人而異。</text:p>
          </table:table-cell>
          <table:table-cell table:style-name="ce151" office:value-type="string" calcext:value-type="string">
            <text:p>你進行判定前使用，該判定的達成值+3</text:p>
            <text:p>該效果1劇本可以使用3次</text:p>
          </table:table-cell>
          <table:table-cell table:style-name="ce148" office:value-type="string" calcext:value-type="string">
            <text:p>IA P136</text:p>
          </table:table-cell>
          <table:table-cell table:style-name="ce148"/>
          <table:table-cell table:number-columns-repeated="1016"/>
        </table:table-row>
        <table:table-row table:style-name="ro16">
          <table:table-cell table:style-name="ce148" office:value-type="string" calcext:value-type="string">
            <text:p>高效工作</text:p>
            <text:p>（エフィシエントワーク）</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能夠根據情況判斷並看出拿出全力的時機的紋章。作為接觸了許多事件的特工，你能夠輕鬆看穿戰局的走勢。</text:p>
          </table:table-cell>
          <table:table-cell table:style-name="ce151" office:value-type="string" calcext:value-type="string">
            <text:p>高潮階段期間，你的攻擊所造成的傷害+1D10</text:p>
          </table:table-cell>
          <table:table-cell table:style-name="ce148" office:value-type="string" calcext:value-type="string">
            <text:p>IA P136</text:p>
          </table:table-cell>
          <table:table-cell table:style-name="ce148"/>
          <table:table-cell table:number-columns-repeated="1016"/>
        </table:table-row>
        <table:table-row table:style-name="ro16">
          <table:table-cell table:style-name="ce148" office:value-type="string" calcext:value-type="string">
            <text:p>高等票據</text:p>
            <text:p>（ハイアーチケット）</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能將緊急情況下的移動手段立刻準備好的體制</text:p>
          </table:table-cell>
          <table:table-cell table:style-name="ce151" office:value-type="string" calcext:value-type="string">
            <text:p>選擇一件[購入：購入不可]以外非獨特道具的載具，你獲得選擇的載具及能夠駕駛它的臨時演員</text:p>
            <text:p>該效果1劇本可以使用1次</text:p>
          </table:table-cell>
          <table:table-cell table:style-name="ce148" office:value-type="string" calcext:value-type="string">
            <text:p>IA P13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葬儀</text:p>
            <text:p>（フューネラル）</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表示你能對原菌和超越者罪犯施以確實的死亡的紋章，你無法允許應死之物苟且偷生</text:p>
          </table:table-cell>
          <table:table-cell table:style-name="ce151" office:value-type="string" calcext:value-type="string">
            <text:p>你對場景中從[戰鬥不能]狀態回復的角色進行攻擊的攻擊力+3D10</text:p>
          </table:table-cell>
          <table:table-cell table:style-name="ce148" office:value-type="string" calcext:value-type="string">
            <text:p>IA P13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UGN報告</text:p>
            <text:p>（UGNリポート）</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將與敵人的戰鬥資料即時解析並回傳的情報傳遞系統，這些資料全部基於你的戰鬥資料</text:p>
          </table:table-cell>
          <table:table-cell table:style-name="ce151" office:value-type="string" calcext:value-type="string">
            <text:p>你進行攻擊造成至少1點HP傷害時使用，該劇本間，你選擇的任意角色全員對該對象造成的傷害+5</text:p>
            <text:p>該效果1劇本可以使用1次</text:p>
          </table:table-cell>
          <table:table-cell table:style-name="ce148" office:value-type="string" calcext:value-type="string">
            <text:p>IA P13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陽之特工</text:p>
            <text:p>（サンズエージェント）</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是“萬陽”亞修·雷多利克的直屬特工的紋章，你有著與亞修的賞識相稱的功績。</text:p>
          </table:table-cell>
          <table:table-cell table:style-name="ce151" office:value-type="string" calcext:value-type="string">
            <text:p>你組合了異能的判定前使用；該判定達成值+20，但侵蝕率會上升10點</text:p>
            <text:p>該效果1劇本可以使用1次</text:p>
          </table:table-cell>
          <table:table-cell table:style-name="ce148" office:value-type="string" calcext:value-type="string">
            <text:p>IA P137</text:p>
          </table:table-cell>
          <table:table-cell table:style-name="ce148"/>
          <table:table-cell table:number-columns-repeated="1016"/>
        </table:table-row>
        <table:table-row table:style-name="ro16">
          <table:table-cell table:style-name="ce148" office:value-type="string" calcext:value-type="string">
            <text:p>遺物碎片</text:p>
            <text:p>（ピースレリック）</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借給專門回收遺產的特工使用的謎之石片，有著可以對其他的背教者產生各種干涉的能力。</text:p>
          </table:table-cell>
          <table:table-cell table:style-name="ce151" office:value-type="string" calcext:value-type="string">
            <text:p>你進行&lt;RC&gt;判定前使用，該判定達成值+10</text:p>
            <text:p>該效果1劇本可以使用3次</text:p>
          </table:table-cell>
          <table:table-cell table:style-name="ce148" office:value-type="string" calcext:value-type="string">
            <text:p>IA P137</text:p>
          </table:table-cell>
          <table:table-cell table:style-name="ce148"/>
          <table:table-cell table:number-columns-repeated="1016"/>
        </table:table-row>
        <table:table-row table:style-name="ro16">
          <table:table-cell table:style-name="ce148" office:value-type="string" calcext:value-type="string">
            <text:p>第二心臟</text:p>
            <text:p>（セカンドハート）</text:p>
          </table:table-cell>
          <table:table-cell table:style-name="ce93" office:value-type="string" calcext:value-type="string">
            <text:p>紋章/一般</text:p>
          </table:table-cell>
          <table:table-cell table:style-name="ce148" office:value-type="float" office:value="50" calcext:value-type="float">
            <text:p>50</text:p>
          </table:table-cell>
          <table:table-cell table:style-name="ce148" office:value-type="string" calcext:value-type="string">
            <text:p>1/劇本</text:p>
          </table:table-cell>
          <table:table-cell table:style-name="ce151" office:value-type="string" calcext:value-type="string">
            <text:p>無論是從多麼危險的任務中都能生還，甚至被認為是不死之身的生命力，或許該說正因如此，其持有者總是會被優先派遣到高危任務之中。</text:p>
          </table:table-cell>
          <table:table-cell table:style-name="ce151" office:value-type="string" calcext:value-type="string">
            <text:p>你即將承受HP傷害前使用，使該HP傷害變為0</text:p>
            <text:p>該效果1劇本可以使用1次</text:p>
          </table:table-cell>
          <table:table-cell table:style-name="ce148" office:value-type="string" calcext:value-type="string">
            <text:p>IA P137</text:p>
          </table:table-cell>
          <table:table-cell table:style-name="ce148"/>
          <table:table-cell table:number-columns-repeated="1016"/>
        </table:table-row>
        <table:table-row table:style-name="ro16">
          <table:table-cell table:style-name="ce148" office:value-type="string" calcext:value-type="string">
            <text:p>刀鋒特工</text:p>
            <text:p>（エッジエージェント）</text:p>
          </table:table-cell>
          <table:table-cell table:style-name="ce93" office:value-type="string" calcext:value-type="string">
            <text:p>核心紋章/一般</text:p>
          </table:table-cell>
          <table:table-cell table:style-name="ce148" office:value-type="float" office:value="20" calcext:value-type="float">
            <text:p>20</text:p>
          </table:table-cell>
          <table:table-cell table:style-name="ce148" office:value-type="string" calcext:value-type="string">
            <text:p>3/劇本</text:p>
          </table:table-cell>
          <table:table-cell table:style-name="ce151" office:value-type="string" calcext:value-type="string">
            <text:p>作為能將危險的任務輕鬆解決的特工之證的領帶夾，也是能替他人承擔危險的勇敢者之證</text:p>
          </table:table-cell>
          <table:table-cell table:style-name="ce151" office:value-type="string" calcext:value-type="string">
            <text:p>與[侵蝕值：4D10]的異能同時使用，該異能變為[侵蝕值：2D10]</text:p>
            <text:p>該效果1劇本可以使用3次</text:p>
          </table:table-cell>
          <table:table-cell table:style-name="ce148" office:value-type="string" calcext:value-type="string">
            <text:p>IA P13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尊主剋星</text:p>
            <text:p>（マスターキラー）</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對FH擔當的特工所掌握的戰鬥技術，這種戰鬥技術已然埋葬了數位尊主級特工。</text:p>
          </table:table-cell>
          <table:table-cell table:style-name="ce151" office:value-type="string" calcext:value-type="string">
            <text:p>你進行的攻擊，攻擊力+15；攻擊對象為取得了尊主特工紋章的角色時，則攻擊力額外再+15（合計+30）</text:p>
          </table:table-cell>
          <table:table-cell table:style-name="ce148" office:value-type="string" calcext:value-type="string">
            <text:p>IA P137</text:p>
          </table:table-cell>
          <table:table-cell table:style-name="ce148" office:value-type="string" calcext:value-type="string">
            <text:p>IA修正描述，攻擊力加成</text:p>
            <text:p>+5→+15（+20→+30）</text:p>
          </table:table-cell>
          <table:table-cell table:number-columns-repeated="1016"/>
        </table:table-row>
        <table:table-row table:style-name="ro16">
          <table:table-cell table:style-name="ce148" office:value-type="string" calcext:value-type="string">
            <text:p>赫拉克勒斯</text:p>
            <text:p>（ハーキュリーズ）</text:p>
          </table:table-cell>
          <table:table-cell table:style-name="ce93" office:value-type="string" calcext:value-type="string">
            <text:p>核心紋章/一般</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贈與以壓倒性的不屈不撓為傲的特工的紋章，被贈與了象徵傳說英雄生命力的飾品，擁有該紋章的人能如那位英雄般帶領UGN跨越無數試煉</text:p>
          </table:table-cell>
          <table:table-cell table:style-name="ce151" office:value-type="string" calcext:value-type="string">
            <text:p>你的HP最大值+50</text:p>
          </table:table-cell>
          <table:table-cell table:style-name="ce148" office:value-type="string" calcext:value-type="string">
            <text:p>IA P137</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UGN中樞評議會（Axis） <text:s text:c="5"/>取得條件：職業為UGN特工A~D、UGN支部長A~D <text:s text:c="3"/>需要GM同意 <text:s text:c="15"/>取得該類紋章的角色將會稱為UGN中樞評議會的評議員之一</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評議員之刃</text:p>
            <text:p>（カウンシラーズエッジ）</text:p>
          </table:table-cell>
          <table:table-cell table:style-name="ce93" office:value-type="string" calcext:value-type="string">
            <text:p>紋章/近戰</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交付給成為評議員者的細身短劍，受EX背教者病毒所感染，其造成的傷害會使對方的背教者病毒不穩定化。</text:p>
          </table:table-cell>
          <table:table-cell table:style-name="ce151" office:value-type="string" calcext:value-type="string">
            <text:p>技能：&lt;近戰&gt;   命中：-1   攻擊力：3   格擋值：1   射程：至近</text:p>
            <text:p>使用了該武器的近戰攻擊給對象造成了至少1點HP傷害時，該回合間，對象進行的組合了異能的判定暴擊值+1</text:p>
          </table:table-cell>
          <table:table-cell table:style-name="ce148" office:value-type="string" calcext:value-type="string">
            <text:p>IA P138</text:p>
          </table:table-cell>
          <table:table-cell table:style-name="ce148"/>
          <table:table-cell table:number-columns-repeated="1016"/>
        </table:table-row>
        <table:table-row table:style-name="ro16">
          <table:table-cell table:style-name="ce148" office:value-type="string" calcext:value-type="string">
            <text:p>吸收裝甲</text:p>
            <text:p>（アブソーブアーマー）</text:p>
          </table:table-cell>
          <table:table-cell table:style-name="ce93" office:value-type="string" calcext:value-type="string">
            <text:p>紋章/防具</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為了保護對UGN來說至關重要的評議員而開發的防具，使用了有著擴散並吸收衝擊功能的特殊素材</text:p>
          </table:table-cell>
          <table:table-cell table:style-name="ce151" office:value-type="string" calcext:value-type="string">
            <text:p>閃避：0   行動值：0   裝甲值：15</text:p>
            <text:p>即將承受HP傷害前使用，裝備了此防具的角色（預定）受到的HP傷害-3D10</text:p>
            <text:p>該效果1劇本可以使用3次</text:p>
          </table:table-cell>
          <table:table-cell table:style-name="ce148" office:value-type="string" calcext:value-type="string">
            <text:p>IA P138</text:p>
          </table:table-cell>
          <table:table-cell table:style-name="ce148"/>
          <table:table-cell table:number-columns-repeated="1016"/>
        </table:table-row>
        <table:table-row table:style-name="ro16">
          <table:table-cell table:style-name="ce148" office:value-type="string" calcext:value-type="string">
            <text:p>純正中樞</text:p>
            <text:p>（ジェニュインアクシス）</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你僅憑超越者的實力獲得了中樞評議會的認可</text:p>
          </table:table-cell>
          <table:table-cell table:style-name="ce151" office:value-type="string" calcext:value-type="string">
            <text:p>取得時從你已取得的異能中選擇一項[限制：-]的異能，該異能LV+5，該效果可以超出等級上限，但不能增加使用次數；你不能取得其他紋章</text:p>
          </table:table-cell>
          <table:table-cell table:style-name="ce148" office:value-type="string" calcext:value-type="string">
            <text:p>IA P13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嫡系部隊</text:p>
            <text:p>（アンダーコープス）</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對聽從評議員命令發起攻擊的直屬部隊進行指揮的權利，部隊中齊聚了能夠將平平無奇的敵人一掃而光的精銳。</text:p>
          </table:table-cell>
          <table:table-cell table:style-name="ce151" office:value-type="string" calcext:value-type="string">
            <text:p>準備階段時使用，使該場景中存在的所有集群單位陷入[戰鬥不能]</text:p>
            <text:p>該效果1劇本可以使用1次</text:p>
          </table:table-cell>
          <table:table-cell table:style-name="ce148" office:value-type="string" calcext:value-type="string">
            <text:p>IA P138</text:p>
          </table:table-cell>
          <table:table-cell table:style-name="ce148"/>
          <table:table-cell table:number-columns-repeated="1016"/>
        </table:table-row>
        <table:table-row table:style-name="ro16">
          <table:table-cell table:style-name="ce148" office:value-type="string" calcext:value-type="string">
            <text:p>神之一擇</text:p>
            <text:p>（ゴッドチョイス）</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有流覽了大量狀況後能更有效指揮部下的指揮能力的紋章</text:p>
          </table:table-cell>
          <table:table-cell table:style-name="ce151" office:value-type="string" calcext:value-type="string">
            <text:p>先攻階段使用，選擇一名未行動角色，該角色於先制階段進行主要階段；該角色可以拒絕該效果</text:p>
            <text:p>該效果1劇本可以使用1次</text:p>
          </table:table-cell>
          <table:table-cell table:style-name="ce148" office:value-type="string" calcext:value-type="string">
            <text:p>IA P13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力量之拳</text:p>
            <text:p>（フィストオブパワ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你利用中央評議員的各種許可權進行強力的攻擊，其舉手投足間都有援護射擊、裝備和事先工作的援助</text:p>
          </table:table-cell>
          <table:table-cell table:style-name="ce151" office:value-type="string" calcext:value-type="string">
            <text:p>你進行攻擊判定前使用，該攻擊的攻擊力+【社會】</text:p>
            <text:p>該效果1劇本可以使用3次</text:p>
          </table:table-cell>
          <table:table-cell table:style-name="ce148" office:value-type="string" calcext:value-type="string">
            <text:p>IA P13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百萬富翁</text:p>
            <text:p>（ミリオネア）</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評議員所持有的莫大財產，僅僅是立身UGN這一組織的意志決定機關一事，便足以掌握巨大的財富。</text:p>
          </table:table-cell>
          <table:table-cell table:style-name="ce151" office:value-type="string" calcext:value-type="string">
            <text:p>你的常備化點數+30</text:p>
          </table:table-cell>
          <table:table-cell table:style-name="ce148" office:value-type="string" calcext:value-type="string">
            <text:p>IA P138</text:p>
          </table:table-cell>
          <table:table-cell table:style-name="ce148"/>
          <table:table-cell table:number-columns-repeated="1016"/>
        </table:table-row>
        <table:table-row table:style-name="ro16">
          <table:table-cell table:style-name="ce148" office:value-type="string" calcext:value-type="string">
            <text:p>生命線</text:p>
            <text:p>（ライフライン）</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UGN為了守護重要的你而建立的警備體制的紋章，無論什麼樣的緊急情況都能讓你迅速逃離</text:p>
          </table:table-cell>
          <table:table-cell table:style-name="ce151" office:value-type="string" calcext:value-type="string">
            <text:p>結算階段或你陷入[戰鬥不能]狀態時使用，你從場景中退場</text:p>
            <text:p>該效果1劇本可以使用1次</text:p>
          </table:table-cell>
          <table:table-cell table:style-name="ce148" office:value-type="string" calcext:value-type="string">
            <text:p>IA P13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防衛命令</text:p>
            <text:p>（ワーデンオーダ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場景</text:p>
          </table:table-cell>
          <table:table-cell table:style-name="ce151" office:value-type="string" calcext:value-type="string">
            <text:p>你有下達以UGN的全力護衛你的命令的許可權</text:p>
          </table:table-cell>
          <table:table-cell table:style-name="ce151" office:value-type="string" calcext:value-type="string">
            <text:p>準備階段使用，指定任意一名角色，該場景間該角色對你使用掩護也不會變為[已行動]，即使在[已行動]狀態也能對你使用掩護</text:p>
            <text:p>該效果1場景可以使用1次</text:p>
          </table:table-cell>
          <table:table-cell table:style-name="ce148" office:value-type="string" calcext:value-type="string">
            <text:p>IA P13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R調整器</text:p>
            <text:p>（Rアジャスター）</text:p>
          </table:table-cell>
          <table:table-cell table:style-name="ce93" office:value-type="string" calcext:value-type="string">
            <text:p>紋章/一般</text:p>
          </table:table-cell>
          <table:table-cell table:style-name="ce148" office:value-type="float" office:value="40" calcext:value-type="float">
            <text:p>40</text:p>
          </table:table-cell>
          <table:table-cell table:style-name="ce148" office:value-type="string" calcext:value-type="string">
            <text:p>1/劇本</text:p>
          </table:table-cell>
          <table:table-cell table:style-name="ce151" office:value-type="string" calcext:value-type="string">
            <text:p>只允許超越者評議員接受的背教者調整手術</text:p>
          </table:table-cell>
          <table:table-cell table:style-name="ce151" office:value-type="string" calcext:value-type="string">
            <text:p>任何時候均可使用。從你取得的異能中，選擇一個有使用次數限制的異能，使其使用次數回復一次；但你的侵蝕率會因此而上升[所回復使用次數的異能的侵蝕值]點</text:p>
            <text:p>該效果1劇本可以使用1次</text:p>
          </table:table-cell>
          <table:table-cell table:style-name="ce148" office:value-type="string" calcext:value-type="string">
            <text:p>IA P139</text:p>
          </table:table-cell>
          <table:table-cell table:style-name="ce148"/>
          <table:table-cell table:number-columns-repeated="1016"/>
        </table:table-row>
        <table:table-row table:style-name="ro16">
          <table:table-cell table:style-name="ce148" office:value-type="string" calcext:value-type="string">
            <text:p>中樞命令</text:p>
            <text:p>（アクシスオーダー）</text:p>
          </table:table-cell>
          <table:table-cell table:style-name="ce93" office:value-type="string" calcext:value-type="string">
            <text:p>紋章/一般</text:p>
          </table:table-cell>
          <table:table-cell table:style-name="ce148" office:value-type="float" office:value="40" calcext:value-type="float">
            <text:p>40</text:p>
          </table:table-cell>
          <table:table-cell table:style-name="ce148" office:value-type="string" calcext:value-type="string">
            <text:p>1/劇本</text:p>
          </table:table-cell>
          <table:table-cell table:style-name="ce151" office:value-type="string" calcext:value-type="string">
            <text:p>只允許評議員使用的戰鬥支援請求許可權，但想要發動的話需要承擔相應的費用</text:p>
          </table:table-cell>
          <table:table-cell table:style-name="ce151" office:value-type="string" calcext:value-type="string">
            <text:p>準備階段使用，使用時消耗任意點財富點數（最多20）；該回合間，你進行的攻擊的攻擊力+[消耗的財富點數]</text:p>
            <text:p>該效果1劇本可以使用1次</text:p>
          </table:table-cell>
          <table:table-cell table:style-name="ce148" office:value-type="string" calcext:value-type="string">
            <text:p>IA P139</text:p>
          </table:table-cell>
          <table:table-cell table:style-name="ce148"/>
          <table:table-cell table:number-columns-repeated="1016"/>
        </table:table-row>
        <table:table-row table:style-name="ro16">
          <table:table-cell table:style-name="ce148" office:value-type="string" calcext:value-type="string">
            <text:p>品質控制器</text:p>
            <text:p>（マスコントローラー）</text:p>
          </table:table-cell>
          <table:table-cell table:style-name="ce93" office:value-type="string" calcext:value-type="string">
            <text:p>紋章/一般</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能夠干涉周圍背教者病毒的特殊微粒子散佈裝置，作為UGN頂端的評議員，儘管只是一點點，但連操作背教者一事亦是被允許的。</text:p>
          </table:table-cell>
          <table:table-cell table:style-name="ce151" office:value-type="string" calcext:value-type="string">
            <text:p>與《結界化》一同使用，直至場景結束或是你使用的《結界化》解除之前，場景內的超越者進行的任何判定骰數+2個或-2個；具體受到哪種效果，由你在使用該道具時為各個對象分別決定</text:p>
          </table:table-cell>
          <table:table-cell table:style-name="ce148" office:value-type="string" calcext:value-type="string">
            <text:p>IA P139</text:p>
          </table:table-cell>
          <table:table-cell table:style-name="ce148"/>
          <table:table-cell table:number-columns-repeated="1016"/>
        </table:table-row>
        <table:table-row table:style-name="ro16">
          <table:table-cell table:style-name="ce148" office:value-type="string" calcext:value-type="string">
            <text:p>無限補給</text:p>
            <text:p>（アンリミテッドサプリメント）</text:p>
          </table:table-cell>
          <table:table-cell table:style-name="ce93" office:value-type="string" calcext:value-type="string">
            <text:p>紋章/一般</text:p>
          </table:table-cell>
          <table:table-cell table:style-name="ce148" office:value-type="float" office:value="60" calcext:value-type="float">
            <text:p>60</text:p>
          </table:table-cell>
          <table:table-cell table:style-name="ce148" office:value-type="string" calcext:value-type="string">
            <text:p>-</text:p>
          </table:table-cell>
          <table:table-cell table:style-name="ce151" office:value-type="string" calcext:value-type="string">
            <text:p>由UGN提供的消耗品補充支援，評議員親身行動時，來自組織的後援是理所當然的事情。</text:p>
          </table:table-cell>
          <table:table-cell table:style-name="ce151" office:value-type="string" calcext:value-type="string">
            <text:p>你常備化的「種類：消耗品」不會因使用而失去</text:p>
          </table:table-cell>
          <table:table-cell table:style-name="ce148" office:value-type="string" calcext:value-type="string">
            <text:p>IA P139</text:p>
          </table:table-cell>
          <table:table-cell table:style-name="ce148"/>
          <table:table-cell table:number-columns-repeated="1016"/>
        </table:table-row>
        <table:table-row table:style-name="ro16">
          <table:table-cell table:style-name="ce148" office:value-type="string" calcext:value-type="string">
            <text:p>時間行者</text:p>
            <text:p>（タイムウォーカー）</text:p>
          </table:table-cell>
          <table:table-cell table:style-name="ce93" office:value-type="string" calcext:value-type="string">
            <text:p>紋章/一般</text:p>
          </table:table-cell>
          <table:table-cell table:style-name="ce148" office:value-type="float" office:value="70" calcext:value-type="float">
            <text:p>70</text:p>
          </table:table-cell>
          <table:table-cell table:style-name="ce148" office:value-type="string" calcext:value-type="string">
            <text:p>1/場景</text:p>
          </table:table-cell>
          <table:table-cell table:style-name="ce151" office:value-type="string" calcext:value-type="string">
            <text:p>UGN中樞評議員的特權。通過接受UGN各個部門的支援，做到如同超越時間一般連續行動。</text:p>
          </table:table-cell>
          <table:table-cell table:style-name="ce151" office:value-type="string" calcext:value-type="string">
            <text:p>先攻階段時使用，若你處於[已行動]狀態，則轉變為[未行動]</text:p>
            <text:p>該效果1場景可以使用1次</text:p>
          </table:table-cell>
          <table:table-cell table:style-name="ce148" office:value-type="string" calcext:value-type="string">
            <text:p>IA P139</text:p>
          </table:table-cell>
          <table:table-cell table:style-name="ce148"/>
          <table:table-cell table:number-columns-repeated="1016"/>
        </table:table-row>
        <table:table-row table:style-name="ro16">
          <table:table-cell table:style-name="ce148" office:value-type="string" calcext:value-type="string">
            <text:p>時間之主</text:p>
            <text:p>（タイムマスター）</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有更加超越時間般行動力的UGN中樞評議員特權，沒有以秒以寸計算的瘋狂計畫和按照計畫指揮他人行動的能力的話就無法支配時間</text:p>
          </table:table-cell>
          <table:table-cell table:style-name="ce151" office:value-type="string" calcext:value-type="string">
            <text:p>你使用“時間行者”時作為原本效果的替代，你可以在先攻階段進行主要階段且不會因此變為[已行動]，“時間行者”的次數照常消費</text:p>
          </table:table-cell>
          <table:table-cell table:style-name="ce148" office:value-type="string" calcext:value-type="string">
            <text:p>IA P13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交涉手段</text:p>
            <text:p>（ディプロマシー）</text:p>
          </table:table-cell>
          <table:table-cell table:style-name="ce93" office:value-type="string" calcext:value-type="string">
            <text:p>核心紋章/一般</text:p>
          </table:table-cell>
          <table:table-cell table:style-name="ce148" office:value-type="float" office:value="50" calcext:value-type="float">
            <text:p>50</text:p>
          </table:table-cell>
          <table:table-cell table:style-name="ce148" office:value-type="string" calcext:value-type="string">
            <text:p>1/劇本</text:p>
          </table:table-cell>
          <table:table-cell table:style-name="ce151" office:value-type="string" calcext:value-type="string">
            <text:p>驅使UGN中央評議員的特權進行交涉的紋章</text:p>
          </table:table-cell>
          <table:table-cell table:style-name="ce151" office:value-type="string" calcext:value-type="string">
            <text:p>主要動作使用，你指定一名知道名字的角色，該角色可以聽從你的一個要求，即使是敵對組織的角色被要求撤退也會聽從；GM可以對該效果使用的對象和要求做出限制</text:p>
            <text:p>該效果1劇本可以使用1次</text:p>
          </table:table-cell>
          <table:table-cell table:style-name="ce148" office:value-type="string" calcext:value-type="string">
            <text:p>IA P13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高堡</text:p>
            <text:p>（ハイキャッスル）</text:p>
          </table:table-cell>
          <table:table-cell table:style-name="ce93" office:value-type="string" calcext:value-type="string">
            <text:p>核心紋章/一般</text:p>
          </table:table-cell>
          <table:table-cell table:style-name="ce148" office:value-type="float" office:value="100" calcext:value-type="float">
            <text:p>100</text:p>
          </table:table-cell>
          <table:table-cell table:style-name="ce148" office:value-type="string" calcext:value-type="string">
            <text:p>1/劇本</text:p>
          </table:table-cell>
          <table:table-cell table:style-name="ce151" office:value-type="string" calcext:value-type="string">
            <text:p>UGN中樞評議員所持有的特權，行使這份特權的話，便能入手一項所望之物</text:p>
          </table:table-cell>
          <table:table-cell table:style-name="ce151" office:value-type="string" calcext:value-type="string">
            <text:p>主要動作使用，你可以取得一項你想要的東西。除了情報、道具以外，以異能、D-Lois等為目標也沒有問題，但是無法取得E-Lois。以該效果取得的東西將會在劇本結束後失去。GM可以拒絕該道具的使用， 此時不消耗使用次數</text:p>
            <text:p>該效果1劇本可以使用1次</text:p>
          </table:table-cell>
          <table:table-cell table:style-name="ce148" office:value-type="string" calcext:value-type="string">
            <text:p>IA P139</text:p>
          </table:table-cell>
          <table:table-cell table:style-name="ce148"/>
          <table:table-cell table:number-columns-repeated="1016"/>
        </table:table-row>
        <table:table-row table:style-name="ro16">
          <table:table-cell table:style-name="ce147" office:value-type="string" calcext:value-type="string" table:number-columns-spanned="6" table:number-rows-spanned="1">
            <text:p>UGN法外者 <text:s text:c="27"/>取得條件：沒有取得UGN通用以外紋章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提成保障</text:p>
            <text:p>（ギャランティープラス）</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被作為能幹的UGN法外者登錄的紋章，因此，你從UGN處收穫了高額的報酬。</text:p>
          </table:table-cell>
          <table:table-cell table:style-name="ce151" office:value-type="string" calcext:value-type="string">
            <text:p>通過取得該紋章，你的財富點數+10</text:p>
          </table:table-cell>
          <table:table-cell table:style-name="ce148" office:value-type="string" calcext:value-type="string">
            <text:p>IA P140</text:p>
          </table:table-cell>
          <table:table-cell table:style-name="ce148"/>
          <table:table-cell table:number-columns-repeated="1016"/>
        </table:table-row>
        <table:table-row table:style-name="ro16">
          <table:table-cell table:style-name="ce148" office:value-type="string" calcext:value-type="string">
            <text:p>霧谷連結</text:p>
            <text:p>（キリタニコネクショ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與UGN日本支部長霧谷雄吾有著私人聯繫的紋章，霧谷會為了你和自己的關聯人進行交涉、斡旋。</text:p>
          </table:table-cell>
          <table:table-cell table:style-name="ce151" office:value-type="string" calcext:value-type="string">
            <text:p>你進行的，使用了「種類：關聯」的判定的達成值+3</text:p>
          </table:table-cell>
          <table:table-cell table:style-name="ce148" office:value-type="string" calcext:value-type="string">
            <text:p>IA P140</text:p>
          </table:table-cell>
          <table:table-cell table:style-name="ce148"/>
          <table:table-cell table:number-columns-repeated="1016"/>
        </table:table-row>
        <table:table-row table:style-name="ro16">
          <table:table-cell table:style-name="ce148" office:value-type="string" calcext:value-type="string">
            <text:p>社會援助</text:p>
            <text:p>（ソーシャルサポート）</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對UGN所屬超越者的生活支援系統，支援超越者適應一般社會是UGN的重要任務之一</text:p>
          </table:table-cell>
          <table:table-cell table:style-name="ce151" office:value-type="string" calcext:value-type="string">
            <text:p>你的基本侵蝕率-2</text:p>
          </table:table-cell>
          <table:table-cell table:style-name="ce148" office:value-type="string" calcext:value-type="string">
            <text:p>IA P14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飛毛腿</text:p>
            <text:p>（デリバリ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正因為你是UGN法外者，故而擁有迅速趕到現場的行動力的紋章</text:p>
          </table:table-cell>
          <table:table-cell table:style-name="ce151" office:value-type="string" calcext:value-type="string">
            <text:p>你的【行動值】+3</text:p>
          </table:table-cell>
          <table:table-cell table:style-name="ce148" office:value-type="string" calcext:value-type="string">
            <text:p>IA P140</text:p>
          </table:table-cell>
          <table:table-cell table:style-name="ce148"/>
          <table:table-cell table:number-columns-repeated="1016"/>
        </table:table-row>
        <table:table-row table:style-name="ro16">
          <table:table-cell table:style-name="ce148" office:value-type="string" calcext:value-type="string">
            <text:p>跳槽</text:p>
            <text:p>（ドロップアウト）</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你是脫離了陌生者、FH等組織，而後跳槽到UGN的UGN法外者。至於脫離的理由等請與GM討論決定</text:p>
          </table:table-cell>
          <table:table-cell table:style-name="ce151" office:value-type="string" calcext:value-type="string">
            <text:p>取得時從其他組織的紋章中選擇一個，你取得所選的紋章，所選紋章所需的經驗點需要另外消耗。選擇需要GM許可的紋章時，同樣需要先征得GM的同意</text:p>
          </table:table-cell>
          <table:table-cell table:style-name="ce148" office:value-type="string" calcext:value-type="string">
            <text:p>IA P140</text:p>
          </table:table-cell>
          <table:table-cell table:style-name="ce148"/>
          <table:table-cell table:number-columns-repeated="1016"/>
        </table:table-row>
        <table:table-row table:style-name="ro16">
          <table:table-cell table:style-name="ce148" office:value-type="string" calcext:value-type="string">
            <text:p>R增強器</text:p>
            <text:p>（Ｒエンハンサ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能夠增幅異能威力的小型裝置，被設計成戒指或者耳環之類的模樣貼身使用。</text:p>
          </table:table-cell>
          <table:table-cell table:style-name="ce151" office:value-type="string" calcext:value-type="string">
            <text:p>你進行的組合了異能的攻擊傷害+1D10，但攻擊的侵蝕值將會合計+1</text:p>
          </table:table-cell>
          <table:table-cell table:style-name="ce148" office:value-type="string" calcext:value-type="string">
            <text:p>IA P140</text:p>
          </table:table-cell>
          <table:table-cell table:style-name="ce148"/>
          <table:table-cell table:number-columns-repeated="1016"/>
        </table:table-row>
        <table:table-row table:style-name="ro16">
          <table:table-cell table:style-name="ce148" office:value-type="string" calcext:value-type="string">
            <text:p>R等化器</text:p>
            <text:p>（Ｒバランサ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你在UGN處接受過能夠安全使用特定異能的訓練。</text:p>
          </table:table-cell>
          <table:table-cell table:style-name="ce151" office:value-type="string" calcext:value-type="string">
            <text:p>團前選擇一個你取得的異能，所選異能的「侵蝕值」-1（最低1）</text:p>
          </table:table-cell>
          <table:table-cell table:style-name="ce148" office:value-type="string" calcext:value-type="string">
            <text:p>IA P140</text:p>
          </table:table-cell>
          <table:table-cell table:style-name="ce148" office:value-type="string" calcext:value-type="string">
            <text:p>IA修改經驗值</text:p>
          </table:table-cell>
          <table:table-cell table:number-columns-repeated="1016"/>
        </table:table-row>
        <table:table-row table:style-name="ro16">
          <table:table-cell table:style-name="ce148" office:value-type="string" calcext:value-type="string">
            <text:p>崩毀日常</text:p>
            <text:p>（クランブルデイズ）</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熟知發生緊急情況時的對應方案、民眾誘導方法、情報隱蔽方法、不要獨自對抗原菌等事務</text:p>
          </table:table-cell>
          <table:table-cell table:style-name="ce151" office:value-type="string" calcext:value-type="string">
            <text:p>你進行的判定骰數+1個，該效果無法在戰鬥中使用</text:p>
          </table:table-cell>
          <table:table-cell table:style-name="ce148" office:value-type="string" calcext:value-type="string">
            <text:p>IA P14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憎惡</text:p>
            <text:p>（リパルション）</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對其他組織的仇恨與復仇心讓你協助UGN的紋章</text:p>
          </table:table-cell>
          <table:table-cell table:style-name="ce151" office:value-type="string" calcext:value-type="string">
            <text:p>取得時選擇UGN以外的一個組織，你對該組織所屬角色進行的攻擊判定達成值+5</text:p>
          </table:table-cell>
          <table:table-cell table:style-name="ce148" office:value-type="string" calcext:value-type="string">
            <text:p>IA P14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RC掃描器</text:p>
            <text:p>（ＲＣスキャナ）</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能夠調查你的背教者病毒狀態的特殊裝置，有著手錶一類的外觀。掃描所得的情報將會傳輸至UGN所持有的背教者資料庫當中，並傳回最合適你的背教者病毒的操作手段。</text:p>
          </table:table-cell>
          <table:table-cell table:style-name="ce151" office:value-type="string" calcext:value-type="string">
            <text:p>你進行的組合了異能的&lt;RC&gt;判定骰數+2個</text:p>
          </table:table-cell>
          <table:table-cell table:style-name="ce148" office:value-type="string" calcext:value-type="string">
            <text:p>IA P141</text:p>
          </table:table-cell>
          <table:table-cell table:style-name="ce148"/>
          <table:table-cell table:number-columns-repeated="1016"/>
        </table:table-row>
        <table:table-row table:style-name="ro16">
          <table:table-cell table:style-name="ce148" office:value-type="string" calcext:value-type="string">
            <text:p>武器改裝</text:p>
            <text:p>（ウェポンカスタマイズ）</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持有的武器經過了UGN研究機構的調整，想必能夠與你的異能互相配合，發揮出更高的性能吧。</text:p>
          </table:table-cell>
          <table:table-cell table:style-name="ce151" office:value-type="string" calcext:value-type="string">
            <text:p>導入階段從你常備化的武器中選擇一件；使用所選武器的判定組合了異能時，該武器的攻擊力+4；但是，所選的武器只有你能裝備和使用</text:p>
          </table:table-cell>
          <table:table-cell table:style-name="ce148" office:value-type="string" calcext:value-type="string">
            <text:p>IA P141</text:p>
          </table:table-cell>
          <table:table-cell table:style-name="ce148"/>
          <table:table-cell table:number-columns-repeated="1016"/>
        </table:table-row>
        <table:table-row table:style-name="ro16">
          <table:table-cell table:style-name="ce148" office:value-type="string" calcext:value-type="string">
            <text:p>伊吉斯指環</text:p>
            <text:p>（イージスリング）</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場景</text:p>
          </table:table-cell>
          <table:table-cell table:style-name="ce151" office:value-type="string" calcext:value-type="string">
            <text:p>UGN所開發的，用以對抗無視防禦異能的裝置，有著指環的造型。</text:p>
          </table:table-cell>
          <table:table-cell table:style-name="ce151" office:value-type="string" calcext:value-type="string">
            <text:p>格擋時同時使用，即使該攻擊的傷害帶有「無視裝甲值進行傷害計算」異能效果，也仍按照裝甲值有效進行計算</text:p>
            <text:p>該效果1場景可以使用1次</text:p>
          </table:table-cell>
          <table:table-cell table:style-name="ce148" office:value-type="string" calcext:value-type="string">
            <text:p>IA P141</text:p>
          </table:table-cell>
          <table:table-cell table:style-name="ce148"/>
          <table:table-cell table:number-columns-repeated="1016"/>
        </table:table-row>
        <table:table-row table:style-name="ro16">
          <table:table-cell table:style-name="ce148" office:value-type="string" calcext:value-type="string">
            <text:p>法外者王牌</text:p>
            <text:p>（イリーガルジョーカ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是霧谷雄吾所信賴的法外者特工人才，俗稱“法外者王牌”。共有七人的法外者王牌，據說在世界各地都有所行動。</text:p>
          </table:table-cell>
          <table:table-cell table:style-name="ce151" office:value-type="string" calcext:value-type="string">
            <text:p>你進行判定之後使用，該判定的達成值+10</text:p>
            <text:p>該效果1劇本可以使用1次</text:p>
          </table:table-cell>
          <table:table-cell table:style-name="ce148" office:value-type="string" calcext:value-type="string">
            <text:p>IA P141</text:p>
          </table:table-cell>
          <table:table-cell table:style-name="ce148"/>
          <table:table-cell table:number-columns-repeated="1016"/>
        </table:table-row>
        <table:table-row table:style-name="ro16">
          <table:table-cell table:style-name="ce148" office:value-type="string" calcext:value-type="string">
            <text:p>衝動抑制劑</text:p>
            <text:p>（アージインヒビター）</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UGN為無法定期進行醫學檢查的法外者準備的衝動抑制劑，雖然副作用很強但是能在緊急情況下避免暴走</text:p>
          </table:table-cell>
          <table:table-cell table:style-name="ce151" office:value-type="string" calcext:value-type="string">
            <text:p>你進行衝動判定前使用；該判定骰數+5個，但判定後你受到[異常狀態：恍惚]</text:p>
          </table:table-cell>
          <table:table-cell table:style-name="ce148" office:value-type="string" calcext:value-type="string">
            <text:p>IA P14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法外者移動</text:p>
            <text:p>（イリーガルモービル）</text:p>
          </table:table-cell>
          <table:table-cell table:style-name="ce93" office:value-type="string" calcext:value-type="string">
            <text:p>核心紋章/一般</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來自UGN兼任聯絡員的變節體載具，無論何處都能將你運送抵達，也能支援作戰</text:p>
          </table:table-cell>
          <table:table-cell table:style-name="ce151" office:value-type="string" calcext:value-type="string">
            <text:p>你進行的判定骰數+4個（即使無法使用載具的場景中也能生效），作為載具需要資料時，在場景開始時選擇“小汽車”“摩托艇”“直升機”中的一項</text:p>
          </table:table-cell>
          <table:table-cell table:style-name="ce148" office:value-type="string" calcext:value-type="string">
            <text:p>IA P14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舊日生活技能</text:p>
            <text:p>（エクスライフスキル）</text:p>
          </table:table-cell>
          <table:table-cell table:style-name="ce93" office:value-type="string" calcext:value-type="string">
            <text:p>核心紋章/一般</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表示你曾作為日常世界中特定領域的第一名活躍的紋章，其技術與知識對非日常世界來說並非完全無用</text:p>
          </table:table-cell>
          <table:table-cell table:style-name="ce151" office:value-type="string" calcext:value-type="string">
            <text:p>取得時選擇一項技能，該技能判定達成值+10</text:p>
          </table:table-cell>
          <table:table-cell table:style-name="ce148" office:value-type="string" calcext:value-type="string">
            <text:p>IA P14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全金屬之心</text:p>
            <text:p>（フルメタルハート）</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擁有鋼鐵之心的紋章，因戰爭、犯罪或大災難使你認為日常並不和平，因此你擁有比任何人都強韌的內心</text:p>
          </table:table-cell>
          <table:table-cell table:style-name="ce151" office:value-type="string" calcext:value-type="string">
            <text:p>你受到的HP傷害-3D10</text:p>
          </table:table-cell>
          <table:table-cell table:style-name="ce148" office:value-type="string" calcext:value-type="string">
            <text:p>IA P141</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UGN通用 <text:s text:c="30"/>取得條件：職業為UGN系，或是身為UGN法外者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指揮官之刃</text:p>
            <text:p>（コマンダーズエッジ）</text:p>
          </table:table-cell>
          <table:table-cell table:style-name="ce93" office:value-type="string" calcext:value-type="string">
            <text:p>紋章/近戰</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贈與優秀小隊長的求生匕首，擁有它就是擁有領導力和指揮能力的證明</text:p>
          </table:table-cell>
          <table:table-cell table:style-name="ce151" office:value-type="string" calcext:value-type="string">
            <text:p>技能：&lt;近戰&gt;   命中：0  攻擊力：5  格擋值：2  射程：至近</text:p>
            <text:p>取得需要【社會】5以上，準備階段使用，該回合間與你處同一接戰範圍的任意角色全體攻擊力+3</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赤紅之盾</text:p>
            <text:p>（紅い盾）</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強化塑膠盾，使用帶有EX背教者的素材製作，帶有些許紅色，據說使用者經常換人</text:p>
          </table:table-cell>
          <table:table-cell table:style-name="ce151" office:value-type="string" calcext:value-type="string">
            <text:p>技能：&lt;近戰&gt;   命中：-1  攻擊力：4  格擋值：8  射程：至近</text:p>
            <text:p>該武器的格擋值+&lt;意志&gt;</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玻璃城壁</text:p>
            <text:p>（グラスウォール）</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特殊素材製作的強化塑膠盾，耐久性較差</text:p>
          </table:table-cell>
          <table:table-cell table:style-name="ce151" office:value-type="string" calcext:value-type="string">
            <text:p>技能：&lt;近戰&gt;  命中：0  攻擊力：3  格擋值：12   射程：至近</text:p>
            <text:p>該武器1劇本可以使用3次</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獸化武器</text:p>
            <text:p>（ベスティアウェポン）</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在UGN只存在12把的帶有謎之刻印的槍，各自形狀不同但都有強大的破壞力，擁有奪取使用者生命的性質</text:p>
          </table:table-cell>
          <table:table-cell table:style-name="ce151" office:value-type="string" calcext:value-type="string">
            <text:p>技能：&lt;射擊&gt;  命中：-2  攻擊力：9  格擋值：-   射程：100m</text:p>
            <text:p>使用該武器進行攻擊的傷害+1D10，使用該效果後你失去3HP</text:p>
            <text:p>雙手握持，至近不可</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鳴泣之子</text:p>
            <text:p>（クライベイビー）</text:p>
          </table:table-cell>
          <table:table-cell table:style-name="ce93" office:value-type="string" calcext:value-type="string">
            <text:p>紋章/射擊</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只會借給優秀原菌獵人的被EX背教者感染的槍，擁有自我修復能力，無論壞掉多少次都會以更加兇惡的姿態再生</text:p>
          </table:table-cell>
          <table:table-cell table:style-name="ce151" office:value-type="string" calcext:value-type="string">
            <text:p>技能：&lt;射擊&gt;  命中：-3  攻擊力：11  格擋值：-   射程：50m</text:p>
            <text:p>該武器破壞時使用，使該破壞效果無效；使用該效果時你的侵蝕率+2</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追蹤者夾克</text:p>
            <text:p>（トレーサーズジャケット）</text:p>
          </table:table-cell>
          <table:table-cell table:style-name="ce93" office:value-type="string" calcext:value-type="string">
            <text:p>紋章/防具</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只會交給擁有優秀追蹤能力的人的高性能特工套裝，使用特殊素材能增幅肌肉力量和敏捷性</text:p>
          </table:table-cell>
          <table:table-cell table:style-name="ce151" office:value-type="string" calcext:value-type="string">
            <text:p>閃避：0   行動值：0   裝甲值：7</text:p>
            <text:p>你進行的【肉體】判定達成值+3，對攻擊判定無效</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調查員夾克</text:p>
            <text:p>（リサーチャーズジャケット）</text:p>
          </table:table-cell>
          <table:table-cell table:style-name="ce93" office:value-type="string" calcext:value-type="string">
            <text:p>紋章/防具</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只會交給擁有優秀調查能力的人的耐環境特工套裝，對高溫和污染抵抗性強，可以在任何地方安全展開調查活動</text:p>
          </table:table-cell>
          <table:table-cell table:style-name="ce151" office:value-type="string" calcext:value-type="string">
            <text:p>閃避：-2   行動值：0   裝甲值：5</text:p>
            <text:p>你進行的&lt;知覺&gt;和&lt;知識：●●&gt;判定達成值+3</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UGN射手夾克</text:p>
            <text:p>（UGNシューターズジャケット）</text:p>
          </table:table-cell>
          <table:table-cell table:style-name="ce93" office:value-type="string" calcext:value-type="string">
            <text:p>紋章/防具</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UGN將射手夾克改良後的產物，使用了特殊開發素材使其動作輕快，在槍戰中的防禦力也有所提升</text:p>
          </table:table-cell>
          <table:table-cell table:style-name="ce151" office:value-type="string" calcext:value-type="string">
            <text:p>閃避：0   行動值：-1   裝甲值：5</text:p>
            <text:p>你進行的&lt;射擊&gt;判定骰數+1個，受到射擊攻擊的傷害-5</text:p>
          </table:table-cell>
          <table:table-cell table:style-name="ce148" office:value-type="string" calcext:value-type="string">
            <text:p>IA P14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UGN戰鬥服II</text:p>
          </table:table-cell>
          <table:table-cell table:style-name="ce93" office:value-type="string" calcext:value-type="string">
            <text:p>紋章/防具</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強化了防禦能力和背教者控制機能的UGN戰鬥服</text:p>
          </table:table-cell>
          <table:table-cell table:style-name="ce151" office:value-type="string" calcext:value-type="string">
            <text:p>閃避：0   行動值：0   裝甲值：15</text:p>
            <text:p>你進行的組合了異能的判定骰數+2個</text:p>
          </table:table-cell>
          <table:table-cell table:style-name="ce148" office:value-type="string" calcext:value-type="string">
            <text:p>IA P143</text:p>
          </table:table-cell>
          <table:table-cell table:style-name="ce148"/>
          <table:table-cell table:number-columns-repeated="1016"/>
        </table:table-row>
        <table:table-row table:style-name="ro16">
          <table:table-cell table:style-name="ce148" office:value-type="string" calcext:value-type="string">
            <text:p>UGN噴氣摩托</text:p>
            <text:p>（UGNジェットバイク）</text:p>
          </table:table-cell>
          <table:table-cell table:style-name="ce93" office:value-type="string" calcext:value-type="string">
            <text:p>紋章/載具</text:p>
          </table:table-cell>
          <table:table-cell table:style-name="ce148" office:value-type="float" office:value="20" calcext:value-type="float">
            <text:p>20</text:p>
          </table:table-cell>
          <table:table-cell table:style-name="ce148" office:value-type="string" calcext:value-type="string">
            <text:p>1/場景</text:p>
          </table:table-cell>
          <table:table-cell table:style-name="ce151" office:value-type="string" calcext:value-type="string">
            <text:p>UGN開發的內藏噴氣推進器的摩托，操縱推進器噴口可以短時間飛行</text:p>
          </table:table-cell>
          <table:table-cell table:style-name="ce151" office:value-type="string" calcext:value-type="string">
            <text:p>技能：&lt;駕駛：二輪&gt;   攻擊力：8   行動值：-2   裝甲值：4   全力移動：200m</text:p>
            <text:p>戰鬥移動前使用，該移動間你進入飛行狀態</text:p>
            <text:p>該效果1場景可以使用1次</text:p>
          </table:table-cell>
          <table:table-cell table:style-name="ce148" office:value-type="string" calcext:value-type="string">
            <text:p>IA P14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學院出身</text:p>
            <text:p>（學園帰り）</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從被叫做學園島的地方畢業，抑或是從那裡來的實習生的紋章。你有著一些得意的領域</text:p>
          </table:table-cell>
          <table:table-cell table:style-name="ce151" office:value-type="string" calcext:value-type="string">
            <text:p>取得時選擇一個能力值（肉體/感覺/精神/社會），使用了所選能力值進行的任何判定骰數+1個</text:p>
          </table:table-cell>
          <table:table-cell table:style-name="ce148" office:value-type="string" calcext:value-type="string">
            <text:p>IA P143</text:p>
          </table:table-cell>
          <table:table-cell table:style-name="ce148"/>
          <table:table-cell table:number-columns-repeated="1016"/>
        </table:table-row>
        <table:table-row table:style-name="ro16">
          <table:table-cell table:style-name="ce148" office:value-type="string" calcext:value-type="string">
            <text:p>搜尋之眼</text:p>
            <text:p>（サーチアイ）</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分析目標所持有的超越者能力的UGN網路</text:p>
          </table:table-cell>
          <table:table-cell table:style-name="ce151" office:value-type="string" calcext:value-type="string">
            <text:p>準備階段使用，選擇一個場景中登場了的超越者角色，該場景間，所選角色對你進行組合了異能的攻擊，你的回應動作執行閃避時，骰子數+2個</text:p>
          </table:table-cell>
          <table:table-cell table:style-name="ce148" office:value-type="string" calcext:value-type="string">
            <text:p>IA P143</text:p>
          </table:table-cell>
          <table:table-cell table:style-name="ce148"/>
          <table:table-cell table:number-columns-repeated="1016"/>
        </table:table-row>
        <table:table-row table:style-name="ro16">
          <table:table-cell table:style-name="ce148" office:value-type="string" calcext:value-type="string">
            <text:p>粉與煙</text:p>
            <text:p>（パウダースモーク）</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因UGN的活動跨越了無數戰場的紋章，你已經染上了戰場的味道</text:p>
          </table:table-cell>
          <table:table-cell table:style-name="ce151" office:value-type="string" calcext:value-type="string">
            <text:p>你進行的&lt;情報：黑社會&gt;和&lt;情報：軍事&gt;判定，達成值+3</text:p>
          </table:table-cell>
          <table:table-cell table:style-name="ce148" office:value-type="string" calcext:value-type="string">
            <text:p>IA P14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修養票</text:p>
            <text:p>（レクリエーションチケット）</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由日本支部長霧谷雄吾想出的為了感謝平日的任務與協助而分配的票據，能夠使用各種商業設施，但也有一部分傳聞說這是用了後會讓休假泡湯的不幸票據</text:p>
          </table:table-cell>
          <table:table-cell table:style-name="ce151" office:value-type="string" calcext:value-type="string">
            <text:p>取得時你的財富點數+5</text:p>
          </table:table-cell>
          <table:table-cell table:style-name="ce148" office:value-type="string" calcext:value-type="string">
            <text:p>IA P14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機器駕車</text:p>
            <text:p>（ロボカ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車輛搭載的自動駕駛功能，除車輛外也有船舶和飛機用的系統</text:p>
          </table:table-cell>
          <table:table-cell table:style-name="ce151" office:value-type="string" calcext:value-type="string">
            <text:p>取得時選擇你常備化的一個[種類：載具]道具，搭載該載具時進行的&lt;駕駛：●●&gt;判定骰數+2個</text:p>
          </table:table-cell>
          <table:table-cell table:style-name="ce148" office:value-type="string" calcext:value-type="string">
            <text:p>IA P14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UGN療法</text:p>
            <text:p>（UGNセラピ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以UGN所屬者為對象的心理療法系統，雖然有拘束時間過久和對私生活干涉過多等不滿的聲音，但是效果已經證明無誤，尤其是在因為戰鬥等侵蝕率激增的特工多有應用</text:p>
          </table:table-cell>
          <table:table-cell table:style-name="ce151" office:value-type="string" calcext:value-type="string">
            <text:p>你的侵蝕率基本值-5（最低30），不能與其他降低侵蝕率基本值的效果同時使用</text:p>
          </table:table-cell>
          <table:table-cell table:style-name="ce148" office:value-type="string" calcext:value-type="string">
            <text:p>IA P14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衝刺噴射器</text:p>
            <text:p>（ダッシュブースタ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可以高速移動的噴氣背包，控制姿勢很難</text:p>
          </table:table-cell>
          <table:table-cell table:style-name="ce151" office:value-type="string" calcext:value-type="string">
            <text:p>進行戰鬥移動或脫離時使用，該移動距離+5m，使用後你受到[異常狀態：硬直]</text:p>
          </table:table-cell>
          <table:table-cell table:style-name="ce148" office:value-type="string" calcext:value-type="string">
            <text:p>IA P14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前科者</text:p>
            <text:p>（前科者／タトゥ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曾是超越者罪犯的紋章，你以同意協助UGN為條件獲得了些許自由</text:p>
          </table:table-cell>
          <table:table-cell table:style-name="ce151" office:value-type="string" calcext:value-type="string">
            <text:p>取得需要&lt;情報：黑社會&gt;LV4以上；你的【感覺】+2，但你進行的【社會】判定骰數-1個</text:p>
          </table:table-cell>
          <table:table-cell table:style-name="ce148" office:value-type="string" calcext:value-type="string">
            <text:p>IA P14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俄耳甫斯之環</text:p>
            <text:p>（オルフェウスリング）</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發出使異能威力減弱的特殊音波的裝置，有著細手環的造型。</text:p>
          </table:table-cell>
          <table:table-cell table:style-name="ce151" office:value-type="string" calcext:value-type="string">
            <text:p>你對組合了異能的攻擊進行格擋時，格擋值+1D10</text:p>
          </table:table-cell>
          <table:table-cell table:style-name="ce148" office:value-type="string" calcext:value-type="string">
            <text:p>IA P144</text:p>
          </table:table-cell>
          <table:table-cell table:style-name="ce148"/>
          <table:table-cell table:number-columns-repeated="1016"/>
        </table:table-row>
        <table:table-row table:style-name="ro16">
          <table:table-cell table:style-name="ce148" office:value-type="string" calcext:value-type="string">
            <text:p>消除器</text:p>
            <text:p>（キャンセラ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擾亂背教者阻礙其活動的抑制裝置</text:p>
          </table:table-cell>
          <table:table-cell table:style-name="ce151" office:value-type="string" calcext:value-type="string">
            <text:p>取得需要&lt;RC&gt;LV4以上；次要動作使用，該場景中登場的超越者角色進行的判定，骰子數-2個</text:p>
            <text:p>該效果1劇本可以使用1次</text:p>
          </table:table-cell>
          <table:table-cell table:style-name="ce148" office:value-type="string" calcext:value-type="string">
            <text:p>IA P14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掩體</text:p>
            <text:p>（スクリー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受過站在對手的矢狀面妨礙攻擊的訓練的紋章，也被稱為站在前衛的人</text:p>
          </table:table-cell>
          <table:table-cell table:style-name="ce151" office:value-type="string" calcext:value-type="string">
            <text:p>與你處同一接戰區域的角色，以你之外的角色為對象進行攻擊時，攻擊判定骰數-3個</text:p>
          </table:table-cell>
          <table:table-cell table:style-name="ce148" office:value-type="string" calcext:value-type="string">
            <text:p>IA P14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個人記號</text:p>
            <text:p>（パーソナルマーク）</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贈與留下偉大功績的特工或法外者的傳說記號，無論是屬於UGN還是與UGN敵對的人看到這個記號都會理解你是何人又是多麼恐怖的存在</text:p>
          </table:table-cell>
          <table:table-cell table:style-name="ce151" office:value-type="string" calcext:value-type="string">
            <text:p>取得時選擇一項能力值（肉體/感覺/精神/社會）；你使用該能力值進行判定前使用，該判定骰數+3個</text:p>
            <text:p>該效果1劇本可以使用3次</text:p>
          </table:table-cell>
          <table:table-cell table:style-name="ce148" office:value-type="string" calcext:value-type="string">
            <text:p>IA P14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適合體</text:p>
            <text:p>（適合體／ブレッスト）</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是大規模事故或試驗中唯一倖存者的紋章，被發現能聚集擁有同樣境遇死者的背教者的特異性質</text:p>
          </table:table-cell>
          <table:table-cell table:style-name="ce151" office:value-type="string" calcext:value-type="string">
            <text:p>取得時選擇你已經取得的一個[最大LV：10]異能，計算該異能效果時按照2倍LV計算，可以超過最大LV；你的侵蝕率基本值+4</text:p>
          </table:table-cell>
          <table:table-cell table:style-name="ce148" office:value-type="string" calcext:value-type="string">
            <text:p>IA P14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回憶之魂</text:p>
            <text:p>（リマインドソール）</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有著必須生還的理由。等待自己歸來的人、必須達成的約定等等，具體理由請和GM進行商討設定。</text:p>
          </table:table-cell>
          <table:table-cell table:style-name="ce151" office:value-type="string" calcext:value-type="string">
            <text:p>投擲回歸骰子前使用，該回歸的骰子數+1個；進行「增加回歸骰子數量」的回歸（俗稱的雙倍回歸）時，在骰子數計算完畢之後再應用效果；此外，該效果無法在「追加回歸擲骰」時應用</text:p>
          </table:table-cell>
          <table:table-cell table:style-name="ce148" office:value-type="string" calcext:value-type="string">
            <text:p>IA P144</text:p>
          </table:table-cell>
          <table:table-cell table:style-name="ce148"/>
          <table:table-cell table:number-columns-repeated="1016"/>
        </table:table-row>
        <table:table-row table:style-name="ro16">
          <table:table-cell table:style-name="ce148" office:value-type="string" calcext:value-type="string">
            <text:p>背教者訓練</text:p>
            <text:p>（レネゲイドトレーニング）</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在UGN的設施中積累了特殊的戰鬥訓練，令你在戰鬥中能夠更有效率的使用異能。</text:p>
          </table:table-cell>
          <table:table-cell table:style-name="ce151" office:value-type="string" calcext:value-type="string">
            <text:p>你進行的[組合了異能的攻擊判定]和[閃避判定]，骰子數+1個</text:p>
          </table:table-cell>
          <table:table-cell table:style-name="ce148" office:value-type="string" calcext:value-type="string">
            <text:p>IA P144</text:p>
          </table:table-cell>
          <table:table-cell table:style-name="ce148"/>
          <table:table-cell table:number-columns-repeated="1016"/>
        </table:table-row>
        <table:table-row table:style-name="ro16">
          <table:table-cell table:style-name="ce148" office:value-type="string" calcext:value-type="string">
            <text:p>奮鬥者</text:p>
            <text:p>（奮闘者／ストラグラー）</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場景</text:p>
          </table:table-cell>
          <table:table-cell table:style-name="ce151" office:value-type="string" calcext:value-type="string">
            <text:p>表示你擁有即便歷經苦難也會爬起身來的鬥志的紋章</text:p>
          </table:table-cell>
          <table:table-cell table:style-name="ce151" office:value-type="string" calcext:value-type="string">
            <text:p>你從戰鬥不能狀態回復時使用，該場景間你進行攻擊的攻擊力+10</text:p>
            <text:p>該效果1場景可以使用1次</text:p>
          </table:table-cell>
          <table:table-cell table:style-name="ce148" office:value-type="string" calcext:value-type="string">
            <text:p>IA P14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潛能X</text:p>
            <text:p>（ポテンシャルX）</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以增強特定異能為目的施加的強化手術</text:p>
          </table:table-cell>
          <table:table-cell table:style-name="ce151" office:value-type="string" calcext:value-type="string">
            <text:p>選擇一個你已取得的《復原化》以外的[限制：-]異能；該異能LV+2，可以超過最大LV，不會增加使用次數，該異能變為[限制：100%]</text:p>
          </table:table-cell>
          <table:table-cell table:style-name="ce148" office:value-type="string" calcext:value-type="string">
            <text:p>IA P14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UGN債務</text:p>
            <text:p>（UGNデュティ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其他組織從UGN這裡欠下的債的紋章，你可以讓它們以某種形式將這筆債給償了</text:p>
          </table:table-cell>
          <table:table-cell table:style-name="ce151" office:value-type="string" calcext:value-type="string">
            <text:p>「必要經驗點」30以下的「種類：紋章」道具被使用時使用，取消那個道具的效果</text:p>
            <text:p>該效果1劇本可以使用1次</text:p>
          </table:table-cell>
          <table:table-cell table:style-name="ce148" office:value-type="string" calcext:value-type="string">
            <text:p>IA P145</text:p>
          </table:table-cell>
          <table:table-cell table:style-name="ce148"/>
          <table:table-cell table:number-columns-repeated="1016"/>
        </table:table-row>
        <table:table-row table:style-name="ro16">
          <table:table-cell table:style-name="ce148" office:value-type="string" calcext:value-type="string">
            <text:p>憂鬱</text:p>
            <text:p>（ブルージズ）</text:p>
          </table:table-cell>
          <table:table-cell table:style-name="ce93" office:value-type="string" calcext:value-type="string">
            <text:p>紋章/一般</text:p>
          </table:table-cell>
          <table:table-cell table:style-name="ce148" office:value-type="float" office:value="35" calcext:value-type="float">
            <text:p>35</text:p>
          </table:table-cell>
          <table:table-cell table:style-name="ce148" office:value-type="string" calcext:value-type="string">
            <text:p>-</text:p>
          </table:table-cell>
          <table:table-cell table:style-name="ce151" office:value-type="string" calcext:value-type="string">
            <text:p>象徵過去的失敗或悔恨的照片或遺物，你有著將這些轉變為活下去原動力的意志力</text:p>
          </table:table-cell>
          <table:table-cell table:style-name="ce151" office:value-type="string" calcext:value-type="string">
            <text:p>你進行的判定骰數+4個，該效果只能在持有一個以上未昇華泰塔斯時生效</text:p>
          </table:table-cell>
          <table:table-cell table:style-name="ce148" office:value-type="string" calcext:value-type="string">
            <text:p>IA P14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死亡武器</text:p>
            <text:p>（ダイドウェポン）</text:p>
          </table:table-cell>
          <table:table-cell table:style-name="ce93" office:value-type="string" calcext:value-type="string">
            <text:p>紋章/一般</text:p>
          </table:table-cell>
          <table:table-cell table:style-name="ce148" office:value-type="float" office:value="40" calcext:value-type="float">
            <text:p>40</text:p>
          </table:table-cell>
          <table:table-cell table:style-name="ce148" office:value-type="string" calcext:value-type="string">
            <text:p>-</text:p>
          </table:table-cell>
          <table:table-cell table:style-name="ce151" office:value-type="string" calcext:value-type="string">
            <text:p>表示你使用的武具在作戰行動中受到了重度背教者污染的紋章，這件道具在UGN嚴密監視下才被允許使用</text:p>
          </table:table-cell>
          <table:table-cell table:style-name="ce151" office:value-type="string" calcext:value-type="string">
            <text:p>取得時選擇你已取得的一件武器，使用該武器進行攻擊判定前使用，該判定暴擊值-2（下限5），判定後你的侵蝕率+1D10</text:p>
          </table:table-cell>
          <table:table-cell table:style-name="ce148" office:value-type="string" calcext:value-type="string">
            <text:p>IA P14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異能膏藥</text:p>
            <text:p>（エフェクトパッチ）</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對背教者的發現有指向性的膏藥狀藥物</text:p>
          </table:table-cell>
          <table:table-cell table:style-name="ce151" office:value-type="string" calcext:value-type="string">
            <text:p>次要動作使用，你選擇已有症候群的一項簡易異能；該場景間，你獲得該異能LV1</text:p>
          </table:table-cell>
          <table:table-cell table:style-name="ce148" office:value-type="string" calcext:value-type="string">
            <text:p>IA P14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破壞彈</text:p>
            <text:p>（ブレイクバレット）</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UGN試製開發的，能夠破壞背教者的子彈。</text:p>
          </table:table-cell>
          <table:table-cell table:style-name="ce151" office:value-type="string" calcext:value-type="string">
            <text:p>次要動作使用，主要動作進行的以「種類：射擊」武器進行的攻擊傷害骰+1D10，但不會對非超越者產生效果</text:p>
            <text:p>該道具最多可以取得至3個</text:p>
          </table:table-cell>
          <table:table-cell table:style-name="ce148" office:value-type="string" calcext:value-type="string">
            <text:p>IA P145</text:p>
          </table:table-cell>
          <table:table-cell table:style-name="ce148"/>
          <table:table-cell table:number-columns-repeated="1016"/>
        </table:table-row>
        <table:table-row table:style-name="ro16">
          <table:table-cell table:style-name="ce148" office:value-type="string" calcext:value-type="string">
            <text:p>破壞彈II</text:p>
            <text:p>（ブレイクバレットII）</text:p>
          </table:table-cell>
          <table:table-cell table:style-name="ce93" office:value-type="string" calcext:value-type="string">
            <text:p>紋章/消耗品</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破壞背教者的對超越者特殊子彈，不安定的試作強化版</text:p>
          </table:table-cell>
          <table:table-cell table:style-name="ce151" office:value-type="string" calcext:value-type="string">
            <text:p>次要動作使用，該主要階段間你使用「種類：射擊」武器進行攻擊對超越者造成的傷害+2D10；判定後，使用的武器破壞</text:p>
          </table:table-cell>
          <table:table-cell table:style-name="ce148" office:value-type="string" calcext:value-type="string">
            <text:p>IA P14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守護者之印</text:p>
            <text:p>（ガーディアンズサイン）</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飾有UGNlogo的墜飾和領帶夾等，寄宿著對UGN所提出的“人與超越者的共存”之理想懷有強烈同感的意念。</text:p>
          </table:table-cell>
          <table:table-cell table:style-name="ce151" office:value-type="string" calcext:value-type="string">
            <text:p>你受到包括[暴走]的異常狀態後使用；取消所有受到的異常狀態</text:p>
            <text:p>該道具可以取得多個</text:p>
          </table:table-cell>
          <table:table-cell table:style-name="ce148" office:value-type="string" calcext:value-type="string">
            <text:p>IA P145</text:p>
          </table:table-cell>
          <table:table-cell table:style-name="ce148"/>
          <table:table-cell table:number-columns-repeated="1016"/>
        </table:table-row>
        <table:table-row table:style-name="ro16">
          <table:table-cell table:style-name="ce148" office:value-type="string" calcext:value-type="string">
            <text:p>醫療援助</text:p>
            <text:p>（メディカルアシスタント）</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擁有從UGN的醫療設施處接受治療權利的紋章。</text:p>
          </table:table-cell>
          <table:table-cell table:style-name="ce151" office:value-type="string" calcext:value-type="string">
            <text:p>你沒有登場的場景結束時使用，你的HP回復至HP上限</text:p>
            <text:p>該道具可以取得多個</text:p>
          </table:table-cell>
          <table:table-cell table:style-name="ce148" office:value-type="string" calcext:value-type="string">
            <text:p>IA P145</text:p>
          </table:table-cell>
          <table:table-cell table:style-name="ce148"/>
          <table:table-cell table:number-columns-repeated="1016"/>
        </table:table-row>
        <table:table-row table:style-name="ro16">
          <table:table-cell table:style-name="ce147" office:value-type="string" calcext:value-type="string" table:number-columns-spanned="6" table:number-rows-spanned="1">
            <text:p>FH特工 <text:s text:c="34"/>取得條件：職業為FH特工A~D</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吞噬者</text:p>
            <text:p>（デバウラー）</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有著彎曲刀身的巨劍。因其隨著持有者的理性被逐漸侵蝕而成長的特性而有著貪食者的異名。被確認了有多把存在，不同的個體在“性格”方面上有著微妙的差別</text:p>
          </table:table-cell>
          <table:table-cell table:style-name="ce151" office:value-type="string" calcext:value-type="string">
            <text:p>技能：近戰   命中：-6   攻擊力：13   格擋值：1   射程：至近</text:p>
            <text:p>你的侵蝕率達到100%以上時，該武器的變為「命中：0」，且使用了該武器的攻擊的判定骰數+2個</text:p>
            <text:p>雙手持握</text:p>
          </table:table-cell>
          <table:table-cell table:style-name="ce148" office:value-type="string" calcext:value-type="string">
            <text:p>IA P146</text:p>
          </table:table-cell>
          <table:table-cell table:style-name="ce148"/>
          <table:table-cell table:number-columns-repeated="1016"/>
        </table:table-row>
        <table:table-row table:style-name="ro16">
          <table:table-cell table:style-name="ce148" office:value-type="string" calcext:value-type="string">
            <text:p>幻象外套</text:p>
            <text:p>（ミラージュコート）</text:p>
          </table:table-cell>
          <table:table-cell table:style-name="ce93" office:value-type="string" calcext:value-type="string">
            <text:p>紋章/防具</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向周圍投射分身投影的映射投射外套，並非為了隱藏身形，而是以配合機動性來擾亂瞄準為目的</text:p>
          </table:table-cell>
          <table:table-cell table:style-name="ce151" office:value-type="string" calcext:value-type="string">
            <text:p>閃避：0   行動值：0   裝甲值：6</text:p>
            <text:p>該回合間進行過戰鬥移動、全力移動或從接戰區域脫離時，你進行的閃避達成值+5</text:p>
          </table:table-cell>
          <table:table-cell table:style-name="ce148" office:value-type="string" calcext:value-type="string">
            <text:p>IA P146</text:p>
          </table:table-cell>
          <table:table-cell table:style-name="ce148"/>
          <table:table-cell table:number-columns-repeated="1016"/>
        </table:table-row>
        <table:table-row table:style-name="ro16">
          <table:table-cell table:style-name="ce148" office:value-type="string" calcext:value-type="string">
            <text:p>灰盒</text:p>
            <text:p>（グレイボックス）</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場景</text:p>
          </table:table-cell>
          <table:table-cell table:style-name="ce151" office:value-type="string" calcext:value-type="string">
            <text:p>能夠收納各式各樣的道具，並根據需求取出的多功能箱</text:p>
          </table:table-cell>
          <table:table-cell table:style-name="ce151" office:value-type="string" calcext:value-type="string">
            <text:p>次要動作使用，你可以裝備、變更所持的武器或防具；此外，該主要階段間進行的攻擊判定骰數+1個</text:p>
            <text:p>該效果1場景可以使用1次</text:p>
          </table:table-cell>
          <table:table-cell table:style-name="ce148" office:value-type="string" calcext:value-type="string">
            <text:p>IA P146</text:p>
          </table:table-cell>
          <table:table-cell table:style-name="ce148"/>
          <table:table-cell table:number-columns-repeated="1016"/>
        </table:table-row>
        <table:table-row table:style-name="ro16">
          <table:table-cell table:style-name="ce148" office:value-type="string" calcext:value-type="string">
            <text:p>蟄刺者</text:p>
            <text:p>（スティンガ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以隱秘行動為宗旨的特工的紋章，你十分擅于使用適合用來暗殺的小型武器，抑或是威力較低的異能</text:p>
          </table:table-cell>
          <table:table-cell table:style-name="ce151" office:value-type="string" calcext:value-type="string">
            <text:p>你進行的攻擊傷害+1D10，但必須是以攻擊力5以下的武器發起的攻擊；使用了多件武器時，所有武器的攻擊力都必須在5以下</text:p>
          </table:table-cell>
          <table:table-cell table:style-name="ce148" office:value-type="string" calcext:value-type="string">
            <text:p>IA P146</text:p>
          </table:table-cell>
          <table:table-cell table:style-name="ce148"/>
          <table:table-cell table:number-columns-repeated="1016"/>
        </table:table-row>
        <table:table-row table:style-name="ro16">
          <table:table-cell table:style-name="ce148" office:value-type="string" calcext:value-type="string">
            <text:p>古老王者</text:p>
            <text:p>（ディプライブド／舊き王者）</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被剝奪地位的前任尊主特工的紋章</text:p>
          </table:table-cell>
          <table:table-cell table:style-name="ce151" office:value-type="string" calcext:value-type="string">
            <text:p>取得時選擇一件尊主特工紋章取得，取得那個紋章所需的經驗點需要另外消耗且需要GM許可，該效果取得的道具只能在高潮階段使用及生效</text:p>
          </table:table-cell>
          <table:table-cell table:style-name="ce148" office:value-type="string" calcext:value-type="string">
            <text:p>IA P14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霜凍百合</text:p>
            <text:p>（フローズンリリ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作為單元內負責資金籌措和運營方面的特工的紋章。</text:p>
          </table:table-cell>
          <table:table-cell table:style-name="ce151" office:value-type="string" calcext:value-type="string">
            <text:p>你的財富點數+5；此外，你可以在「場景中登場的其他角色所進行的判定」中使用你的財富點數，但那個判定必須是可以使用財富點數的判定</text:p>
          </table:table-cell>
          <table:table-cell table:style-name="ce148" office:value-type="string" calcext:value-type="string">
            <text:p>IA P146</text:p>
          </table:table-cell>
          <table:table-cell table:style-name="ce148"/>
          <table:table-cell table:number-columns-repeated="1016"/>
        </table:table-row>
        <table:table-row table:style-name="ro16">
          <table:table-cell table:style-name="ce148" office:value-type="string" calcext:value-type="string">
            <text:p>捕食者</text:p>
            <text:p>（カーニヴァラ／捕食者）</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接受了為增強戰鬥感覺的包含實戰在內的特殊訓練的紋章，但過於敏銳的感覺會對日常生活造成障礙</text:p>
          </table:table-cell>
          <table:table-cell table:style-name="ce151" office:value-type="string" calcext:value-type="string">
            <text:p>你進行的攻擊判定及應對攻擊進行的回應動作的【感覺】判定骰數+2個；其他【感覺】判定骰數-2個</text:p>
          </table:table-cell>
          <table:table-cell table:style-name="ce148" office:value-type="string" calcext:value-type="string">
            <text:p>IA P14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星珍</text:p>
            <text:p>（スターリープレシャス）</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聯絡卿認可你的欲望具有珍貴價值的，以星星為原型的徽章。將會被賦予特別的許可權</text:p>
          </table:table-cell>
          <table:table-cell table:style-name="ce151" office:value-type="string" calcext:value-type="string">
            <text:p>你進行的【社會】判定的骰子數+3個</text:p>
          </table:table-cell>
          <table:table-cell table:style-name="ce148" office:value-type="string" calcext:value-type="string">
            <text:p>IA P146</text:p>
          </table:table-cell>
          <table:table-cell table:style-name="ce148"/>
          <table:table-cell table:number-columns-repeated="1016"/>
        </table:table-row>
        <table:table-row table:style-name="ro16">
          <table:table-cell table:style-name="ce148" office:value-type="string" calcext:value-type="string">
            <text:p>羽生新娘</text:p>
            <text:p>（フェザードブライド）</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1/場景</text:p>
          </table:table-cell>
          <table:table-cell table:style-name="ce151" office:value-type="string" calcext:value-type="string">
            <text:p>分析狀況獲得有利條件的戰術預測APP，因為使用時是連接隱藏身份的研究單元進行預測，不想用的特工也不少</text:p>
          </table:table-cell>
          <table:table-cell table:style-name="ce151" office:value-type="string" calcext:value-type="string">
            <text:p>準備階段使用，該回合間你的行動值+1D10</text:p>
            <text:p>該效果1場景可以使用1次</text:p>
          </table:table-cell>
          <table:table-cell table:style-name="ce148" office:value-type="string" calcext:value-type="string">
            <text:p>IA P14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掠奪者之拳</text:p>
            <text:p>（サッカーパンチ）</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擅長獲取先制的戰鬥的紋章</text:p>
          </table:table-cell>
          <table:table-cell table:style-name="ce151" office:value-type="string" calcext:value-type="string">
            <text:p>你對未行動角色進行的攻擊傷害+1D10</text:p>
          </table:table-cell>
          <table:table-cell table:style-name="ce148" office:value-type="string" calcext:value-type="string">
            <text:p>IA P14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狩獵之眼</text:p>
            <text:p>（ハンティングアイ）</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表示你是主要負責驅趕獵物和佯攻擔當的特工的紋章</text:p>
          </table:table-cell>
          <table:table-cell table:style-name="ce151" office:value-type="string" calcext:value-type="string">
            <text:p>你對對象造成至少1點HP傷害時使用，對其造成[異常狀態：憎惡]，憎惡對象為你；對多個角色造成傷害時，則對全員造成[異常狀態：憎惡]</text:p>
            <text:p>該效果1場景可以使用1次</text:p>
          </table:table-cell>
          <table:table-cell table:style-name="ce148" office:value-type="string" calcext:value-type="string">
            <text:p>IA P147</text:p>
          </table:table-cell>
          <table:table-cell table:style-name="ce148"/>
          <table:table-cell table:number-columns-repeated="1016"/>
        </table:table-row>
        <table:table-row table:style-name="ro16">
          <table:table-cell table:style-name="ce148" office:value-type="string" calcext:value-type="string">
            <text:p>恩賜解脫</text:p>
            <text:p>（ミセリコルデ）</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負責著處分失敗實驗體和叛徒超越者的紋章。對那些曾經為人者、為同伴者，你向來眼都不眨地將其處分</text:p>
          </table:table-cell>
          <table:table-cell table:style-name="ce151" office:value-type="string" calcext:value-type="string">
            <text:p>你使用任何異能攻擊超越者時，傷害骰+1D10；但是，每當使用該效果時，你的侵蝕率+3</text:p>
          </table:table-cell>
          <table:table-cell table:style-name="ce148" office:value-type="string" calcext:value-type="string">
            <text:p>IA P147</text:p>
          </table:table-cell>
          <table:table-cell table:style-name="ce148"/>
          <table:table-cell table:number-columns-repeated="1016"/>
        </table:table-row>
        <table:table-row table:style-name="ro16">
          <table:table-cell table:style-name="ce148" office:value-type="string" calcext:value-type="string">
            <text:p>地獄之壁</text:p>
            <text:p>（ヘルズウォール）</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是負責護衛單元隊長和幹部的特工的紋章，於你面前現身過的UGN以及組織派出的刺客不在少數，但達成目的者少之又少</text:p>
          </table:table-cell>
          <table:table-cell table:style-name="ce151" office:value-type="string" calcext:value-type="string">
            <text:p>與你使用的改變空手資料的異能一同使用，受該異能效果影響期間，空手的格擋值+[【肉體】]；但是，每當使用該效果時，你的侵蝕率+3</text:p>
          </table:table-cell>
          <table:table-cell table:style-name="ce148" office:value-type="string" calcext:value-type="string">
            <text:p>IA P147</text:p>
          </table:table-cell>
          <table:table-cell table:style-name="ce148"/>
          <table:table-cell table:number-columns-repeated="1016"/>
        </table:table-row>
        <table:table-row table:style-name="ro16">
          <table:table-cell table:style-name="ce148" office:value-type="string" calcext:value-type="string">
            <text:p>綁票客</text:p>
            <text:p>（ラグマン）</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在FH之中是負責綁架和誘拐的特工的紋章</text:p>
          </table:table-cell>
          <table:table-cell table:style-name="ce151" office:value-type="string" calcext:value-type="string">
            <text:p>準備階段時使用，使場景內登場的一個角色向你的接戰區域進行移動</text:p>
            <text:p>該效果1劇本可以使用1次</text:p>
          </table:table-cell>
          <table:table-cell table:style-name="ce148" office:value-type="string" calcext:value-type="string">
            <text:p>IA P147</text:p>
          </table:table-cell>
          <table:table-cell table:style-name="ce148"/>
          <table:table-cell table:number-columns-repeated="1016"/>
        </table:table-row>
        <table:table-row table:style-name="ro16">
          <table:table-cell table:style-name="ce148" office:value-type="string" calcext:value-type="string">
            <text:p>純白標識</text:p>
            <text:p>（ヴァイスブランド）</text:p>
          </table:table-cell>
          <table:table-cell table:style-name="ce93" office:value-type="string" calcext:value-type="string">
            <text:p>核心紋章/一般</text:p>
          </table:table-cell>
          <table:table-cell table:style-name="ce148" office:value-type="float" office:value="35" calcext:value-type="float">
            <text:p>35</text:p>
          </table:table-cell>
          <table:table-cell table:style-name="ce148" office:value-type="string" calcext:value-type="string">
            <text:p>-</text:p>
          </table:table-cell>
          <table:table-cell table:style-name="ce151" office:value-type="string" calcext:value-type="string">
            <text:p>表示你接受了將死去特工的知識直接“烙印”在記憶中的特殊記憶處理的紋章，你是繼承了過去存在過FH特工的技巧、記憶甚至是惡意的存在</text:p>
          </table:table-cell>
          <table:table-cell table:style-name="ce151" office:value-type="string" calcext:value-type="string">
            <text:p>你進行攻擊的攻擊力+10；你受到異常狀態期間，攻擊力額外+10；關於獲得了怎樣的記憶，可以與GM交流決定</text:p>
          </table:table-cell>
          <table:table-cell table:style-name="ce148" office:value-type="string" calcext:value-type="string">
            <text:p>IA P14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攜帶特工</text:p>
            <text:p>（キャリーエージェント）</text:p>
          </table:table-cell>
          <table:table-cell table:style-name="ce93" office:value-type="string" calcext:value-type="string">
            <text:p>核心紋章/一般</text:p>
          </table:table-cell>
          <table:table-cell table:style-name="ce148" office:value-type="float" office:value="35" calcext:value-type="float">
            <text:p>35</text:p>
          </table:table-cell>
          <table:table-cell table:style-name="ce148" office:value-type="string" calcext:value-type="string">
            <text:p>-</text:p>
          </table:table-cell>
          <table:table-cell table:style-name="ce151" office:value-type="string" calcext:value-type="string">
            <text:p>你被授予了特別的FH道具，據說是贈與中央教條特別認定的擁有欲望者的，無論如何評價，你都會貫徹自己的信念</text:p>
          </table:table-cell>
          <table:table-cell table:style-name="ce151" office:value-type="string" calcext:value-type="string">
            <text:p>導入階段時選擇一件你取得的FH道具，你擁有該道具期間，你進行判定的暴擊值-1（下限值7），你的侵蝕率超過100%期間，該效果下限值變為6</text:p>
          </table:table-cell>
          <table:table-cell table:style-name="ce148" office:value-type="string" calcext:value-type="string">
            <text:p>IA P14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強力獲取安瓿</text:p>
            <text:p>（ジャガーノーツアンプル）</text:p>
          </table:table-cell>
          <table:table-cell table:style-name="ce93" office:value-type="string" calcext:value-type="string">
            <text:p>核心紋章/消耗品</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能讓侵蝕率急速上升的再生藥，如果不是擁有強大執念的話會肉體會無法忍耐復活的衝擊，在FH中也是禁忌的藥品</text:p>
          </table:table-cell>
          <table:table-cell table:style-name="ce151" office:value-type="string" calcext:value-type="string">
            <text:p>你陷入戰鬥不能狀態時使用，你從戰鬥不能狀態回復，將HP回復至20；你的侵蝕率+1D10；但是，你的&lt;意志&gt;在LV4以下時，你立刻死亡</text:p>
          </table:table-cell>
          <table:table-cell table:style-name="ce148" office:value-type="string" calcext:value-type="string">
            <text:p>IA P147</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FH單元隊長 <text:s text:c="27"/>取得條件：職業為FH單元隊長A~D</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卡里古拉</text:p>
            <text:p>（カリギュラ）</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以恐懼支配著單元的紋章，你深知你睥睨一瞥，都比刀子更加銳利</text:p>
          </table:table-cell>
          <table:table-cell table:style-name="ce151" office:value-type="string" calcext:value-type="string">
            <text:p>技能：&lt;交涉&gt;   命中：-   攻擊力：參照效果   格擋值：-   射程：視野</text:p>
            <text:p>該武器的攻擊力為+[你的&lt;交涉&gt;技能等級]（最多+10），此外，裝備該武器期間，你進行的「技能：&lt;交涉&gt;」異能的傷害+[該武器的攻擊力]</text:p>
          </table:table-cell>
          <table:table-cell table:style-name="ce148" office:value-type="string" calcext:value-type="string">
            <text:p>IA P148</text:p>
          </table:table-cell>
          <table:table-cell table:style-name="ce148"/>
          <table:table-cell table:number-columns-repeated="1016"/>
        </table:table-row>
        <table:table-row table:style-name="ro16">
          <table:table-cell table:style-name="ce148" office:value-type="string" calcext:value-type="string">
            <text:p>用後即棄</text:p>
            <text:p>（ディスポーザブル）</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超越者們會對只有微弱能力的消耗品視而不見，但它們對你來說有利用價值</text:p>
          </table:table-cell>
          <table:table-cell table:style-name="ce151" office:value-type="string" calcext:value-type="string">
            <text:p>取得時選擇一項簡易異能，可以不屬你取得的症候群；該簡易異能1劇本可以使用1次且不增加侵蝕率</text:p>
            <text:p>該效果1劇本可以使用1次；該道具最多可以取得3個</text:p>
          </table:table-cell>
          <table:table-cell table:style-name="ce148" office:value-type="string" calcext:value-type="string">
            <text:p>IA P14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FH衣架</text:p>
            <text:p>（FHハンガ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據說FH在各地區保有的所在地不明的裝備貯藏庫</text:p>
          </table:table-cell>
          <table:table-cell table:style-name="ce151" office:value-type="string" calcext:value-type="string">
            <text:p>場景開始時使用，該場景中你進行的&lt;籌措&gt;判定骰數+3個</text:p>
            <text:p>該效果1劇本可以使用1次</text:p>
          </table:table-cell>
          <table:table-cell table:style-name="ce148" office:value-type="string" calcext:value-type="string">
            <text:p>IA P14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許珀里翁</text:p>
            <text:p>（ハイペリオ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利用高度差的特殊戰鬥技術，與對手的位置關係正是支配的重要要素，故而你總是專心於身處比對手更高的位置。掌握制空權便是掌握戰局，你比誰都更加深明此事。</text:p>
          </table:table-cell>
          <table:table-cell table:style-name="ce151" office:value-type="string" calcext:value-type="string">
            <text:p>你在飛行狀態進行的任何判定，達成值+2</text:p>
          </table:table-cell>
          <table:table-cell table:style-name="ce148" office:value-type="string" calcext:value-type="string">
            <text:p>IA P148</text:p>
          </table:table-cell>
          <table:table-cell table:style-name="ce148"/>
          <table:table-cell table:number-columns-repeated="1016"/>
        </table:table-row>
        <table:table-row table:style-name="ro16">
          <table:table-cell table:style-name="ce148" office:value-type="string" calcext:value-type="string">
            <text:p>損友</text:p>
            <text:p>（バッドフレン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你能掌握其弱點，利用其善意的漏洞，煽動其罪惡感，榨幹一切價值的情報員，在他們的眼中，你定是與惡魔別無二致的存在</text:p>
          </table:table-cell>
          <table:table-cell table:style-name="ce151" office:value-type="string" calcext:value-type="string">
            <text:p>你因使用「種類：關聯」道具的效果而增加了判定骰數時，骰子數額外再+2個</text:p>
          </table:table-cell>
          <table:table-cell table:style-name="ce148" office:value-type="string" calcext:value-type="string">
            <text:p>IA P148</text:p>
          </table:table-cell>
          <table:table-cell table:style-name="ce148"/>
          <table:table-cell table:number-columns-repeated="1016"/>
        </table:table-row>
        <table:table-row table:style-name="ro16">
          <table:table-cell table:style-name="ce148" office:value-type="string" calcext:value-type="string">
            <text:p>假面營生</text:p>
            <text:p>（ペルソナショップ）</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的單元在表面上作為其他組織存在的紋章。這個表面組織中抽取的利潤，便是作為FH活動的資金源</text:p>
          </table:table-cell>
          <table:table-cell table:style-name="ce151" office:value-type="string" calcext:value-type="string">
            <text:p>取得該紋章時，從你已取得的&lt;藝術：●●&gt;技能中選擇一個；你的常備點+[所選的&lt;藝術&gt;技能的LV×2]（最多+10）</text:p>
          </table:table-cell>
          <table:table-cell table:style-name="ce148" office:value-type="string" calcext:value-type="string">
            <text:p>IA P148</text:p>
          </table:table-cell>
          <table:table-cell table:style-name="ce148"/>
          <table:table-cell table:number-columns-repeated="1016"/>
        </table:table-row>
        <table:table-row table:style-name="ro16">
          <table:table-cell table:style-name="ce148" office:value-type="string" calcext:value-type="string">
            <text:p>藝術品味</text:p>
            <text:p>（アートセンス）</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愛著“美”的紋章，你並不需要對侵擾美的愚者留下慈悲</text:p>
          </table:table-cell>
          <table:table-cell table:style-name="ce151" office:value-type="string" calcext:value-type="string">
            <text:p>取得需要&lt;藝術：●●&gt;LV3以上；你對沒有擁有相同&lt;藝術：●●&gt;LV1以上的角色進行的攻擊傷害+1D10</text:p>
          </table:table-cell>
          <table:table-cell table:style-name="ce148" office:value-type="string" calcext:value-type="string">
            <text:p>IA P14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御賜</text:p>
            <text:p>（セプタ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從中央信條處受取了象徵著其地位的武器</text:p>
          </table:table-cell>
          <table:table-cell table:style-name="ce151" office:value-type="string" calcext:value-type="string">
            <text:p>取得時，從常備化的武器中選擇一件；裝備該武器期間，你進行的命中判定的骰子數+2個；即使沒有使用該武器發動攻擊，骰子數增加的效果依然適用</text:p>
          </table:table-cell>
          <table:table-cell table:style-name="ce148" office:value-type="string" calcext:value-type="string">
            <text:p>IA P148</text:p>
          </table:table-cell>
          <table:table-cell table:style-name="ce148" office:value-type="string" calcext:value-type="string">
            <text:p>IA獲得強化</text:p>
          </table:table-cell>
          <table:table-cell table:number-columns-repeated="1016"/>
        </table:table-row>
        <table:table-row table:style-name="ro16">
          <table:table-cell table:style-name="ce148" office:value-type="string" calcext:value-type="string">
            <text:p>黑名單</text:p>
            <text:p>（ブラックリスト）</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有關UGN所屬的重點注意人物的情報資料中心</text:p>
          </table:table-cell>
          <table:table-cell table:style-name="ce151" office:value-type="string" calcext:value-type="string">
            <text:p>以UGN所屬的角色為對象進行判定前使用，該判定的暴擊值-1（下限值6）</text:p>
            <text:p>該效果1劇本可以使用1次</text:p>
          </table:table-cell>
          <table:table-cell table:style-name="ce148" office:value-type="string" calcext:value-type="string">
            <text:p>IA P14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失敗者</text:p>
            <text:p>（ルーサ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的單元曾在多次作戰中失敗、毀滅，但是，你絕對不會因此而放棄，只要你還在，單元的再生便是可能的</text:p>
          </table:table-cell>
          <table:table-cell table:style-name="ce151" office:value-type="string" calcext:value-type="string">
            <text:p>你陷入戰鬥不能時使用，你從該場景中退場；使用該道具時，必須昇華一個Titus</text:p>
          </table:table-cell>
          <table:table-cell table:style-name="ce148" office:value-type="string" calcext:value-type="string">
            <text:p>IA P149</text:p>
          </table:table-cell>
          <table:table-cell table:style-name="ce148"/>
          <table:table-cell table:number-columns-repeated="1016"/>
        </table:table-row>
        <table:table-row table:style-name="ro16">
          <table:table-cell table:style-name="ce148" office:value-type="string" calcext:value-type="string">
            <text:p>惡魔之家</text:p>
            <text:p>（ハウスオブデモンズ）</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場景</text:p>
          </table:table-cell>
          <table:table-cell table:style-name="ce151" office:value-type="string" calcext:value-type="string">
            <text:p>表示單元危險度的稱號。“家”表示擁有如同對同一血脈般的統率力，“惡魔”則意味著最高級的危險程度</text:p>
          </table:table-cell>
          <table:table-cell table:style-name="ce151" office:value-type="string" calcext:value-type="string">
            <text:p>準備階段使用，該回合間，場景中登場的任意角色的【行動值】+5</text:p>
            <text:p>該效果1場景可以使用1次</text:p>
          </table:table-cell>
          <table:table-cell table:style-name="ce148" office:value-type="string" calcext:value-type="string">
            <text:p>IA P149</text:p>
          </table:table-cell>
          <table:table-cell table:style-name="ce148"/>
          <table:table-cell table:number-columns-repeated="1016"/>
        </table:table-row>
        <table:table-row table:style-name="ro16">
          <table:table-cell table:style-name="ce148" office:value-type="string" calcext:value-type="string">
            <text:p>兩手準備</text:p>
            <text:p>（セカンドディール）</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藏有兩張底牌的紋章，立於支配他人立場者，總是會為不時之需做準備</text:p>
          </table:table-cell>
          <table:table-cell table:style-name="ce151" office:value-type="string" calcext:value-type="string">
            <text:p>次要動作使用，從你常備化而被破壞的道具，或是已經失去的「消耗品」中選擇一個；你取得該道具</text:p>
            <text:p>該效果1劇本可以使用1次</text:p>
          </table:table-cell>
          <table:table-cell table:style-name="ce148" office:value-type="string" calcext:value-type="string">
            <text:p>IA P149</text:p>
          </table:table-cell>
          <table:table-cell table:style-name="ce148"/>
          <table:table-cell table:number-columns-repeated="1016"/>
        </table:table-row>
        <table:table-row table:style-name="ro16">
          <table:table-cell table:style-name="ce148" office:value-type="string" calcext:value-type="string">
            <text:p>整裝待發</text:p>
            <text:p>（ユニフォームド）</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能夠為單元的成員配發專用戰鬥服的紋章，其設計由你決定</text:p>
          </table:table-cell>
          <table:table-cell table:style-name="ce151" office:value-type="string" calcext:value-type="string">
            <office:annotation draw:style-name="gr10" draw:text-style-name="P2" svg:width="327.26pt" svg:height="100.49pt" svg:x="1078.84pt" svg:y="2662.5pt" draw:caption-point-x="-11.54pt" draw:caption-point-y="-22.22pt">
              <dc:date>2026-04-24T00:00:00</dc:date>
              <text:p text:style-name="P1">FH防護背心</text:p>
              <text:p text:style-name="P1">閃避：0</text:p>
              <text:p text:style-name="P1">行動值：-2</text:p>
              <text:p text:style-name="P1">裝甲值：10</text:p>
              <text:p text:style-name="P1">效果：裝備該防具的角色受到硬直狀態後立即使用，可以打消那個硬直狀態，這個效果一劇本只能使用一次。</text:p>
              <text:p text:style-name="P1">======</text:p>
            </office:annotation>
            <text:p>主要動作使用，場景中登場的任意角色可以取得並裝備“FH防護背心”；但是，該道具無法常備化，且會在劇本結束時失去</text:p>
          </table:table-cell>
          <table:table-cell table:style-name="ce148" office:value-type="string" calcext:value-type="string">
            <text:p>IA P149</text:p>
          </table:table-cell>
          <table:table-cell table:style-name="ce148"/>
          <table:table-cell table:number-columns-repeated="1016"/>
        </table:table-row>
        <table:table-row table:style-name="ro16">
          <table:table-cell table:style-name="ce148" office:value-type="string" calcext:value-type="string">
            <text:p>無冕之王</text:p>
            <text:p>（ハーミットセプター）</text:p>
          </table:table-cell>
          <table:table-cell table:style-name="ce93" office:value-type="string" calcext:value-type="string">
            <text:p>紋章/一般</text:p>
          </table:table-cell>
          <table:table-cell table:style-name="ce148" office:value-type="float" office:value="80" calcext:value-type="float">
            <text:p>80</text:p>
          </table:table-cell>
          <table:table-cell table:style-name="ce148" office:value-type="string" calcext:value-type="string">
            <text:p>1/劇本</text:p>
          </table:table-cell>
          <table:table-cell table:style-name="ce151" office:value-type="string" calcext:value-type="string">
            <text:p>表示你的單元對公權力有著極大影響力的稱號。若是你希望的話，搞出一次社會性的混亂不過是手到擒來的功夫。</text:p>
          </table:table-cell>
          <table:table-cell table:style-name="ce151" office:value-type="string" calcext:value-type="string">
            <text:p>主要動作使用，你可以令一個公共機關或是組織停止活動，或是反過來令其出動；具體會因此而發生什麼事情請與GM協商決定</text:p>
          </table:table-cell>
          <table:table-cell table:style-name="ce148" office:value-type="string" calcext:value-type="string">
            <text:p>IA P149</text:p>
          </table:table-cell>
          <table:table-cell table:style-name="ce148"/>
          <table:table-cell table:number-columns-repeated="1016"/>
        </table:table-row>
        <table:table-row table:style-name="ro16">
          <table:table-cell table:style-name="ce148" office:value-type="string" calcext:value-type="string">
            <text:p>統一款式</text:p>
            <text:p>（ユニファイドコンファーム）</text:p>
          </table:table-cell>
          <table:table-cell table:style-name="ce93" office:value-type="string" calcext:value-type="string">
            <text:p>核心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特別製作的單元戰鬥服的紋章，衣服上雖然沒有施加魔法，但能讓穿上的人獲得對你的領導力和單元的理想無盡的執念</text:p>
          </table:table-cell>
          <table:table-cell table:style-name="ce151" office:value-type="string" calcext:value-type="string">
            <text:p>取得需要“整裝待發”，因你的“整裝待發”裝備“FH防護背心”的角色進行的判定，骰子數+3個</text:p>
          </table:table-cell>
          <table:table-cell table:style-name="ce148" office:value-type="string" calcext:value-type="string">
            <text:p>IA P14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揭幕</text:p>
            <text:p>（カーテンライズ）</text:p>
          </table:table-cell>
          <table:table-cell table:style-name="ce93" office:value-type="string" calcext:value-type="string">
            <text:p>核心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作為幕後黑手準備了最佳舞臺的紋章，一定能讓舞臺上的演員演出最好的戲劇</text:p>
          </table:table-cell>
          <table:table-cell table:style-name="ce151" office:value-type="string" calcext:value-type="string">
            <text:p>你在受到“無冕之王”影響的場所期間，場景中登場的你以外任意角色全體進行的判定暴擊值-1（下限值6）；該效果在“無冕之王”影響期間一直生效，或是只在該場景中生效，由GM決定</text:p>
          </table:table-cell>
          <table:table-cell table:style-name="ce148" office:value-type="string" calcext:value-type="string">
            <text:p>IA P14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惡魔帳幕</text:p>
            <text:p>（イヴィルシュラウド）</text:p>
          </table:table-cell>
          <table:table-cell table:style-name="ce93" office:value-type="string" calcext:value-type="string">
            <text:p>核心紋章/一般</text:p>
          </table:table-cell>
          <table:table-cell table:style-name="ce148" office:value-type="float" office:value="35" calcext:value-type="float">
            <text:p>35</text:p>
          </table:table-cell>
          <table:table-cell table:style-name="ce148" office:value-type="string" calcext:value-type="string">
            <text:p>1/劇本</text:p>
          </table:table-cell>
          <table:table-cell table:style-name="ce151" office:value-type="string" calcext:value-type="string">
            <text:p>從各種危機中守護你的黑影狀屏障的發生裝置，有著金色卡片的形狀，持有這件事本身就是自身特權的象徵，屏障也因為遮光的樣式被稱為暗之衣</text:p>
          </table:table-cell>
          <table:table-cell table:style-name="ce151" office:value-type="string" calcext:value-type="string">
            <text:p>準備階段使用，該回合間你受到的HP傷害-20</text:p>
            <text:p>該效果1劇本可以使用1次</text:p>
          </table:table-cell>
          <table:table-cell table:style-name="ce148" office:value-type="string" calcext:value-type="string">
            <text:p>IA P149</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FH之子 <text:s text:c="34"/>取得條件：職業為FH之子A~C</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保姆</text:p>
            <text:p>（ナニィ）</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交給缺乏社會常識的FH之子的音感應答型支援AI，語氣極其無機質</text:p>
          </table:table-cell>
          <table:table-cell table:style-name="ce151" office:value-type="string" calcext:value-type="string">
            <text:p>你進行&lt;知識：●●&gt;判定前使用，該判定骰數+2個；但是，受到該效果影響的判定無法產生暴擊</text:p>
          </table:table-cell>
          <table:table-cell table:style-name="ce148" office:value-type="string" calcext:value-type="string">
            <text:p>IA P15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量產品</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場景</text:p>
          </table:table-cell>
          <table:table-cell table:style-name="ce151" office:value-type="string" calcext:value-type="string">
            <text:p>你是被作為戰鬥員量產出來的個體之一。被認為沒什麼特別能力方面的可期待性，因此只接受過一些微小的耐久性強化手術</text:p>
          </table:table-cell>
          <table:table-cell table:style-name="ce151" office:value-type="string" calcext:value-type="string">
            <text:p>對你的HP傷害計算完畢後使用，你（預定）受到的傷害-1D10點</text:p>
            <text:p>該效果1場景可以使用1次</text:p>
          </table:table-cell>
          <table:table-cell table:style-name="ce148" office:value-type="string" calcext:value-type="string">
            <text:p>IA P150</text:p>
          </table:table-cell>
          <table:table-cell table:style-name="ce148"/>
          <table:table-cell table:number-columns-repeated="1016"/>
        </table:table-row>
        <table:table-row table:style-name="ro16">
          <table:table-cell table:style-name="ce148" office:value-type="string" calcext:value-type="string">
            <text:p>棄子</text:p>
            <text:p>（捨て駒）</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場景</text:p>
          </table:table-cell>
          <table:table-cell table:style-name="ce151" office:value-type="string" calcext:value-type="string">
            <text:p>表示你是被當作用來斷後的棄子的紋章</text:p>
          </table:table-cell>
          <table:table-cell table:style-name="ce151" office:value-type="string" calcext:value-type="string">
            <text:p>準備階段使用，令你接戰區域之內的任意角色脫離該接戰區域；此時也可以讓臨時角色脫離，其移動距離視為5m；GM可以拒絕臨時角色的脫離，被施加該效果的對象也可以拒絕該效果</text:p>
            <text:p>該效果1場景可以使用1次</text:p>
          </table:table-cell>
          <table:table-cell table:style-name="ce148" office:value-type="string" calcext:value-type="string">
            <text:p>IA P150</text:p>
          </table:table-cell>
          <table:table-cell table:style-name="ce148"/>
          <table:table-cell table:number-columns-repeated="1016"/>
        </table:table-row>
        <table:table-row table:style-name="ro16">
          <table:table-cell table:style-name="ce148" office:value-type="string" calcext:value-type="string">
            <text:p>玩具使</text:p>
            <text:p>（玩具使い）</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在幼年期便被教授了各種武器使用方法的紋章。於你而言，刀槍等物是有如熟手的玩具一般的東西</text:p>
          </table:table-cell>
          <table:table-cell table:style-name="ce151" office:value-type="string" calcext:value-type="string">
            <text:p>你使用武器進行的攻擊的傷害+3</text:p>
          </table:table-cell>
          <table:table-cell table:style-name="ce148" office:value-type="string" calcext:value-type="string">
            <text:p>IA P150</text:p>
          </table:table-cell>
          <table:table-cell table:style-name="ce148"/>
          <table:table-cell table:number-columns-repeated="1016"/>
        </table:table-row>
        <table:table-row table:style-name="ro16">
          <table:table-cell table:style-name="ce148" office:value-type="string" calcext:value-type="string">
            <text:p>失敗作</text:p>
            <text:p>（バイプロダクト／失敗作）</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某實驗失敗作的紋章，也有可能是無能的大人沒能理解你的價值</text:p>
          </table:table-cell>
          <table:table-cell table:style-name="ce151" office:value-type="string" calcext:value-type="string">
            <text:p>取得時選擇你已取得的一項異能，該異能最大LV+1（不增加異能LV）；異能成長所需的經驗需要另外消耗</text:p>
          </table:table-cell>
          <table:table-cell table:style-name="ce148" office:value-type="string" calcext:value-type="string">
            <text:p>IA P15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偏食家</text:p>
            <text:p>（ビキーター／偏食家）</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的嘴裡經常吃著喜歡的食物的紋章，你不想吃喜歡的食物以外的東西，也因為生活得更自由，所以比別人精神安定</text:p>
          </table:table-cell>
          <table:table-cell table:style-name="ce151" office:value-type="string" calcext:value-type="string">
            <text:p>你進行的衝動判定骰數+2個；你的常備化點數-1</text:p>
          </table:table-cell>
          <table:table-cell table:style-name="ce148" office:value-type="string" calcext:value-type="string">
            <text:p>IA P15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撒嬌寶寶</text:p>
            <text:p>（甘ったれ）</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你無法放手的玩偶或是墜飾、毛巾等，對你有著強烈感情價值的物品，這個物品將會成為增幅你背教者病毒的關鍵</text:p>
          </table:table-cell>
          <table:table-cell table:style-name="ce151" office:value-type="string" calcext:value-type="string">
            <text:p>你使用了「時機：次要動作」或「對象：自身」的異能時，該主要階段間進行的&lt;RC&gt;判定骰數+1個；取得該道具時，你的侵蝕率基本值+2</text:p>
          </table:table-cell>
          <table:table-cell table:style-name="ce148" office:value-type="string" calcext:value-type="string">
            <text:p>IA P150</text:p>
          </table:table-cell>
          <table:table-cell table:style-name="ce148"/>
          <table:table-cell table:number-columns-repeated="1016"/>
        </table:table-row>
        <table:table-row table:style-name="ro16">
          <table:table-cell table:style-name="ce148" office:value-type="string" calcext:value-type="string">
            <text:p>最愛之人</text:p>
            <text:p>（ワンラストハグ／最愛の人）</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你有與不想忘記的人物、親人或者兄弟一起生活的記憶，這些記憶化作守護你精神的核心，對他人的干涉有穩固的保護作用。記憶中的人物是何許人，你依然知道或者已然忘卻都可以</text:p>
          </table:table-cell>
          <table:table-cell table:style-name="ce151" office:value-type="string" calcext:value-type="string">
            <text:p>你使用【精神】進行的回應動作判定，骰子數+3個</text:p>
          </table:table-cell>
          <table:table-cell table:style-name="ce148" office:value-type="string" calcext:value-type="string">
            <text:p>IA P15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刻銘</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你是被被施與了特別強化的一系列實驗體之一。這一系列的實驗體都被授予了劍的銘刻</text:p>
          </table:table-cell>
          <table:table-cell table:style-name="ce151" office:value-type="string" calcext:value-type="string">
            <text:p>取得時選擇一項技能，以所選技能進行的判定，達成值+3；你的侵蝕率基本值+2</text:p>
          </table:table-cell>
          <table:table-cell table:style-name="ce148" office:value-type="string" calcext:value-type="string">
            <text:p>IA P151</text:p>
          </table:table-cell>
          <table:table-cell table:style-name="ce148"/>
          <table:table-cell table:number-columns-repeated="1016"/>
        </table:table-row>
        <table:table-row table:style-name="ro16">
          <table:table-cell table:style-name="ce148" office:value-type="string" calcext:value-type="string">
            <text:p>濃縮體</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是與多數的FH之子交戰且生存的，被選拔的存在的紋章。在搏命的戰鬥中，你的能力受到了向著強者進化的磨練</text:p>
          </table:table-cell>
          <table:table-cell table:style-name="ce151" office:value-type="string" calcext:value-type="string">
            <text:p>取得時，從你取得的「最大等級：10」的異能中選擇一個，計算該異能的效果時，視為雙倍LV計算，此時可以超過最大等級</text:p>
          </table:table-cell>
          <table:table-cell table:style-name="ce148" office:value-type="string" calcext:value-type="string">
            <text:p>IA P151</text:p>
          </table:table-cell>
          <table:table-cell table:style-name="ce148"/>
          <table:table-cell table:number-columns-repeated="1016"/>
        </table:table-row>
        <table:table-row table:style-name="ro16">
          <table:table-cell table:style-name="ce148" office:value-type="string" calcext:value-type="string">
            <text:p>同類相殘</text:p>
            <text:p>（同屬殺し）</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在經受的訓練中，徹底瞭解了自己症候群的特點和弱點，正因如此，對於擁有相同症候群的超越者來說，你將是危險的天敵</text:p>
          </table:table-cell>
          <table:table-cell table:style-name="ce151" office:value-type="string" calcext:value-type="string">
            <text:p>你的攻擊命中與你至少持有一種相同症候群的超越者時，傷害+2D10</text:p>
          </table:table-cell>
          <table:table-cell table:style-name="ce148" office:value-type="string" calcext:value-type="string">
            <text:p>IA P151</text:p>
          </table:table-cell>
          <table:table-cell table:style-name="ce148"/>
          <table:table-cell table:number-columns-repeated="1016"/>
        </table:table-row>
        <table:table-row table:style-name="ro16">
          <table:table-cell table:style-name="ce148" office:value-type="string" calcext:value-type="string">
            <text:p>命途的終點</text:p>
            <text:p>（命の終著）</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一次又一次的任務中被過度驅使，但即便如此仍然生存下來的FH之子的紋章。連連曆戰賦予了你從中生還的力量，但被過度壓榨的肉體也到達了崩潰邊緣</text:p>
          </table:table-cell>
          <table:table-cell table:style-name="ce151" office:value-type="string" calcext:value-type="string">
            <office:annotation draw:style-name="gr11" draw:text-style-name="P2" svg:width="327.26pt" svg:height="160.5pt" svg:x="1078.84pt" svg:y="2917.5pt" draw:caption-point-x="-11.54pt" draw:caption-point-y="-22.22pt">
              <dc:date>2026-04-24T00:00:00</dc:date>
              <text:p text:style-name="P1">反射</text:p>
              <text:p text:style-name="P1">最大等級：3</text:p>
              <text:p text:style-name="P1">時機：回應動作</text:p>
              <text:p text:style-name="P1">技能：癥狀</text:p>
              <text:p text:style-name="P1">難易度：-</text:p>
              <text:p text:style-name="P1">對象：自身</text:p>
              <text:p text:style-name="P1">射程：至近</text:p>
              <text:p text:style-name="P1">侵蝕值：2</text:p>
              <text:p text:style-name="P1">效果：組合的判定暴擊值-LV(下限值7)。</text:p>
              <text:p text:style-name="P1">======</text:p>
            </office:annotation>
            <text:p>取得時選擇一個你擁有的症候群，你獲得所選症候群的《戰鬥反射》LV3，但你的【最大HP】-20（最低1）。</text:p>
          </table:table-cell>
          <table:table-cell table:style-name="ce148" office:value-type="string" calcext:value-type="string">
            <text:p>IA P151</text:p>
          </table:table-cell>
          <table:table-cell table:style-name="ce148"/>
          <table:table-cell table:number-columns-repeated="1016"/>
        </table:table-row>
        <table:table-row table:style-name="ro16">
          <table:table-cell table:style-name="ce148" office:value-type="string" calcext:value-type="string">
            <text:p>生來的瘋狂</text:p>
            <text:p>（生來の狂気）</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是在與世間道德隔絕的環境下長大的紋章。正因如此，你的價值觀有著顯著的扭曲，與你話鋒相交者，想必會因你種種離譜的想法而感到戰慄吧</text:p>
          </table:table-cell>
          <table:table-cell table:style-name="ce151" office:value-type="string" calcext:value-type="string">
            <text:p>你進行的&lt;交涉&gt;判定，以及針對&lt;交涉&gt;判定進行的回應動作的達成值+10。但你進行的&lt;情報：流言&gt;判定必定失敗</text:p>
          </table:table-cell>
          <table:table-cell table:style-name="ce148" office:value-type="string" calcext:value-type="string">
            <text:p>IA P151</text:p>
          </table:table-cell>
          <table:table-cell table:style-name="ce148"/>
          <table:table-cell table:number-columns-repeated="1016"/>
        </table:table-row>
        <table:table-row table:style-name="ro16">
          <table:table-cell table:style-name="ce148" office:value-type="string" calcext:value-type="string">
            <text:p>陰晴不定</text:p>
            <text:p>（気まぐれ）</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的背教者病毒在隱藏著強大力量的同時，會隨著你的感情而產生顯著變化的紋章</text:p>
          </table:table-cell>
          <table:table-cell table:style-name="ce151" office:value-type="string" calcext:value-type="string">
            <text:p>當你的侵蝕率不足100%時，你進行的任何判定骰數-1個；侵蝕率達到100%以上時，你進行的任何判定骰數+3個</text:p>
          </table:table-cell>
          <table:table-cell table:style-name="ce148" office:value-type="string" calcext:value-type="string">
            <text:p>IA P151</text:p>
          </table:table-cell>
          <table:table-cell table:style-name="ce148"/>
          <table:table-cell table:number-columns-repeated="1016"/>
        </table:table-row>
        <table:table-row table:style-name="ro16">
          <table:table-cell table:style-name="ce148" office:value-type="string" calcext:value-type="string">
            <text:p>宿命之鞘</text:p>
            <text:p>（ヴォイドシース／宿命の鞘）</text:p>
          </table:table-cell>
          <table:table-cell table:style-name="ce93" office:value-type="string" calcext:value-type="string">
            <text:p>核心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你是作為宿命兵裝特別適合者被選上的孩子，不知是否是偶然，你在FH中被看做是特別戰鬥要員，又或者單純被視為死神</text:p>
          </table:table-cell>
          <table:table-cell table:style-name="ce151" office:value-type="string" calcext:value-type="string">
            <text:p>取得需要FH共通紋章“宿命兵裝”；你使用“宿命兵裝”指定的武器造成的傷害不會因為裝甲值和格擋值以外的其他效果減少</text:p>
          </table:table-cell>
          <table:table-cell table:style-name="ce148" office:value-type="string" calcext:value-type="string">
            <text:p>IA P15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抹消者</text:p>
            <text:p>（リセットメモリ／抹消者）</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你的背教者擁有能消除記憶的特異性質。雖然你在組織中受到厚待，但是所有接近你的人都不是心甘情願的</text:p>
          </table:table-cell>
          <table:table-cell table:style-name="ce151" office:value-type="string" calcext:value-type="string">
            <text:p>取得需要GM許可。你的攻擊造成至少1點HP傷害時，可以消去對象擁有的1個Lois、Titus或E-Lois，消去的資料在劇本結束前無法復原、無法使用，生效的效果立刻消失</text:p>
            <text:p>該效果1劇本可以使用1次</text:p>
          </table:table-cell>
          <table:table-cell table:style-name="ce148" office:value-type="string" calcext:value-type="string">
            <text:p>IA P15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加速的意志</text:p>
            <text:p>（アクセラレーテッド／加速する意志）</text:p>
          </table:table-cell>
          <table:table-cell table:style-name="ce93" office:value-type="string" calcext:value-type="string">
            <text:p>核心紋章/一般</text:p>
          </table:table-cell>
          <table:table-cell table:style-name="ce148" office:value-type="float" office:value="35" calcext:value-type="float">
            <text:p>35</text:p>
          </table:table-cell>
          <table:table-cell table:style-name="ce148" office:value-type="string" calcext:value-type="string">
            <text:p>1/劇本</text:p>
          </table:table-cell>
          <table:table-cell table:style-name="ce151" office:value-type="string" calcext:value-type="string">
            <text:p>你的體內埋入了神經加速裝置試作品，誰都不能啟動它，只有當你產生“想要跨越什麼”的意志時才會反應啟動</text:p>
          </table:table-cell>
          <table:table-cell table:style-name="ce151" office:value-type="string" calcext:value-type="string">
            <text:p>你昇華Titus時，作為原本昇華效果的替代，可以在先制階段進行一個主要階段；該主要階段即使是“已行動”狀態也可以行動，進行後也不會因此變為“已行動”狀態</text:p>
            <text:p>該效果1劇本可以使用1次</text:p>
          </table:table-cell>
          <table:table-cell table:style-name="ce148" office:value-type="string" calcext:value-type="string">
            <text:p>IA P151</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尊主特工 <text:s text:c="32"/>取得條件：職業為FH特工、FH單元隊長、FH之子，需征得GM同意</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百萬苦痛</text:p>
            <text:p>（ミリオンペイン）</text:p>
          </table:table-cell>
          <table:table-cell table:style-name="ce93" office:value-type="string" calcext:value-type="string">
            <text:p>紋章/近戰</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一擊便能擊退一支軍隊的超規格巨槍。只有尊主特工才會被允許觸碰的，可謂是對軍存在的武器</text:p>
          </table:table-cell>
          <table:table-cell table:style-name="ce151" office:value-type="string" calcext:value-type="string">
            <text:p>技能：&lt;近戰&gt;   命中：-3   攻擊力：24   格擋值：12   射程：至近</text:p>
            <text:p>每當你使用該武器進行攻擊或格擋時，你的侵蝕率+3</text:p>
            <text:p>雙手持握</text:p>
          </table:table-cell>
          <table:table-cell table:style-name="ce148" office:value-type="string" calcext:value-type="string">
            <text:p>IA P152</text:p>
          </table:table-cell>
          <table:table-cell table:style-name="ce148"/>
          <table:table-cell table:number-columns-repeated="1016"/>
        </table:table-row>
        <table:table-row table:style-name="ro16">
          <table:table-cell table:style-name="ce148" office:value-type="string" calcext:value-type="string">
            <text:p>亡靈之禦印</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被考德威爾博士認可的存在的證明。但這證明本身並沒有什麼效果，不隨身攜帶者亦不在少數。</text:p>
          </table:table-cell>
          <table:table-cell table:style-name="ce151" office:value-type="string" calcext:value-type="string">
            <text:p>從你取得的「限制：-」異能中選擇一個，該異能的LV和最大LV各+1</text:p>
          </table:table-cell>
          <table:table-cell table:style-name="ce148" office:value-type="string" calcext:value-type="string">
            <text:p>IA P152</text:p>
          </table:table-cell>
          <table:table-cell table:style-name="ce148"/>
          <table:table-cell table:number-columns-repeated="1016"/>
        </table:table-row>
        <table:table-row table:style-name="ro16">
          <table:table-cell table:style-name="ce148" office:value-type="string" calcext:value-type="string">
            <text:p>最強的一振</text:p>
            <text:p>（最強の一振り）</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對特定武器極為擅長，在使用這類武器一事上無人能出你左右，通常來說，你的代號將會冠以該武器之名。</text:p>
          </table:table-cell>
          <table:table-cell table:style-name="ce151" office:value-type="string" calcext:value-type="string">
            <office:annotation draw:style-name="gr12" draw:text-style-name="P2" svg:width="327.26pt" svg:height="85.49pt" svg:x="1078.84pt" svg:y="3052.49pt" draw:caption-point-x="-11.54pt" draw:caption-point-y="-22.22pt">
              <dc:date>2026-04-24T00:00:00</dc:date>
              <text:p text:style-name="P1">官方FAQ：</text:p>
              <text:p text:style-name="P1">Q：裝備了多把“紋章：最強的一振”所選擇的武器時，武器的攻擊力應當如何計算？</text:p>
              <text:p text:style-name="P1">A：請對裝備中的所有武器都進行攻擊力修正</text:p>
              <text:p text:style-name="P1">注：神腦的覆數武器和可變武器所使用的武器均視為裝備</text:p>
              <text:p text:style-name="P1">======</text:p>
            </office:annotation>
            <text:p>從武器中選擇一種，你使用所選的武器進行攻擊時，該武器的攻擊力+5；無論目前已經取得的、沒有取得的，或以異能製作的武器，皆可作為該效果的選擇</text:p>
          </table:table-cell>
          <table:table-cell table:style-name="ce148" office:value-type="string" calcext:value-type="string">
            <text:p>IA P152</text:p>
          </table:table-cell>
          <table:table-cell table:style-name="ce148"/>
          <table:table-cell table:number-columns-repeated="1016"/>
        </table:table-row>
        <table:table-row table:style-name="ro16">
          <table:table-cell table:style-name="ce148" office:value-type="string" calcext:value-type="string">
            <text:p>畏怖</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主要階段</text:p>
          </table:table-cell>
          <table:table-cell table:style-name="ce151" office:value-type="string" calcext:value-type="string">
            <text:p>表示你周圍的人因你的個人魅力而服從於你。通常來說，你的代號將會與恐懼、絕望等負面感情有所關聯。</text:p>
          </table:table-cell>
          <table:table-cell table:style-name="ce151" office:value-type="string" calcext:value-type="string">
            <text:p>其他角色為針對你的攻擊進行掩護時使用；該角色不會因執行掩護而變為“已行動”，但使用該效果時，你的侵蝕率+3</text:p>
            <text:p>該效果一主要階段可以使用1次</text:p>
          </table:table-cell>
          <table:table-cell table:style-name="ce148" office:value-type="string" calcext:value-type="string">
            <text:p>IA P152</text:p>
          </table:table-cell>
          <table:table-cell table:style-name="ce148"/>
          <table:table-cell table:number-columns-repeated="1016"/>
        </table:table-row>
        <table:table-row table:style-name="ro16">
          <table:table-cell table:style-name="ce148" office:value-type="string" calcext:value-type="string">
            <text:p>蹂躪者</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歷來將膽敢擋在你面前的大小妨礙全數踏碎。通常來說，你的代號會是與死亡有關的名號</text:p>
          </table:table-cell>
          <table:table-cell table:style-name="ce151" office:value-type="string" calcext:value-type="string">
            <text:p>你進行的「對象：單體」以外的攻擊，傷害+1D10；攻擊的對象進行格擋時，額外再對其附加[異常狀態：恍惚]</text:p>
          </table:table-cell>
          <table:table-cell table:style-name="ce148" office:value-type="string" calcext:value-type="string">
            <text:p>IA P152</text:p>
          </table:table-cell>
          <table:table-cell table:style-name="ce148"/>
          <table:table-cell table:number-columns-repeated="1016"/>
        </table:table-row>
        <table:table-row table:style-name="ro16">
          <table:table-cell table:style-name="ce148" office:value-type="string" calcext:value-type="string">
            <text:p>破壞的權化</text:p>
            <text:p>（ストームルーラー／破壊の権化）</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磨煉出的異能的破壞力巨大，你的代號會是與你的攻擊手段相關的名號</text:p>
          </table:table-cell>
          <table:table-cell table:style-name="ce151" office:value-type="string" calcext:value-type="string">
            <text:p>你進行的攻擊，攻擊力+[組合的異能數×2]（最大+10）</text:p>
          </table:table-cell>
          <table:table-cell table:style-name="ce148" office:value-type="string" calcext:value-type="string">
            <text:p>IA P15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沉眠之獅</text:p>
            <text:p>（眠れる獅子）</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的實力並不能立即發揮，而是花上一段時間來慢慢將獵物逼上絕路。通常來說，你的代號將會冠以動物，尤其是猛獸之名</text:p>
          </table:table-cell>
          <table:table-cell table:style-name="ce151" office:value-type="string" calcext:value-type="string">
            <text:p>從回合進行的第二回合開始，你進行的任何判定骰數+3個</text:p>
          </table:table-cell>
          <table:table-cell table:style-name="ce148" office:value-type="string" calcext:value-type="string">
            <text:p>IA P152</text:p>
          </table:table-cell>
          <table:table-cell table:style-name="ce148"/>
          <table:table-cell table:number-columns-repeated="1016"/>
        </table:table-row>
        <table:table-row table:style-name="ro16">
          <table:table-cell table:style-name="ce148" office:value-type="string" calcext:value-type="string">
            <text:p>決鬥者</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渴求令你血脈賁張驚心動魄之戰的紋章。通常來說，你的代號將會使與戰鬥有關的名號。</text:p>
          </table:table-cell>
          <table:table-cell table:style-name="ce151" office:value-type="string" calcext:value-type="string">
            <text:p>任何時候均可使用，從場景中登場了的角色中選擇一個，該場景間，你與選擇的角色進行對決時，判定骰數+5個，但是除此以外的判定，骰子數-2個</text:p>
            <text:p>該效果1劇本可以使用1次</text:p>
          </table:table-cell>
          <table:table-cell table:style-name="ce148" office:value-type="string" calcext:value-type="string">
            <text:p>IA P152</text:p>
          </table:table-cell>
          <table:table-cell table:style-name="ce148"/>
          <table:table-cell table:number-columns-repeated="1016"/>
        </table:table-row>
        <table:table-row table:style-name="ro16">
          <table:table-cell table:style-name="ce148" office:value-type="string" calcext:value-type="string">
            <text:p>走破者</text:p>
            <text:p>（ブラックアウト／走破者）</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劇本</text:p>
          </table:table-cell>
          <table:table-cell table:style-name="ce151" office:value-type="string" calcext:value-type="string">
            <text:p>你捨棄一切只追求速度，甚至能夠超越極限，你的代號會是與速度相關的名號</text:p>
          </table:table-cell>
          <table:table-cell table:style-name="ce151" office:value-type="string" calcext:value-type="string">
            <text:p>你處於“未行動”狀態的先制階段使用；你受到[異常狀態：暴走]，並進行主要階段</text:p>
            <text:p>該效果1劇本可以使用1次</text:p>
          </table:table-cell>
          <table:table-cell table:style-name="ce148" office:value-type="string" calcext:value-type="string">
            <text:p>IA P15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無形威脅</text:p>
            <text:p>（ボイゾナス／見えざる脅威）</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1/劇本</text:p>
          </table:table-cell>
          <table:table-cell table:style-name="ce151" office:value-type="string" calcext:value-type="string">
            <text:p>你擅長使用直接動武以外的方式追擊、排除敵人的戰術，你的代號會是與毒相關的名號</text:p>
          </table:table-cell>
          <table:table-cell table:style-name="ce151" office:value-type="string" calcext:value-type="string">
            <text:p>選擇場景中登場的一名角色，該劇本間，該角色受到的傷害+5</text:p>
            <text:p>該效果1劇本可以使用1次</text:p>
          </table:table-cell>
          <table:table-cell table:style-name="ce148" office:value-type="string" calcext:value-type="string">
            <text:p>IA P15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不破者</text:p>
            <text:p>（インヴィンシブル／破れざる者）</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持有強大的強韌力的紋章，你的代號會是與山或船等巨大之物相關的名號</text:p>
          </table:table-cell>
          <table:table-cell table:style-name="ce151" office:value-type="string" calcext:value-type="string">
            <text:p>你的HP最大值+20</text:p>
          </table:table-cell>
          <table:table-cell table:style-name="ce148" office:value-type="string" calcext:value-type="string">
            <text:p>IA P15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瘋狂的行徑</text:p>
            <text:p>（狂気の沙汰）</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瀕臨失去自我的危險水域，那才是你真正的根據地。你輕鬆的踏上這界限點，立於極限的邊緣之上，抑或是已然跨過也說不定。通常來說，你的代號將會是以惡魔和怪物為原型的名號</text:p>
          </table:table-cell>
          <table:table-cell table:style-name="ce151" office:value-type="string" calcext:value-type="string">
            <text:p>你使用「侵蝕值：4D10」的異能時，該場景間，你進行的任何判定的達成值+5，你所受的任何傷害-10（最低0）</text:p>
          </table:table-cell>
          <table:table-cell table:style-name="ce148" office:value-type="string" calcext:value-type="string">
            <text:p>IA P153</text:p>
          </table:table-cell>
          <table:table-cell table:style-name="ce148"/>
          <table:table-cell table:number-columns-repeated="1016"/>
        </table:table-row>
        <table:table-row table:style-name="ro16">
          <table:table-cell table:style-name="ce148" office:value-type="string" calcext:value-type="string">
            <text:p>挑戰者</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你的背教者病毒會因為與更加強大的背教者對峙而活性化。無論是對上何等強大的背教者，你都能做到與其進行對等的交鋒。通常來說，你的代號將會是以某種傳說為原型的名號</text:p>
          </table:table-cell>
          <table:table-cell table:style-name="ce151" office:value-type="string" calcext:value-type="string">
            <text:p>你所攻擊的對象有著比你更高的侵蝕率時，攻擊力+10</text:p>
          </table:table-cell>
          <table:table-cell table:style-name="ce148" office:value-type="string" calcext:value-type="string">
            <text:p>IA P153</text:p>
          </table:table-cell>
          <table:table-cell table:style-name="ce148"/>
          <table:table-cell table:number-columns-repeated="1016"/>
        </table:table-row>
        <table:table-row table:style-name="ro16">
          <table:table-cell table:style-name="ce148" office:value-type="string" calcext:value-type="string">
            <text:p>力之證</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FH之中有著冠上尊主特工名號的道具，那正是作為尊主特工的證明，為了爭奪其所有權，FH內部進行了無數的浴血鬥爭，你手中所擁有的，正是此物</text:p>
          </table:table-cell>
          <table:table-cell table:style-name="ce151" office:value-type="string" calcext:value-type="string">
            <text:p>導入階段選擇一個耗費常備化點數50點以下的FH專用道具；你可以免費取得該道具。該道具無法常備化，且會在劇本結束時失去</text:p>
          </table:table-cell>
          <table:table-cell table:style-name="ce148" office:value-type="string" calcext:value-type="string">
            <text:p>IA P153</text:p>
          </table:table-cell>
          <table:table-cell table:style-name="ce148"/>
          <table:table-cell table:number-columns-repeated="1016"/>
        </table:table-row>
        <table:table-row table:style-name="ro16">
          <table:table-cell table:style-name="ce148" office:value-type="string" calcext:value-type="string">
            <text:p>打破者</text:p>
            <text:p>（ニゲイター／打破する者）</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擁有抗爭世界律法之理並將其打破的紋章，你將國家或已有概念等被唾棄的已成自然之物破壞掉，但如今世上依然有需要破壞之物，你的代號會是使人想起破壞或毀滅之物的名號</text:p>
          </table:table-cell>
          <table:table-cell table:style-name="ce151" office:value-type="string" calcext:value-type="string">
            <text:p>任何時候你都可以指定一件想要破壞的東西為對象，該劇本間你對該對象進行攻擊的傷害+3D10</text:p>
            <text:p>該效果1劇本可以使用1次</text:p>
          </table:table-cell>
          <table:table-cell table:style-name="ce148" office:value-type="string" calcext:value-type="string">
            <text:p>IA P15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災厄使者</text:p>
            <text:p>（ドゥームブリンガー／厄災の遣い）</text:p>
          </table:table-cell>
          <table:table-cell table:style-name="ce93" office:value-type="string" calcext:value-type="string">
            <text:p>核心紋章/一般</text:p>
          </table:table-cell>
          <table:table-cell table:style-name="ce148" office:value-type="float" office:value="50" calcext:value-type="float">
            <text:p>50</text:p>
          </table:table-cell>
          <table:table-cell table:style-name="ce148" office:value-type="string" calcext:value-type="string">
            <text:p>1/劇本</text:p>
          </table:table-cell>
          <table:table-cell table:style-name="ce151" office:value-type="string" calcext:value-type="string">
            <text:p>表示你是能將非常大範圍記憶體在的人類進行破壞、殺傷或無力化的存在的紋章，其存在方式在FH中也受到戒備，你的代號冠以神明之類的名號</text:p>
          </table:table-cell>
          <table:table-cell table:style-name="ce151" office:value-type="string" calcext:value-type="string">
            <text:p>主要動作使用，使該場景中登場的團體及臨時演員陷入[戰鬥不能]狀態或[死亡]，該效果的範圍由GM決定</text:p>
            <text:p>該效果1劇本可以使用1次</text:p>
          </table:table-cell>
          <table:table-cell table:style-name="ce148" office:value-type="string" calcext:value-type="string">
            <text:p>IA P15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君臨者</text:p>
            <text:p>（レイナー／君臨者）</text:p>
          </table:table-cell>
          <table:table-cell table:style-name="ce93" office:value-type="string" calcext:value-type="string">
            <text:p>核心紋章/一般</text:p>
          </table:table-cell>
          <table:table-cell table:style-name="ce148" office:value-type="float" office:value="80" calcext:value-type="float">
            <text:p>80</text:p>
          </table:table-cell>
          <table:table-cell table:style-name="ce148" office:value-type="string" calcext:value-type="string">
            <text:p>1/劇本</text:p>
          </table:table-cell>
          <table:table-cell table:style-name="ce151" office:value-type="string" calcext:value-type="string">
            <text:p>表示你統治著非常多的部下、多個單元、社會集團或國家的紋章，只要你想，你的願望基本都能實現。你的代號與王或為政者相關</text:p>
          </table:table-cell>
          <table:table-cell table:style-name="ce151" office:value-type="string" calcext:value-type="string">
            <text:p>主要動作使用，你動員部下為你實現一個願望，能實現到什麼程度由GM決定</text:p>
            <text:p>該效果1劇本可以使用1次</text:p>
          </table:table-cell>
          <table:table-cell table:style-name="ce148" office:value-type="string" calcext:value-type="string">
            <text:p>IA P153</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聯絡特工 <text:s text:c="32"/>取得條件：職業為FH特工、FH單元隊長、FH之子，需征得GM同意</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可怖之物</text:p>
            <text:p>（テリブルワン）</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因為存在感或是背教者病毒，你身上時常纏繞對他人產生威壓的氣場；即便不是聯絡特工，其他人也能理解其強弱差距</text:p>
          </table:table-cell>
          <table:table-cell table:style-name="ce151" office:value-type="string" calcext:value-type="string">
            <text:p>其他角色以包含你在內作為對象進行的判定時，骰子數-2個</text:p>
          </table:table-cell>
          <table:table-cell table:style-name="ce148" office:value-type="string" calcext:value-type="string">
            <text:p>IA P15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固態資金</text:p>
            <text:p>（ソリッドキャッシュ）</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1/劇本</text:p>
          </table:table-cell>
          <table:table-cell table:style-name="ce151" office:value-type="string" calcext:value-type="string">
            <text:p>表示你準備了大量能在任何時候自由換成現金的現金資料的紋章</text:p>
          </table:table-cell>
          <table:table-cell table:style-name="ce151" office:value-type="string" calcext:value-type="string">
            <text:p>任何時候都可以使用，你取得3個“信用資料”，該效果取得的道具可以交給其他人使用</text:p>
            <text:p>該效果1劇本可以使用1次</text:p>
          </table:table-cell>
          <table:table-cell table:style-name="ce148" office:value-type="string" calcext:value-type="string">
            <text:p>IA P15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府庫之主</text:p>
            <text:p>（ヴォールトキーパ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有著集中管理多個單元的研究成果和技術的許可權</text:p>
          </table:table-cell>
          <table:table-cell table:style-name="ce151" office:value-type="string" calcext:value-type="string">
            <text:p>取得時選擇一個聯絡特工以外的，必要經驗點在30以下的FH紋章，你可以免費取得該紋章。所選的紋章可在導入階段進行變更</text:p>
          </table:table-cell>
          <table:table-cell table:style-name="ce148" office:value-type="string" calcext:value-type="string">
            <text:p>IA P154</text:p>
          </table:table-cell>
          <table:table-cell table:style-name="ce148"/>
          <table:table-cell table:number-columns-repeated="1016"/>
        </table:table-row>
        <table:table-row table:style-name="ro16">
          <table:table-cell table:style-name="ce148" office:value-type="string" calcext:value-type="string">
            <text:p>嗜戰怪人</text:p>
            <text:p>（コンバットフリーク）</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是開墾了無數屍田的、純粹的戰鬥狂。你只能從生命暴露在危險之下的地方感受到活著的實感</text:p>
          </table:table-cell>
          <table:table-cell table:style-name="ce151" office:value-type="string" calcext:value-type="string">
            <text:p>你的HP在[【肉體】+10]點以下期間，你所進行的攻擊判定和閃避判定，骰子數+5個</text:p>
          </table:table-cell>
          <table:table-cell table:style-name="ce148" office:value-type="string" calcext:value-type="string">
            <text:p>IA P154</text:p>
          </table:table-cell>
          <table:table-cell table:style-name="ce148"/>
          <table:table-cell table:number-columns-repeated="1016"/>
        </table:table-row>
        <table:table-row table:style-name="ro16">
          <table:table-cell table:style-name="ce148" office:value-type="string" calcext:value-type="string">
            <text:p>瘟疫</text:p>
            <text:p>（プレイグ）</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場景</text:p>
          </table:table-cell>
          <table:table-cell table:style-name="ce151" office:value-type="string" calcext:value-type="string">
            <text:p>你身負著有極強毒性的背教者病毒，走到哪裡都會產生大量的死亡正是你的經歷</text:p>
          </table:table-cell>
          <table:table-cell table:style-name="ce151" office:value-type="string" calcext:value-type="string">
            <text:p>與《結界化》同時使用；該場景中登場的，除你以外的所有其他角色受到[異常狀態：邪毒]，其等級為LV3。臨時角色受到該道具的效果影響時會發生什麼由GM決定</text:p>
            <text:p>該效果1場景可以使用1次</text:p>
          </table:table-cell>
          <table:table-cell table:style-name="ce148" office:value-type="string" calcext:value-type="string">
            <text:p>IA P154</text:p>
          </table:table-cell>
          <table:table-cell table:style-name="ce148"/>
          <table:table-cell table:number-columns-repeated="1016"/>
        </table:table-row>
        <table:table-row table:style-name="ro16">
          <table:table-cell table:style-name="ce148" office:value-type="string" calcext:value-type="string">
            <text:p>瘋狂科學家</text:p>
            <text:p>（マッドサイエンティスト）</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推行著使人超越者化的實驗一事</text:p>
          </table:table-cell>
          <table:table-cell table:style-name="ce151" office:value-type="string" calcext:value-type="string">
            <text:p>準備階段使用，從『規則書2』P264或『上級規則』P143的「原菌：●●」系敵人中選擇一個；該原菌會在你的接戰區域登場。該原菌會聽從你的命令，並由你為其進行判定擲骰；但該原菌會在場景結束時消失</text:p>
            <text:p>該效果1劇本可以使用1次</text:p>
          </table:table-cell>
          <table:table-cell table:style-name="ce148" office:value-type="string" calcext:value-type="string">
            <text:p>IA P154</text:p>
          </table:table-cell>
          <table:table-cell table:style-name="ce148"/>
          <table:table-cell table:number-columns-repeated="1016"/>
        </table:table-row>
        <table:table-row table:style-name="ro16">
          <table:table-cell table:style-name="ce148" office:value-type="string" calcext:value-type="string">
            <text:p>稀有種</text:p>
            <text:p>（レアスピーシズ）</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持有的背教者十分稀有，且有著侵蝕並干涉其他人的背教者的特性。此外，你也持有著為了抑制這份危險性而準備的拘束具</text:p>
          </table:table-cell>
          <table:table-cell table:style-name="ce151" office:value-type="string" calcext:value-type="string">
            <text:p>準備階段使用，該回合間，場景中的任意角色以主要動作進行的判定，骰子數-4個</text:p>
          </table:table-cell>
          <table:table-cell table:style-name="ce148" office:value-type="string" calcext:value-type="string">
            <text:p>IA P154</text:p>
          </table:table-cell>
          <table:table-cell table:style-name="ce148"/>
          <table:table-cell table:number-columns-repeated="1016"/>
        </table:table-row>
        <table:table-row table:style-name="ro16">
          <table:table-cell table:style-name="ce148" office:value-type="string" calcext:value-type="string">
            <text:p>古秘藏家</text:p>
            <text:p>（エンシェントキーパー）</text:p>
          </table:table-cell>
          <table:table-cell table:style-name="ce93" office:value-type="string" calcext:value-type="string">
            <text:p>紋章/一般</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表示你秘藏著被封印的遺產兵器。理所當然的，你可以無需經過任何人許可的自由使用這份遺產。</text:p>
          </table:table-cell>
          <table:table-cell table:style-name="ce151" office:value-type="string" calcext:value-type="string">
            <text:p>取得時從任意症候群的「限制：120%」異能中選擇一個，以LV1免費取得，可以使用經驗點提升該異能的等級。此外，該異能的最大等級不受你的血統影響，固定為異能本身記述的最大等級</text:p>
          </table:table-cell>
          <table:table-cell table:style-name="ce148" office:value-type="string" calcext:value-type="string">
            <text:p>IA P154</text:p>
          </table:table-cell>
          <table:table-cell table:style-name="ce148"/>
          <table:table-cell table:number-columns-repeated="1016"/>
        </table:table-row>
        <table:table-row table:style-name="ro16">
          <table:table-cell table:style-name="ce148" office:value-type="string" calcext:value-type="string">
            <text:p>公眾危機</text:p>
            <text:p>（パブリックハザード）</text:p>
          </table:table-cell>
          <table:table-cell table:style-name="ce93" office:value-type="string" calcext:value-type="string">
            <text:p>紋章/一般</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你被UGN視為災難級危險特工，你會將前路上的一切破壞殆盡</text:p>
          </table:table-cell>
          <table:table-cell table:style-name="ce151" office:value-type="string" calcext:value-type="string">
            <text:p>取得時選擇一項敵人專用異能取得LV1並變為[侵蝕值：4D10]，該異能不能是[時機：常時]也不能使用經驗值成長；GM可以指定取得或消除該敵人專用異能</text:p>
          </table:table-cell>
          <table:table-cell table:style-name="ce148" office:value-type="string" calcext:value-type="string">
            <text:p>IA P15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不容觸碰</text:p>
            <text:p>（アンタッチャブル）</text:p>
          </table:table-cell>
          <table:table-cell table:style-name="ce93" office:value-type="string" calcext:value-type="string">
            <text:p>紋章/一般</text:p>
          </table:table-cell>
          <table:table-cell table:style-name="ce148" office:value-type="float" office:value="60" calcext:value-type="float">
            <text:p>60</text:p>
          </table:table-cell>
          <table:table-cell table:style-name="ce148" office:value-type="string" calcext:value-type="string">
            <text:p>-</text:p>
          </table:table-cell>
          <table:table-cell table:style-name="ce151" office:value-type="string" calcext:value-type="string">
            <text:p>表示你持有著誰人都難以靠近的壓迫感。若沒有極強的決意，僅僅是靠近你都是一大難事</text:p>
          </table:table-cell>
          <table:table-cell table:style-name="ce151" office:value-type="string" calcext:value-type="string">
            <text:p>你所在的接戰區域內無法以戰鬥移動來進行移動</text:p>
          </table:table-cell>
          <table:table-cell table:style-name="ce148" office:value-type="string" calcext:value-type="string">
            <text:p>IA P155</text:p>
          </table:table-cell>
          <table:table-cell table:style-name="ce148"/>
          <table:table-cell table:number-columns-repeated="1016"/>
        </table:table-row>
        <table:table-row table:style-name="ro16">
          <table:table-cell table:style-name="ce148" office:value-type="string" calcext:value-type="string">
            <text:p>聖威</text:p>
            <text:p>（セイクリッド）</text:p>
          </table:table-cell>
          <table:table-cell table:style-name="ce93" office:value-type="string" calcext:value-type="string">
            <text:p>紋章/一般</text:p>
          </table:table-cell>
          <table:table-cell table:style-name="ce148" office:value-type="float" office:value="60" calcext:value-type="float">
            <text:p>60</text:p>
          </table:table-cell>
          <table:table-cell table:style-name="ce148" office:value-type="string" calcext:value-type="string">
            <text:p>1/場景</text:p>
          </table:table-cell>
          <table:table-cell table:style-name="ce151" office:value-type="string" calcext:value-type="string">
            <text:p>你有著讓其他背教者屈服的力量，即使是原菌，在這份力量面前也唯有跪倒</text:p>
          </table:table-cell>
          <table:table-cell table:style-name="ce151" office:value-type="string" calcext:value-type="string">
            <text:p>其他角色組合了異能進行的判定之前使用，該判定的骰子數-10個</text:p>
            <text:p>該效果1場景可以使用1次</text:p>
          </table:table-cell>
          <table:table-cell table:style-name="ce148" office:value-type="string" calcext:value-type="string">
            <text:p>IA P155</text:p>
          </table:table-cell>
          <table:table-cell table:style-name="ce148"/>
          <table:table-cell table:number-columns-repeated="1016"/>
        </table:table-row>
        <table:table-row table:style-name="ro16">
          <table:table-cell table:style-name="ce148" office:value-type="string" calcext:value-type="string">
            <text:p>天使</text:p>
            <text:p>（エンジェル）</text:p>
          </table:table-cell>
          <table:table-cell table:style-name="ce93" office:value-type="string" calcext:value-type="string">
            <text:p>紋章/一般</text:p>
          </table:table-cell>
          <table:table-cell table:style-name="ce148" office:value-type="float" office:value="100" calcext:value-type="float">
            <text:p>100</text:p>
          </table:table-cell>
          <table:table-cell table:style-name="ce148" office:value-type="string" calcext:value-type="string">
            <text:p>-</text:p>
          </table:table-cell>
          <table:table-cell table:style-name="ce151" office:value-type="string" calcext:value-type="string">
            <text:p>你生來便是壓倒性的存在，抑或是某種妄執使你超越了人和超越者</text:p>
          </table:table-cell>
          <table:table-cell table:style-name="ce151" office:value-type="string" calcext:value-type="string">
            <text:p>取得時從你擁有的、有使用次數限制的D-lois、E-lois抑或是異能中選擇一個，所選的D-lois或異能的使用次數+1</text:p>
          </table:table-cell>
          <table:table-cell table:style-name="ce148" office:value-type="string" calcext:value-type="string">
            <text:p>IA P155</text:p>
          </table:table-cell>
          <table:table-cell table:style-name="ce148"/>
          <table:table-cell table:number-columns-repeated="1016"/>
        </table:table-row>
        <table:table-row table:style-name="ro16">
          <table:table-cell table:style-name="ce148" office:value-type="string" calcext:value-type="string">
            <text:p>結界妨礙</text:p>
            <text:p>（ワーディングジャマー）</text:p>
          </table:table-cell>
          <table:table-cell table:style-name="ce93" office:value-type="string" calcext:value-type="string">
            <text:p>紋章/一般</text:p>
          </table:table-cell>
          <table:table-cell table:style-name="ce148" office:value-type="float" office:value="100" calcext:value-type="float">
            <text:p>100</text:p>
          </table:table-cell>
          <table:table-cell table:style-name="ce148" office:value-type="string" calcext:value-type="string">
            <text:p>1/劇本</text:p>
          </table:table-cell>
          <table:table-cell table:style-name="ce151" office:value-type="string" calcext:value-type="string">
            <text:p>使用特殊藥品或裝置，可以妨礙大範圍內的結界化效果</text:p>
          </table:table-cell>
          <table:table-cell table:style-name="ce151" office:value-type="string" calcext:value-type="string">
            <text:p>先制階段使用，該場景間場景內的所有角色取得異能《AWF》，該效果會引起什麼後果由GM決定</text:p>
            <text:p>該效果1劇本可以使用1次</text:p>
          </table:table-cell>
          <table:table-cell table:style-name="ce148" office:value-type="string" calcext:value-type="string">
            <text:p>IA P15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敢死隊</text:p>
            <text:p>（コープス）</text:p>
          </table:table-cell>
          <table:table-cell table:style-name="ce93" office:value-type="string" calcext:value-type="string">
            <text:p>紋章/消耗品</text:p>
          </table:table-cell>
          <table:table-cell table:style-name="ce148" office:value-type="float" office:value="60" calcext:value-type="float">
            <text:p>60</text:p>
          </table:table-cell>
          <table:table-cell table:style-name="ce148" office:value-type="string" calcext:value-type="string">
            <text:p>-</text:p>
          </table:table-cell>
          <table:table-cell table:style-name="ce151" office:value-type="string" calcext:value-type="string">
            <text:p>對你絕對盡忠，面對你下的命令連眉頭都不皺一下慷慨赴死的消耗品部隊</text:p>
          </table:table-cell>
          <table:table-cell table:style-name="ce151" office:value-type="string" calcext:value-type="string">
            <text:p>準備階段使用，對場景內的任意角色造成4D10點HP傷害</text:p>
          </table:table-cell>
          <table:table-cell table:style-name="ce148" office:value-type="string" calcext:value-type="string">
            <text:p>IA P155</text:p>
          </table:table-cell>
          <table:table-cell table:style-name="ce148"/>
          <table:table-cell table:number-columns-repeated="1016"/>
        </table:table-row>
        <table:table-row table:style-name="ro16">
          <table:table-cell table:style-name="ce148" office:value-type="string" calcext:value-type="string">
            <text:p>聯絡之力</text:p>
            <text:p>（パワーオブリエゾン）</text:p>
          </table:table-cell>
          <table:table-cell table:style-name="ce93" office:value-type="string" calcext:value-type="string">
            <text:p>核心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處於可以利用大量FH特工之力的立場的紋章</text:p>
          </table:table-cell>
          <table:table-cell table:style-name="ce151" office:value-type="string" calcext:value-type="string">
            <text:p>該道具最多可取得至3個，不包含在已取得的核心紋章數量中；取得時，你從其他FH紋章中選擇一項取得；取得的紋章無需滿足其本職條件，取得所需的經驗點需要另外消耗</text:p>
          </table:table-cell>
          <table:table-cell table:style-name="ce148" office:value-type="string" calcext:value-type="string">
            <text:p>IA P15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不滅</text:p>
            <text:p>（アンダイイング）</text:p>
          </table:table-cell>
          <table:table-cell table:style-name="ce93" office:value-type="string" calcext:value-type="string">
            <text:p>核心紋章/一般</text:p>
          </table:table-cell>
          <table:table-cell table:style-name="ce148" office:value-type="float" office:value="250" calcext:value-type="float">
            <text:p>250</text:p>
          </table:table-cell>
          <table:table-cell table:style-name="ce148" office:value-type="string" calcext:value-type="string">
            <text:p>-</text:p>
          </table:table-cell>
          <table:table-cell table:style-name="ce151" office:value-type="string" calcext:value-type="string">
            <text:p>表示你是12名聯絡卿中的一人、也是無法被毀滅的存在的紋章。“成為聯絡卿的一柱”值得大書特書的，可並非只有不死不滅這一點</text:p>
          </table:table-cell>
          <table:table-cell table:style-name="ce151" office:value-type="string" calcext:value-type="string">
            <text:p>該道具只有原菌可以取得，不包含在已取得的核心紋章數量中；你陷入戰鬥不能狀態時使用，從戰鬥不能狀態回復並從場景中退場；GM可以任意設定打倒你的手段</text:p>
          </table:table-cell>
          <table:table-cell table:style-name="ce148" office:value-type="string" calcext:value-type="string">
            <text:p>IA P15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氏族卿</text:p>
            <text:p>（クランロード）</text:p>
          </table:table-cell>
          <table:table-cell table:style-name="ce93" office:value-type="string" calcext:value-type="string">
            <text:p>核心紋章/一般</text:p>
          </table:table-cell>
          <table:table-cell table:style-name="ce148" office:value-type="float" office:value="300" calcext:value-type="float">
            <text:p>300</text:p>
          </table:table-cell>
          <table:table-cell table:style-name="ce148" office:value-type="string" calcext:value-type="string">
            <text:p>-</text:p>
          </table:table-cell>
          <table:table-cell table:style-name="ce151" office:value-type="string" calcext:value-type="string">
            <text:p>表示你作為聯絡卿率領著自己的氏族，氏族中的每名成員都是一騎當千的超越者，無視他們直接討伐你是不可能的</text:p>
          </table:table-cell>
          <table:table-cell table:style-name="ce151" office:value-type="string" calcext:value-type="string">
            <text:p>該紋章不包含在已取得的核心紋章數量中；取得時，你決定屬於你氏族的角色；屬於你氏族的角色存在期間，你受到的傷害-50；其他氏族的角色能夠做到何種地步，由GM決定</text:p>
          </table:table-cell>
          <table:table-cell table:style-name="ce148" office:value-type="string" calcext:value-type="string">
            <text:p>IA P155</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FH法外者 <text:s text:c="30"/>取得條件：沒有取得FH通用以外紋章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FH外來者</text:p>
            <text:p>（FHフォリナ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在不知道FH的存在或是沒有被告知就為其作惡的紋章，也可能你自己選擇不去正視現實</text:p>
          </table:table-cell>
          <table:table-cell table:style-name="ce151" office:value-type="string" calcext:value-type="string">
            <text:p>你進行的【社會】判定骰數+1個，你進行的&lt;情報：UGN&gt;和&lt;情報：FH&gt;判定達成值-2</text:p>
          </table:table-cell>
          <table:table-cell table:style-name="ce148" office:value-type="string" calcext:value-type="string">
            <text:p>IA P15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FH信使</text:p>
            <text:p>（ＦＨメッセンジャ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不知不覺出現在你面前，僅單方面傳達必要的情報和指令，爾後又揚長而去的FH聯絡役</text:p>
          </table:table-cell>
          <table:table-cell table:style-name="ce151" office:value-type="string" calcext:value-type="string">
            <text:p>你進行的&lt;情報：FH&gt;和&lt;情報：黑社會&gt;判定的骰子數+3個</text:p>
          </table:table-cell>
          <table:table-cell table:style-name="ce148" office:value-type="string" calcext:value-type="string">
            <text:p>IA P156</text:p>
          </table:table-cell>
          <table:table-cell table:style-name="ce148"/>
          <table:table-cell table:number-columns-repeated="1016"/>
        </table:table-row>
        <table:table-row table:style-name="ro16">
          <table:table-cell table:style-name="ce148" office:value-type="string" calcext:value-type="string">
            <text:p>另一副面孔</text:p>
            <text:p>（アナザーフェイス）</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有著作為FH協助者和並非如此的兩幅面孔的紋章</text:p>
          </table:table-cell>
          <table:table-cell table:style-name="ce151" office:value-type="string" calcext:value-type="string">
            <text:p>取得時從自由人紋章中選擇一項取得，取得所需的經驗點需要另外消耗</text:p>
          </table:table-cell>
          <table:table-cell table:style-name="ce148" office:value-type="string" calcext:value-type="string">
            <text:p>IA P15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食腐者</text:p>
            <text:p>（死體漁り）</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從FH的監視者那裡得到了某種“出讓的東西”。可能那並不是道具，而是權利等無形之物也說不定</text:p>
          </table:table-cell>
          <table:table-cell table:style-name="ce151" office:value-type="string" calcext:value-type="string">
            <text:p>取得時從FH紋章中選擇一個，你可以取得所選的紋章，取得那個紋章所需的經驗點需要另外消耗；選擇需要GM許可的紋章時，同樣需要先征得GM的同意</text:p>
          </table:table-cell>
          <table:table-cell table:style-name="ce148" office:value-type="string" calcext:value-type="string">
            <text:p>IA P156</text:p>
          </table:table-cell>
          <table:table-cell table:style-name="ce148"/>
          <table:table-cell table:number-columns-repeated="1016"/>
        </table:table-row>
        <table:table-row table:style-name="ro16">
          <table:table-cell table:style-name="ce148" office:value-type="string" calcext:value-type="string">
            <text:p>黑色郵件</text:p>
            <text:p>（ブラックメイル）</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因為過去的不小心或為了人身安全被FH脅迫協助它們的紋章，作為協助FH的代價它們給你準備了大量報酬</text:p>
          </table:table-cell>
          <table:table-cell table:style-name="ce151" office:value-type="string" calcext:value-type="string">
            <text:p>你的常備化點數+10，你進行的【社會】判定骰數-1個</text:p>
          </table:table-cell>
          <table:table-cell table:style-name="ce148" office:value-type="string" calcext:value-type="string">
            <text:p>IA P15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各取所需</text:p>
            <text:p>（ギブ＆テイク）</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打著自己的算盤協助FH，並獲取了回報的紋章</text:p>
          </table:table-cell>
          <table:table-cell table:style-name="ce151" office:value-type="string" calcext:value-type="string">
            <text:p>你的【社會】+1；上升的能力值按照如「5（6）」形式，分別記錄上升前後的能力值；使用經驗點進行能力值成長時，所需的經驗點參照上升前的能力值資料</text:p>
          </table:table-cell>
          <table:table-cell table:style-name="ce148" office:value-type="string" calcext:value-type="string">
            <text:p>IA P156</text:p>
          </table:table-cell>
          <table:table-cell table:style-name="ce148"/>
          <table:table-cell table:number-columns-repeated="1016"/>
        </table:table-row>
        <table:table-row table:style-name="ro16">
          <table:table-cell table:style-name="ce148" office:value-type="string" calcext:value-type="string">
            <text:p>休閒時光</text:p>
            <text:p>（レストタイム）</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你身處嚴苛的環境之中，因此無比珍惜平穩的時間，即使很快就會有新的任務下來，這一刻仍是只屬於你的休閒時光</text:p>
          </table:table-cell>
          <table:table-cell table:style-name="ce151" office:value-type="string" calcext:value-type="string">
            <text:p>你的侵蝕率基本值-3</text:p>
          </table:table-cell>
          <table:table-cell table:style-name="ce148" office:value-type="string" calcext:value-type="string">
            <text:p>IA P156</text:p>
          </table:table-cell>
          <table:table-cell table:style-name="ce148"/>
          <table:table-cell table:number-columns-repeated="1016"/>
        </table:table-row>
        <table:table-row table:style-name="ro16">
          <table:table-cell table:style-name="ce148" office:value-type="string" calcext:value-type="string">
            <text:p>獨行超越者</text:p>
            <text:p>（ローンオーヴァー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因為協助FH的代價無法任何人親近，孤獨地生活著的紋章。不堅強就無法生存下去，你因這份孤獨而變得強大</text:p>
          </table:table-cell>
          <table:table-cell table:style-name="ce151" office:value-type="string" calcext:value-type="string">
            <text:p>你的最大HP+10，但你的侵蝕率基本值+4</text:p>
          </table:table-cell>
          <table:table-cell table:style-name="ce148" office:value-type="string" calcext:value-type="string">
            <text:p>IA P156</text:p>
          </table:table-cell>
          <table:table-cell table:style-name="ce148"/>
          <table:table-cell table:number-columns-repeated="1016"/>
        </table:table-row>
        <table:table-row table:style-name="ro16">
          <table:table-cell table:style-name="ce148" office:value-type="string" calcext:value-type="string">
            <text:p>FH贈禮</text:p>
            <text:p>（FHギフト）</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作為協助FH的報酬它們為你準備了特別道具的紋章</text:p>
          </table:table-cell>
          <table:table-cell table:style-name="ce151" office:value-type="string" calcext:value-type="string">
            <text:p>即使你沒有取得FH專用D-lois也可以選擇2件FH道具；取得所需的常備化點數需要另外消耗</text:p>
          </table:table-cell>
          <table:table-cell table:style-name="ce148" office:value-type="string" calcext:value-type="string">
            <text:p>IA P15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逃亡者</text:p>
            <text:p>（エスケイピ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曾再三嘗試從FH處逃亡。雖然每一次都以失敗告終，但作為從中收穫的結果，單論逃跑的速度確實是變快了</text:p>
          </table:table-cell>
          <table:table-cell table:style-name="ce151" office:value-type="string" calcext:value-type="string">
            <text:p>使用進行閃避的異能時使用，該判定的達成值+10，使用該效果時，你的侵蝕率+1D10</text:p>
            <text:p>該效果1劇本可以使用1次</text:p>
          </table:table-cell>
          <table:table-cell table:style-name="ce148" office:value-type="string" calcext:value-type="string">
            <text:p>IA P157</text:p>
          </table:table-cell>
          <table:table-cell table:style-name="ce148"/>
          <table:table-cell table:number-columns-repeated="1016"/>
        </table:table-row>
        <table:table-row table:style-name="ro16">
          <table:table-cell table:style-name="ce148" office:value-type="string" calcext:value-type="string">
            <text:p>韁鎖</text:p>
            <text:p>（チェインド）</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被FH要脅了重要的身邊人，被迫與FH協作</text:p>
          </table:table-cell>
          <table:table-cell table:style-name="ce151" office:value-type="string" calcext:value-type="string">
            <text:p>導入階段選擇一個Lois；只要該Lois沒有被Titus化，你進行的任何判定骰數+1個；但是，所選的Lois變為Titus時，你的侵蝕率立即上升2D10</text:p>
          </table:table-cell>
          <table:table-cell table:style-name="ce148" office:value-type="string" calcext:value-type="string">
            <text:p>IA P157</text:p>
          </table:table-cell>
          <table:table-cell table:style-name="ce148"/>
          <table:table-cell table:number-columns-repeated="1016"/>
        </table:table-row>
        <table:table-row table:style-name="ro16">
          <table:table-cell table:style-name="ce148" office:value-type="string" calcext:value-type="string">
            <text:p>反叛的守護者</text:p>
            <text:p>（リバースガーディア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曾所屬於UGN，或是曾與之合作</text:p>
          </table:table-cell>
          <table:table-cell table:style-name="ce151" office:value-type="string" calcext:value-type="string">
            <text:p>取得時從「必要經驗點」為15以下的UGN紋章中選擇一個，你直接免費取得所選的紋章；所選的紋章只能常備化一個，如果有「需要GM許可」的要求時，同樣需要先征得GM的同意</text:p>
          </table:table-cell>
          <table:table-cell table:style-name="ce148" office:value-type="string" calcext:value-type="string">
            <text:p>IA P157</text:p>
          </table:table-cell>
          <table:table-cell table:style-name="ce148"/>
          <table:table-cell table:number-columns-repeated="1016"/>
        </table:table-row>
        <table:table-row table:style-name="ro16">
          <table:table-cell table:style-name="ce148" office:value-type="string" calcext:value-type="string">
            <text:p>罪孽</text:p>
            <text:p>（ギルティ）</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你與FH協作是為了贖罪，罪絕無可赦的罪孽就像是刻在你心上的、深重的傷痕，只要還未忘記這份疼痛，你連死亡都不被允許</text:p>
          </table:table-cell>
          <table:table-cell table:style-name="ce151" office:value-type="string" calcext:value-type="string">
            <text:p>取得時，選擇你的一個固定Lois，使其Ttitus化；你無法昇華該Titus。你陷入戰鬥不能時使用，你的HP回復至最大HP</text:p>
            <text:p>該效果1劇本可以使用1次</text:p>
          </table:table-cell>
          <table:table-cell table:style-name="ce148" office:value-type="string" calcext:value-type="string">
            <text:p>IA P157</text:p>
          </table:table-cell>
          <table:table-cell table:style-name="ce148"/>
          <table:table-cell table:number-columns-repeated="1016"/>
        </table:table-row>
        <table:table-row table:style-name="ro16">
          <table:table-cell table:style-name="ce148" office:value-type="string" calcext:value-type="string">
            <text:p>逆施者</text:p>
            <text:p>（バックキャスタ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於你而言，背教者便是可以闡述世間萬物的萬能真理，若是為了證明這個命題，與FH聯手亦在所不惜</text:p>
          </table:table-cell>
          <table:table-cell table:style-name="ce151" office:value-type="string" calcext:value-type="string">
            <text:p>你進行判定前使用，該判定改為使用&lt;知識：背教者&gt;來代替原本使用的技能進行</text:p>
            <text:p>該效果1劇本可以使用3次</text:p>
          </table:table-cell>
          <table:table-cell table:style-name="ce148" office:value-type="string" calcext:value-type="string">
            <text:p>IA P157</text:p>
          </table:table-cell>
          <table:table-cell table:style-name="ce148"/>
          <table:table-cell table:number-columns-repeated="1016"/>
        </table:table-row>
        <table:table-row table:style-name="ro16">
          <table:table-cell table:style-name="ce148" office:value-type="string" calcext:value-type="string">
            <text:p>頂點士兵</text:p>
            <text:p>（エーペックスソルジャー）</text:p>
          </table:table-cell>
          <table:table-cell table:style-name="ce93" office:value-type="string" calcext:value-type="string">
            <text:p>核心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你是傳說中的FH雇傭兵，很多FH特工雇傭過你，你的肉體、精神和直覺，全都是能被稱為紋章的最佳商品</text:p>
          </table:table-cell>
          <table:table-cell table:style-name="ce151" office:value-type="string" calcext:value-type="string">
            <text:p>你的能力值（肉體/感覺/精神/社會）合計+4點；但是，單項能力值最多分配2點</text:p>
          </table:table-cell>
          <table:table-cell table:style-name="ce148" office:value-type="string" calcext:value-type="string">
            <text:p>IA P15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惡魔之血</text:p>
            <text:p>（デーモンブラッド／悪魔の血）</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受聯絡卿注意的紋章，你被分到了特殊的背教者病毒，它們更具有攻擊性，也能強化衝動</text:p>
          </table:table-cell>
          <table:table-cell table:style-name="ce151" office:value-type="string" calcext:value-type="string">
            <text:p>取得時選擇一項能力值（肉體/感覺/精神/社會），你進行攻擊的攻擊力+[選擇的能力值]，你在場景中登場時的侵蝕率增長+1（最大增長10）</text:p>
          </table:table-cell>
          <table:table-cell table:style-name="ce148" office:value-type="string" calcext:value-type="string">
            <text:p>IA P15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破碎之心</text:p>
            <text:p>（ブロークンハート／壊れた心）</text:p>
          </table:table-cell>
          <table:table-cell table:style-name="ce93" office:value-type="string" calcext:value-type="string">
            <text:p>核心紋章/一般</text:p>
          </table:table-cell>
          <table:table-cell table:style-name="ce148" office:value-type="float" office:value="40" calcext:value-type="float">
            <text:p>40</text:p>
          </table:table-cell>
          <table:table-cell table:style-name="ce148" office:value-type="string" calcext:value-type="string">
            <text:p>3/劇本</text:p>
          </table:table-cell>
          <table:table-cell table:style-name="ce151" office:value-type="string" calcext:value-type="string">
            <text:p>表示你的心中早已放棄的紋章，你曾有願望但如今已消逝，對你來說理想欲望等詞語太過沉重，但因為心中早已放棄，你才能專業地完成任務</text:p>
          </table:table-cell>
          <table:table-cell table:style-name="ce151" office:value-type="string" calcext:value-type="string">
            <text:p>你進行判定前使用，該判定達成值+10</text:p>
            <text:p>該效果1劇本可以使用3次</text:p>
          </table:table-cell>
          <table:table-cell table:style-name="ce148" office:value-type="string" calcext:value-type="string">
            <text:p>IA P157</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FH通用 <text:s text:c="34"/>取得條件：職業為FH，或是身為FH法外者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雷將神器</text:p>
          </table:table-cell>
          <table:table-cell table:style-name="ce93" office:value-type="string" calcext:value-type="string">
            <text:p>紋章/近戰/射擊</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FH在東亞遺跡中發現的對應斬打投射的12把長矛狀武器，但其中大半在組織內部爭奪戰中遺失了</text:p>
          </table:table-cell>
          <table:table-cell table:style-name="ce151" office:value-type="string" calcext:value-type="string">
            <text:p>技能：近戰/射擊   命中：0   攻擊力：12   格擋值：4   射程：至近/50m</text:p>
            <text:p>以[種類：射擊]使用時，射程資料參照右側；使用該武器進行的攻擊判定，達成值+4</text:p>
            <text:p>雙手持握</text:p>
          </table:table-cell>
          <table:table-cell table:style-name="ce148" office:value-type="string" calcext:value-type="string">
            <text:p>IA P15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魔神之魂</text:p>
            <text:p>（チーフスピリッツ）</text:p>
          </table:table-cell>
          <table:table-cell table:style-name="ce93" office:value-type="string" calcext:value-type="string">
            <text:p>紋章/防具</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每一件都有著不同的惡魔之名的72件外套，有的被贈與優秀的特工，也有的被贈與擁有強固的理想和欲望之人，穿著者會被視為擁有特權</text:p>
          </table:table-cell>
          <table:table-cell table:style-name="ce151" office:value-type="string" calcext:value-type="string">
            <text:p>閃避：0   行動值：0   裝甲值：7</text:p>
            <text:p>你進行&lt;情報：●●&gt;判定時，骰子數+3個</text:p>
          </table:table-cell>
          <table:table-cell table:style-name="ce148" office:value-type="string" calcext:value-type="string">
            <text:p>IA P15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春日一族</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屬於春日一族的氏族的紋章，屬於該氏族的特工們皆以無論何等艱難的情況下都絕不放棄完成任務的極強意志力而聞名。</text:p>
          </table:table-cell>
          <table:table-cell table:style-name="ce151" office:value-type="string" calcext:value-type="string">
            <text:p>你進行的&lt;意志&gt;判定達成值+3</text:p>
          </table:table-cell>
          <table:table-cell table:style-name="ce148" office:value-type="string" calcext:value-type="string">
            <text:p>IA P158</text:p>
          </table:table-cell>
          <table:table-cell table:style-name="ce148"/>
          <table:table-cell table:number-columns-repeated="1016"/>
        </table:table-row>
        <table:table-row table:style-name="ro16">
          <table:table-cell table:style-name="ce148" office:value-type="string" calcext:value-type="string">
            <text:p>懷疑</text:p>
            <text:p>（サスペクト）</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因為從屬FH，撒謊和背叛對你來說都像是日常茶飯一樣</text:p>
          </table:table-cell>
          <table:table-cell table:style-name="ce151" office:value-type="string" calcext:value-type="string">
            <text:p>你進行的&lt;知覺&gt;和&lt;交涉&gt;判定，骰子數+2個</text:p>
          </table:table-cell>
          <table:table-cell table:style-name="ce148" office:value-type="string" calcext:value-type="string">
            <text:p>IA P15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氏族符號</text:p>
            <text:p>（クランサイ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從屬於同一氏族的道具，也有作為暗號的情況，持有者們會捨棄至今為止的爭鬥與因緣，為了氏族的目的共同努力</text:p>
          </table:table-cell>
          <table:table-cell table:style-name="ce151" office:value-type="string" calcext:value-type="string">
            <text:p>取得時選擇一項技能，你進行的所選技能判定時，骰子數+2個</text:p>
          </table:table-cell>
          <table:table-cell table:style-name="ce148" office:value-type="string" calcext:value-type="string">
            <text:p>IA P15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尋人者</text:p>
            <text:p>（マンサーチャ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在FH中擔任身邊調查或者尋人工作的追蹤者的紋章</text:p>
          </table:table-cell>
          <table:table-cell table:style-name="ce151" office:value-type="string" calcext:value-type="string">
            <text:p>你對角色進行的身邊調查或住所調查，相關情報收集的判定，骰子數+2個；具體對什麼判定生效，由GM決定</text:p>
          </table:table-cell>
          <table:table-cell table:style-name="ce148" office:value-type="string" calcext:value-type="string">
            <text:p>IA P15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鉛兵</text:p>
            <text:p>（鉛の兵士）</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FH內負責護衛要人、肉盾等工作的紋章，身體強壯就是你的優勢</text:p>
          </table:table-cell>
          <table:table-cell table:style-name="ce151" office:value-type="string" calcext:value-type="string">
            <text:p>你進行掩護時受到的傷害-5</text:p>
          </table:table-cell>
          <table:table-cell table:style-name="ce148" office:value-type="string" calcext:value-type="string">
            <text:p>IA P15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從旁干涉</text:p>
            <text:p>（フランカー／橫やり）</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擅長對被吸引注意的他人發動奇襲的紋章，其中的“他人”包含同屬於FH的人在內</text:p>
          </table:table-cell>
          <table:table-cell table:style-name="ce151" office:value-type="string" calcext:value-type="string">
            <text:p>你攻擊[與[你以外的角色]處同一接戰範圍的角色]時，傷害+1D10</text:p>
          </table:table-cell>
          <table:table-cell table:style-name="ce148" office:value-type="string" calcext:value-type="string">
            <text:p>IA P15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邊緣暴徒</text:p>
            <text:p>（マージナルヴィラン）</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1/劇本</text:p>
          </table:table-cell>
          <table:table-cell table:style-name="ce151" office:value-type="string" calcext:value-type="string">
            <text:p>表示你接受了能將異能的力量最大程度使用出來的強化手術的紋章</text:p>
          </table:table-cell>
          <table:table-cell table:style-name="ce151" office:value-type="string" calcext:value-type="string">
            <text:p>取得時選擇[時機：常時]以外的一項異能，使用該異能時按照你血統能夠取得的最大異能等級計算；使用該效果後，直到劇本結束，無法再次使用該異能</text:p>
            <text:p>該效果1劇本可以使用1次</text:p>
          </table:table-cell>
          <table:table-cell table:style-name="ce148" office:value-type="string" calcext:value-type="string">
            <text:p>IA P15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粗糙騎手</text:p>
            <text:p>（ラフライダ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表示你擅長使用載具粗暴地撞上去的紋章</text:p>
          </table:table-cell>
          <table:table-cell table:style-name="ce151" office:value-type="string" calcext:value-type="string">
            <text:p>你使用載具進行攻擊的攻擊力+5，使用載具以外進行的攻擊判定，骰子數-2個</text:p>
          </table:table-cell>
          <table:table-cell table:style-name="ce148" office:value-type="string" calcext:value-type="string">
            <text:p>IA P15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FH列裝</text:p>
            <text:p>（ＦＨイシュ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是被允許使用FH專用裝備的超越者的紋章</text:p>
          </table:table-cell>
          <table:table-cell table:style-name="ce151" office:value-type="string" calcext:value-type="string">
            <text:p>你可以常備化FH專用道具，所需要的常備點按照通常規則消費，以此方式取得的道具，基本上除你以外均無法裝備和使用</text:p>
          </table:table-cell>
          <table:table-cell table:style-name="ce148" office:value-type="string" calcext:value-type="string">
            <text:p>IA P159</text:p>
          </table:table-cell>
          <table:table-cell table:style-name="ce148"/>
          <table:table-cell table:number-columns-repeated="1016"/>
        </table:table-row>
        <table:table-row table:style-name="ro16">
          <table:table-cell table:style-name="ce148" office:value-type="string" calcext:value-type="string">
            <text:p>戰鬥適性體</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跨越了FH式的殘酷戰鬥訓練，並作為強者覺醒一事的紋章。你有著隨時思考備戰的習慣</text:p>
          </table:table-cell>
          <table:table-cell table:style-name="ce151" office:value-type="string" calcext:value-type="string">
            <text:p>你的【行動值】+5</text:p>
          </table:table-cell>
          <table:table-cell table:style-name="ce148" office:value-type="string" calcext:value-type="string">
            <text:p>IA P159</text:p>
          </table:table-cell>
          <table:table-cell table:style-name="ce148"/>
          <table:table-cell table:number-columns-repeated="1016"/>
        </table:table-row>
        <table:table-row table:style-name="ro16">
          <table:table-cell table:style-name="ce148" office:value-type="string" calcext:value-type="string">
            <text:p>宿命兵裝</text:p>
            <text:p>（ヴォイドウエポ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素材與製作方法全部不明的漆黑武器，據說由“誘惑者”特圖帶來，現在能夠確認至少存在13件</text:p>
          </table:table-cell>
          <table:table-cell table:style-name="ce151" office:value-type="string" calcext:value-type="string">
            <text:p>取得時選擇一件持有的武器，該武器攻擊力+5；你進行的衝動判定，難度+2</text:p>
          </table:table-cell>
          <table:table-cell table:style-name="ce148" office:value-type="string" calcext:value-type="string">
            <text:p>IA P15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殲滅者</text:p>
            <text:p>（エリミネーター／殲滅者）</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擅長無差別攻擊的紋章</text:p>
          </table:table-cell>
          <table:table-cell table:style-name="ce151" office:value-type="string" calcext:value-type="string">
            <text:p>你進行攻擊時使用，該攻擊為[對象：單體]時，變為[對象：範圍]；該效果的優先順序高於組合異能的原本效果</text:p>
            <text:p>該效果1劇本可以使用1次</text:p>
          </table:table-cell>
          <table:table-cell table:style-name="ce148" office:value-type="string" calcext:value-type="string">
            <text:p>IA P15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強制起動者</text:p>
            <text:p>（オーバーユーザー／強制起動者）</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接受了能將異能使用到超過限度訓練的紋章</text:p>
          </table:table-cell>
          <table:table-cell table:style-name="ce151" office:value-type="string" calcext:value-type="string">
            <text:p>使用有使用次數限制的異能時使用，該異能即使使用次數為0也能使用，使用後也不會消耗使用次數；使用該效果後，直到劇本結束，無法再次使用該異能</text:p>
            <text:p>該效果1劇本可以使用1次</text:p>
          </table:table-cell>
          <table:table-cell table:style-name="ce148" office:value-type="string" calcext:value-type="string">
            <text:p>IA P15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殺戮首領</text:p>
            <text:p>（キルリーダ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贈與各地區中殺死最多敵對組織特工者的稱號，其中最優秀的據說會被授予尊主之名</text:p>
          </table:table-cell>
          <table:table-cell table:style-name="ce151" office:value-type="string" calcext:value-type="string">
            <text:p>你對超越者造成的傷害+2D10</text:p>
          </table:table-cell>
          <table:table-cell table:style-name="ce148" office:value-type="string" calcext:value-type="string">
            <text:p>IA P15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協作者</text:p>
            <text:p>（コンビネイタ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在獨立性極高的FH之中，你重視著與同伴合作的紋章。理所當然的，那並不一定是基於友情的行動</text:p>
          </table:table-cell>
          <table:table-cell table:style-name="ce151" office:value-type="string" calcext:value-type="string">
            <text:p>你通過攻擊對對象造成至少1點傷害時，該回合間，對象所受到的攻擊，傷害+2D10</text:p>
          </table:table-cell>
          <table:table-cell table:style-name="ce148" office:value-type="string" calcext:value-type="string">
            <text:p>IA P159</text:p>
          </table:table-cell>
          <table:table-cell table:style-name="ce148"/>
          <table:table-cell table:number-columns-repeated="1016"/>
        </table:table-row>
        <table:table-row table:style-name="ro16">
          <table:table-cell table:style-name="ce148" office:value-type="string" calcext:value-type="string">
            <text:p>清道夫</text:p>
            <text:p>（スイーパ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在FH之中十分擅長掃射戰的紋章。那些被削弱的、失去戰意的、陷入混亂的，於你而言都是絕佳的獵物。</text:p>
          </table:table-cell>
          <table:table-cell table:style-name="ce151" office:value-type="string" calcext:value-type="string">
            <text:p>你對受到了任何異常狀態的角色進行攻擊時，傷害+1D10</text:p>
          </table:table-cell>
          <table:table-cell table:style-name="ce148" office:value-type="string" calcext:value-type="string">
            <text:p>IA P160</text:p>
          </table:table-cell>
          <table:table-cell table:style-name="ce148"/>
          <table:table-cell table:number-columns-repeated="1016"/>
        </table:table-row>
        <table:table-row table:style-name="ro16">
          <table:table-cell table:style-name="ce148" office:value-type="string" calcext:value-type="string">
            <text:p>設陷者</text:p>
            <text:p>（トラッパ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是十分擅長蹲點作戰和誘敵戰術等奇襲戰的特工的紋章。</text:p>
          </table:table-cell>
          <table:table-cell table:style-name="ce151" office:value-type="string" calcext:value-type="string">
            <text:p>你隱秘狀態下進行的攻擊，傷害+2D10</text:p>
          </table:table-cell>
          <table:table-cell table:style-name="ce148" office:value-type="string" calcext:value-type="string">
            <text:p>IA P160</text:p>
          </table:table-cell>
          <table:table-cell table:style-name="ce148"/>
          <table:table-cell table:number-columns-repeated="1016"/>
        </table:table-row>
        <table:table-row table:style-name="ro16">
          <table:table-cell table:style-name="ce148" office:value-type="string" calcext:value-type="string">
            <text:p>巴卡尼亞</text:p>
            <text:p>（バッカニア）</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是擅長跳上移動中車輛的突擊要員的紋章，車上戰鬥是你的得意舞臺</text:p>
          </table:table-cell>
          <table:table-cell table:style-name="ce151" office:value-type="string" calcext:value-type="string">
            <text:p>你對處搭乘狀態的角色造成的傷害+2D10</text:p>
          </table:table-cell>
          <table:table-cell table:style-name="ce148" office:value-type="string" calcext:value-type="string">
            <text:p>IA P16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憎惡</text:p>
            <text:p>（ヘイトレッド）</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對特定目標抱有憎惡，進行強化背教者攻擊性暗示的強化手術</text:p>
          </table:table-cell>
          <table:table-cell table:style-name="ce151" office:value-type="string" calcext:value-type="string">
            <text:p>準備階段使用，選擇場景中登場的一名角色；你受到[異常狀態：憎惡]，憎惡對象為該角色；你對該角色進行攻擊時，攻擊力+5，使用該效果時，你的侵蝕率+3</text:p>
          </table:table-cell>
          <table:table-cell table:style-name="ce148" office:value-type="string" calcext:value-type="string">
            <text:p>IA P16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告密者</text:p>
            <text:p>（ラットフィンク）</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所屬於情報工作單元“告密者(RatFink)”的紋章。揭露情報也好掩蓋情報也好，於你而言皆是同等輕鬆之事。</text:p>
          </table:table-cell>
          <table:table-cell table:style-name="ce151" office:value-type="string" calcext:value-type="string">
            <text:p>場景中登場的角色進行收集情報相關的判定前使用；使該判定的目標值+5或-5</text:p>
            <text:p>該效果1劇本可以使用1次</text:p>
          </table:table-cell>
          <table:table-cell table:style-name="ce148" office:value-type="string" calcext:value-type="string">
            <text:p>IA P160</text:p>
          </table:table-cell>
          <table:table-cell table:style-name="ce148"/>
          <table:table-cell table:number-columns-repeated="1016"/>
        </table:table-row>
        <table:table-row table:style-name="ro16">
          <table:table-cell table:style-name="ce148" office:value-type="string" calcext:value-type="string">
            <text:p>哀慟衝動</text:p>
            <text:p>（ソロウフルアージ）</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劇本</text:p>
          </table:table-cell>
          <table:table-cell table:style-name="ce151" office:value-type="string" calcext:value-type="string">
            <text:p>借由喪失的壓力強化攻擊性的強化手術紋章</text:p>
          </table:table-cell>
          <table:table-cell table:style-name="ce151" office:value-type="string" calcext:value-type="string">
            <text:p>你的Lois變為Titus時使用，該場景間你進行的攻擊判定，骰子數+2個</text:p>
            <text:p>該效果1劇本可以使用1次</text:p>
          </table:table-cell>
          <table:table-cell table:style-name="ce148" office:value-type="string" calcext:value-type="string">
            <text:p>IA P16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霸者之印</text:p>
            <text:p>（覇者の印）</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3/劇本</text:p>
          </table:table-cell>
          <table:table-cell table:style-name="ce151" office:value-type="string" calcext:value-type="string">
            <text:p>施加了謎之刻印的國際象棋黑棋，被給予擁有能夠開闢下一時代的強者，令其擁有打破一切困難的力量</text:p>
          </table:table-cell>
          <table:table-cell table:style-name="ce151" office:value-type="string" calcext:value-type="string">
            <text:p>進行判定前使用，該判定骰數+5個</text:p>
            <text:p>該效果1劇本可以使用3次</text:p>
          </table:table-cell>
          <table:table-cell table:style-name="ce148" office:value-type="string" calcext:value-type="string">
            <text:p>IA P16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守密人</text:p>
            <text:p>（シークレットキーパ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在組織繼承了某個秘密的紋章，這個秘密無法輕易說出口，但在萬一之時會成為強有力的武器</text:p>
          </table:table-cell>
          <table:table-cell table:style-name="ce151" office:value-type="string" calcext:value-type="string">
            <text:p>主要動作使用，可直接對GM質問疑問點；GM可拒絕回答，此時不消耗使用次數</text:p>
            <text:p>該效果1劇本可以使用1次</text:p>
          </table:table-cell>
          <table:table-cell table:style-name="ce148" office:value-type="string" calcext:value-type="string">
            <text:p>IA P16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殺戮器官</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有著無法自控的，真身不明的力量的紋章。FH將其命名為“殺戮器官”，並對你進行著研究</text:p>
          </table:table-cell>
          <table:table-cell table:style-name="ce151" office:value-type="string" calcext:value-type="string">
            <text:p>你受到[異常狀態：暴走]期間進行的組合了異能的攻擊，傷害+2D10；你進行的衝動判定必然失敗</text:p>
          </table:table-cell>
          <table:table-cell table:style-name="ce148" office:value-type="string" calcext:value-type="string">
            <text:p>IA P160</text:p>
          </table:table-cell>
          <table:table-cell table:style-name="ce148"/>
          <table:table-cell table:number-columns-repeated="1016"/>
        </table:table-row>
        <table:table-row table:style-name="ro16">
          <table:table-cell table:style-name="ce148" office:value-type="string" calcext:value-type="string">
            <text:p>幻月犬</text:p>
            <text:p>（ムーンドッグ）</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是屬於戰鬥部隊“幻月犬(MoonDog)”的特工的紋章；你的戰鬥越是持久，便越是像漸盈漸滿的月亮一般鬥志越發高昂，戰鬥力也越發強悍</text:p>
          </table:table-cell>
          <table:table-cell table:style-name="ce151" office:value-type="string" calcext:value-type="string">
            <text:p>你開始主要階段時使用，該場景間，你進行的攻擊傷害+5；多次使用時，該效果將會疊加</text:p>
          </table:table-cell>
          <table:table-cell table:style-name="ce148" office:value-type="string" calcext:value-type="string">
            <text:p>IA P161</text:p>
          </table:table-cell>
          <table:table-cell table:style-name="ce148"/>
          <table:table-cell table:number-columns-repeated="1016"/>
        </table:table-row>
        <table:table-row table:style-name="ro16">
          <table:table-cell table:style-name="ce148" office:value-type="string" calcext:value-type="string">
            <text:p>迅猛推進</text:p>
            <text:p>（ラピッドブースタ）</text:p>
          </table:table-cell>
          <table:table-cell table:style-name="ce93" office:value-type="string" calcext:value-type="string">
            <text:p>紋章/一般</text:p>
          </table:table-cell>
          <table:table-cell table:style-name="ce148" office:value-type="float" office:value="35" calcext:value-type="float">
            <text:p>35</text:p>
          </table:table-cell>
          <table:table-cell table:style-name="ce148" office:value-type="string" calcext:value-type="string">
            <text:p>1/場景</text:p>
          </table:table-cell>
          <table:table-cell table:style-name="ce151" office:value-type="string" calcext:value-type="string">
            <text:p>使背教者活性化增強反應速度的強化手術，你的侵蝕率越高機動性就越強</text:p>
          </table:table-cell>
          <table:table-cell table:style-name="ce151" office:value-type="string" calcext:value-type="string">
            <text:p>準備階段使用，該回合間你的【行動值】+5，你的侵蝕率超過100%以上時，【行動值】額外+5（總計+10）；使用該效果後，你的侵蝕率+3</text:p>
            <text:p>該效果1場景可以使用1次</text:p>
          </table:table-cell>
          <table:table-cell table:style-name="ce148" office:value-type="string" calcext:value-type="string">
            <text:p>IA P16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暴食零</text:p>
            <text:p>（グラットンゼロ）</text:p>
          </table:table-cell>
          <table:table-cell table:style-name="ce93" office:value-type="string" calcext:value-type="string">
            <text:p>紋章/一般</text:p>
          </table:table-cell>
          <table:table-cell table:style-name="ce148" office:value-type="float" office:value="200" calcext:value-type="float">
            <text:p>200</text:p>
          </table:table-cell>
          <table:table-cell table:style-name="ce148" office:value-type="string" calcext:value-type="string">
            <text:p>-</text:p>
          </table:table-cell>
          <table:table-cell table:style-name="ce151" office:value-type="string" calcext:value-type="string">
            <text:p>為殺傷超越者而製作的被EX背教者感染的試作戰術級炸彈</text:p>
          </table:table-cell>
          <table:table-cell table:style-name="ce151" office:value-type="string" calcext:value-type="string">
            <text:p>主要動作使用，該場景結束前，場景中登場的角色在HP變為0時立刻死亡；即使不在場景中登場，該道具也可以使用，此時使用不需要消耗動作；取得該道具需要GM許可</text:p>
          </table:table-cell>
          <table:table-cell table:style-name="ce148" office:value-type="string" calcext:value-type="string">
            <text:p>IA P16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惡魔的淡麗</text:p>
            <text:p>（悪魔の淡麗）</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在市內某處偶爾會出現的拉麵攤子，品嘗著透亮的湯頭能夠回想起自己的原點，但“攤主是何人”、“為何被稱為惡魔”之類的問題全都無人知曉</text:p>
          </table:table-cell>
          <table:table-cell table:style-name="ce151" office:value-type="string" calcext:value-type="string">
            <text:p>主要動作使用，該劇本間你進行的&lt;意志&gt;判定，骰子數+2個</text:p>
          </table:table-cell>
          <table:table-cell table:style-name="ce148" office:value-type="string" calcext:value-type="string">
            <text:p>IA P16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復原者</text:p>
            <text:p>（オーバーリライザー）</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使超越者的再生能力增強的藥物，雖然只是在研究《復原化》的過程中製作的尚未完成的治癒力活性劑，但仍會提供給需要的超越者</text:p>
          </table:table-cell>
          <table:table-cell table:style-name="ce151" office:value-type="string" calcext:value-type="string">
            <text:p>與《復原化》同時使用，該《復原化》的效果擲骰全部按照10計算</text:p>
          </table:table-cell>
          <table:table-cell table:style-name="ce148" office:value-type="string" calcext:value-type="string">
            <text:p>IA P16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漆黑佈告</text:p>
            <text:p>（ブラックエディクト）</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可以對他人強行發出粗暴命令的藥物</text:p>
          </table:table-cell>
          <table:table-cell table:style-name="ce151" office:value-type="string" calcext:value-type="string">
            <text:p>與[種類：關聯]同時使用，該關聯使用的判定骰數+2個；使用該效果後，直到劇本結束，無法再次使用該關聯</text:p>
          </table:table-cell>
          <table:table-cell table:style-name="ce148" office:value-type="string" calcext:value-type="string">
            <text:p>IA P16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真實深淵</text:p>
            <text:p>（トゥルーアビス）</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將“黑之深淵”進一步強化的背教者活性藥，能讓使用者的背教者強化到危險區域</text:p>
          </table:table-cell>
          <table:table-cell table:style-name="ce151" office:value-type="string" calcext:value-type="string">
            <text:p>次要動作使用，該回合間你進行的判定骰數+6個，你的侵蝕率+12</text:p>
          </table:table-cell>
          <table:table-cell table:style-name="ce148" office:value-type="string" calcext:value-type="string">
            <text:p>IA P16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助長Σ</text:p>
            <text:p>（プロモーションΣ）</text:p>
          </table:table-cell>
          <table:table-cell table:style-name="ce93" office:value-type="string" calcext:value-type="string">
            <text:p>紋章/消耗品</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能夠強化戰鬥能力的猛藥，以“只是普通的強化藥”為名提供給成員們</text:p>
          </table:table-cell>
          <table:table-cell table:style-name="ce151" office:value-type="string" calcext:value-type="string">
            <text:p>準備階段使用，該回合間你進行攻擊的攻擊力+10，使用後侵蝕率+2D10，並且陷入[異常狀態：暴走]</text:p>
          </table:table-cell>
          <table:table-cell table:style-name="ce148" office:value-type="string" calcext:value-type="string">
            <text:p>IA P16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終決</text:p>
            <text:p>（ラストラン）</text:p>
          </table:table-cell>
          <table:table-cell table:style-name="ce93" office:value-type="string" calcext:value-type="string">
            <text:p>紋章/消耗品</text:p>
          </table:table-cell>
          <table:table-cell table:style-name="ce148" office:value-type="float" office:value="80" calcext:value-type="float">
            <text:p>80</text:p>
          </table:table-cell>
          <table:table-cell table:style-name="ce148" office:value-type="string" calcext:value-type="string">
            <text:p>-</text:p>
          </table:table-cell>
          <table:table-cell table:style-name="ce151" office:value-type="string" calcext:value-type="string">
            <text:p>FH所開發的能力強化手術。接受了這項實驗者有著僅僅一次的，解放超越極限之力的機會，但也有著會變得無法抑制衝動的代價。</text:p>
          </table:table-cell>
          <table:table-cell table:style-name="ce151" office:value-type="string" calcext:value-type="string">
            <text:p>準備階段使用，該場景間，你進行的任意判定骰數+10個，進行的攻擊攻擊力+10，但使用時你的侵蝕率會+20，並且陷入[異常狀態：暴走]</text:p>
          </table:table-cell>
          <table:table-cell table:style-name="ce148" office:value-type="string" calcext:value-type="string">
            <text:p>IA P161</text:p>
          </table:table-cell>
          <table:table-cell table:style-name="ce148" office:value-type="string" calcext:value-type="string">
            <text:p>IA修改經驗值</text:p>
          </table:table-cell>
          <table:table-cell table:number-columns-repeated="1016"/>
        </table:table-row>
        <table:table-row table:style-name="ro16">
          <table:table-cell table:style-name="ce147" office:value-type="string" calcext:value-type="string" table:number-columns-spanned="6" table:number-rows-spanned="1">
            <text:p>宇宙友愛協會 <text:s text:c="25"/>取得條件：沒有取得其他紋章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ARPA之書</text:p>
            <text:p>（ARPAの書）</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記載了有關現今網際網路的前身ARPA的文檔，受EX背教者病毒所感染，使用這份文檔，便能操縱網上的任何情報</text:p>
          </table:table-cell>
          <table:table-cell table:style-name="ce151" office:value-type="string" calcext:value-type="string">
            <text:p>收集情報的判定前使用，該判定的骰子數+3個</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8" office:value-type="string" calcext:value-type="string">
            <text:p>宇宙友愛協會臂章</text:p>
            <text:p>（宇宙友愛協會ワッペ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印有宇宙友愛協會圖案的臂章，出席線下見面會或是企業活動時就會戴上</text:p>
          </table:table-cell>
          <table:table-cell table:style-name="ce151" office:value-type="string" calcext:value-type="string">
            <text:p>你進行的&lt;知識：●●&gt;判定，達成值+3</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8" office:value-type="string" calcext:value-type="string">
            <text:p>姆民班</text:p>
            <text:p>（ムー民班）</text:p>
          </table:table-cell>
          <table:table-cell table:style-name="ce93" office:value-type="string" calcext:value-type="string">
            <text:p>紋章/關聯</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宇宙友愛協會的姆民班，乃是以神秘學狂熱者為中心的妄想團隊。只要好好提問的話，基本上鐵定得到錯誤答案；但是，不幸的是，極少數情況下反而在“附贈情報”之中會摻雜著正確的答案</text:p>
          </table:table-cell>
          <table:table-cell table:style-name="ce151" office:value-type="string" calcext:value-type="string">
            <text:p>技能：&lt;知識：神秘學&gt;</text:p>
            <text:p>&lt;知識：神秘學&gt;的判定骰數+3個</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8" office:value-type="string" calcext:value-type="string">
            <text:p>巨石班</text:p>
            <text:p>（モノリス班）</text:p>
          </table:table-cell>
          <table:table-cell table:style-name="ce93" office:value-type="string" calcext:value-type="string">
            <text:p>紋章/關聯</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宇宙友愛協會的巨石班，乃是以研究者等硬科幻粉為中心的分析團隊。只要好好提問的話，基本上鐵定得到正確答案；但是，不幸的是，隨之而來的還有一大堆沒什麼意義的附贈情報</text:p>
          </table:table-cell>
          <table:table-cell table:style-name="ce151" office:value-type="string" calcext:value-type="string">
            <text:p>技能：&lt;知識：學問&gt;</text:p>
            <text:p>&lt;知識：學問&gt;的判定骰數+3個</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8" office:value-type="string" calcext:value-type="string">
            <text:p>深遠之識</text:p>
            <text:p>（深遠なる知識）</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表示你持有非狂熱者的一般人終身都不會知道的深厚知識的紋章。一旦開口任誰都無法阻止，聽者將會被直接壓（講）倒（懵）</text:p>
          </table:table-cell>
          <table:table-cell table:style-name="ce151" office:value-type="string" calcext:value-type="string">
            <text:p>次要動作使用，該主要階段間，你進行的攻擊命中時，給對象造成[異常狀態：重壓]和[異常狀態：恍惚]</text:p>
            <text:p>該效果1劇本可以使用3次</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8" office:value-type="string" calcext:value-type="string">
            <text:p>背教者偵測鏡</text:p>
            <text:p>（レネゲイドスカウタ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宇宙友愛協會為了找出潛伏於社會之中的“背教者星人”製作的單片眼鏡型分析裝置，雖然平時一點用都沒有，但進入《結界化》的範圍之後便會發揮其分析能力</text:p>
          </table:table-cell>
          <table:table-cell table:style-name="ce151" office:value-type="string" calcext:value-type="string">
            <text:p>任何時候均可使用，通過使用該道具，你可以得知視野內一個角色的的侵蝕率</text:p>
            <text:p>該效果1劇本可以使用3次</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8" office:value-type="string" calcext:value-type="string">
            <text:p>斯巴達克斯</text:p>
            <text:p>（スパルタクス）</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藉由變節者之力，將危機斥退；該變節者乃是寄宿於某天文臺伺服器之中的電腦生命體，有將人類資料化並傳送到別處的能力；因為傳送過程只有一瞬間，對手看起來上去就像是遭遇了“神隱”一般</text:p>
          </table:table-cell>
          <table:table-cell table:style-name="ce151" office:value-type="string" calcext:value-type="string">
            <text:p>回應動作使用，使正與你進行對決的角色立即從場景中退場；GM可以拒絕該效果，此時不消耗使用次數</text:p>
            <text:p>該效果1劇本可以使用1次</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8" office:value-type="string" calcext:value-type="string">
            <text:p>小灰人偵探事務所</text:p>
            <text:p>（リトルグレイ探偵事務所）</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由宇宙友愛協會的熱心成員們經營的偵探事務所，偵探們身上寄宿著協力型變節者，遭遇危機時便會發力相助</text:p>
          </table:table-cell>
          <table:table-cell table:style-name="ce151" office:value-type="string" calcext:value-type="string">
            <text:p>準備階段使用，該回合間，你進行的回應動作判定的暴擊值-1（下限6）</text:p>
            <text:p>該效果1劇本可以使用1次</text:p>
          </table:table-cell>
          <table:table-cell table:style-name="ce148" office:value-type="string" calcext:value-type="string">
            <text:p>IA P162</text:p>
          </table:table-cell>
          <table:table-cell table:style-name="ce148"/>
          <table:table-cell table:number-columns-repeated="1016"/>
        </table:table-row>
        <table:table-row table:style-name="ro16">
          <table:table-cell table:style-name="ce147" office:value-type="string" calcext:value-type="string" table:number-columns-spanned="6" table:number-rows-spanned="1">
            <text:p>超越者運動員 <text:s text:c="25"/>取得條件：沒有取得其他紋章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超越者游泳法</text:p>
            <text:p>（オーヴァード泳法）</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能利用背教者之力自由游泳</text:p>
          </table:table-cell>
          <table:table-cell table:style-name="ce151" office:value-type="string" calcext:value-type="string">
            <text:p>你在水中或水上的行動不會受到不利修正，具體無視哪些修正由GM決定</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者空手道</text:p>
            <text:p>（オーヴァード空手）</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學會了作為超越者空手道基本的呼吸法和身體運用法，可以不給背教者施加必要以上的刺激就引發出必要的力量，敲磚都輕而易舉</text:p>
          </table:table-cell>
          <table:table-cell table:style-name="ce151" office:value-type="string" calcext:value-type="string">
            <text:p>你使用空手進行的近戰攻擊判定，達成值+2</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者命中</text:p>
            <text:p>（オーヴァードシュート）</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能利用背教者之力進行更有藝術性的命中；所謂“命中”表示以足球籃球為代表的運動中能夠得分的攻擊或動作；投標槍等也算在內</text:p>
          </table:table-cell>
          <table:table-cell table:style-name="ce151" office:value-type="string" calcext:value-type="string">
            <text:p>你使用[種類：近戰/射擊]武器進行的攻擊判定，達成值+2</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者書法</text:p>
            <text:p>（オーヴァード書道）</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能利用背教者之力積極地進行創作活動（繪畫、演奏樂器等）</text:p>
          </table:table-cell>
          <table:table-cell table:style-name="ce151" office:value-type="string" calcext:value-type="string">
            <text:p>你進行的&lt;藝術：●●&gt;判定，達成值+2</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者衝刺</text:p>
            <text:p>（オーヴァードダッシュ）</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能利用背教者之力短距離高速奔跑</text:p>
          </table:table-cell>
          <table:table-cell table:style-name="ce151" office:value-type="string" calcext:value-type="string">
            <text:p>你的戰鬥移動距離+2m，全力移動距離也會因此變更</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者駕駛</text:p>
            <text:p>（オーヴァードドライビング）</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能利用背教者之力更有效率地駕駛（自行車、摩托車等都行）</text:p>
          </table:table-cell>
          <table:table-cell table:style-name="ce151" office:value-type="string" calcext:value-type="string">
            <text:p>你進行的&lt;駕駛：●●&gt;判定，達成值+2</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者帶球</text:p>
            <text:p>（オーヴァードドリブル）</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能利用背教者之力快速傳球（足球、籃球等傳球都行）</text:p>
          </table:table-cell>
          <table:table-cell table:style-name="ce151" office:value-type="string" calcext:value-type="string">
            <text:p>你進行移動的主要階段間，使用【肉體】進行的判定骰數+1個</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越者貓足</text:p>
            <text:p>（オーヴァード貓足）</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你學會了作為超越者空手道基本的步法和受身，可以不給背教者施加必要以上的刺激就引發出必要的力量，可以輕易化解對方攻擊</text:p>
          </table:table-cell>
          <table:table-cell table:style-name="ce151" office:value-type="string" calcext:value-type="string">
            <text:p>你使用空手進行格擋的格擋值+2</text:p>
          </table:table-cell>
          <table:table-cell table:style-name="ce148" office:value-type="string" calcext:value-type="string">
            <text:p>IA P163</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神城集團 <text:s text:c="32"/>取得條件：職業為商務人士、企業高層、企業特工A～D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硬核業務西裝</text:p>
            <text:p>（ハードビズ・スーツ）</text:p>
          </table:table-cell>
          <table:table-cell table:style-name="ce93" office:value-type="string" calcext:value-type="string">
            <text:p>紋章/防具</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為神城集團工作員準備的強化服</text:p>
          </table:table-cell>
          <table:table-cell table:style-name="ce151" office:value-type="string" calcext:value-type="string">
            <text:p>閃避：0   行動值：0   裝甲值：8</text:p>
            <text:p>你進行&lt;意志&gt;判定達成值+[&lt;情報：商務&gt;（最大5）]</text:p>
          </table:table-cell>
          <table:table-cell table:style-name="ce148" office:value-type="string" calcext:value-type="string">
            <text:p>IA P16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關聯：巨型企業</text:p>
            <text:p>（コネ：超巨大企業）</text:p>
          </table:table-cell>
          <table:table-cell table:style-name="ce93" office:value-type="string" calcext:value-type="string">
            <text:p>紋章/關聯</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大型跨國企業的重要成員或幹部，不一定是本公司的人</text:p>
          </table:table-cell>
          <table:table-cell table:style-name="ce151" office:value-type="string" calcext:value-type="string">
            <text:p>你進行&lt;情報：商務&gt;判定前使用，該判定骰數+3個</text:p>
          </table:table-cell>
          <table:table-cell table:style-name="ce148" office:value-type="string" calcext:value-type="string">
            <text:p>IA P16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火炮車</text:p>
            <text:p>（ガントラック）</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可以由超越者遠端操控的公事包型無人機，內藏武器，可以憑你的意思操縱</text:p>
          </table:table-cell>
          <table:table-cell table:style-name="ce151" office:value-type="string" calcext:value-type="string">
            <text:p>取得需要&lt;RC&gt;LV1以上；你可以追加裝備一件武器</text:p>
          </table:table-cell>
          <table:table-cell table:style-name="ce148" office:value-type="string" calcext:value-type="string">
            <text:p>IA P16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黑色ID卡</text:p>
            <text:p>（黒のIDカー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屬於神城早月派系（會長派）的ID卡，採用了會與背教者產生反應的素材製造，會與《結界化》產生反應而閃爍金光</text:p>
          </table:table-cell>
          <table:table-cell table:style-name="ce151" office:value-type="string" calcext:value-type="string">
            <text:p>取得時選擇一項技能，你進行的所選技能的判定，達成值+2；該道具無法與「銀色ID卡」同時取得</text:p>
          </table:table-cell>
          <table:table-cell table:style-name="ce148" office:value-type="string" calcext:value-type="string">
            <text:p>IA P164</text:p>
          </table:table-cell>
          <table:table-cell table:style-name="ce148"/>
          <table:table-cell table:number-columns-repeated="1016"/>
        </table:table-row>
        <table:table-row table:style-name="ro16">
          <table:table-cell table:style-name="ce148" office:value-type="string" calcext:value-type="string">
            <text:p>社史編纂課</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神城之中的諜報組織，在多餘的課長之下，齊聚著戴上溺愛孩子的中年一般社員和冒失OL面具的優秀特工，只要跟部門打聲招呼，便會立即展開情報收集</text:p>
          </table:table-cell>
          <table:table-cell table:style-name="ce151" office:value-type="string" calcext:value-type="string">
            <text:p>你進行的&lt;情報：●●&gt;判定骰數+1個</text:p>
          </table:table-cell>
          <table:table-cell table:style-name="ce148" office:value-type="string" calcext:value-type="string">
            <text:p>IA P164</text:p>
          </table:table-cell>
          <table:table-cell table:style-name="ce148"/>
          <table:table-cell table:number-columns-repeated="1016"/>
        </table:table-row>
        <table:table-row table:style-name="ro16">
          <table:table-cell table:style-name="ce148" office:value-type="string" calcext:value-type="string">
            <text:p>銀色ID卡</text:p>
            <text:p>（銀のIDカー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屬於神城集團的改革派（比現在更加追求嘗試利用背教者來獲取利益的派系）的ID卡，採用了會與背教者產生反應的素材製造，會與《結界化》產生反應而發出清澈的音色</text:p>
          </table:table-cell>
          <table:table-cell table:style-name="ce151" office:value-type="string" calcext:value-type="string">
            <text:p>你進行的&lt;意志&gt;和&lt;籌措&gt;判定的達成值+2；該道具無法與「黑色ID卡」同時取得</text:p>
          </table:table-cell>
          <table:table-cell table:style-name="ce148" office:value-type="string" calcext:value-type="string">
            <text:p>IA P164</text:p>
          </table:table-cell>
          <table:table-cell table:style-name="ce148"/>
          <table:table-cell table:number-columns-repeated="1016"/>
        </table:table-row>
        <table:table-row table:style-name="ro16">
          <table:table-cell table:style-name="ce148" office:value-type="string" calcext:value-type="string">
            <text:p>神之遺子</text:p>
            <text:p>（神の落とし子）</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因神城過去進行的實驗而誕生的超越者一事的紋章</text:p>
          </table:table-cell>
          <table:table-cell table:style-name="ce151" office:value-type="string" calcext:value-type="string">
            <text:p>取得時從你擁有的異能中選擇一個，你的侵蝕率超過100%期間，所選異能的LV+2，此時可超過最大等級，但不會因此而增加使用次數</text:p>
          </table:table-cell>
          <table:table-cell table:style-name="ce148" office:value-type="string" calcext:value-type="string">
            <text:p>IA P164</text:p>
          </table:table-cell>
          <table:table-cell table:style-name="ce148"/>
          <table:table-cell table:number-columns-repeated="1016"/>
        </table:table-row>
        <table:table-row table:style-name="ro16">
          <table:table-cell table:style-name="ce148" office:value-type="string" calcext:value-type="string">
            <text:p>傑出特工</text:p>
            <text:p>（スペシャルエージェント）</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ext:p>1/判定</text:p>
          </table:table-cell>
          <table:table-cell table:style-name="ce151" office:value-type="string" calcext:value-type="string">
            <text:p>表示你在神城的特工之中亦是脫穎而出的一事的紋章，為了公司的利益，你跨越了種種困難</text:p>
          </table:table-cell>
          <table:table-cell table:style-name="ce151" office:value-type="string" calcext:value-type="string">
            <text:p>你進行判定之後使用，該判定的達成值+1D10</text:p>
            <text:p>該效果一次判定可以使用1次，1劇本可以使用3次</text:p>
          </table:table-cell>
          <table:table-cell table:style-name="ce148" office:value-type="string" calcext:value-type="string">
            <text:p>IA P164</text:p>
          </table:table-cell>
          <table:table-cell table:style-name="ce148"/>
          <table:table-cell table:number-columns-repeated="1016"/>
        </table:table-row>
        <table:table-row table:style-name="ro16">
          <table:table-cell table:style-name="ce148" office:value-type="string" calcext:value-type="string">
            <text:p>尖端設計</text:p>
            <text:p>（ハイデザイ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由神城的優秀技術力打造而出的防具、載具，有比一般裝備更加結實易用的性能</text:p>
          </table:table-cell>
          <table:table-cell table:style-name="ce151" office:value-type="string" calcext:value-type="string">
            <text:p>取得時，從你常備化的防具或載具中選擇一件；所選道具的行動值+3（此時可以令行動值提升至1以上）、裝甲值+7</text:p>
          </table:table-cell>
          <table:table-cell table:style-name="ce148" office:value-type="string" calcext:value-type="string">
            <text:p>IA P165</text:p>
          </table:table-cell>
          <table:table-cell table:style-name="ce148"/>
          <table:table-cell table:number-columns-repeated="1016"/>
        </table:table-row>
        <table:table-row table:style-name="ro16">
          <table:table-cell table:style-name="ce148" office:value-type="string" calcext:value-type="string">
            <text:p>優良兵器</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持有著以神城的優秀技術力製造而出的武器，與一般的武器相比，其使用了更加優秀的材質，性能亦更上層樓</text:p>
          </table:table-cell>
          <table:table-cell table:style-name="ce151" office:value-type="string" calcext:value-type="string">
            <text:p>取得時，從你常備化的武器中選擇一件，所選武器的命中+2、攻擊力+5；GM允許的話，可在導入階段重新選擇</text:p>
          </table:table-cell>
          <table:table-cell table:style-name="ce148" office:value-type="string" calcext:value-type="string">
            <text:p>IA P165</text:p>
          </table:table-cell>
          <table:table-cell table:style-name="ce148"/>
          <table:table-cell table:number-columns-repeated="1016"/>
        </table:table-row>
        <table:table-row table:style-name="ro16">
          <table:table-cell table:style-name="ce148" office:value-type="string" calcext:value-type="string">
            <text:p>K資金</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上上代會長所隱藏的，用於過去戰爭的軍資金，雖然能使用的只有其中一部分，但差不多的東西基本都能夠買得下來</text:p>
          </table:table-cell>
          <table:table-cell table:style-name="ce151" office:value-type="string" calcext:value-type="string">
            <text:p>購入判定前使用，該購入判定自動成功，你立即入手你想要的道具；但是，無法用來取得[購入不可]的道具、特殊道具、以D-lois取得的道具、紋章道具。入手的該道具無法常備化，且將劇本結束時消失</text:p>
            <text:p>該效果1劇本可以使用1次</text:p>
          </table:table-cell>
          <table:table-cell table:style-name="ce148" office:value-type="string" calcext:value-type="string">
            <text:p>IA P165</text:p>
          </table:table-cell>
          <table:table-cell table:style-name="ce148"/>
          <table:table-cell table:number-columns-repeated="1016"/>
        </table:table-row>
        <table:table-row table:style-name="ro16">
          <table:table-cell table:style-name="ce148" office:value-type="string" calcext:value-type="string">
            <text:p>公關策劃七課</text:p>
            <text:p>（広報企畫七課）</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神城的公關部門。通過新聞和網路，以及輿論等等手段，將虛假的情報變成真相</text:p>
          </table:table-cell>
          <table:table-cell table:style-name="ce151" office:value-type="string" calcext:value-type="string">
            <text:p>主要動作使用，你可以掩蓋或是憑空捏造一個指定的資訊。會因此而產生什麼樣的影響由GM來決定。但首先你需通過目標值為15的&lt;情報：媒體&gt;判定，以獲取你欲掩蓋/捏造之情報的真相</text:p>
            <text:p>該效果1劇本可以使用1次</text:p>
          </table:table-cell>
          <table:table-cell table:style-name="ce148" office:value-type="string" calcext:value-type="string">
            <text:p>IA P165</text:p>
          </table:table-cell>
          <table:table-cell table:style-name="ce148"/>
          <table:table-cell table:number-columns-repeated="1016"/>
        </table:table-row>
        <table:table-row table:style-name="ro16">
          <table:table-cell table:style-name="ce148" office:value-type="string" calcext:value-type="string">
            <text:p>黑色交易</text:p>
            <text:p>（闇取引）</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作為神城的暗部，與FH和結社等秘密結社、犯罪組織有所關聯的紋章。這些組織與你至今都仍有關聯</text:p>
          </table:table-cell>
          <table:table-cell table:style-name="ce151" office:value-type="string" calcext:value-type="string">
            <text:p>先攻階段使用，使一個接戰區域中存在的所有集群單位全部退場；GM可以拒絕該效果，此時不消耗使用次數</text:p>
            <text:p>該效果1劇本可以使用1次</text:p>
          </table:table-cell>
          <table:table-cell table:style-name="ce148" office:value-type="string" calcext:value-type="string">
            <text:p>IA P165</text:p>
          </table:table-cell>
          <table:table-cell table:style-name="ce148"/>
          <table:table-cell table:number-columns-repeated="1016"/>
        </table:table-row>
        <table:table-row table:style-name="ro16">
          <table:table-cell table:style-name="ce148" office:value-type="string" calcext:value-type="string">
            <text:p>活力棒</text:p>
            <text:p>（バイタルバー）</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能強化超越者恢復力的攜帶食品，關於味道和口感的會議課題很多</text:p>
          </table:table-cell>
          <table:table-cell table:style-name="ce151" office:value-type="string" calcext:value-type="string">
            <text:p>次要動作使用，你的HP回復2D10</text:p>
            <text:p>該道具最多可以取得3件</text:p>
          </table:table-cell>
          <table:table-cell table:style-name="ce148" office:value-type="string" calcext:value-type="string">
            <text:p>IA P16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OEM</text:p>
          </table:table-cell>
          <table:table-cell table:style-name="ce93" office:value-type="string" calcext:value-type="string">
            <text:p>核心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你是天才商品開發者，即使是在非日常世界裡，與其他組織的道具開發機密有關也不算少見</text:p>
          </table:table-cell>
          <table:table-cell table:style-name="ce151" office:value-type="string" calcext:value-type="string">
            <text:p>你合計取得3件其他組織的紋章，每一件都可以屬不同的組織，但不能選擇核心紋章，常備化所需的經驗點需要另外消耗，取得需要GM許可的道具依然需要GM許可</text:p>
          </table:table-cell>
          <table:table-cell table:style-name="ce148" office:value-type="string" calcext:value-type="string">
            <text:p>IA P16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黑西裝</text:p>
            <text:p>（ブラックスーツ）</text:p>
          </table:table-cell>
          <table:table-cell table:style-name="ce93" office:value-type="string" calcext:value-type="string">
            <text:p>核心紋章/一般</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你是神城集團的非合法活動專家，處理正常手段無法處理的問題就是你的工作，這種職業大半都是都市傳說，使得普通人之間有了“小心穿黑西裝的神城集團員工”的警句，當然實際上不一定要穿黑西裝</text:p>
          </table:table-cell>
          <table:table-cell table:style-name="ce151" office:value-type="string" calcext:value-type="string">
            <text:p>你進行攻擊判定的達成值和攻擊力+5，你受到的傷害-5</text:p>
          </table:table-cell>
          <table:table-cell table:style-name="ce148" office:value-type="string" calcext:value-type="string">
            <text:p>IA P16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行政官</text:p>
            <text:p>（エグゼクティブ）</text:p>
          </table:table-cell>
          <table:table-cell table:style-name="ce93" office:value-type="string" calcext:value-type="string">
            <text:p>核心紋章/一般</text:p>
          </table:table-cell>
          <table:table-cell table:style-name="ce148" office:value-type="float" office:value="40" calcext:value-type="float">
            <text:p>40</text:p>
          </table:table-cell>
          <table:table-cell table:style-name="ce148" office:value-type="string" calcext:value-type="string">
            <text:p>-</text:p>
          </table:table-cell>
          <table:table-cell table:style-name="ce151" office:value-type="string" calcext:value-type="string">
            <text:p>你是神城集團分社長等重要幹部，被委任負責重大案件，因為給了你自由使用巨額預算的許可權，所有你一定很有才能</text:p>
          </table:table-cell>
          <table:table-cell table:style-name="ce151" office:value-type="string" calcext:value-type="string">
            <text:p>你的財富點數+30，且可以在所有判定中使用財富點數；在正常情況下無法使用財富點數的判定中，每次最多使用5點</text:p>
          </table:table-cell>
          <table:table-cell table:style-name="ce148" office:value-type="string" calcext:value-type="string">
            <text:p>IA P165</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結社 <text:s text:c="39"/>取得條件：職業為結社成員、黑社會、小偷、駭客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黃金槍</text:p>
            <text:p>（黃金銃）</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5/劇本</text:p>
          </table:table-cell>
          <table:table-cell table:style-name="ce151" office:value-type="string" calcext:value-type="string">
            <text:p>分配給肅清結社內二五仔的結社監察官的手槍，能夠使用對背教者用的特殊彈藥。</text:p>
          </table:table-cell>
          <table:table-cell table:style-name="ce151" office:value-type="string" calcext:value-type="string">
            <text:p>技能：&lt;射擊&gt;   命中：-1   攻擊力：7   格擋值：-   射程：20m</text:p>
            <text:p>使用了該武器的攻擊的命中判定前使用，該攻擊的傷害+5</text:p>
            <text:p>該效果1劇本可以使用5次</text:p>
          </table:table-cell>
          <table:table-cell table:style-name="ce148" office:value-type="string" calcext:value-type="string">
            <text:p>IA P166</text:p>
          </table:table-cell>
          <table:table-cell table:style-name="ce148"/>
          <table:table-cell table:number-columns-repeated="1016"/>
        </table:table-row>
        <table:table-row table:style-name="ro16">
          <table:table-cell table:style-name="ce148" office:value-type="string" calcext:value-type="string">
            <text:p>結社外套</text:p>
            <text:p>（ギルトコート）</text:p>
          </table:table-cell>
          <table:table-cell table:style-name="ce93" office:value-type="string" calcext:value-type="string">
            <text:p>紋章/防具</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結社特工所穿的長款風衣。以舊東德情報部史塔西的設計為原型，有著讓穿著者不顯眼的心理性效果。</text:p>
          </table:table-cell>
          <table:table-cell table:style-name="ce151" office:value-type="string" calcext:value-type="string">
            <text:p>閃避：0   行動值：0   裝甲值：3</text:p>
            <text:p>次要動作使用，你進入隱秘狀態</text:p>
            <text:p>該效果1場景可以使用1次</text:p>
          </table:table-cell>
          <table:table-cell table:style-name="ce148" office:value-type="string" calcext:value-type="string">
            <text:p>IA P166</text:p>
          </table:table-cell>
          <table:table-cell table:style-name="ce148"/>
          <table:table-cell table:number-columns-repeated="1016"/>
        </table:table-row>
        <table:table-row table:style-name="ro16">
          <table:table-cell table:style-name="ce148" office:value-type="string" calcext:value-type="string">
            <text:p>假面舞會</text:p>
            <text:p>（マスカレード）</text:p>
          </table:table-cell>
          <table:table-cell table:style-name="ce93" office:value-type="string" calcext:value-type="string">
            <text:p>紋章/一般</text:p>
          </table:table-cell>
          <table:table-cell table:style-name="ce148" office:value-type="float" office:value="3" calcext:value-type="float">
            <text:p>3</text:p>
          </table:table-cell>
          <table:table-cell table:style-name="ce148" office:value-type="string" calcext:value-type="string">
            <text:p>-</text:p>
          </table:table-cell>
          <table:table-cell table:style-name="ce151" office:value-type="string" calcext:value-type="string">
            <text:p>可以成為在場的任何人，潛入任何地方的變裝道具套裝</text:p>
          </table:table-cell>
          <table:table-cell table:style-name="ce151" office:value-type="string" calcext:value-type="string">
            <text:p>場景登場時可以變裝成適合該場景的人物；可以同時準備偽造的身份證明，GM認為有必要的話，需要進行&lt;知覺&gt;判定</text:p>
          </table:table-cell>
          <table:table-cell table:style-name="ce148" office:value-type="string" calcext:value-type="string">
            <text:p>IA P16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結社卡</text:p>
            <text:p>（ギルトカー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印有昭示結社特工身份紋章的信用卡，與結社有所關係的犯罪組織必須為持有這張信用卡的人謀求便利</text:p>
          </table:table-cell>
          <table:table-cell table:style-name="ce151" office:value-type="string" calcext:value-type="string">
            <text:p>你進行的&lt;交涉&gt;判定的骰子數+1個</text:p>
          </table:table-cell>
          <table:table-cell table:style-name="ce148" office:value-type="string" calcext:value-type="string">
            <text:p>IA P166</text:p>
          </table:table-cell>
          <table:table-cell table:style-name="ce148"/>
          <table:table-cell table:number-columns-repeated="1016"/>
        </table:table-row>
        <table:table-row table:style-name="ro16">
          <table:table-cell table:style-name="ce148" office:value-type="string" calcext:value-type="string">
            <text:p>協作</text:p>
            <text:p>（コープレーショ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獲得必要的人才、掌控弱點進行脅迫等確保現場協助者的結社門道</text:p>
          </table:table-cell>
          <table:table-cell table:style-name="ce151" office:value-type="string" calcext:value-type="string">
            <text:p>任何時候都可以使用，選擇一個[購入不可]的關聯（不可以是獨特道具）；取得該關聯</text:p>
            <text:p>該效果1劇本可以使用1次</text:p>
          </table:table-cell>
          <table:table-cell table:style-name="ce148" office:value-type="string" calcext:value-type="string">
            <text:p>IA P16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笑面金庫</text:p>
            <text:p>（スマイリーの貸金庫）</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實行著管理和籌措結社所擁有的武器、載具的成員的紋章。舊克格勃的特工之間會為了安全傳遞情報和道具而借用世界各地的銀行保險櫃等設施，你也繼承了這種做法</text:p>
          </table:table-cell>
          <table:table-cell table:style-name="ce151" office:value-type="string" calcext:value-type="string">
            <text:p>你進行的&lt;籌措&gt;判定，達成值+3</text:p>
          </table:table-cell>
          <table:table-cell table:style-name="ce148" office:value-type="string" calcext:value-type="string">
            <text:p>IA P166</text:p>
          </table:table-cell>
          <table:table-cell table:style-name="ce148"/>
          <table:table-cell table:number-columns-repeated="1016"/>
        </table:table-row>
        <table:table-row table:style-name="ro16">
          <table:table-cell table:style-name="ce148" office:value-type="string" calcext:value-type="string">
            <text:p>水晶警備保障</text:p>
            <text:p>（クリスタル警備保障）</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由結社本家持有的PMC（民間軍事公司），用於以暴力阻止無視結社調停，擴大戰爭範圍的犯罪組織。有著使用獵槍進行狙擊、使用消耗品火箭炮進行攻擊等，在日本的大街小巷中也能夠進行支援的特徵</text:p>
          </table:table-cell>
          <table:table-cell table:style-name="ce151" office:value-type="string" calcext:value-type="string">
            <text:p>你進行傷害擲骰前使用，該傷害+2D10</text:p>
            <text:p>該效果1劇本可以使用1次</text:p>
          </table:table-cell>
          <table:table-cell table:style-name="ce148" office:value-type="string" calcext:value-type="string">
            <text:p>IA P166</text:p>
          </table:table-cell>
          <table:table-cell table:style-name="ce148"/>
          <table:table-cell table:number-columns-repeated="1016"/>
        </table:table-row>
        <table:table-row table:style-name="ro16">
          <table:table-cell table:style-name="ce148" office:value-type="string" calcext:value-type="string">
            <text:p>滑輪救援</text:p>
            <text:p>（シーヴズレスキュ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將陷入絕境的某人救出的支援能力，雖然結社的罪犯中多數是個人主義者，但也會為同一個目標努力</text:p>
          </table:table-cell>
          <table:table-cell table:style-name="ce151" office:value-type="string" calcext:value-type="string">
            <text:p>先制階段使用，選擇一名場景中登場的任意角色，回復該角色受到的所有異常狀態</text:p>
            <text:p>該效果1場景可以使用1次</text:p>
          </table:table-cell>
          <table:table-cell table:style-name="ce148" office:value-type="string" calcext:value-type="string">
            <text:p>IA P16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鈔能力</text:p>
            <text:p>（マネーパワ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是結社的頭目亦或是財務等，處於能夠自由掌握結社一部分資金地位的紋章。藉由豐富的資金，你能夠對戰鬥進行有利的安排。</text:p>
          </table:table-cell>
          <table:table-cell table:style-name="ce151" office:value-type="string" calcext:value-type="string">
            <text:p>準備階段使用，消耗至多10點的任意點財富點數；該回合間，你進行的攻擊，攻擊力+[消耗的財富點數]；你的行動值-5</text:p>
          </table:table-cell>
          <table:table-cell table:style-name="ce148" office:value-type="string" calcext:value-type="string">
            <text:p>IA P167</text:p>
          </table:table-cell>
          <table:table-cell table:style-name="ce148"/>
          <table:table-cell table:number-columns-repeated="1016"/>
        </table:table-row>
        <table:table-row table:style-name="ro16">
          <table:table-cell table:style-name="ce148" office:value-type="string" calcext:value-type="string">
            <text:p>鉤與繩</text:p>
            <text:p>（フック＆ワイヤー）</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3/劇本</text:p>
          </table:table-cell>
          <table:table-cell table:style-name="ce151" office:value-type="string" calcext:value-type="string">
            <text:p>鉤與繩套組，你可以使用這些小道具飛行，如果只是從對方頭頂飛過去的話連背教者之力都不是必要的</text:p>
          </table:table-cell>
          <table:table-cell table:style-name="ce151" office:value-type="string" calcext:value-type="string">
            <text:p>你進行戰鬥移動前使用，你以飛行狀態進行移動</text:p>
            <text:p>該效果1劇本可以使用3次</text:p>
          </table:table-cell>
          <table:table-cell table:style-name="ce148" office:value-type="string" calcext:value-type="string">
            <text:p>IA P16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小行星力學</text:p>
            <text:p>（小惑星の力學）</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被認為是十九世紀的英國犯罪界首領“教授”所書寫的論文感染了EX背教者病毒的產物，會根據閱讀者而改變內容，浮現出解決讀者問題的完美犯罪手段。平常都在結社內受到嚴密看管</text:p>
          </table:table-cell>
          <table:table-cell table:style-name="ce151" office:value-type="string" calcext:value-type="string">
            <text:p>準備階段使用，該回合間，場景中登場的任意角色，全員行動值+10</text:p>
            <text:p>該效果1劇本可以使用1次</text:p>
          </table:table-cell>
          <table:table-cell table:style-name="ce148" office:value-type="string" calcext:value-type="string">
            <text:p>IA P167</text:p>
          </table:table-cell>
          <table:table-cell table:style-name="ce148"/>
          <table:table-cell table:number-columns-repeated="1016"/>
        </table:table-row>
        <table:table-row table:style-name="ro16">
          <table:table-cell table:style-name="ce148" office:value-type="string" calcext:value-type="string">
            <text:p>不死</text:p>
            <text:p>（ネバーダイ）</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有著殺之不死的驚人頑強的紋章。透過裝死、替身、詭計等手段來從死亡的危機脫身，越是惡人，就越是打不死的小強</text:p>
          </table:table-cell>
          <table:table-cell table:style-name="ce151" office:value-type="string" calcext:value-type="string">
            <text:p>你陷入戰鬥不能時使用，你解除戰鬥不能，並回復4D10HP</text:p>
            <text:p>該效果1劇本可以使用1次</text:p>
          </table:table-cell>
          <table:table-cell table:style-name="ce148" office:value-type="string" calcext:value-type="string">
            <text:p>IA P167</text:p>
          </table:table-cell>
          <table:table-cell table:style-name="ce148"/>
          <table:table-cell table:number-columns-repeated="1016"/>
        </table:table-row>
        <table:table-row table:style-name="ro16">
          <table:table-cell table:style-name="ce148" office:value-type="string" calcext:value-type="string">
            <text:p>高光動作</text:p>
            <text:p>（ハイライトアクション）</text:p>
          </table:table-cell>
          <table:table-cell table:style-name="ce93" office:value-type="string" calcext:value-type="string">
            <text:p>紋章/一般</text:p>
          </table:table-cell>
          <table:table-cell table:style-name="ce148" office:value-type="float" office:value="40" calcext:value-type="float">
            <text:p>40</text:p>
          </table:table-cell>
          <table:table-cell table:style-name="ce148" office:value-type="string" calcext:value-type="string">
            <text:p>3/劇本</text:p>
          </table:table-cell>
          <table:table-cell table:style-name="ce151" office:value-type="string" calcext:value-type="string">
            <text:p>你能趁對手一瞬間的大意做出行動</text:p>
          </table:table-cell>
          <table:table-cell table:style-name="ce151" office:value-type="string" calcext:value-type="string">
            <text:p>你的主要階段開始時使用，該主要階段中，受異常狀態影響的角色使用回應動作時，不能使用異能或道具</text:p>
            <text:p>該效果1劇本可以使用3次</text:p>
          </table:table-cell>
          <table:table-cell table:style-name="ce148" office:value-type="string" calcext:value-type="string">
            <text:p>IA P16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不可能犯罪</text:p>
          </table:table-cell>
          <table:table-cell table:style-name="ce93" office:value-type="string" calcext:value-type="string">
            <text:p>紋章/一般</text:p>
          </table:table-cell>
          <table:table-cell table:style-name="ce148" office:value-type="float" office:value="50" calcext:value-type="float">
            <text:p>50</text:p>
          </table:table-cell>
          <table:table-cell table:style-name="ce148" office:value-type="string" calcext:value-type="string">
            <text:p>1/劇本</text:p>
          </table:table-cell>
          <table:table-cell table:style-name="ce151" office:value-type="string" calcext:value-type="string">
            <text:p>驅使詳細計算的詭計，即使在其他地方也能實行犯罪</text:p>
          </table:table-cell>
          <table:table-cell table:style-name="ce151" office:value-type="string" calcext:value-type="string">
            <text:p>你對場景中登場的角色使用的武器和異能可以無視射程；GM許可的情況下，即使你不在場景中登場，也能使用該效果</text:p>
            <text:p>該效果1劇本可以使用1次</text:p>
          </table:table-cell>
          <table:table-cell table:style-name="ce148" office:value-type="string" calcext:value-type="string">
            <text:p>IA P16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演出依舊</text:p>
            <text:p>（ショーマストゴーオン／舞臺は踴る）</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你是建立作戰的專家，幾乎以犯罪為生，必須擁有無論多麼完美的計畫都能即時修正的優秀現場監督能力，以此能力任何時候成為首腦都不為過</text:p>
          </table:table-cell>
          <table:table-cell table:style-name="ce151" office:value-type="string" calcext:value-type="string">
            <text:p>先制階段使用，該回合間，該場景中登場的所有角色行動值可以由你自由替換，或者說可以由你決定所有角色的行動順序</text:p>
            <text:p>該效果1劇本可以使用1次</text:p>
          </table:table-cell>
          <table:table-cell table:style-name="ce148" office:value-type="string" calcext:value-type="string">
            <text:p>IA P16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傾斜天平</text:p>
            <text:p>（アンバランス／傾く天秤）</text:p>
          </table:table-cell>
          <table:table-cell table:style-name="ce93" office:value-type="string" calcext:value-type="string">
            <text:p>核心紋章/一般</text:p>
          </table:table-cell>
          <table:table-cell table:style-name="ce148" office:value-type="float" office:value="35" calcext:value-type="float">
            <text:p>35</text:p>
          </table:table-cell>
          <table:table-cell table:style-name="ce148" office:value-type="string" calcext:value-type="string">
            <text:p>1/劇本</text:p>
          </table:table-cell>
          <table:table-cell table:style-name="ce151" office:value-type="string" calcext:value-type="string">
            <text:p>你能夠通過大規模工作阻止其他人前進，你是擅長謀劃大規模機關的建立作戰專家，犯罪界的幻想曲</text:p>
          </table:table-cell>
          <table:table-cell table:style-name="ce151" office:value-type="string" calcext:value-type="string">
            <text:p>準備階段使用，場景內登場的任意角色進行難易度為20的&lt;知覺&gt;判定，失敗時受到無法被異能解除的[異常狀態：硬直]</text:p>
            <text:p>該效果1劇本可以使用1次</text:p>
          </table:table-cell>
          <table:table-cell table:style-name="ce148" office:value-type="string" calcext:value-type="string">
            <text:p>IA P16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成真贗品</text:p>
            <text:p>（トゥルーイミテーション）</text:p>
          </table:table-cell>
          <table:table-cell table:style-name="ce93" office:value-type="string" calcext:value-type="string">
            <text:p>核心紋章/一般</text:p>
          </table:table-cell>
          <table:table-cell table:style-name="ce148" office:value-type="float" office:value="50" calcext:value-type="float">
            <text:p>50</text:p>
          </table:table-cell>
          <table:table-cell table:style-name="ce148" office:value-type="string" calcext:value-type="string">
            <text:p>1/劇本</text:p>
          </table:table-cell>
          <table:table-cell table:style-name="ce151" office:value-type="string" calcext:value-type="string">
            <text:p>你是製作贗品的專家，你的作品幾乎是藝術品，有時甚至超越了正品</text:p>
          </table:table-cell>
          <table:table-cell table:style-name="ce151" office:value-type="string" calcext:value-type="string">
            <text:p>主要動作使用，選擇一件在該劇本中目擊過的道具並製作其仿造品，仿造品擁有與正品相同的效果，可以是親眼所見、通過錄影等媒介、甚至是權力或作戰等非實體道具</text:p>
            <text:p>該效果1劇本可以使用1次</text:p>
          </table:table-cell>
          <table:table-cell table:style-name="ce148" office:value-type="string" calcext:value-type="string">
            <text:p>IA P167</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公安員警特殊犯罪調查室 <text:s text:c="7"/>取得條件：職業為刑警或是鑒定員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科學搜查研究所</text:p>
          </table:table-cell>
          <table:table-cell table:style-name="ce93" office:value-type="string" calcext:value-type="string">
            <text:p>紋章/關聯</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集約了科學性搜查所需的技術和資料的研究所、於法醫學研究室之中有著負責背教者對策的部門，獨立進行著有關背教者病毒的研究和情報收集</text:p>
          </table:table-cell>
          <table:table-cell table:style-name="ce151" office:value-type="string" calcext:value-type="string">
            <text:p>技能：&lt;情報：員警&gt;</text:p>
            <text:p>&lt;情報：員警&gt;的判定骰數+2個</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8" office:value-type="string" calcext:value-type="string">
            <text:p>員警筆記</text:p>
            <text:p>（員警手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警官所持有的身份證明書，雖然名為筆記，但現行物均是用以證明身份的東西，並沒有進行記錄等筆記該有的功能。配發給特調警官們的版本內部藏有IC晶片，使用特調的專用器材時，便是用它來解鎖</text:p>
          </table:table-cell>
          <table:table-cell table:style-name="ce151" office:value-type="string" calcext:value-type="string">
            <text:p>你進行的使用了【社會】能力值的判定，達成值+1</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8" office:value-type="string" calcext:value-type="string">
            <text:p>R監視隊</text:p>
            <text:p>（R監視チーム）</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對背教能力者進行監視的特調部門，通過監控攝像頭和竊聽器等等，地毯式的調查對象和其周邊是否有發生背教者相關的事故</text:p>
          </table:table-cell>
          <table:table-cell table:style-name="ce151" office:value-type="string" calcext:value-type="string">
            <text:p>情報判定後使用，該判定的達成值+5</text:p>
            <text:p>該效果1劇本可以使用3次</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8" office:value-type="string" calcext:value-type="string">
            <text:p>R拘留所</text:p>
            <text:p>（R拘置所）</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超越者專用的拘留所。為了預防利用異能逃走，有著媲美避難所級的堅固</text:p>
          </table:table-cell>
          <table:table-cell table:style-name="ce151" office:value-type="string" calcext:value-type="string">
            <text:p>主要動作使用，將場景中登場的一個角色拘束或保護在R拘留所內。想要從拘留所內逃走或潛入，必須成功通過目標值15的&lt;情報：員警&gt;判定；GM可以拒絕對角色的拘束或保護，此時不消耗使用次數</text:p>
            <text:p>該效果1劇本可以使用1次</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8" office:value-type="string" calcext:value-type="string">
            <text:p>封鎖網</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讓同僚封鎖周邊區域，封住敵人行動的紋章。所能妨礙的不僅僅是移動，而是其所有行動</text:p>
          </table:table-cell>
          <table:table-cell table:style-name="ce151" office:value-type="string" calcext:value-type="string">
            <text:p>準備階段使用，該回合間，封鎖你所在的接戰區域。此外，在該封鎖接戰區內的任意角色進行的任何判定，骰子數-2個</text:p>
            <text:p>該效果1場景可以使用1次</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8" office:value-type="string" calcext:value-type="string">
            <text:p>炎之自豪</text:p>
            <text:p>（炎のプライド）</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有著身為特調的一員守護日本的崇高自豪的紋章，這份強烈的自豪感，正是你動力的源泉</text:p>
          </table:table-cell>
          <table:table-cell table:style-name="ce151" office:value-type="string" calcext:value-type="string">
            <text:p>取得時選擇一種能力值（肉體/感覺/精神/社會）；使用所選能力值的判定前使用，該判定的達成值+5</text:p>
            <text:p>該效果1劇本可以使用1次</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8" office:value-type="string" calcext:value-type="string">
            <text:p>特殊急襲部隊</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表示能受到特殊急襲部隊（SAT）支援的紋章。其作為日本的反恐部隊，雖然有經受過一定的對背教能力者訓練，但進行戰鬥支援就是非超越者隊員們的極限了</text:p>
          </table:table-cell>
          <table:table-cell table:style-name="ce151" office:value-type="string" calcext:value-type="string">
            <text:p>你進行判定前使用，該判定的骰子數+5個</text:p>
            <text:p>該效果1劇本可以使用3次</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8" office:value-type="string" calcext:value-type="string">
            <text:p>特殊災害特別處置法</text:p>
            <text:p>（特殊災害特別措置法）</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特調的王牌，將背教者問題視為特殊災害，以特殊災害特別處置法來實施周邊居民的緊急避難和防衛隊的緊急出動</text:p>
          </table:table-cell>
          <table:table-cell table:style-name="ce151" office:value-type="string" calcext:value-type="string">
            <text:p>主要動作使用，使該場景中登場的任意角色從場景中退場，此外，該場景間，你可以拒絕角色在場景中登場；GM也可以指定任意角色不受該效果影響</text:p>
            <text:p>該效果1劇本可以使用1次</text:p>
          </table:table-cell>
          <table:table-cell table:style-name="ce148" office:value-type="string" calcext:value-type="string">
            <text:p>IA P168</text:p>
          </table:table-cell>
          <table:table-cell table:style-name="ce148"/>
          <table:table-cell table:number-columns-repeated="1016"/>
        </table:table-row>
        <table:table-row table:style-name="ro16">
          <table:table-cell table:style-name="ce147" office:value-type="string" calcext:value-type="string" table:number-columns-spanned="6" table:number-rows-spanned="1">
            <text:p>鴻央會 <text:s text:c="35"/>取得條件：職業為黑社會或是刺客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傳說之白鞘</text:p>
          </table:table-cell>
          <table:table-cell table:style-name="ce93" office:value-type="string" calcext:value-type="string">
            <text:p>紋章/近戰</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日本刀中的利劍，以及將其收納其中的、感染了EX背教者病毒的白色刀鞘；有吸收使用者生命的力量</text:p>
          </table:table-cell>
          <table:table-cell table:style-name="ce151" office:value-type="string" calcext:value-type="string">
            <text:p>技能：&lt;近戰&gt;   命中：-3   攻擊力：9   格擋值：3   射程：至近</text:p>
            <text:p>以該武器進行攻擊的傷害擲骰前使用，消耗10點以下任意點HP，則該攻擊的攻擊力+[所消耗的HP×2]</text:p>
            <text:p>該效果1劇本可以使用1次</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8" office:value-type="string" calcext:value-type="string">
            <text:p>改裝戰車</text:p>
            <text:p>（テクニカル）</text:p>
          </table:table-cell>
          <table:table-cell table:style-name="ce93" office:value-type="string" calcext:value-type="string">
            <text:p>紋章/載具</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各個組織在抗爭中使用的，進行了武裝改造的皮卡車</text:p>
          </table:table-cell>
          <table:table-cell table:style-name="ce151" office:value-type="string" calcext:value-type="string">
            <office:annotation draw:style-name="gr13" draw:text-style-name="P2" svg:width="327.26pt" svg:height="175.49pt" svg:x="1078.84pt" svg:y="5332.51pt" draw:caption-point-x="-11.54pt" draw:caption-point-y="-22.22pt">
              <dc:date>2026-04-24T00:00:00</dc:date>
              <text:p text:style-name="P1">榴彈發射器</text:p>
              <text:p text:style-name="P1">種類：射擊</text:p>
              <text:p text:style-name="P1">技能：&lt;射擊&gt;</text:p>
              <text:p text:style-name="P1">命中：-2</text:p>
              <text:p text:style-name="P1">攻擊力：9</text:p>
              <text:p text:style-name="P1">格擋值：—</text:p>
              <text:p text:style-name="P1">射程：30m</text:p>
              <text:p text:style-name="P1">發射榴彈用的射擊筒，藉由四散的彈片進行廣範圍攻擊。</text:p>
              <text:p text:style-name="P1">使用該武器的射擊攻擊不能選擇與你處於同一接戰區域的角色作為攻擊對象。</text:p>
              <text:p text:style-name="P1">消耗次要動作，該主要階段間，以該武器進行的射擊攻擊對象變更為「對象：範圍」，這個效果一個劇本中只能使用一次。</text:p>
              <text:p text:style-name="P1">======</text:p>
            </office:annotation>
            <text:p>技能：&lt;駕駛：四輪&gt;   攻擊力：6   行動值：-5   裝甲值：6   全力移動：100m</text:p>
            <text:p>搭乘期間，戰鬥移動+20m，且視為裝備了可以使用的榴彈發射器</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8" office:value-type="string" calcext:value-type="string">
            <text:p>代紋徽章</text:p>
            <text:p>（代紋バッジ）</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雕刻了所屬組織代紋的暴力團員徽章，幹部級別的徽章則是金色的。雖然在員警嚴格掃黑除惡的時代一般都不會佩戴在身上，但在因背教者問題導致社會不安放大的如今，又開始佩戴上了</text:p>
          </table:table-cell>
          <table:table-cell table:style-name="ce151" office:value-type="string" calcext:value-type="string">
            <text:p>你進行的使用了【社會】能力值的任何判定，達成值+2</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8" office:value-type="string" calcext:value-type="string">
            <text:p>密醫</text:p>
            <text:p>（闇醫者）</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暴力團在通常無法到一般的醫療機構接受治療時使用的密醫，你在遭遇突發情況之時也可以借助他們來獲得治療。並非只有不具行醫執照的赤腳大夫，也有被威脅或是被收買的正規醫生存在</text:p>
          </table:table-cell>
          <table:table-cell table:style-name="ce151" office:value-type="string" calcext:value-type="string">
            <text:p>場景結束時使用，你的HP恢復到最大值</text:p>
            <text:p>該效果1劇本可以使用1次</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8" office:value-type="string" calcext:value-type="string">
            <text:p>升龍的刺青</text:p>
            <text:p>（昇り龍の刺青）</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展示自己是走過無數戰場的武鬥派黑道的刺青，脫下各種衣服展露刺青時，你的意志將會因此而增強， 繼而發揮出最大的力量</text:p>
          </table:table-cell>
          <table:table-cell table:style-name="ce151" office:value-type="string" calcext:value-type="string">
            <text:p>次要動作時使用，該回合間，你進行的攻擊判定，暴擊值-1（下限6）；但該效果生效期間，你無法受到任何防具的效果，也無法使用防具</text:p>
            <text:p>該效果1劇本可以使用1次</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8" office:value-type="string" calcext:value-type="string">
            <text:p>杯之誓約</text:p>
            <text:p>（杯の契り）</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表示你是與鴻央會交換契約，身為一組之“組長”的紋章。只要你一開口，不知死活的手下們便會為你出力</text:p>
          </table:table-cell>
          <table:table-cell table:style-name="ce151" office:value-type="string" calcext:value-type="string">
            <text:p>場景中登場的一個角色進行傷害擲骰前使用，該傷害+3D10</text:p>
            <text:p>該效果1劇本可以使用3次</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8" office:value-type="string" calcext:value-type="string">
            <text:p>仁義之志</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看重義理人情的黑道的紋章。重視仁義的意念賦予了你忍耐苦難的力量</text:p>
          </table:table-cell>
          <table:table-cell table:style-name="ce151" office:value-type="string" calcext:value-type="string">
            <text:p>你受到[暴走]以外的異常狀態後使用，取消所受的所有異常狀態</text:p>
            <text:p>該道具最多可以取得至3個</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8" office:value-type="string" calcext:value-type="string">
            <text:p>炮灰</text:p>
            <text:p>（鉄砲玉）</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不顧自身安全沖入敵陣的小混混，是你的小弟之中的一員。膽子夠大，本事卻跟不上，失敗次數也很多；但其捨身的一擊有時也能讓對手露出破綻</text:p>
          </table:table-cell>
          <table:table-cell table:style-name="ce151" office:value-type="string" calcext:value-type="string">
            <text:p>次要動作使用，該主要階段間，你攻擊的對象的回應動作，骰子數-1個；此外，攻擊命中時，以無視對方裝甲值進行傷害計算</text:p>
            <text:p>該道具可以取得多個</text:p>
          </table:table-cell>
          <table:table-cell table:style-name="ce148" office:value-type="string" calcext:value-type="string">
            <text:p>IA P169</text:p>
          </table:table-cell>
          <table:table-cell table:style-name="ce148"/>
          <table:table-cell table:number-columns-repeated="1016"/>
        </table:table-row>
        <table:table-row table:style-name="ro16">
          <table:table-cell table:style-name="ce147" office:value-type="string" calcext:value-type="string" table:number-columns-spanned="6" table:number-rows-spanned="1">
            <text:p>神恩天國 <text:s text:c="32"/>取得條件：職業為黑手黨、刺客、小偷、駭客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暴走劍</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神恩天國從倉庫裡偷出來的，風暴基地開發失敗後封印於隔離倉庫的劍。通過使體內的背教者病毒進入暴走狀態來增大其破壞力</text:p>
          </table:table-cell>
          <table:table-cell table:style-name="ce151" office:value-type="string" calcext:value-type="string">
            <office:annotation draw:style-name="gr14" draw:text-style-name="P2" svg:width="327.26pt" svg:height="70.5pt" svg:x="1078.84pt" svg:y="5452.5pt" draw:caption-point-x="-11.54pt" draw:caption-point-y="-22.22pt">
              <dc:date>2026-04-24T00:00:00</dc:date>
              <text:p text:style-name="P1">官方FAQ：</text:p>
              <text:p text:style-name="P1">Q：裝備了暴走劍的角色持有沖動異能時該如何處理？</text:p>
              <text:p text:style-name="P1">A：請於裝備時應用沖動變異暴走的效果，並解除普通的暴走異常狀態。此後，直至再次裝備暴走劍為止，都不會再次受到源自暴走劍的暴走狀態</text:p>
              <text:p text:style-name="P1">======</text:p>
            </office:annotation>
            <text:p>技能：&lt;近戰&gt;   命中：-3   攻擊力：15   格擋值：3   射程：至近</text:p>
            <text:p>裝備該武器期間，你受到[異常狀態：暴走]，該暴走在解除裝備該武器前無法解除</text:p>
          </table:table-cell>
          <table:table-cell table:style-name="ce148" office:value-type="string" calcext:value-type="string">
            <text:p>IA P170</text:p>
          </table:table-cell>
          <table:table-cell table:style-name="ce148"/>
          <table:table-cell table:number-columns-repeated="1016"/>
        </table:table-row>
        <table:table-row table:style-name="ro16">
          <table:table-cell table:style-name="ce148" office:value-type="string" calcext:value-type="string">
            <text:p>爆破者666</text:p>
            <text:p>（ブラスター６６６）</text:p>
          </table:table-cell>
          <table:table-cell table:style-name="ce93" office:value-type="string" calcext:value-type="string">
            <text:p>紋章/射擊</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神恩天國研究小組製作的熱能光束槍，雖然強力但是機能不太穩定</text:p>
          </table:table-cell>
          <table:table-cell table:style-name="ce151" office:value-type="string" calcext:value-type="string">
            <text:p>技能：&lt;射擊&gt;   命中：-2   攻擊力：14   格擋值：-   射程：20m</text:p>
            <text:p>使用該武器進行攻擊後投擲D10，點數為1時該武器破壞</text:p>
          </table:table-cell>
          <table:table-cell table:style-name="ce148" office:value-type="string" calcext:value-type="string">
            <text:p>IA P17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盜龍索爾</text:p>
            <text:p>（ラプトルソー）</text:p>
          </table:table-cell>
          <table:table-cell table:style-name="ce93" office:value-type="string" calcext:value-type="string">
            <text:p>紋章/射擊</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可以搭載于絕對強力坦克的戰鬥無人機，可以依超越者意志自律操縱</text:p>
          </table:table-cell>
          <table:table-cell table:style-name="ce151" office:value-type="string" calcext:value-type="string">
            <text:p>技能：&lt;RC&gt;   命中：-3   攻擊力：18   格擋值：-   射程：30m</text:p>
            <text:p>使用該武器進行的判定可以組合[技能：&lt;射擊&gt;]的異能</text:p>
          </table:table-cell>
          <table:table-cell table:style-name="ce148" office:value-type="string" calcext:value-type="string">
            <text:p>IA P17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絕對強力坦克</text:p>
            <text:p>（ジャガンナートタンク）</text:p>
          </table:table-cell>
          <table:table-cell table:style-name="ce93" office:value-type="string" calcext:value-type="string">
            <text:p>紋章/載具</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將通過非法管道籌措的戰車改造成超越者專用特殊車輛，可以依超越者意志操縱</text:p>
          </table:table-cell>
          <table:table-cell table:style-name="ce151" office:value-type="string" calcext:value-type="string">
            <text:p>技能：&lt;RC&gt;    攻擊力：15  行動值：-10   裝甲值：25   全力移動：40m</text:p>
            <text:p>使用該載具進行的判定可以組合[技能：&lt;駕駛：●●&gt;]異能，因該載具使行動值降低到0以下時按照1計算</text:p>
          </table:table-cell>
          <table:table-cell table:style-name="ce148" office:value-type="string" calcext:value-type="string">
            <text:p>IA P17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新人類研究所</text:p>
          </table:table-cell>
          <table:table-cell table:style-name="ce93" office:value-type="string" calcext:value-type="string">
            <text:p>紋章/關聯</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神恩天國所擁有的，幾乎是唯一的實驗設施， 雖然設備都很落後，但仍然進行著人體實驗，其研究內容意外還挺有進展</text:p>
          </table:table-cell>
          <table:table-cell table:style-name="ce151" office:value-type="string" calcext:value-type="string">
            <text:p>技能：&lt;知識：背教者&gt;</text:p>
            <text:p>&lt;知識：背教者&gt;判定的骰子數+3個</text:p>
          </table:table-cell>
          <table:table-cell table:style-name="ce148" office:value-type="string" calcext:value-type="string">
            <text:p>IA P170</text:p>
          </table:table-cell>
          <table:table-cell table:style-name="ce148"/>
          <table:table-cell table:number-columns-repeated="1016"/>
        </table:table-row>
        <table:table-row table:style-name="ro16">
          <table:table-cell table:style-name="ce148" office:value-type="string" calcext:value-type="string">
            <text:p>榮光的手環</text:p>
            <text:p>（栄光の腕輪）</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使用感應到《結界化》便會閃爍金光的素材製作的手環，同時也昭示著身為神恩天國成員的身份</text:p>
          </table:table-cell>
          <table:table-cell table:style-name="ce151" office:value-type="string" calcext:value-type="string">
            <text:p>你進行的使用【精神】能力值的判定，達成值+1</text:p>
          </table:table-cell>
          <table:table-cell table:style-name="ce148" office:value-type="string" calcext:value-type="string">
            <text:p>IA P170</text:p>
          </table:table-cell>
          <table:table-cell table:style-name="ce148"/>
          <table:table-cell table:number-columns-repeated="1016"/>
        </table:table-row>
        <table:table-row table:style-name="ro16">
          <table:table-cell table:style-name="ce148" office:value-type="string" calcext:value-type="string">
            <text:p>神恩基金</text:p>
            <text:p>（グレイスファンド）</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為使用超越者能力毫不猶豫的物資籌備，被當局察覺的風險很大</text:p>
          </table:table-cell>
          <table:table-cell table:style-name="ce151" office:value-type="string" calcext:value-type="string">
            <text:p>你進行購入判定的暴擊值-2（下限值8）；購入判定以外的【社會】判定，骰子數-1個</text:p>
          </table:table-cell>
          <table:table-cell table:style-name="ce148" office:value-type="string" calcext:value-type="string">
            <text:p>IA P17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拔狂助長</text:p>
            <text:p>（サイコブースト）</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接受了通過藥物和催眠進行的，疑似洗腦的暗示的紋章。扭曲的精神在發揮出強大力量的同時，也會對肉體構成不小的負擔</text:p>
          </table:table-cell>
          <table:table-cell table:style-name="ce151" office:value-type="string" calcext:value-type="string">
            <text:p>準備階段使用，該回合間，你進行的&lt;RC&gt;判定，骰子數+5個；使用該效果時，你受到[異常狀態：硬直]和[異常狀態：邪毒]，邪毒的等級為LV2</text:p>
            <text:p>該效果1劇本可以使用1次</text:p>
          </table:table-cell>
          <table:table-cell table:style-name="ce148" office:value-type="string" calcext:value-type="string">
            <text:p>IA P170</text:p>
          </table:table-cell>
          <table:table-cell table:style-name="ce148"/>
          <table:table-cell table:number-columns-repeated="1016"/>
        </table:table-row>
        <table:table-row table:style-name="ro16">
          <table:table-cell table:style-name="ce148" office:value-type="string" calcext:value-type="string">
            <text:p>試作型超越者干擾器</text:p>
            <text:p>（試作型オーヴァードジャマ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防衛隊陌生者所開發的對超越者兵器的試作型，從防衛隊的研究所裡偷出來的東西</text:p>
          </table:table-cell>
          <table:table-cell table:style-name="ce151" office:value-type="string" calcext:value-type="string">
            <text:p>準備階段使用，該回合間，場景中登場的所有角色進行組合了異能的判定時，骰子數-5個；使用該效果時，你的侵蝕率+2D10</text:p>
          </table:table-cell>
          <table:table-cell table:style-name="ce148" office:value-type="string" calcext:value-type="string">
            <text:p>IA P171</text:p>
          </table:table-cell>
          <table:table-cell table:style-name="ce148"/>
          <table:table-cell table:number-columns-repeated="1016"/>
        </table:table-row>
        <table:table-row table:style-name="ro16">
          <table:table-cell table:style-name="ce148" office:value-type="string" calcext:value-type="string">
            <text:p>侵蝕的惡意</text:p>
            <text:p>（侵蝕する悪意）</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侵蝕他人的精神，在攻擊中注入強烈惡意的紋章</text:p>
          </table:table-cell>
          <table:table-cell table:style-name="ce151" office:value-type="string" calcext:value-type="string">
            <text:p>次要動作使用，從暴走以外的異常狀態中選擇一個，該主要階段間，你進行的攻擊命中時，對對象造成所選的異常狀態；選擇邪毒時，其邪毒等級為LV3，選擇憎惡時，憎惡對象由你指定</text:p>
            <text:p>該效果1劇本可以使用3次</text:p>
          </table:table-cell>
          <table:table-cell table:style-name="ce148" office:value-type="string" calcext:value-type="string">
            <text:p>IA P171</text:p>
          </table:table-cell>
          <table:table-cell table:style-name="ce148"/>
          <table:table-cell table:number-columns-repeated="1016"/>
        </table:table-row>
        <table:table-row table:style-name="ro16">
          <table:table-cell table:style-name="ce148" office:value-type="string" calcext:value-type="string">
            <text:p>天體</text:p>
            <text:p>（セレスティアル）</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使用異能和背教者技術製作的至高晚餐，是只有被選召的人才能食用的新世界的款待</text:p>
          </table:table-cell>
          <table:table-cell table:style-name="ce151" office:value-type="string" calcext:value-type="string">
            <text:p>主要動作使用，該場景間你的HP最大值+10，回復5D10HP；使用後你的侵蝕率+1D10；可以交給其他角色使用，非超越者角色使用後可能覺醒為超越者，詳細由GM決定</text:p>
          </table:table-cell>
          <table:table-cell table:style-name="ce148" office:value-type="string" calcext:value-type="string">
            <text:p>IA P17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榮耀存根</text:p>
            <text:p>（グロリアスタブ）</text:p>
          </table:table-cell>
          <table:table-cell table:style-name="ce93" office:value-type="string" calcext:value-type="string">
            <text:p>紋章/消耗品</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將超越者的精神研磨至極的神秘藥劑，能讓人獲得壓倒性的自我肯定感</text:p>
          </table:table-cell>
          <table:table-cell table:style-name="ce151" office:value-type="string" calcext:value-type="string">
            <text:p>次要動作使用，該場景間，你組合異能進行的判定，骰子數+3個；使用後你的侵蝕率+1D10</text:p>
            <text:p>該道具可以取得多個</text:p>
          </table:table-cell>
          <table:table-cell table:style-name="ce148" office:value-type="string" calcext:value-type="string">
            <text:p>IA P17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MM-77病毒</text:p>
            <text:p>（ＭＭー77ウィルス）</text:p>
          </table:table-cell>
          <table:table-cell table:style-name="ce93" office:value-type="string" calcext:value-type="string">
            <text:p>紋章/消耗品</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從英軍的研究設施裡偷出來的生化兵器。其活動潛伏於流感病毒的陰影之下，並將感染體切實逼向死亡</text:p>
          </table:table-cell>
          <table:table-cell table:style-name="ce151" office:value-type="string" calcext:value-type="string">
            <text:p>主要動作使用，對該場景登場的任意角色全員造成LV10的邪毒；該效果對臨時角色會造成怎樣的影響，由GM決定</text:p>
          </table:table-cell>
          <table:table-cell table:style-name="ce148" office:value-type="string" calcext:value-type="string">
            <text:p>IA P171</text:p>
          </table:table-cell>
          <table:table-cell table:style-name="ce148"/>
          <table:table-cell table:number-columns-repeated="1016"/>
        </table:table-row>
        <table:table-row table:style-name="ro16">
          <table:table-cell table:style-name="ce148" office:value-type="string" calcext:value-type="string">
            <text:p>索多瑪洲際導彈</text:p>
            <text:p>（ソドムICBM）</text:p>
          </table:table-cell>
          <table:table-cell table:style-name="ce93" office:value-type="string" calcext:value-type="string">
            <text:p>紋章/消耗品</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從美軍處偷來的，使用特殊彈頭的洲際導彈，不僅有著與核武器相當的威力，還不會造成環境破壞（取而代之的是產生大量的鹽）</text:p>
          </table:table-cell>
          <table:table-cell table:style-name="ce151" office:value-type="string" calcext:value-type="string">
            <text:p>主要動作使用，該回合的結算階段時，對該場景中登場的所有角色造成10D10點HP傷害，該效果沒有命中判定，對象不能執行回應動作</text:p>
          </table:table-cell>
          <table:table-cell table:style-name="ce148" office:value-type="string" calcext:value-type="string">
            <text:p>IA P171</text:p>
          </table:table-cell>
          <table:table-cell table:style-name="ce148"/>
          <table:table-cell table:number-columns-repeated="1016"/>
        </table:table-row>
        <table:table-row table:style-name="ro16">
          <table:table-cell table:style-name="ce148" office:value-type="string" calcext:value-type="string">
            <text:p>超社會</text:p>
            <text:p>（ハイパーソサエティ）</text:p>
          </table:table-cell>
          <table:table-cell table:style-name="ce93" office:value-type="string" calcext:value-type="string">
            <text:p>核心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作為神恩天國的一員在一般社會構築起的地位，依靠超越者之力的話在表世界獲得成功根本不是難事，當然這樣的成功會有很多奇怪之處</text:p>
          </table:table-cell>
          <table:table-cell table:style-name="ce151" office:value-type="string" calcext:value-type="string">
            <text:p>你的【社會】+5，你使用【社會】進行的回應動作判定，骰子數-3個</text:p>
          </table:table-cell>
          <table:table-cell table:style-name="ce148" office:value-type="string" calcext:value-type="string">
            <text:p>IA P17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祝福之子</text:p>
            <text:p>（セレブレテッド／祝福の子）</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3/劇本</text:p>
          </table:table-cell>
          <table:table-cell table:style-name="ce151" office:value-type="string" calcext:value-type="string">
            <text:p>你是因神恩天國誕生的超越者，它們充滿瘋狂的試驗造成了大量犧牲，而你奇跡般的獲得了力量</text:p>
          </table:table-cell>
          <table:table-cell table:style-name="ce151" office:value-type="string" calcext:value-type="string">
            <text:p>你進行判定前使用，該判定暴擊值-1（下限值6），使用後你的侵蝕率+3</text:p>
            <text:p>該效果1劇本可以使用3次</text:p>
          </table:table-cell>
          <table:table-cell table:style-name="ce148" office:value-type="string" calcext:value-type="string">
            <text:p>IA P17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蒙娜麗莎的微笑</text:p>
            <text:p>（モナリザの微笑み）</text:p>
          </table:table-cell>
          <table:table-cell table:style-name="ce93" office:value-type="string" calcext:value-type="string">
            <text:p>核心紋章/一般</text:p>
          </table:table-cell>
          <table:table-cell table:style-name="ce148" office:value-type="float" office:value="90" calcext:value-type="float">
            <text:p>90</text:p>
          </table:table-cell>
          <table:table-cell table:style-name="ce148" office:value-type="string" calcext:value-type="string">
            <text:p>1/劇本</text:p>
          </table:table-cell>
          <table:table-cell table:style-name="ce151" office:value-type="string" calcext:value-type="string">
            <text:p>在瘋狂的盡頭幻視到的美麗世界，使人獲得如同被神選召般壓倒性全能感的紋章，已經沒有人能夠阻止陷入暴走的你了</text:p>
          </table:table-cell>
          <table:table-cell table:style-name="ce151" office:value-type="string" calcext:value-type="string">
            <text:p>與E-lois同時使用，該場景間你進行判定的暴擊值-3（下限值7）</text:p>
            <text:p>該效果1劇本可以使用1次</text:p>
          </table:table-cell>
          <table:table-cell table:style-name="ce148" office:value-type="string" calcext:value-type="string">
            <text:p>IA P171</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紋章：陌生者 <text:s text:c="2"/>取得條件：職業為陌生者、防衛隊員、傭兵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AR格鬥斧</text:p>
            <text:p>（ARコンバットアクス）</text:p>
          </table:table-cell>
          <table:table-cell table:style-name="ce93" office:value-type="string" calcext:value-type="string">
            <text:p>紋章/近戰</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交給超越者化隊員的格鬥武器，一般以消防斧為基礎但更強韌也有更好的外殼貫通力，與外表相反是非常值得信賴的武器</text:p>
          </table:table-cell>
          <table:table-cell table:style-name="ce151" office:value-type="string" calcext:value-type="string">
            <text:p>技能：&lt;近戰&gt;   命中：-1   攻擊力：8   格擋值：2   射程：至近</text:p>
            <text:p>使用該武器進行攻擊時，按照對象裝甲值-5計算傷害</text:p>
          </table:table-cell>
          <table:table-cell table:style-name="ce148" office:value-type="string" calcext:value-type="string">
            <text:p>IA P17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迦具土</text:p>
            <text:p>（カグツチ）</text:p>
          </table:table-cell>
          <table:table-cell table:style-name="ce93" office:value-type="string" calcext:value-type="string">
            <text:p>紋章/近戰</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據說從舊日軍傳來的軍刀，不知是以什麼碎片煉成的，也不知道為何被稱為迦具土，因為使用了非常硬且剛性很強的素材而不容易折斷和彎曲</text:p>
          </table:table-cell>
          <table:table-cell table:style-name="ce151" office:value-type="string" calcext:value-type="string">
            <text:p>技能：&lt;近戰&gt;   命中：-2   攻擊力：13   格擋值：8   射程：至近</text:p>
            <text:p>該武器不會因為異能的效果被破壞</text:p>
          </table:table-cell>
          <table:table-cell table:style-name="ce148" office:value-type="string" calcext:value-type="string">
            <text:p>IA P17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AR戰鬥卡賓槍</text:p>
            <text:p>（ARバトルカービン）</text:p>
          </table:table-cell>
          <table:table-cell table:style-name="ce93" office:value-type="string" calcext:value-type="string">
            <text:p>紋章/射擊</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對超越者自動小型槍，對火力和便攜性這對相反的性質進行了強行共存的產物，配有展開式槍托</text:p>
          </table:table-cell>
          <table:table-cell table:style-name="ce151" office:value-type="string" calcext:value-type="string">
            <text:p>技能：&lt;射擊&gt;   命中：-4/0   攻擊力：11   格擋值：-   射程：30m/50m</text:p>
            <text:p>次要動作使用，該場景間命中與射程使用右側資料</text:p>
            <text:p>至近不可</text:p>
          </table:table-cell>
          <table:table-cell table:style-name="ce148" office:value-type="string" calcext:value-type="string">
            <text:p>IA P17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AR霰彈槍</text:p>
            <text:p>（ARショットガン）</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使用AR(AntiRenegade，反背教者）特殊彈的霰彈槍，被AR特殊彈命中的超越者，將會產生暫時的背教者紊亂，導致運動能力降低</text:p>
          </table:table-cell>
          <table:table-cell table:style-name="ce151" office:value-type="string" calcext:value-type="string">
            <text:p>技能：&lt;射擊&gt;   命中：0   攻擊力：10   格擋值：-   射程：20m</text:p>
            <text:p>使用了該武器的射擊攻擊對超越者造成至少1點HP傷害時，該回合間，對象的【行動值】-5</text:p>
          </table:table-cell>
          <table:table-cell table:style-name="ce148" office:value-type="string" calcext:value-type="string">
            <text:p>IA P172</text:p>
          </table:table-cell>
          <table:table-cell table:style-name="ce148"/>
          <table:table-cell table:number-columns-repeated="1016"/>
        </table:table-row>
        <table:table-row table:style-name="ro16">
          <table:table-cell table:style-name="ce148" office:value-type="string" calcext:value-type="string">
            <text:p>PIB</text:p>
            <text:p>（ペイントイットブラック）</text:p>
          </table:table-cell>
          <table:table-cell table:style-name="ce93" office:value-type="string" calcext:value-type="string">
            <text:p>紋章/射擊</text:p>
          </table:table-cell>
          <table:table-cell table:style-name="ce148" office:value-type="float" office:value="40" calcext:value-type="float">
            <text:p>40</text:p>
          </table:table-cell>
          <table:table-cell table:style-name="ce148" office:value-type="string" calcext:value-type="string">
            <text:p>-</text:p>
          </table:table-cell>
          <table:table-cell table:style-name="ce151" office:value-type="string" calcext:value-type="string">
            <text:p>陌生者部隊隊長黑崎剛道在副隊長時代使用的精確射擊步槍，經過精密調整，能夠精確射擊</text:p>
          </table:table-cell>
          <table:table-cell table:style-name="ce151" office:value-type="string" calcext:value-type="string">
            <text:p>技能：&lt;射擊&gt;   命中：0   攻擊力：14   格擋值：-   射程：100m</text:p>
            <text:p>你進行的&lt;射擊&gt;判定，達成值+5</text:p>
            <text:p>至近不可</text:p>
          </table:table-cell>
          <table:table-cell table:style-name="ce148" office:value-type="string" calcext:value-type="string">
            <text:p>IA P17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陌生者特殊戰鬥服</text:p>
            <text:p>（ストレンジャーズ特殊戦闘服）</text:p>
          </table:table-cell>
          <table:table-cell table:style-name="ce93" office:value-type="string" calcext:value-type="string">
            <text:p>紋章/防具</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陌生者的特殊戰鬥服，其外觀接近於在防衛隊野戰戰鬥服外面再套一層防彈衣，但其實編入了更難受到背教者侵蝕的特殊素材</text:p>
          </table:table-cell>
          <table:table-cell table:style-name="ce151" office:value-type="string" calcext:value-type="string">
            <text:p>閃避：-1   行動值：-1   裝甲值：3</text:p>
            <text:p>你受到使用了異能的攻擊時，受到的HP傷害-5點</text:p>
          </table:table-cell>
          <table:table-cell table:style-name="ce148" office:value-type="string" calcext:value-type="string">
            <text:p>IA P172</text:p>
          </table:table-cell>
          <table:table-cell table:style-name="ce148"/>
          <table:table-cell table:number-columns-repeated="1016"/>
        </table:table-row>
        <table:table-row table:style-name="ro16">
          <table:table-cell table:style-name="ce148" office:value-type="string" calcext:value-type="string">
            <text:p>重裝甲貨車</text:p>
            <text:p>（重裝甲トラック）</text:p>
          </table:table-cell>
          <table:table-cell table:style-name="ce93" office:value-type="string" calcext:value-type="string">
            <text:p>紋章/載具</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陌生者部隊在城市區域的作戰中使用的貨車，其外觀與市面上的商用貨車無異，但其內部改造成了部隊運輸車，可以乘載一個分隊（8人）的士兵</text:p>
          </table:table-cell>
          <table:table-cell table:style-name="ce151" office:value-type="string" calcext:value-type="string">
            <text:p>技能：&lt;駕駛：四輪&gt; <text:s text:c="2"/>攻擊力：4 <text:s text:c="2"/>行動值：-6 <text:s text:c="2"/>裝甲值：12 <text:s text:c="2"/>全力移動：100m</text:p>
          </table:table-cell>
          <table:table-cell table:style-name="ce148" office:value-type="string" calcext:value-type="string">
            <text:p>IA P172</text:p>
          </table:table-cell>
          <table:table-cell table:style-name="ce148"/>
          <table:table-cell table:number-columns-repeated="1016"/>
        </table:table-row>
        <table:table-row table:style-name="ro16">
          <table:table-cell table:style-name="ce148" office:value-type="string" calcext:value-type="string">
            <text:p>特S式裝甲車</text:p>
            <text:p>（特S式裝甲車両）</text:p>
          </table:table-cell>
          <table:table-cell table:style-name="ce93" office:value-type="string" calcext:value-type="string">
            <text:p>紋章/載具</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陌生者部隊配備的輪式裝甲車，為各種兵裝準備了槍座</text:p>
          </table:table-cell>
          <table:table-cell table:style-name="ce151" office:value-type="string" calcext:value-type="string">
            <text:p>技能：&lt;駕駛：四輪&gt;   攻擊力：9   行動值：-2   裝甲值：10   全力移動：100m</text:p>
            <text:p>你裝備的[種類：射擊]武器全部變為[命中：0]</text:p>
          </table:table-cell>
          <table:table-cell table:style-name="ce148" office:value-type="string" calcext:value-type="string">
            <text:p>IA P17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陌生者BC</text:p>
            <text:p>（ストレンジャーズBC）</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面向陌生者部隊新兵的訓練演習，參加的隊員會將都市戰、野外戰的基礎以實戰形式學習</text:p>
          </table:table-cell>
          <table:table-cell table:style-name="ce151" office:value-type="string" calcext:value-type="string">
            <text:p>選擇一項取得的技能，你使用該技能進行的判定骰數+1個</text:p>
            <text:p>該紋章最多可以取得3個</text:p>
          </table:table-cell>
          <table:table-cell table:style-name="ce148" office:value-type="string" calcext:value-type="string">
            <text:p>IA P17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陌生者徽章</text:p>
            <text:p>（ストレンジャーズ徽章）</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完成了防衛隊“陌生者”的訓練，獲得了作為陌生者一員資格的徽章。跨越了嚴酷訓練的隊員們的體力遠超常人</text:p>
          </table:table-cell>
          <table:table-cell table:style-name="ce151" office:value-type="string" calcext:value-type="string">
            <text:p>你的最大HP+5</text:p>
          </table:table-cell>
          <table:table-cell table:style-name="ce148" office:value-type="string" calcext:value-type="string">
            <text:p>IA P173</text:p>
          </table:table-cell>
          <table:table-cell table:style-name="ce148"/>
          <table:table-cell table:number-columns-repeated="1016"/>
        </table:table-row>
        <table:table-row table:style-name="ro16">
          <table:table-cell table:style-name="ce148" office:value-type="string" calcext:value-type="string">
            <text:p>野外活動訓練畢業證</text:p>
            <text:p>（野外活動訓練修了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陌生者部隊內部進行的嚴酷生存訓練，每次都有很多人掉隊</text:p>
          </table:table-cell>
          <table:table-cell table:style-name="ce151" office:value-type="string" calcext:value-type="string">
            <text:p>你進行的【肉體】判定骰數+3個，但不能用於攻擊和閃避判定</text:p>
          </table:table-cell>
          <table:table-cell table:style-name="ce148" office:value-type="string" calcext:value-type="string">
            <text:p>IA P17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隱秘訓練畢業證</text:p>
            <text:p>（隠密訓練修了証）</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你接受了從事隱秘作戰的特殊訓練</text:p>
          </table:table-cell>
          <table:table-cell table:style-name="ce151" office:value-type="string" calcext:value-type="string">
            <text:p>取得需要&lt;知覺&gt;LV4以上；你進行的&lt;知覺&gt;判定，暴擊值-1（下限值9）</text:p>
          </table:table-cell>
          <table:table-cell table:style-name="ce148" office:value-type="string" calcext:value-type="string">
            <text:p>IA P17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陌生戰技</text:p>
            <text:p>（ストレンジアーツ）</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陌生者部隊內部採用的軍事格鬥技術，決定戰鬥勝負的不只是身為超越者的能力</text:p>
          </table:table-cell>
          <table:table-cell table:style-name="ce151" office:value-type="string" calcext:value-type="string">
            <text:p>你進行攻擊使用的技能在LV5以上時，造成的傷害+1D10</text:p>
          </table:table-cell>
          <table:table-cell table:style-name="ce148" office:value-type="string" calcext:value-type="string">
            <text:p>IA P17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速成武器</text:p>
            <text:p>（インスタントウエポ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擅長可以將身邊的東西當做即興武器使用的技術</text:p>
          </table:table-cell>
          <table:table-cell table:style-name="ce151" office:value-type="string" calcext:value-type="string">
            <text:p>次要動作使用，該場景間你製作並裝備以下資料的武器，視作創造道具，以[種類：射擊]使用時使用右側資料</text:p>
            <text:p>技能：&lt;近戰&gt;/&lt;射擊&gt;   命中：-1   攻擊力：7   格擋值：4   射程：至近/10m</text:p>
          </table:table-cell>
          <table:table-cell table:style-name="ce148" office:value-type="string" calcext:value-type="string">
            <text:p>IA P17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區域封鎖：日本國內</text:p>
            <text:p>（エリア封鎖：日本國內）</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出動自衛隊封鎖附近一帶，方便進行作戰</text:p>
          </table:table-cell>
          <table:table-cell table:style-name="ce151" office:value-type="string" calcext:value-type="string">
            <text:p>主要動作使用，場景內登場的臨時演員全部退場；只能在以日本國內為舞臺的場景中使用，使用時需要GM許可</text:p>
            <text:p>該效果1劇本可以使用1次</text:p>
          </table:table-cell>
          <table:table-cell table:style-name="ce148" office:value-type="string" calcext:value-type="string">
            <text:p>IA P17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主腦</text:p>
            <text:p>（オーバーマインド）</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陌生者在超越者身上施行的實驗性精神強化手術。雖然有著在戰鬥中不會產生迷惘的效果，但也有著“是接近洗腦的技術”的說法</text:p>
          </table:table-cell>
          <table:table-cell table:style-name="ce151" office:value-type="string" calcext:value-type="string">
            <text:p>你進行的攻擊判定，達成值+5；但是，你在受到來自持有比你更高的指揮許可權的角色的命令時，會受到[異常狀態：憎惡]，憎惡的對象由GM決定；該憎惡1劇本生效1次</text:p>
          </table:table-cell>
          <table:table-cell table:style-name="ce148" office:value-type="string" calcext:value-type="string">
            <text:p>IA P173</text:p>
          </table:table-cell>
          <table:table-cell table:style-name="ce148"/>
          <table:table-cell table:number-columns-repeated="1016"/>
        </table:table-row>
        <table:table-row table:style-name="ro16">
          <table:table-cell table:style-name="ce148" office:value-type="string" calcext:value-type="string">
            <text:p>閉鎖空間槍鬥士</text:p>
            <text:p>（クローズドガンファイタ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table:table-cell table:style-name="ce151" office:value-type="string" calcext:value-type="string">
            <text:p>表示你身懷能在狹窄室外等地更有效使用槍械的技術</text:p>
          </table:table-cell>
          <table:table-cell table:style-name="ce151" office:value-type="string" calcext:value-type="string">
            <text:p>你可以使用帶有[至近不可]的武器對與你處同一接戰區域的角色進行攻擊</text:p>
          </table:table-cell>
          <table:table-cell table:style-name="ce148" office:value-type="string" calcext:value-type="string">
            <text:p>IA P17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黑十字勳章</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在對背教者作戰中立下戰功的勳章，其作為菅原陸將私人製造的勳章，與日本政府和防衛隊皆無關係；但正因如此，其在陌生者之中比任何勳章都更有份量</text:p>
          </table:table-cell>
          <table:table-cell table:style-name="ce151" office:value-type="string" calcext:value-type="string">
            <text:p>你進行的【社會】判定的骰子數+2個</text:p>
          </table:table-cell>
          <table:table-cell table:style-name="ce148" office:value-type="string" calcext:value-type="string">
            <text:p>IA P174</text:p>
          </table:table-cell>
          <table:table-cell table:style-name="ce148"/>
          <table:table-cell table:number-columns-repeated="1016"/>
        </table:table-row>
        <table:table-row table:style-name="ro16">
          <table:table-cell table:style-name="ce148" office:value-type="string" calcext:value-type="string">
            <text:p>特號紀念章</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有著達成“魔街”封鎖任務經歷防衛紀念章，其形為小長方形的略綬；所謂“魔街”乃是對背教者作戰的最前線之一，持有這特號紀念章者，能夠在防衛隊內部享受種種便利</text:p>
          </table:table-cell>
          <table:table-cell table:style-name="ce151" office:value-type="string" calcext:value-type="string">
            <text:p>你進行&lt;籌措&gt;判定前使用，該判定的達成值+10</text:p>
            <text:p>該效果1劇本可以使用1次</text:p>
          </table:table-cell>
          <table:table-cell table:style-name="ce148" office:value-type="string" calcext:value-type="string">
            <text:p>IA P174</text:p>
          </table:table-cell>
          <table:table-cell table:style-name="ce148"/>
          <table:table-cell table:number-columns-repeated="1016"/>
        </table:table-row>
        <table:table-row table:style-name="ro16">
          <table:table-cell table:style-name="ce148" office:value-type="string" calcext:value-type="string">
            <text:p>零號紀念章</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參與了誕生魔街的“震夜”、與FH的“遺產”爭奪戰、與Xenos的對背教生命體作戰等等激戰的防衛紀念章。這些名留隊史的激戰經驗，也將你鍛煉成了特別的士兵</text:p>
          </table:table-cell>
          <table:table-cell table:style-name="ce151" office:value-type="string" calcext:value-type="string">
            <text:p>取得時從&lt;近戰&gt;或&lt;射擊&gt;選擇一項；你進行所選技能判定，骰子數+5個；取得該紋章時，你的侵蝕率基本值+7</text:p>
          </table:table-cell>
          <table:table-cell table:style-name="ce148" office:value-type="string" calcext:value-type="string">
            <text:p>IA P174</text:p>
          </table:table-cell>
          <table:table-cell table:style-name="ce148"/>
          <table:table-cell table:number-columns-repeated="1016"/>
        </table:table-row>
        <table:table-row table:style-name="ro16">
          <table:table-cell table:style-name="ce148" office:value-type="string" calcext:value-type="string">
            <text:p>教官資格證</text:p>
            <text:p>（教官適任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持有在陌生者的訓練過程中擔任教官資格者所持有的證明，只有兼具身為士兵的實力和看人極准的眼光者才能擁有。</text:p>
          </table:table-cell>
          <table:table-cell table:style-name="ce151" office:value-type="string" calcext:value-type="string">
            <text:p>準備階段使用，指定場景內一角色作為對象，該場景間，該對象進行的主要動作暴擊值-1（下限6），且判定骰數+3個；該效果無法對自己使用</text:p>
            <text:p>該效果1劇本可以使用1次</text:p>
          </table:table-cell>
          <table:table-cell table:style-name="ce148" office:value-type="string" calcext:value-type="string">
            <text:p>IA P174</text:p>
          </table:table-cell>
          <table:table-cell table:style-name="ce148"/>
          <table:table-cell table:number-columns-repeated="1016"/>
        </table:table-row>
        <table:table-row table:style-name="ro16">
          <table:table-cell table:style-name="ce148" office:value-type="string" calcext:value-type="string">
            <text:p>殲滅作戰</text:p>
            <text:p>（殲滅作戦）</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使用轟炸或超遠距離炮擊將目標地區的超越者全部殲滅的作戰</text:p>
          </table:table-cell>
          <table:table-cell table:style-name="ce151" office:value-type="string" calcext:value-type="string">
            <text:p>準備階段使用，對場景中登場的所有角色造成30HP傷害，該場景中使用了“區域封鎖：●●”紋章時你可以將任意角色從該效果中除外</text:p>
            <text:p>該效果1劇本可以使用1次</text:p>
          </table:table-cell>
          <table:table-cell table:style-name="ce148" office:value-type="string" calcext:value-type="string">
            <text:p>IA P17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強化義體</text:p>
          </table:table-cell>
          <table:table-cell table:style-name="ce93" office:value-type="string" calcext:value-type="string">
            <text:p>紋章/一般</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以防衛隊獨家技術開發出來的機械化義體。</text:p>
          </table:table-cell>
          <table:table-cell table:style-name="ce151" office:value-type="string" calcext:value-type="string">
            <text:p>只有症候群為雷擊黑犬的角色能夠常備化；想要看破是機械的話，必須與你在&lt;知覺&gt;對決中勝出。你的裝甲值+10（與防具疊加），且空手變更為如下資料：</text:p>
            <text:p>種類：近戰   技能：&lt;近戰&gt;   命中：-1   攻擊力：10   格擋值：6   射程：至近</text:p>
          </table:table-cell>
          <table:table-cell table:style-name="ce148" office:value-type="string" calcext:value-type="string">
            <text:p>IA P174</text:p>
          </table:table-cell>
          <table:table-cell table:style-name="ce148"/>
          <table:table-cell table:number-columns-repeated="1016"/>
        </table:table-row>
        <table:table-row table:style-name="ro16">
          <table:table-cell table:style-name="ce148" office:value-type="string" calcext:value-type="string">
            <text:p>十拳劍</text:p>
          </table:table-cell>
          <table:table-cell table:style-name="ce93" office:value-type="string" calcext:value-type="string">
            <text:p>核心紋章/一般</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表示你是特化了與原菌或超越者單獨對決的隊員的符牒，因為要考慮對都市等周邊影響，期待你能像葬送沉眠大蛇的勇者般隱秘而迅速的應對</text:p>
          </table:table-cell>
          <table:table-cell table:style-name="ce151" office:value-type="string" calcext:value-type="string">
            <text:p>你進行近戰攻擊的攻擊力和格擋的格擋值+5，&lt;知覺&gt;判定骰數+3個</text:p>
          </table:table-cell>
          <table:table-cell table:style-name="ce148" office:value-type="string" calcext:value-type="string">
            <text:p>IA P17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草薙劍</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是特化了與殲滅任務的隊員的符牒，你為應對背教者污染和原菌大量出現等情況而被允許攜帶各種火器，期待你能像野火迅速燒盡般的殲滅</text:p>
          </table:table-cell>
          <table:table-cell table:style-name="ce151" office:value-type="string" calcext:value-type="string">
            <text:p>你進行射擊攻擊的攻擊力+10，你使用帶有[該武器1劇本可以使用1次]的[種類：射擊]一般道具武器時可以無視使用次數使用</text:p>
          </table:table-cell>
          <table:table-cell table:style-name="ce148" office:value-type="string" calcext:value-type="string">
            <text:p>IA P17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月讀尊</text:p>
          </table:table-cell>
          <table:table-cell table:style-name="ce93" office:value-type="string" calcext:value-type="string">
            <text:p>核心紋章/一般</text:p>
          </table:table-cell>
          <table:table-cell table:style-name="ce148" office:value-type="float" office:value="70" calcext:value-type="float">
            <text:p>70</text:p>
          </table:table-cell>
          <table:table-cell table:style-name="ce148" office:value-type="string" calcext:value-type="string">
            <text:p>1/劇本</text:p>
          </table:table-cell>
          <table:table-cell table:style-name="ce151" office:value-type="string" calcext:value-type="string">
            <text:p>表示你陌生者部隊內部設置的隱秘部隊的隊員的符牒，該作戰的目的是對超越者要人進行暗殺，部隊選擇了擅長以直接戰鬥能力以外排除周邊人員的人</text:p>
          </table:table-cell>
          <table:table-cell table:style-name="ce151" office:value-type="string" calcext:value-type="string">
            <text:p>準備階段使用，選擇場景中登場的任意角色，該回合間，被選擇的所有角色不能對攻擊進行回應動作</text:p>
            <text:p>該效果1劇本可以使用1次</text:p>
          </table:table-cell>
          <table:table-cell table:style-name="ce148" office:value-type="string" calcext:value-type="string">
            <text:p>IA P174</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紋章：Xenos <text:s text:c="4"/>取得條件：職業為Xenos特工A~D、XenosRB A～D、RB A~D</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巡視者</text:p>
            <text:p>（インスペクター）</text:p>
          </table:table-cell>
          <table:table-cell table:style-name="ce93" office:value-type="string" calcext:value-type="string">
            <text:p>紋章/近戰</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只授予被都築京香親自挑選之人的活體劍，擁有能根據持有者受到的壓力進行反應的性質</text:p>
          </table:table-cell>
          <table:table-cell table:style-name="ce151" office:value-type="string" calcext:value-type="string">
            <text:p>技能：&lt;近戰&gt;   命中：0/-4   攻擊力：10   格擋值：4   射程：至近</text:p>
            <text:p>你受到任何“計畫：●●”的效果時，該武器的命中使用右側資料；使用該武器組合異能進行的攻擊，傷害+2D10</text:p>
          </table:table-cell>
          <table:table-cell table:style-name="ce148" office:value-type="string" calcext:value-type="string">
            <text:p>IA P17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親族鄰人</text:p>
            <text:p>（キーンネイバー）</text:p>
          </table:table-cell>
          <table:table-cell table:style-name="ce93" office:value-type="string" calcext:value-type="string">
            <text:p>紋章/近戰</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從屬Xenos、擁有近戰武器姿態的EX超越者，在成為你趁手武器的同時也是你的夥伴</text:p>
          </table:table-cell>
          <table:table-cell table:style-name="ce151" office:value-type="string" calcext:value-type="string">
            <text:p>技能：&lt;近戰&gt;   命中：0   攻擊力：7   格擋值：5   射程：至近</text:p>
            <text:p>準備階段使用，該場景間該武器攻擊力+3，使用該效果時你的侵蝕率+3</text:p>
          </table:table-cell>
          <table:table-cell table:style-name="ce148" office:value-type="string" calcext:value-type="string">
            <text:p>IA P17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源紫刀</text:p>
          </table:table-cell>
          <table:table-cell table:style-name="ce93" office:value-type="string" calcext:value-type="string">
            <text:p>紋章/近戰</text:p>
          </table:table-cell>
          <table:table-cell table:style-name="ce148" office:value-type="float" office:value="25" calcext:value-type="float">
            <text:p>25</text:p>
          </table:table-cell>
          <table:table-cell table:style-name="ce148" office:value-type="string" calcext:value-type="string">
            <text:p>1/劇本</text:p>
          </table:table-cell>
          <table:table-cell table:style-name="ce151" office:value-type="string" calcext:value-type="string">
            <text:p>Xenos的神祠中供奉的靈劍，可以激發秘藏的力量，發揮出甚至能斬斷因緣的銳利鋒刃</text:p>
          </table:table-cell>
          <table:table-cell table:style-name="ce151" office:value-type="string" calcext:value-type="string">
            <text:p>技能：&lt;近戰&gt;   命中：0   攻擊力：11   格擋值：2   射程：至近</text:p>
            <text:p>次要動作使用，該主要階段間，你使用該武器進行攻擊造成的傷害+3D10</text:p>
            <text:p>該效果1劇本可以使用1次</text:p>
          </table:table-cell>
          <table:table-cell table:style-name="ce148" office:value-type="string" calcext:value-type="string">
            <text:p>IA P17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破幻者</text:p>
            <text:p>（イリュージョンブレイカー）</text:p>
          </table:table-cell>
          <table:table-cell table:style-name="ce93" office:value-type="string" calcext:value-type="string">
            <text:p>紋章/射擊</text:p>
          </table:table-cell>
          <table:table-cell table:style-name="ce148" office:value-type="float" office:value="10" calcext:value-type="float">
            <text:p>10</text:p>
          </table:table-cell>
          <table:table-cell table:style-name="ce148" office:value-type="string" calcext:value-type="string">
            <text:p>1/場景</text:p>
          </table:table-cell>
          <table:table-cell table:style-name="ce151" office:value-type="string" calcext:value-type="string">
            <text:p>可以將微弱異能造成的假貨擊破的袖珍手槍，不只是實彈，也附帶破咒專用子彈</text:p>
          </table:table-cell>
          <table:table-cell table:style-name="ce151" office:value-type="string" calcext:value-type="string">
            <text:p>技能：&lt;射擊&gt;   命中：0   攻擊力：4   格擋值：-   射程：10m</text:p>
            <text:p>使用該武器進行的射擊攻擊命中時對象受到的簡易異能效果全部結束，此時可以不造成傷害</text:p>
            <text:p>該效果1場景可以使用1次</text:p>
          </table:table-cell>
          <table:table-cell table:style-name="ce148" office:value-type="string" calcext:value-type="string">
            <text:p>IA P17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留鹽</text:p>
            <text:p>（留める塩）</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能射出讓目標性質變化的物質的謎之槍，可以在目標身邊生成鹽結晶封鎖移動</text:p>
          </table:table-cell>
          <table:table-cell table:style-name="ce151" office:value-type="string" calcext:value-type="string">
            <text:p>技能：&lt;射擊&gt;   命中：-1   攻擊力：8   格擋值：-   射程：20m</text:p>
            <text:p>你使用該武器對對象造成至少1點傷害時，對象受到[異常狀態：硬直]</text:p>
          </table:table-cell>
          <table:table-cell table:style-name="ce148" office:value-type="string" calcext:value-type="string">
            <text:p>IA P17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斷罪的十字架</text:p>
            <text:p>（斷罪のクロス）</text:p>
          </table:table-cell>
          <table:table-cell table:style-name="ce93" office:value-type="string" calcext:value-type="string">
            <text:p>紋章/射擊</text:p>
          </table:table-cell>
          <table:table-cell table:style-name="ce148" office:value-type="float" office:value="35" calcext:value-type="float">
            <text:p>35</text:p>
          </table:table-cell>
          <table:table-cell table:style-name="ce148" office:value-type="string" calcext:value-type="string">
            <text:p>-</text:p>
          </table:table-cell>
          <table:table-cell table:style-name="ce151" office:value-type="string" calcext:value-type="string">
            <text:p>Xenos回收的作為巨大十字架的十字弩，據說是寄宿著某位聖人意志的變節體，但真相不明</text:p>
          </table:table-cell>
          <table:table-cell table:style-name="ce151" office:value-type="string" calcext:value-type="string">
            <text:p>技能：&lt;射擊&gt;   命中：-4   攻擊力：24   格擋值：-   射程：視野</text:p>
            <text:p>你沒有受到[異常狀態：暴走]時，使用該武器進行的攻擊判定，骰子數-7個</text:p>
            <text:p>雙手持握，至近不可</text:p>
          </table:table-cell>
          <table:table-cell table:style-name="ce148" office:value-type="string" calcext:value-type="string">
            <text:p>IA P17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法螺的外套</text:p>
            <text:p>（ホラの外套）</text:p>
          </table:table-cell>
          <table:table-cell table:style-name="ce93" office:value-type="string" calcext:value-type="string">
            <text:p>紋章/防具</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即使在Xenos內也只有為臨近執行特別任務的特工授予的，僅限特殊時點使用的外套</text:p>
          </table:table-cell>
          <table:table-cell table:style-name="ce151" office:value-type="string" calcext:value-type="string">
            <text:p>閃避：0   行動值：0   裝甲值：9</text:p>
            <text:p>先制階段使用，你執行一個主要階段；該主要階段不會影響你的未行動/已行動狀態，但不可使用異能，也不能發動攻擊。使用後，該防具被破壞</text:p>
          </table:table-cell>
          <table:table-cell table:style-name="ce148" office:value-type="string" calcext:value-type="string">
            <text:p>IA P17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概念外裝</text:p>
          </table:table-cell>
          <table:table-cell table:style-name="ce93" office:value-type="string" calcext:value-type="string">
            <text:p>紋章/防具（輔助）</text:p>
          </table:table-cell>
          <table:table-cell table:style-name="ce148" office:value-type="float" office:value="15" calcext:value-type="float">
            <text:p>15</text:p>
          </table:table-cell>
          <table:table-cell table:style-name="ce148" office:value-type="string" calcext:value-type="string">
            <text:p>效果：1/劇本</text:p>
          </table:table-cell>
          <table:table-cell table:style-name="ce151" office:value-type="string" calcext:value-type="string">
            <text:p>表示你身為概念存在，肉體只不過是用來與人類接觸的道具的紋章。你的本質是由你自己定義的情報，而肉體只是無論多少次都能修復的皮囊</text:p>
          </table:table-cell>
          <table:table-cell table:style-name="ce151" office:value-type="string" calcext:value-type="string">
            <text:p>閃避：0   行動值：0   裝甲值：5</text:p>
            <text:p>只有變節體可以取得該紋章；先制階段使用，你的HP回復5D10點</text:p>
            <text:p>該效果1劇本可以使用1次</text:p>
          </table:table-cell>
          <table:table-cell table:style-name="ce148" office:value-type="string" calcext:value-type="string">
            <text:p>IA P175</text:p>
          </table:table-cell>
          <table:table-cell table:style-name="ce148"/>
          <table:table-cell table:number-columns-repeated="1016"/>
        </table:table-row>
        <table:table-row table:style-name="ro16">
          <table:table-cell table:style-name="ce148" office:value-type="string" calcext:value-type="string">
            <text:p>幽靈的士</text:p>
            <text:p>（幽霊タクシー）</text:p>
          </table:table-cell>
          <table:table-cell table:style-name="ce93" office:value-type="string" calcext:value-type="string">
            <text:p>紋章/載具</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作為都市傳說起源的變節體的士，雖然沒有司機，但只要告知目的地便會自動前往</text:p>
          </table:table-cell>
          <table:table-cell table:style-name="ce151" office:value-type="string" calcext:value-type="string">
            <office:annotation draw:style-name="gr15" draw:text-style-name="P2" svg:width="327.26pt" svg:height="190.49pt" svg:x="1078.84pt" svg:y="6247.5pt" draw:caption-point-x="-11.54pt" draw:caption-point-y="-22.22pt">
              <dc:date>2026-04-24T00:00:00</dc:date>
              <text:p text:style-name="P1">狩獵姿態</text:p>
              <text:p text:style-name="P1">最大等級：3</text:p>
              <text:p text:style-name="P1">時機：次要動作</text:p>
              <text:p text:style-name="P1">技能：—</text:p>
              <text:p text:style-name="P1">難易度：自動成功</text:p>
              <text:p text:style-name="P1">對象：自身</text:p>
              <text:p text:style-name="P1">射程：至近</text:p>
              <text:p text:style-name="P1">侵蝕值：1</text:p>
              <text:p text:style-name="P1">限制：—</text:p>
              <text:p text:style-name="P1">次數：LV/場景</text:p>
              <text:p text:style-name="P1">效果：進行戰鬥移動。此移動可進行脫離，即使跟其他接戰區域接觸也不須終止移動，不會受到封鎖的影響。</text:p>
              <text:p text:style-name="P1">======</text:p>
            </office:annotation>
            <text:p>技能：&lt;交涉&gt;   攻擊力：5   行動值：-5   裝甲值：5   全力移動：100m</text:p>
            <text:p>搭乘期間，搭乘者視為獲得LV1的《狩獵姿態》，該《狩獵姿態》不會受到侵蝕率帶來的LV上升影響</text:p>
          </table:table-cell>
          <table:table-cell table:style-name="ce148" office:value-type="string" calcext:value-type="string">
            <text:p>IA P176</text:p>
          </table:table-cell>
          <table:table-cell table:style-name="ce148"/>
          <table:table-cell table:number-columns-repeated="1016"/>
        </table:table-row>
        <table:table-row table:style-name="ro16">
          <table:table-cell table:style-name="ce148" office:value-type="string" calcext:value-type="string">
            <text:p>有翼朋友</text:p>
            <text:p>（ファンタスティックマウント／翼持つ友）</text:p>
          </table:table-cell>
          <table:table-cell table:style-name="ce93" office:value-type="string" calcext:value-type="string">
            <text:p>紋章/載具</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協助Xenos、擁有飛行能力的EX超越者騎乘動物，任何時候都能叫出來，很聽你的話</text:p>
          </table:table-cell>
          <table:table-cell table:style-name="ce151" office:value-type="string" calcext:value-type="string">
            <text:p>技能：&lt;駕駛：騎乘動物&gt;   攻擊力：5   行動值：-2   裝甲值：0   全力移動：30m</text:p>
            <text:p>你和同乘者進入飛行狀態</text:p>
          </table:table-cell>
          <table:table-cell table:style-name="ce148" office:value-type="string" calcext:value-type="string">
            <text:p>IA P17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投資</text:p>
            <text:p>（インベストメント）</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被期望自己也能成為超越者一員的後援者們支持的紋章；為進化而不擇手段的愚者永不嫌少</text:p>
          </table:table-cell>
          <table:table-cell table:style-name="ce151" office:value-type="string" calcext:value-type="string">
            <text:p>導入時你的財富點數+5</text:p>
          </table:table-cell>
          <table:table-cell table:style-name="ce148" office:value-type="string" calcext:value-type="string">
            <text:p>IA P17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聆聽頭巾</text:p>
            <text:p>（聞耳頭巾）</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3/劇本</text:p>
          </table:table-cell>
          <table:table-cell table:style-name="ce151" office:value-type="string" calcext:value-type="string">
            <text:p>能夠聽取自我意識稀薄的變節體聲音的頭巾，變節體們遍佈於大街小巷之中，並觀察著人類，為此，通過聽取其話語一事，亦能夠收集各種各樣的情報</text:p>
          </table:table-cell>
          <table:table-cell table:style-name="ce151" office:value-type="string" calcext:value-type="string">
            <text:p>你進行&lt;情報：●●&gt;判定前使用，該判定的骰子數+2個</text:p>
            <text:p>該效果1劇本可以使用3次</text:p>
          </table:table-cell>
          <table:table-cell table:style-name="ce148" office:value-type="string" calcext:value-type="string">
            <text:p>IA P176</text:p>
          </table:table-cell>
          <table:table-cell table:style-name="ce148"/>
          <table:table-cell table:number-columns-repeated="1016"/>
        </table:table-row>
        <table:table-row table:style-name="ro16">
          <table:table-cell table:style-name="ce148" office:value-type="string" calcext:value-type="string">
            <text:p>捉鬼者</text:p>
            <text:p>（スプーキーウォッチャー）</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Xenos為背教者事件搜查而試做的智慧手錶型背教者探知器，周圍有背教者使用痕跡時會發出淡淡的光，可以設置不對登錄過的特定背教者（如使用者本人）做出反應，也可以支援使用者的異能</text:p>
          </table:table-cell>
          <table:table-cell table:style-name="ce151" office:value-type="string" calcext:value-type="string">
            <text:p>你組合異能進行的判定骰數+1個</text:p>
          </table:table-cell>
          <table:table-cell table:style-name="ce148" office:value-type="string" calcext:value-type="string">
            <text:p>IA P17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受供</text:p>
            <text:p>（デヴォーティ）</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3/劇本</text:p>
          </table:table-cell>
          <table:table-cell table:style-name="ce151" office:value-type="string" calcext:value-type="string">
            <text:p>信仰你的信徒們，他們敬畏身為超常存在的你，為你帶來了各種情報，其中也有不知道背教者的存在也依然對你抱持信仰的人</text:p>
          </table:table-cell>
          <table:table-cell table:style-name="ce151" office:value-type="string" calcext:value-type="string">
            <text:p>你進行&lt;情報：●●&gt;判定前使用，該判定達成值+4</text:p>
            <text:p>該效果1劇本可以使用3次</text:p>
          </table:table-cell>
          <table:table-cell table:style-name="ce148" office:value-type="string" calcext:value-type="string">
            <text:p>IA P17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雙重螺旋之環</text:p>
            <text:p>（二重螺旋のリング）</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展示身為Xenos一員或是與Xenos協力的外部特工身份的，模仿雙重螺旋設計的指環。推動背教者進化的Xenos成員們與背教者有著較高的親和力，也擅長於控制背教者的技術。有說法稱這種指環由都築京香所造</text:p>
          </table:table-cell>
          <table:table-cell table:style-name="ce151" office:value-type="string" calcext:value-type="string">
            <text:p>你進行的&lt;RC&gt;判定骰數+1個</text:p>
          </table:table-cell>
          <table:table-cell table:style-name="ce148" office:value-type="string" calcext:value-type="string">
            <text:p>IA P176</text:p>
          </table:table-cell>
          <table:table-cell table:style-name="ce148"/>
          <table:table-cell table:number-columns-repeated="1016"/>
        </table:table-row>
        <table:table-row table:style-name="ro16">
          <table:table-cell table:style-name="ce148" office:value-type="string" calcext:value-type="string">
            <text:p>貴族的接吻</text:p>
            <text:p>（貴種の接吻）</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是被都築京香等強力變節體感染了背教者病毒而成為了超越者的紋章</text:p>
          </table:table-cell>
          <table:table-cell table:style-name="ce151" office:value-type="string" calcext:value-type="string">
            <text:p>取得時選擇一種能力值（肉體/感覺/精神/社會），使所選的能力值+1；上升的能力值按照「5（6）」等，分別記錄上升前後的能力值，使用經驗點進行能力值成長時，所需的經驗點參照上升前的能力值資料；你的侵蝕率基本值+2</text:p>
          </table:table-cell>
          <table:table-cell table:style-name="ce148" office:value-type="string" calcext:value-type="string">
            <text:p>IA P176</text:p>
          </table:table-cell>
          <table:table-cell table:style-name="ce148"/>
          <table:table-cell table:number-columns-repeated="1016"/>
        </table:table-row>
        <table:table-row table:style-name="ro16">
          <table:table-cell table:style-name="ce148" office:value-type="string" calcext:value-type="string">
            <text:p>學習之物</text:p>
            <text:p>（學ぶもの）</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你對知識和情報抱有無盡的探究心和好奇心</text:p>
          </table:table-cell>
          <table:table-cell table:style-name="ce151" office:value-type="string" calcext:value-type="string">
            <text:p>你進行的&lt;情報：●●&gt;判定骰數+2個；使用技能在LV1以上時，骰子數額外+2個（總計+4個）</text:p>
          </table:table-cell>
          <table:table-cell table:style-name="ce148" office:value-type="string" calcext:value-type="string">
            <text:p>IA P17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記憶之棺</text:p>
            <text:p>（アーカイブ／記憶の棺）</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1/劇本</text:p>
          </table:table-cell>
          <table:table-cell table:style-name="ce151" office:value-type="string" calcext:value-type="string">
            <text:p>聚集了與人類和背教者關聯的海量知識的圖書館，只有Xenos的一員才能觸碰其一角</text:p>
          </table:table-cell>
          <table:table-cell table:style-name="ce151" office:value-type="string" calcext:value-type="string">
            <text:p>場景開始時使用，該場景間進行的&lt;知識：●●&gt;判定，達成值+3</text:p>
            <text:p>該效果1劇本可以使用1次</text:p>
          </table:table-cell>
          <table:table-cell table:style-name="ce148" office:value-type="string" calcext:value-type="string">
            <text:p>IA P17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Xenos網路</text:p>
            <text:p>（ゼノスネットワーク）</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為收集奇妙物品而存在的Xenos獨立的網路，Xenos有著回收被背教者感染的物品、意識薄弱的變節體或EX背教者的裡管道</text:p>
          </table:table-cell>
          <table:table-cell table:style-name="ce151" office:value-type="string" calcext:value-type="string">
            <text:p>取得時從Xenos以外的組織紋章中選擇最多3項取得；取得所需的經驗點需要另外消耗</text:p>
          </table:table-cell>
          <table:table-cell table:style-name="ce148" office:value-type="string" calcext:value-type="string">
            <text:p>IA P17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繆斯之一</text:p>
            <text:p>（ワンオブミューズ）</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你身負人類藝術文化，可能是某種模仿，也可能你自身就是藝術本身具現化後的存在</text:p>
          </table:table-cell>
          <table:table-cell table:style-name="ce151" office:value-type="string" calcext:value-type="string">
            <text:p>你可以用&lt;藝術：●●&gt;進行&lt;交涉&gt;判定，該效果可以用組合了[技能：&lt;交涉&gt;]異能的判定</text:p>
          </table:table-cell>
          <table:table-cell table:style-name="ce148" office:value-type="string" calcext:value-type="string">
            <text:p>IA P17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404房間</text:p>
            <text:p>（チャンバー４０４）</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對Xenos特工們的活動進行支援用的安全屋，在世界上很多街角存在，但是普通人絕對發現不了</text:p>
          </table:table-cell>
          <table:table-cell table:style-name="ce151" office:value-type="string" calcext:value-type="string">
            <text:p>場景開始時使用，你和同行者角色的HP回復5D10點，該場景間你和同行者角色進行的&lt;情報：●●&gt;判定骰數+2個</text:p>
            <text:p>該效果1劇本可以使用1次</text:p>
          </table:table-cell>
          <table:table-cell table:style-name="ce148" office:value-type="string" calcext:value-type="string">
            <text:p>IA P17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迷家</text:p>
            <text:p>（マヨヒガ）</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有著能夠產生名為迷家的迷宮空間的能力的紋章。</text:p>
          </table:table-cell>
          <table:table-cell table:style-name="ce151" office:value-type="string" calcext:value-type="string">
            <text:p>你可以通過使用《結界化》來產生被稱為“迷家”的異空間，“迷家”的內部實為迷宮，且非超越者角色無法在沒有你許可的情況下進出，超越者角色則可以通過使用《結界化》來進出</text:p>
          </table:table-cell>
          <table:table-cell table:style-name="ce148" office:value-type="string" calcext:value-type="string">
            <text:p>IA P177</text:p>
          </table:table-cell>
          <table:table-cell table:style-name="ce148"/>
          <table:table-cell table:number-columns-repeated="1016"/>
        </table:table-row>
        <table:table-row table:style-name="ro16">
          <table:table-cell table:style-name="ce148" office:value-type="string" calcext:value-type="string">
            <text:p>迅疾水銀</text:p>
            <text:p>（疾き水銀）</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場景</text:p>
          </table:table-cell>
          <table:table-cell table:style-name="ce151" office:value-type="string" calcext:value-type="string">
            <text:p>表示你擁有將自己的肉體變成液體能力的紋章，這種液體可以被特定物質吸引</text:p>
          </table:table-cell>
          <table:table-cell table:style-name="ce151" office:value-type="string" calcext:value-type="string">
            <text:p>先制階段使用，你進行戰鬥移動，該移動可以進行脫離；移動前所在接戰區域中如果有受到[異常狀態：硬直]的角色存在時，該效果不消耗使用次數</text:p>
            <text:p>該效果1場景可以使用1次</text:p>
          </table:table-cell>
          <table:table-cell table:style-name="ce148" office:value-type="string" calcext:value-type="string">
            <text:p>IA P17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深思熟慮</text:p>
            <text:p>（ファーサイト／深慮）</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場景</text:p>
          </table:table-cell>
          <table:table-cell table:style-name="ce151" office:value-type="string" calcext:value-type="string">
            <text:p>你可以認真分析眼前的一切找到最合適的方法</text:p>
          </table:table-cell>
          <table:table-cell table:style-name="ce151" office:value-type="string" calcext:value-type="string">
            <text:p>準備階段使用，該回合間你的行動值變為1，主要動作判定骰數+3個</text:p>
            <text:p>該效果1場景可以使用1次</text:p>
          </table:table-cell>
          <table:table-cell table:style-name="ce148" office:value-type="string" calcext:value-type="string">
            <text:p>IA P17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古老二十四之證</text:p>
            <text:p>（古き二十四の証）</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表示你是Xenos核心二十四名變節體之一的紋章</text:p>
          </table:table-cell>
          <table:table-cell table:style-name="ce151" office:value-type="string" calcext:value-type="string">
            <text:p>選擇一項你取得的《起源：●●》，該異能最大LV+5，侵蝕值變為2倍，取得該紋章需要GM許可，只有變節體角色可以取得</text:p>
          </table:table-cell>
          <table:table-cell table:style-name="ce148" office:value-type="string" calcext:value-type="string">
            <text:p>IA P17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進化之書</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據推測可能是里安·菲蘭德博士的發掘隊隊員所著的，寫著背教者進化論的筆記</text:p>
          </table:table-cell>
          <table:table-cell table:style-name="ce151" office:value-type="string" calcext:value-type="string">
            <text:p>準備階段使用，該回合間，你使用的異能LV全部+2，此時可超過最大等級，但不會因此而增加使用次數，此外，效果期間內，你取得的所有異能的侵蝕值變為2倍</text:p>
            <text:p>該效果1劇本可以使用1次</text:p>
          </table:table-cell>
          <table:table-cell table:style-name="ce148" office:value-type="string" calcext:value-type="string">
            <text:p>IA P177</text:p>
          </table:table-cell>
          <table:table-cell table:style-name="ce148"/>
          <table:table-cell table:number-columns-repeated="1016"/>
        </table:table-row>
        <table:table-row table:style-name="ro16">
          <table:table-cell table:style-name="ce148" office:value-type="string" calcext:value-type="string">
            <text:p>退化之書</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記錄了背教者退化的，作者不詳的手寫筆記，有著或許是出自里安·菲蘭德博士的挖掘隊員的推測</text:p>
          </table:table-cell>
          <table:table-cell table:style-name="ce151" office:value-type="string" calcext:value-type="string">
            <text:p>準備階段使用，該回合間，你進行的所有判定暴擊值+3；該效果生效期間，你取得的所有異能的侵蝕值變為0</text:p>
            <text:p>該效果1劇本可以使用1次</text:p>
          </table:table-cell>
          <table:table-cell table:style-name="ce148" office:value-type="string" calcext:value-type="string">
            <text:p>IA P178</text:p>
          </table:table-cell>
          <table:table-cell table:style-name="ce148"/>
          <table:table-cell table:number-columns-repeated="1016"/>
        </table:table-row>
        <table:table-row table:style-name="ro16">
          <table:table-cell table:style-name="ce148" office:value-type="string" calcext:value-type="string">
            <text:p>百鬼夜香</text:p>
          </table:table-cell>
          <table:table-cell table:style-name="ce93" office:value-type="string" calcext:value-type="string">
            <text:p>紋章/一般</text:p>
          </table:table-cell>
          <table:table-cell table:style-name="ce148" office:value-type="float" office:value="50" calcext:value-type="float">
            <text:p>50</text:p>
          </table:table-cell>
          <table:table-cell table:style-name="ce148" office:value-type="string" calcext:value-type="string">
            <text:p>3/劇本</text:p>
          </table:table-cell>
          <table:table-cell table:style-name="ce151" office:value-type="string" calcext:value-type="string">
            <text:p>能夠召集自我意識稀薄的變節體的香，由都築京香的一部分製造而成。藉由聚集的變節體們的力量，將不可能化為可能</text:p>
          </table:table-cell>
          <table:table-cell table:style-name="ce151" office:value-type="string" calcext:value-type="string">
            <text:p>你進行判定前使用，該判定的暴擊值-1（下限值5）</text:p>
            <text:p>該效果1劇本可以使用3次</text:p>
          </table:table-cell>
          <table:table-cell table:style-name="ce148" office:value-type="string" calcext:value-type="string">
            <text:p>IA P178</text:p>
          </table:table-cell>
          <table:table-cell table:style-name="ce148"/>
          <table:table-cell table:number-columns-repeated="1016"/>
        </table:table-row>
        <table:table-row table:style-name="ro16">
          <table:table-cell table:style-name="ce148" office:value-type="string" calcext:value-type="string">
            <text:p>計畫：研究</text:p>
            <text:p>（プラン：リサーチ）</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以偵查未知現象為目的的都築京香計畫，可以依照你的考量更改最優先事項</text:p>
          </table:table-cell>
          <table:table-cell table:style-name="ce151" office:value-type="string" calcext:value-type="string">
            <text:p>任何時候都可以使用，該劇本間，你進行的&lt;情報：●●&gt;判定骰數+2個，該效果任何時候都可以被你解除；該效果生效期間，你不會受到其他“計畫：●●”效果影響</text:p>
          </table:table-cell>
          <table:table-cell table:style-name="ce148" office:value-type="string" calcext:value-type="string">
            <text:p>IA P17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計畫：排除</text:p>
            <text:p>（プラン：エリミネート）</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將妨礙Xenos的存在抹殺掉為目的的都築京香計畫，因為將排除目標作為最優先事項，所以沒有考慮參加者的生還率</text:p>
          </table:table-cell>
          <table:table-cell table:style-name="ce151" office:value-type="string" calcext:value-type="string">
            <text:p>任何時候都可以使用，該劇本間，你進行攻擊的攻擊力+7，HP最大值-5，該效果可以被你用次要動作解除；該效果生效期間，你不會受到其他“計畫：●●”效果影響</text:p>
          </table:table-cell>
          <table:table-cell table:style-name="ce148" office:value-type="string" calcext:value-type="string">
            <text:p>IA P17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計畫：生還</text:p>
            <text:p>（プラン：サバイブ）</text:p>
          </table:table-cell>
          <table:table-cell table:style-name="ce93" office:value-type="string" calcext:value-type="string">
            <text:p>紋章/消耗品</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以生還為最優先任務的都築京香計畫</text:p>
          </table:table-cell>
          <table:table-cell table:style-name="ce151" office:value-type="string" calcext:value-type="string">
            <text:p>任何時候都可以使用，該劇本間你使用的異能侵蝕值-1（最低1），組合多個異能時合計侵蝕值-1，該效果可以被你用次要動作解除；該效果生效期間，你不會受到其他“計畫：●●”效果影響</text:p>
          </table:table-cell>
          <table:table-cell table:style-name="ce148" office:value-type="string" calcext:value-type="string">
            <text:p>IA P17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計畫者的預言</text:p>
            <text:p>（プランナーの予言）</text:p>
          </table:table-cell>
          <table:table-cell table:style-name="ce93" office:value-type="string" calcext:value-type="string">
            <text:p>紋章/消耗品</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都築京香的隨口一言，身為她這般的陰謀家，哪怕是隨口一言也會成為對未來某一幕的佈局</text:p>
          </table:table-cell>
          <table:table-cell table:style-name="ce151" office:value-type="string" calcext:value-type="string">
            <text:p>你以外的角色使用了「時機：先攻階段」的異能後使用，取消那個異能的效果，所取消的異能需要達成值時，其達成值變為0；但是，該效果無法針對持有「紋章：Xenos」道具的角色所施展的異能使用</text:p>
          </table:table-cell>
          <table:table-cell table:style-name="ce148" office:value-type="string" calcext:value-type="string">
            <text:p>IA P178</text:p>
          </table:table-cell>
          <table:table-cell table:style-name="ce148"/>
          <table:table-cell table:number-columns-repeated="1016"/>
        </table:table-row>
        <table:table-row table:style-name="ro16">
          <table:table-cell table:style-name="ce148" office:value-type="string" calcext:value-type="string">
            <text:p>深度監視者</text:p>
            <text:p>（ディープウォッチャー）</text:p>
          </table:table-cell>
          <table:table-cell table:style-name="ce93" office:value-type="string" calcext:value-type="string">
            <text:p>核心紋章/一般</text:p>
          </table:table-cell>
          <table:table-cell table:style-name="ce148" office:value-type="float" office:value="35" calcext:value-type="float">
            <text:p>35</text:p>
          </table:table-cell>
          <table:table-cell table:style-name="ce148" office:value-type="string" calcext:value-type="string">
            <text:p>-</text:p>
          </table:table-cell>
          <table:table-cell table:style-name="ce151" office:value-type="string" calcext:value-type="string">
            <text:p>表示你是被交予監視人類活動或特定事件相關任務的紋章，你的任務就是監視狀況推進，根據場合介入事件</text:p>
          </table:table-cell>
          <table:table-cell table:style-name="ce151" office:value-type="string" calcext:value-type="string">
            <text:p>你的收集情報的判定骰數+4個，行動值+10</text:p>
          </table:table-cell>
          <table:table-cell table:style-name="ce148" office:value-type="string" calcext:value-type="string">
            <text:p>IA P17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Xenos執行者</text:p>
            <text:p>（ゼノスエンフォーサー）</text:p>
          </table:table-cell>
          <table:table-cell table:style-name="ce93" office:value-type="string" calcext:value-type="string">
            <text:p>核心紋章/一般</text:p>
          </table:table-cell>
          <table:table-cell table:style-name="ce148" office:value-type="float" office:value="40" calcext:value-type="float">
            <text:p>40</text:p>
          </table:table-cell>
          <table:table-cell table:style-name="ce148" office:value-type="string" calcext:value-type="string">
            <text:p>-</text:p>
          </table:table-cell>
          <table:table-cell table:style-name="ce151" office:value-type="string" calcext:value-type="string">
            <text:p>表示你是為完成都築京香的計畫，在必要的時候投入並強制進行武力介入的特工的紋章，戰鬥不只是單純的力量比拼，你有很多壓制敵人的經驗可用</text:p>
          </table:table-cell>
          <table:table-cell table:style-name="ce151" office:value-type="string" calcext:value-type="string">
            <text:p>你進行攻擊和閃避的判定，達成值+10</text:p>
          </table:table-cell>
          <table:table-cell table:style-name="ce148" office:value-type="string" calcext:value-type="string">
            <text:p>IA P178</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毀滅的鋒刃</text:p>
            <text:p>（エッジオブルーイン）</text:p>
          </table:table-cell>
          <table:table-cell table:style-name="ce93" office:value-type="string" calcext:value-type="string">
            <text:p>核心紋章/一般</text:p>
          </table:table-cell>
          <table:table-cell table:style-name="ce148" office:value-type="float" office:value="45" calcext:value-type="float">
            <text:p>45</text:p>
          </table:table-cell>
          <table:table-cell table:style-name="ce148" office:value-type="string" calcext:value-type="string">
            <text:p>1/劇本</text:p>
          </table:table-cell>
          <table:table-cell table:style-name="ce151" office:value-type="string" calcext:value-type="string">
            <text:p>表示你是擁有毀滅背教者之力的存在的紋章，你主要的任務就是為應死之物——主要是原菌——帶來確實的破滅</text:p>
          </table:table-cell>
          <table:table-cell table:style-name="ce151" office:value-type="string" calcext:value-type="string">
            <text:p>場景中登場的角色使用[從戰鬥不能狀態回復]的效果時使用；使該效果無效，使用後你的侵蝕率+5</text:p>
            <text:p>該效果1劇本可以使用1次</text:p>
          </table:table-cell>
          <table:table-cell table:style-name="ce148" office:value-type="string" calcext:value-type="string">
            <text:p>IA P178</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廷達羅斯 <text:s text:c="32"/>取得條件：沒有取得其他紋章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醜陋的禦盾</text:p>
            <text:p>（醜の禦盾）</text:p>
          </table:table-cell>
          <table:table-cell table:style-name="ce93" office:value-type="string" calcext:value-type="string">
            <text:p>紋章/近戰</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受EX背教者病毒感染的，律令時代的防人們所使用的木制大盾。其表面描有漩渦一樣的紋路，在受到超越者攻擊時紋路便會發光</text:p>
          </table:table-cell>
          <table:table-cell table:style-name="ce151" office:value-type="string" calcext:value-type="string">
            <text:p>技能：近戰   命中：-3   攻擊力：0   格擋值：10   射程：至近</text:p>
            <text:p>使用該武器進行格擋前使用，從所格擋的攻擊處受到的傷害變為0；使用該效果時，你的侵蝕率+3D10</text:p>
            <text:p>該效果1劇本可以使用1次</text:p>
          </table:table-cell>
          <table:table-cell table:style-name="ce148" office:value-type="string" calcext:value-type="string">
            <text:p>IA P179</text:p>
          </table:table-cell>
          <table:table-cell table:style-name="ce148"/>
          <table:table-cell table:number-columns-repeated="1016"/>
        </table:table-row>
        <table:table-row table:style-name="ro16">
          <table:table-cell table:style-name="ce148" office:value-type="string" calcext:value-type="string">
            <text:p>廷達羅斯繩帶</text:p>
            <text:p>（ティンダロスストラップ）</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廷達羅斯成員會掛在電話上的手繩，有著變形的黑色獵犬的形狀，初見的成員會彼此將掛有該繩帶的手機以銳角（90度以下）打開來打招呼。</text:p>
          </table:table-cell>
          <table:table-cell table:style-name="ce151" office:value-type="string" calcext:value-type="string">
            <text:p>你進行的使用【肉體】能力值的判定達成值+1</text:p>
          </table:table-cell>
          <table:table-cell table:style-name="ce148" office:value-type="string" calcext:value-type="string">
            <text:p>IA P179</text:p>
          </table:table-cell>
          <table:table-cell table:style-name="ce148"/>
          <table:table-cell table:number-columns-repeated="1016"/>
        </table:table-row>
        <table:table-row table:style-name="ro16">
          <table:table-cell table:style-name="ce148" office:value-type="string" calcext:value-type="string">
            <text:p>鋼之意志</text:p>
            <text:p>（鋼の意志）</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表示你有著不會敗給衝動的鋼鐵之心的紋章。你的內心有著甚至能夠壓制因衝動而生的暴走的強大</text:p>
          </table:table-cell>
          <table:table-cell table:style-name="ce151" office:value-type="string" calcext:value-type="string">
            <text:p>你受到[異常狀態：暴走]後使用，解除你受到的暴走狀態</text:p>
            <text:p>該效果1劇本可以使用1次</text:p>
          </table:table-cell>
          <table:table-cell table:style-name="ce148" office:value-type="string" calcext:value-type="string">
            <text:p>IA P179</text:p>
          </table:table-cell>
          <table:table-cell table:style-name="ce148"/>
          <table:table-cell table:number-columns-repeated="1016"/>
        </table:table-row>
        <table:table-row table:style-name="ro16">
          <table:table-cell table:style-name="ce148" office:value-type="string" calcext:value-type="string">
            <text:p>故鄉的街道</text:p>
            <text:p>（故郷の街）</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作為廷達羅斯在各個街道中巡邏，對其構造瞭解到了哪怕邊邊角角的紋章。從小巷到下水道，透過以各種各樣的地方為通路，你能夠以最短距離到達目的地</text:p>
          </table:table-cell>
          <table:table-cell table:style-name="ce151" office:value-type="string" calcext:value-type="string">
            <text:p>你進行戰鬥移動或全力移動前使用，該移動可以移動到場景內的任意位置</text:p>
            <text:p>該效果1劇本可以使用1次</text:p>
          </table:table-cell>
          <table:table-cell table:style-name="ce148" office:value-type="string" calcext:value-type="string">
            <text:p>IA P179</text:p>
          </table:table-cell>
          <table:table-cell table:style-name="ce148"/>
          <table:table-cell table:number-columns-repeated="1016"/>
        </table:table-row>
        <table:table-row table:style-name="ro16">
          <table:table-cell table:style-name="ce148" office:value-type="string" calcext:value-type="string">
            <text:p>金剛手環</text:p>
            <text:p>（金剛のバングル）</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廷達羅斯的匠人製作的銀手環，據說是從曾經在任務中死去的隊員身上找到，交由隊友繼承</text:p>
          </table:table-cell>
          <table:table-cell table:style-name="ce151" office:value-type="string" calcext:value-type="string">
            <text:p>你進行掩護時格擋值+[&lt;近戰&gt;LV（最大5）]</text:p>
          </table:table-cell>
          <table:table-cell table:style-name="ce148" office:value-type="string" calcext:value-type="string">
            <text:p>IA P17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咬牙</text:p>
            <text:p>（牙砕き）</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即使快要倒下也要守護某人的意志的紋章</text:p>
          </table:table-cell>
          <table:table-cell table:style-name="ce151" office:value-type="string" calcext:value-type="string">
            <text:p>你進行攻擊判定前使用，該攻擊對對象造成傷害時，該場景間，該對象下一次進行的攻擊傷害-5，如果效果持續期間你死亡，該效果持續至劇本結束</text:p>
            <text:p>該效果1劇本可以使用1次</text:p>
          </table:table-cell>
          <table:table-cell table:style-name="ce148" office:value-type="string" calcext:value-type="string">
            <text:p>IA P17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廷達羅斯少年隊</text:p>
            <text:p>（ティンダロス少年隊）</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作為廷達羅斯准成員的少年少女們，能夠在調查中察覺到大人所無法察覺的異樣而幫上忙</text:p>
          </table:table-cell>
          <table:table-cell table:style-name="ce151" office:value-type="string" calcext:value-type="string">
            <text:p>你進行判定前使用，該判定的達成值+3；該效果只能在中盤階段使用，並且不能在戰鬥中使用</text:p>
            <text:p>該效果1劇本可以使用3次</text:p>
          </table:table-cell>
          <table:table-cell table:style-name="ce148" office:value-type="string" calcext:value-type="string">
            <text:p>IA P179</text:p>
          </table:table-cell>
          <table:table-cell table:style-name="ce148"/>
          <table:table-cell table:number-columns-repeated="1016"/>
        </table:table-row>
        <table:table-row table:style-name="ro16">
          <table:table-cell table:style-name="ce148" office:value-type="string" calcext:value-type="string">
            <text:p>廷達羅斯之腿</text:p>
            <text:p>（ティンダロスの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確保逃脫用運輸手段，送至目的地點的廷達羅斯支援體制</text:p>
          </table:table-cell>
          <table:table-cell table:style-name="ce151" office:value-type="string" calcext:value-type="string">
            <text:p>任何時候都可以使用，你取得一件常備化點數10以下的載具並搭乘，與你處同一接戰區域的角色可以同乘也可以拒絕</text:p>
            <text:p>該效果1劇本可以使用1次</text:p>
          </table:table-cell>
          <table:table-cell table:style-name="ce148" office:value-type="string" calcext:value-type="string">
            <text:p>IA P179</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獵犬通道</text:p>
            <text:p>（ハウンドエントリ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你可以立刻奔赴應守護之人或仇恨一切的超越者身邊</text:p>
          </table:table-cell>
          <table:table-cell table:style-name="ce151" office:value-type="string" calcext:value-type="string">
            <text:p>先制階段使用，你移動到場景內任意角色所在的接戰區域；受到[異常狀態：硬直]時無法使用</text:p>
            <text:p>該效果1劇本可以使用1次</text:p>
          </table:table-cell>
          <table:table-cell table:style-name="ce148" office:value-type="string" calcext:value-type="string">
            <text:p>IA P18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守護之盾</text:p>
            <text:p>（守りの盾）</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表示你有著捐軀覺悟的紋章。廷達羅斯的成員們若是為了守護重要之物，哪怕是搭上自己的性命也在所不惜</text:p>
          </table:table-cell>
          <table:table-cell table:style-name="ce151" office:value-type="string" calcext:value-type="string">
            <text:p>傷害擲骰前使用，你進行掩護，你不會因為這次掩護而變為已行動，且你已行動時也仍可使用</text:p>
            <text:p>該效果1劇本可以使用3次</text:p>
          </table:table-cell>
          <table:table-cell table:style-name="ce148" office:value-type="string" calcext:value-type="string">
            <text:p>IA P180</text:p>
          </table:table-cell>
          <table:table-cell table:style-name="ce148"/>
          <table:table-cell table:number-columns-repeated="1016"/>
        </table:table-row>
        <table:table-row table:style-name="ro16">
          <table:table-cell table:style-name="ce148" office:value-type="string" calcext:value-type="string">
            <text:p>一夫當關</text:p>
            <text:p>（ラインマ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你是阻塞窄路阻止敵人侵入的防衛者，無論在多麼強大的敵人面前你都能攔住他們</text:p>
          </table:table-cell>
          <table:table-cell table:style-name="ce151" office:value-type="string" calcext:value-type="string">
            <text:p>準備階段使用，該場景中你所在的接戰區域被封鎖，該效果在你移動時結束</text:p>
            <text:p>該效果1場景可以使用1次</text:p>
          </table:table-cell>
          <table:table-cell table:style-name="ce148" office:value-type="string" calcext:value-type="string">
            <text:p>IA P18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避難支援</text:p>
            <text:p>（避難支援）</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利用廷達羅斯的支援讓一般民眾前往避難</text:p>
          </table:table-cell>
          <table:table-cell table:style-name="ce151" office:value-type="string" calcext:value-type="string">
            <text:p>準備階段使用，該回合的結算階段時使場景內的任意臨時演員退場，GM可以限制退場人數</text:p>
            <text:p>該效果1劇本可以使用1次</text:p>
          </table:table-cell>
          <table:table-cell table:style-name="ce148" office:value-type="string" calcext:value-type="string">
            <text:p>IA P18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不屈的意志</text:p>
            <text:p>（不屈の意志）</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具備了無論遭到何等妨礙都不會屈服，貫徹自己意志的強韌精神力的紋章</text:p>
          </table:table-cell>
          <table:table-cell table:style-name="ce151" office:value-type="string" calcext:value-type="string">
            <text:p>任何時候均可使用，取消自己受到的各種負面效果，如異常狀態、骰子數減少等，具體可以應用到什麼程度由GM決定；但該效果無法解除戰鬥不能和死亡</text:p>
            <text:p>該效果1劇本可以使用1次</text:p>
          </table:table-cell>
          <table:table-cell table:style-name="ce148" office:value-type="string" calcext:value-type="string">
            <text:p>IA P180</text:p>
          </table:table-cell>
          <table:table-cell table:style-name="ce148"/>
          <table:table-cell table:number-columns-repeated="1016"/>
        </table:table-row>
        <table:table-row table:style-name="ro16">
          <table:table-cell table:style-name="ce148" office:value-type="string" calcext:value-type="string">
            <text:p>占卜婆婆</text:p>
            <text:p>（占い婆）</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常年在街角為大家占卜的老婆婆，遇到困難時前去拜訪便能得到有益的建議</text:p>
          </table:table-cell>
          <table:table-cell table:style-name="ce151" office:value-type="string" calcext:value-type="string">
            <text:p>進行收集情報的判定前使用，該判定改用【精神】進行，所使用的技能不變，且仍能使用「種類：關聯」類的道具</text:p>
            <text:p>該道具可以取得多個</text:p>
          </table:table-cell>
          <table:table-cell table:style-name="ce148" office:value-type="string" calcext:value-type="string">
            <text:p>IA P180</text:p>
          </table:table-cell>
          <table:table-cell table:style-name="ce148"/>
          <table:table-cell table:number-columns-repeated="1016"/>
        </table:table-row>
        <table:table-row table:style-name="ro16">
          <table:table-cell table:style-name="ce148" office:value-type="string" calcext:value-type="string">
            <text:p>黑色籠手</text:p>
            <text:p>（黒の籠手）</text:p>
          </table:table-cell>
          <table:table-cell table:style-name="ce93" office:value-type="string" calcext:value-type="string">
            <text:p>核心紋章/近戰</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被漆黑的憎惡憑依的EX背教者漆黑籠手，只有擁有強烈的復仇心才能駕馭其中的憎惡進行使用</text:p>
          </table:table-cell>
          <table:table-cell table:style-name="ce151" office:value-type="string" calcext:value-type="string">
            <text:p>技能：&lt;近戰&gt;   命中：-2   攻擊力：19   格擋值：5   射程：至近</text:p>
            <text:p>衝動判定失敗時，你選擇一個擁有Lois的角色，你使其受到[異常狀態：憎惡]；其憎惡對象可以由你選擇</text:p>
          </table:table-cell>
          <table:table-cell table:style-name="ce148" office:value-type="string" calcext:value-type="string">
            <text:p>IA P18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盾之誓言</text:p>
            <text:p>（盾の誓い）</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懷有強烈的想要守護弱者願望的紋章對廷達羅斯來說你就是王牌與救世主，其中的期待與重壓使你的心日漸強大</text:p>
          </table:table-cell>
          <table:table-cell table:style-name="ce151" office:value-type="string" calcext:value-type="string">
            <text:p>你進行格擋的格擋值+10</text:p>
            <text:p>另外，你受到[異常狀態：暴走]時使用，回復該異常狀態並失去5HP</text:p>
            <text:p>該效果1劇本可以使用1次</text:p>
          </table:table-cell>
          <table:table-cell table:style-name="ce148" office:value-type="string" calcext:value-type="string">
            <text:p>IA P180</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阿爾法獵犬</text:p>
            <text:p>（アルファハウンド）</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是優秀指引者的紋章，你不止瞭解逃生通道，還擅長誘導人群避難</text:p>
          </table:table-cell>
          <table:table-cell table:style-name="ce151" office:value-type="string" calcext:value-type="string">
            <text:p>準備階段使用，將場景中登場的任意角色的行動值變成與你相同</text:p>
            <text:p>該效果1劇本可以使用1次</text:p>
          </table:table-cell>
          <table:table-cell table:style-name="ce148" office:value-type="string" calcext:value-type="string">
            <text:p>IA P180</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風暴基地 <text:s text:c="32"/>取得條件：職業為風暴基地部隊、傭兵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等離子攻手</text:p>
            <text:p>（プラズマスパイカー）</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生成超高熱等離子體灼燒切割目標的武器，為對抗再生能力強大的超越者而開發的美軍新兵器，連續使用需要大型電池</text:p>
          </table:table-cell>
          <table:table-cell table:style-name="ce151" office:value-type="string" calcext:value-type="string">
            <text:p>技能：&lt;近戰&gt;   命中：-2   攻擊力：15   格擋值：1   射程：至近</text:p>
            <text:p>該武器1劇本可以使用1次</text:p>
          </table:table-cell>
          <table:table-cell table:style-name="ce148" office:value-type="string" calcext:value-type="string">
            <text:p>IA P18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SMAW</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被稱為多目的強襲兵器的聯裝火箭發射器（Multi-use Rocket Launcher），風暴基地將其調整為對超越者專用彈頭</text:p>
          </table:table-cell>
          <table:table-cell table:style-name="ce151" office:value-type="string" calcext:value-type="string">
            <text:p>技能：&lt;射擊&gt;   命中：0   攻擊力：20   格擋值：-   射程：500m</text:p>
            <text:p>以該武器進行攻擊時，可以使該攻擊變成[對象：範圍]，該效果優先順序大於組合異能對象限制</text:p>
            <text:p>該效果1劇本可以使用1次</text:p>
            <text:p>至近不可</text:p>
          </table:table-cell>
          <table:table-cell table:style-name="ce148" office:value-type="string" calcext:value-type="string">
            <text:p>IA P18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重型征服者</text:p>
            <text:p>（ヘビーバンキッシャー）</text:p>
          </table:table-cell>
          <table:table-cell table:style-name="ce93" office:value-type="string" calcext:value-type="string">
            <text:p>紋章/射擊</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在地面設置三腳架的固定式機槍</text:p>
          </table:table-cell>
          <table:table-cell table:style-name="ce151" office:value-type="string" calcext:value-type="string">
            <text:p>技能：&lt;射擊&gt;   命中：0   攻擊力：12   格擋值：-   射程：30m</text:p>
            <text:p>搭載火器；該武器可以在非搭乘狀態下裝備，此時你不能移動，且進行的閃避判定骰數-3個</text:p>
          </table:table-cell>
          <table:table-cell table:style-name="ce148" office:value-type="string" calcext:value-type="string">
            <text:p>IA P18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關聯：總統</text:p>
            <text:p>（コネ：大統領）</text:p>
          </table:table-cell>
          <table:table-cell table:style-name="ce93" office:value-type="string" calcext:value-type="string">
            <text:p>紋章/關聯</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你曾從原菌手中救下了總統，對你的獻身和活躍感到感動的總統成了你的朋友</text:p>
          </table:table-cell>
          <table:table-cell table:style-name="ce151" office:value-type="string" calcext:value-type="string">
            <text:p>技能：&lt;情報：●●&gt;</text:p>
            <text:p>你進行的&lt;情報：●●&gt;判定前使用，該判定直接成功；GM可以拒絕該效果，此時不消耗使用次數</text:p>
            <text:p>該效果1劇本可以使用1次</text:p>
          </table:table-cell>
          <table:table-cell table:style-name="ce148" office:value-type="string" calcext:value-type="string">
            <text:p>IA P181</text:p>
          </table:table-cell>
          <table:table-cell table:style-name="ce148"/>
          <table:table-cell table:number-columns-repeated="1016"/>
        </table:table-row>
        <table:table-row table:style-name="ro16">
          <table:table-cell table:style-name="ce148" office:value-type="string" calcext:value-type="string">
            <text:p>食蛇者</text:p>
            <text:p>（スネークイーター）</text:p>
          </table:table-cell>
          <table:table-cell table:style-name="ce93" office:value-type="string" calcext:value-type="string">
            <text:p>紋章/一般</text:p>
          </table:table-cell>
          <table:table-cell table:style-name="ce148" office:value-type="float" office:value="2" calcext:value-type="float">
            <text:p>2</text:p>
          </table:table-cell>
          <table:table-cell table:style-name="ce148" office:value-type="string" calcext:value-type="string">
            <text:p>-</text:p>
          </table:table-cell>
          <table:table-cell table:style-name="ce151" office:value-type="string" calcext:value-type="string">
            <text:p>無論多麼嚴酷的環境都能單人求生並生還的野外活動技術</text:p>
          </table:table-cell>
          <table:table-cell table:style-name="ce151" office:value-type="string" calcext:value-type="string">
            <text:p>你在任何環境中都能獲得飲用水、食品、藥品、防寒物資等生命維持手段；有其他想要救助的人時，GM認為有必要的話，需要進行&lt;知覺&gt;判定</text:p>
          </table:table-cell>
          <table:table-cell table:style-name="ce148" office:value-type="string" calcext:value-type="string">
            <text:p>IA P18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旋風腳</text:p>
            <text:p>（ゲイルブート）</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對風暴基地新兵進行的地獄般新兵訓練，即便是超越者也叫苦不迭</text:p>
          </table:table-cell>
          <table:table-cell table:style-name="ce151" office:value-type="string" calcext:value-type="string">
            <text:p>取得需要【肉體】5以上；你的戰鬥移動+10m</text:p>
          </table:table-cell>
          <table:table-cell table:style-name="ce148" office:value-type="string" calcext:value-type="string">
            <text:p>IA P18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垂死黎明</text:p>
            <text:p>（ダイイングドーン）</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以核戰爭、僵屍爆發、外星人襲擊等非常情況制定的緊急應對預案，記載了集結美軍頭腦制定的壓力控制方法，不過大半被軍隊當成玩笑</text:p>
          </table:table-cell>
          <table:table-cell table:style-name="ce151" office:value-type="string" calcext:value-type="string">
            <text:p>你進行&lt;意志&gt;判定時，達成值+3</text:p>
          </table:table-cell>
          <table:table-cell table:style-name="ce148" office:value-type="string" calcext:value-type="string">
            <text:p>IA P18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無形標籤</text:p>
            <text:p>（インビジブルタグ）</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為從事危險或非法任務的部分隊員製作的無記名認識票據，沒有記錄姓名、社保編號等可以特定個人的情報，只有票據編號，作為危險情況處理可以獲得高額報酬和為合眾國奉獻之美名</text:p>
          </table:table-cell>
          <table:table-cell table:style-name="ce151" office:value-type="string" calcext:value-type="string">
            <text:p>你的常備化點數+10</text:p>
          </table:table-cell>
          <table:table-cell table:style-name="ce148" office:value-type="string" calcext:value-type="string">
            <text:p>IA P181</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裝甲士兵</text:p>
            <text:p>（アーマードソルジャ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為重武裝戰鬥進行了大量訓練，你時刻謹記立於戰場便意味著直面死亡</text:p>
          </table:table-cell>
          <table:table-cell table:style-name="ce151" office:value-type="string" calcext:value-type="string">
            <text:p>你裝備的防具變為[行動值：0][閃避值：0]</text:p>
          </table:table-cell>
          <table:table-cell table:style-name="ce148" office:value-type="string" calcext:value-type="string">
            <text:p>IA P18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噴氣背包</text:p>
            <text:p>（ジェットパック）</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裝在腰部的個人用短距離飛行引擎，予定用於超越者狩獵而小型化並重視移動距離</text:p>
          </table:table-cell>
          <table:table-cell table:style-name="ce151" office:value-type="string" calcext:value-type="string">
            <text:p>你進行戰鬥移動或全力移動前使用，該移動間你進入飛行狀態，並按照行動值+5計算移動距離（戰鬥移動距離應為行動值+10m）</text:p>
            <text:p>該效果1劇本可以使用3次</text:p>
          </table:table-cell>
          <table:table-cell table:style-name="ce148" office:value-type="string" calcext:value-type="string">
            <text:p>IA P18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自動修復機構</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經由風暴基地的技術班之手，在體內埋藏了賦予你肉體再生能力的機構的紋章。可以通過啟動內藏的機構來大幅度提高新陳代謝來使傷口以驚人的速度迅速恢復。</text:p>
          </table:table-cell>
          <table:table-cell table:style-name="ce151" office:value-type="string" calcext:value-type="string">
            <text:p>次要動作使用，你的HP回復5D10點；使用該效果時，你的侵蝕率+3</text:p>
            <text:p>該效果1劇本可以使用1次</text:p>
          </table:table-cell>
          <table:table-cell table:style-name="ce148" office:value-type="string" calcext:value-type="string">
            <text:p>IA P182</text:p>
          </table:table-cell>
          <table:table-cell table:style-name="ce148"/>
          <table:table-cell table:number-columns-repeated="1016"/>
        </table:table-row>
        <table:table-row table:style-name="ro16">
          <table:table-cell table:style-name="ce148" office:value-type="string" calcext:value-type="string">
            <text:p>出力強化機構</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風暴基地的特殊機修兵為你實施了特殊改造調整的紋章。可以借此進行暫時的出力上升。</text:p>
          </table:table-cell>
          <table:table-cell table:style-name="ce151" office:value-type="string" calcext:value-type="string">
            <text:p>進行回應動作判定前使用，該判定的達成值+5；每次使用該效果時，你失去5點HP</text:p>
          </table:table-cell>
          <table:table-cell table:style-name="ce148" office:value-type="string" calcext:value-type="string">
            <text:p>IA P182</text:p>
          </table:table-cell>
          <table:table-cell table:style-name="ce148"/>
          <table:table-cell table:number-columns-repeated="1016"/>
        </table:table-row>
        <table:table-row table:style-name="ro16">
          <table:table-cell table:style-name="ce148" office:value-type="string" calcext:value-type="string">
            <text:p>沉默扳機</text:p>
            <text:p>（シンクトリガ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你因暗示或訓練能夠迅速使用異能</text:p>
          </table:table-cell>
          <table:table-cell table:style-name="ce151" office:value-type="string" calcext:value-type="string">
            <text:p>準備階段使用，你可以使用一項[時機：次要動作]的異能，不可以組合異能使用</text:p>
            <text:p>該效果1場景可以使用1次</text:p>
          </table:table-cell>
          <table:table-cell table:style-name="ce148" office:value-type="string" calcext:value-type="string">
            <text:p>IA P18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聯組電池</text:p>
            <text:p>（マルチバッテリ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個人攜帶用改良型大型電池，能讓雷擊黑犬症候群的異能進一步強化，但是非常重</text:p>
          </table:table-cell>
          <table:table-cell table:style-name="ce151" office:value-type="string" calcext:value-type="string">
            <text:p>你組合雷擊黑犬異能進行攻擊的攻擊力+5，此外你的“等離子攻手”使用次數變為[5/劇本]；你的行動值-5</text:p>
          </table:table-cell>
          <table:table-cell table:style-name="ce148" office:value-type="string" calcext:value-type="string">
            <text:p>IA P18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超高速公路系統</text:p>
            <text:p>（スーパーハイウェイシステム）</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劇本</text:p>
          </table:table-cell>
          <table:table-cell table:style-name="ce151" office:value-type="string" calcext:value-type="string">
            <text:p>即時監視竊聽全美的駭客系統，名稱一般顯示為高度電腦網路，這些資料的一部分交給了本國的實用化系統，對於地方城市大小的範圍可以做到24小時監控</text:p>
          </table:table-cell>
          <table:table-cell table:style-name="ce151" office:value-type="string" calcext:value-type="string">
            <text:p>主要動作使用，該場景中登場的任意角色進行的收集情報的判定，達成值+10</text:p>
            <text:p>該效果1劇本可以使用1次</text:p>
          </table:table-cell>
          <table:table-cell table:style-name="ce148" office:value-type="string" calcext:value-type="string">
            <text:p>IA P18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區域封鎖：太平洋艦隊</text:p>
            <text:p>（エリア封鎖：太平洋艦隊）</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1/劇本</text:p>
          </table:table-cell>
          <table:table-cell table:style-name="ce151" office:value-type="string" calcext:value-type="string">
            <text:p>接受美軍支援封鎖附近一帶的許可權</text:p>
          </table:table-cell>
          <table:table-cell table:style-name="ce151" office:value-type="string" calcext:value-type="string">
            <text:p>主要動作使用，場景內登場的臨時演員全部退場，只能在以太平洋沿岸各國為舞臺的場景中使用，使用時需要GM許可</text:p>
            <text:p>該效果1劇本可以使用1次</text:p>
          </table:table-cell>
          <table:table-cell table:style-name="ce148" office:value-type="string" calcext:value-type="string">
            <text:p>IA P182</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請求支援：DIA</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事先接受過DIA（美國國防情報局）的軍事情報分析演講教育，能夠使戰鬥向著有利方向展開的紋章</text:p>
          </table:table-cell>
          <table:table-cell table:style-name="ce151" office:value-type="string" calcext:value-type="string">
            <text:p>準備階段使用，該場景間，你的行動值+2</text:p>
            <text:p>該道具可以同時消耗多個使用，效果將會疊加；該道具最多可以取得至3個</text:p>
          </table:table-cell>
          <table:table-cell table:style-name="ce148" office:value-type="string" calcext:value-type="string">
            <text:p>IA P182</text:p>
          </table:table-cell>
          <table:table-cell table:style-name="ce148"/>
          <table:table-cell table:number-columns-repeated="1016"/>
        </table:table-row>
        <table:table-row table:style-name="ro16">
          <table:table-cell table:style-name="ce148" office:value-type="string" calcext:value-type="string">
            <text:p>請求支援：榴彈炮</text:p>
          </table:table-cell>
          <table:table-cell table:style-name="ce93" office:value-type="string" calcext:value-type="string">
            <text:p>紋章/消耗品</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被授予了向美國陸軍申請支援許可權的紋章。只要你發出申請，便會使用事先準備好的155mm榴彈炮進行</text:p>
          </table:table-cell>
          <table:table-cell table:style-name="ce151" office:value-type="string" calcext:value-type="string">
            <text:p>主要動作使用，進行「技能：&lt;射擊&gt;」「對象：範圍」「射程：視野」「攻擊力：8」的射擊攻擊；命中時，給對象造成[異常狀態：硬直]。此攻擊無法與異能組合</text:p>
            <text:p>該道具可以取得多個</text:p>
          </table:table-cell>
          <table:table-cell table:style-name="ce148" office:value-type="string" calcext:value-type="string">
            <text:p>IA P183</text:p>
          </table:table-cell>
          <table:table-cell table:style-name="ce148"/>
          <table:table-cell table:number-columns-repeated="1016"/>
        </table:table-row>
        <table:table-row table:style-name="ro16">
          <table:table-cell table:style-name="ce148" office:value-type="string" calcext:value-type="string">
            <text:p>請求支援：UAV</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被授予了向美國空軍申請支援許可權的紋章。只要你發出申請，便會使用在附近待機的UAV（無人機）對敵人展開攻擊</text:p>
          </table:table-cell>
          <table:table-cell table:style-name="ce151" office:value-type="string" calcext:value-type="string">
            <text:p>你執行的傷害擲骰前使用，該傷害+10</text:p>
            <text:p>該道具可以取得多個</text:p>
          </table:table-cell>
          <table:table-cell table:style-name="ce148" office:value-type="string" calcext:value-type="string">
            <text:p>IA P183</text:p>
          </table:table-cell>
          <table:table-cell table:style-name="ce148"/>
          <table:table-cell table:number-columns-repeated="1016"/>
        </table:table-row>
        <table:table-row table:style-name="ro16">
          <table:table-cell table:style-name="ce148" office:value-type="string" calcext:value-type="string">
            <text:p>請求支援：醫療部隊</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你可以聯絡後方部隊接受應急處理</text:p>
          </table:table-cell>
          <table:table-cell table:style-name="ce151" office:value-type="string" calcext:value-type="string">
            <text:p>主要動作使用，場景中登場的任意角色回復4D10HP；該效果只能在非戰鬥中使用</text:p>
          </table:table-cell>
          <table:table-cell table:style-name="ce148" office:value-type="string" calcext:value-type="string">
            <text:p>IA P18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請求支援：間接炮擊</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對後方戰力發出支援射擊請求</text:p>
          </table:table-cell>
          <table:table-cell table:style-name="ce151" office:value-type="string" calcext:value-type="string">
            <text:p>準備階段使用，制定該場景內任意接戰區域，該回合間指定接戰區域中的角色進行的判定，骰子數-3個</text:p>
          </table:table-cell>
          <table:table-cell table:style-name="ce148" office:value-type="string" calcext:value-type="string">
            <text:p>IA P18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請求支援：輸送</text:p>
          </table:table-cell>
          <table:table-cell table:style-name="ce93" office:value-type="string" calcext:value-type="string">
            <text:p>紋章/消耗品</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被授予了向美國海軍陸戰隊申請支援許可權的紋章。收到申請的海軍便會用運輸機、裝甲運輸車等等來輸送你</text:p>
          </table:table-cell>
          <table:table-cell table:style-name="ce151" office:value-type="string" calcext:value-type="string">
            <text:p>準備階段使用，你進行戰鬥移動，但移動距離視為10m</text:p>
            <text:p>該道具可以取得多個</text:p>
          </table:table-cell>
          <table:table-cell table:style-name="ce148" office:value-type="string" calcext:value-type="string">
            <text:p>IA P183</text:p>
          </table:table-cell>
          <table:table-cell table:style-name="ce148"/>
          <table:table-cell table:number-columns-repeated="1016"/>
        </table:table-row>
        <table:table-row table:style-name="ro16">
          <table:table-cell table:style-name="ce148" office:value-type="string" calcext:value-type="string">
            <text:p>請求支援：航母機動部隊</text:p>
          </table:table-cell>
          <table:table-cell table:style-name="ce93" office:value-type="string" calcext:value-type="string">
            <text:p>紋章/消耗品</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被授予了向美國海軍申請支援許可權的紋章。只要你發出申請，在近海待機的航母機動部隊便會用艦載機和導彈來進行戰鬥支援</text:p>
          </table:table-cell>
          <table:table-cell table:style-name="ce151" office:value-type="string" calcext:value-type="string">
            <text:p>準備階段使用，使場景中登場的任意集群單位和臨時角色變為[戰鬥不能]；該效果沒有命中判定，對象無法執行回應動作</text:p>
          </table:table-cell>
          <table:table-cell table:style-name="ce148" office:value-type="string" calcext:value-type="string">
            <text:p>IA P183</text:p>
          </table:table-cell>
          <table:table-cell table:style-name="ce148"/>
          <table:table-cell table:number-columns-repeated="1016"/>
        </table:table-row>
        <table:table-row table:style-name="ro16">
          <table:table-cell table:style-name="ce148" office:value-type="string" calcext:value-type="string">
            <text:p>人間大炮</text:p>
            <text:p>（キャノンボーラー）</text:p>
          </table:table-cell>
          <table:table-cell table:style-name="ce93" office:value-type="string" calcext:value-type="string">
            <text:p>核心紋章/防具</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空降作戰用動力甲，將人使用專用發射器射出並以最快速度抵達作戰地點，只有接受過特別訓練的超越者才能勝任</text:p>
          </table:table-cell>
          <table:table-cell table:style-name="ce151" office:value-type="string" calcext:value-type="string">
            <text:p>閃避：-3   行動值：-3   裝甲值：25</text:p>
            <text:p>你可以將【搭載火器】視為【雙手持握】裝備；準備階段使用，將你重新配置在場景內任意接戰區域中，不會受到無法移動效果影響</text:p>
            <text:p>該效果1劇本可以使用1次</text:p>
          </table:table-cell>
          <table:table-cell table:style-name="ce148" office:value-type="string" calcext:value-type="string">
            <text:p>IA P18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斯巴達士兵</text:p>
            <text:p>（スパルタンソルジャー）</text:p>
          </table:table-cell>
          <table:table-cell table:style-name="ce93" office:value-type="string" calcext:value-type="string">
            <text:p>核心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贈予以令人驚訝的生還率為傲的士兵的別名，據說你是能從無論多麼危險的任務重生還的不死身存在</text:p>
          </table:table-cell>
          <table:table-cell table:style-name="ce151" office:value-type="string" calcext:value-type="string">
            <text:p>你受到的傷害-5；你的裝甲值合計在10以上時，受到的傷害額外-10（總計-15）</text:p>
          </table:table-cell>
          <table:table-cell table:style-name="ce148" office:value-type="string" calcext:value-type="string">
            <text:p>IA P183</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風暴狂戰士</text:p>
            <text:p>（テンペストバーサーカー）</text:p>
          </table:table-cell>
          <table:table-cell table:style-name="ce93" office:value-type="string" calcext:value-type="string">
            <text:p>核心紋章/一般</text:p>
          </table:table-cell>
          <table:table-cell table:style-name="ce148" office:value-type="float" office:value="50" calcext:value-type="float">
            <text:p>50</text:p>
          </table:table-cell>
          <table:table-cell table:style-name="ce148" office:value-type="string" calcext:value-type="string">
            <text:p>-</text:p>
          </table:table-cell>
          <table:table-cell table:style-name="ce151" office:value-type="string" calcext:value-type="string">
            <text:p>表示接受了風暴基地中進行的強化試驗的超越者的紋章，侵蝕率上升的風險很大，但確認到能極大程度強化身體力量</text:p>
          </table:table-cell>
          <table:table-cell table:style-name="ce151" office:value-type="string" calcext:value-type="string">
            <text:p>你受到[異常狀態：暴走]或侵蝕率在150%以上時，進行的判定骰數+5個，受到的傷害-10</text:p>
          </table:table-cell>
          <table:table-cell table:style-name="ce148" office:value-type="string" calcext:value-type="string">
            <text:p>IA P183</text:p>
          </table:table-cell>
          <table:table-cell table:style-name="ce148" office:value-type="string" calcext:value-type="string">
            <text:p>IA新增</text:p>
          </table:table-cell>
          <table:table-cell table:number-columns-repeated="1016"/>
        </table:table-row>
        <table:table-row table:style-name="ro16">
          <table:table-cell table:style-name="ce147" office:value-type="string" calcext:value-type="string" table:number-columns-spanned="6" table:number-rows-spanned="1">
            <text:p>自由人 <text:s text:c="35"/>取得條件：沒有取得其他紋章的角色</text:p>
          </table:table-cell>
          <table:covered-table-cell table:number-columns-repeated="5"/>
          <table:table-cell table:style-name="ce148" table:number-columns-repeated="2"/>
          <table:table-cell table:number-columns-repeated="1016"/>
        </table:table-row>
        <table:table-row table:style-name="ro16">
          <table:table-cell table:style-name="ce148" office:value-type="string" calcext:value-type="string">
            <text:p>手藝人的小刀</text:p>
            <text:p>（手業師のナイフ）</text:p>
          </table:table-cell>
          <table:table-cell table:style-name="ce93" office:value-type="string" calcext:value-type="string">
            <text:p>紋章/近戰</text:p>
          </table:table-cell>
          <table:table-cell table:style-name="ce148" office:value-type="float" office:value="10" calcext:value-type="float">
            <text:p>10</text:p>
          </table:table-cell>
          <table:table-cell table:style-name="ce148" office:value-type="string" calcext:value-type="string">
            <text:p>3/劇本</text:p>
          </table:table-cell>
          <table:table-cell table:style-name="ce151" office:value-type="string" calcext:value-type="string">
            <text:p>魔術師或鎖匠等將手指靈巧化作武器之人愛用的小刀，可以在各種地方派上用場</text:p>
          </table:table-cell>
          <table:table-cell table:style-name="ce151" office:value-type="string" calcext:value-type="string">
            <text:p>技能：&lt;近戰&gt;   命中：0   攻擊力：6   格擋值：2   射程：至近</text:p>
            <text:p>你進行【感覺】判定前使用，該判定骰數+3個</text:p>
            <text:p>該效果1劇本可以使用3次</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流落業物</text:p>
            <text:p>（流れ業物）</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裏社會看門人們帶著的日本刀，由有實力的人來使用能守護其身</text:p>
          </table:table-cell>
          <table:table-cell table:style-name="ce151" office:value-type="string" calcext:value-type="string">
            <text:p>技能：&lt;近戰&gt;   命中：-1   攻擊力：8   格擋值：3   射程：至近</text:p>
            <text:p>你進行閃避判定前使用，該判定暴擊值-1（下限值6）；只有&lt;近戰&gt;LV4以上時才能使用該效果</text:p>
            <text:p>該效果1劇本可以使用1次</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無銘的守護刀</text:p>
            <text:p>（無銘の護り刀）</text:p>
          </table:table-cell>
          <table:table-cell table:style-name="ce93" office:value-type="string" calcext:value-type="string">
            <text:p>紋章/近戰</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使用特殊制法制作的非常強韌的刀，據說刀匠只給有實力的武戲演員打刀</text:p>
          </table:table-cell>
          <table:table-cell table:style-name="ce151" office:value-type="string" calcext:value-type="string">
            <text:p>技能：&lt;近戰&gt;   命中：0   攻擊力：8   格擋值：5   射程：至近</text:p>
            <text:p>使用該武器格擋前使用，該格擋值+10</text:p>
            <text:p>該效果1場景可以使用1次</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黑劍</text:p>
            <text:p>（黒の剣）</text:p>
          </table:table-cell>
          <table:table-cell table:style-name="ce93" office:value-type="string" calcext:value-type="string">
            <text:p>紋章/近戰</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被稱為妖刀之類名字的黑鞘刀，非常鋒利，甚至能讓持有者的精神發狂</text:p>
          </table:table-cell>
          <table:table-cell table:style-name="ce151" office:value-type="string" calcext:value-type="string">
            <text:p>技能：&lt;近戰&gt;   命中：-1   攻擊力：10   格擋值：2   射程：至近</text:p>
            <text:p>持有該武器時你的衝動判定達成值-4；你受到[異常狀態：暴走]時攻擊力+6</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秘密定制</text:p>
            <text:p>（シークレットカスタム）</text:p>
          </table:table-cell>
          <table:table-cell table:style-name="ce93" office:value-type="string" calcext:value-type="string">
            <text:p>紋章/射擊</text:p>
          </table:table-cell>
          <table:table-cell table:style-name="ce148" office:value-type="float" office:value="15" calcext:value-type="float">
            <text:p>15</text:p>
          </table:table-cell>
          <table:table-cell table:style-name="ce148" office:value-type="string" calcext:value-type="string">
            <text:p>1/場景</text:p>
          </table:table-cell>
          <table:table-cell table:style-name="ce151" office:value-type="string" calcext:value-type="string">
            <text:p>間諜等擅長潛入工作的人愛用的小型自動手槍，用於狙擊的精密度非常高</text:p>
          </table:table-cell>
          <table:table-cell table:style-name="ce151" office:value-type="string" calcext:value-type="string">
            <text:p>技能：&lt;射擊&gt;   命中：0   攻擊力：5   格擋值：-   射程：20m</text:p>
            <text:p>該武器射程範圍內有角色進行判定前使用；該判定骰數-3個</text:p>
            <text:p>該效果1場景可以使用1次</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小型保鏢</text:p>
            <text:p>（リトルバウンサー）</text:p>
          </table:table-cell>
          <table:table-cell table:style-name="ce93" office:value-type="string" calcext:value-type="string">
            <text:p>紋章/射擊</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非法的糾紛調解者們愛用、值得信賴的高威力左輪手槍，根據定制可以進行遠距離狙擊</text:p>
          </table:table-cell>
          <table:table-cell table:style-name="ce151" office:value-type="string" calcext:value-type="string">
            <text:p>技能：&lt;射擊&gt;   命中：-1   攻擊力：11   格擋值：-   射程：20m</text:p>
            <text:p>次要動作使用，該主要階段間該武器變為[射程：100m]</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牽絆的制服</text:p>
            <text:p>（絆の制服）</text:p>
          </table:table-cell>
          <table:table-cell table:style-name="ce93" office:value-type="string" calcext:value-type="string">
            <text:p>紋章/防具</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繼承了友人、夥伴、學生會等種種意志的學生服，只要穿著它內心就會不可思議地冷靜下來</text:p>
          </table:table-cell>
          <table:table-cell table:style-name="ce151" office:value-type="string" calcext:value-type="string">
            <text:p>閃避：0   行動值：0   裝甲值：3</text:p>
            <text:p>你進行【精神】判定時，達成值+2；該效果不能用於攻擊判定</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愛用的夾克</text:p>
            <text:p>（愛用のジャケット）</text:p>
          </table:table-cell>
          <table:table-cell table:style-name="ce93" office:value-type="string" calcext:value-type="string">
            <text:p>紋章/防具</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對你來說可以代替名片的中意夾克，穿著它能讓你在工作中更有精神</text:p>
          </table:table-cell>
          <table:table-cell table:style-name="ce151" office:value-type="string" calcext:value-type="string">
            <text:p>閃避：0   行動值：0   裝甲值：4</text:p>
            <text:p>取得時選擇一項技能，你使用該技能進行判定時，達成值+3</text:p>
          </table:table-cell>
          <table:table-cell table:style-name="ce148" office:value-type="string" calcext:value-type="string">
            <text:p>IA P184</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師傅的外套</text:p>
            <text:p>（師匠のコート）</text:p>
          </table:table-cell>
          <table:table-cell table:style-name="ce93" office:value-type="string" calcext:value-type="string">
            <text:p>紋章/防具</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你從身為你師傅的人處獲得的大衣，與之一同繼承的還有各種人脈，可以說這件大衣就是人脈之證</text:p>
          </table:table-cell>
          <table:table-cell table:style-name="ce151" office:value-type="string" calcext:value-type="string">
            <text:p>閃避：0   行動值：0   裝甲值：4</text:p>
            <text:p>你進行的&lt;情報：●●&gt;判定骰數+3個；該效果不能和[種類：關聯]道具同時使用</text:p>
          </table:table-cell>
          <table:table-cell table:style-name="ce148" office:value-type="string" calcext:value-type="string">
            <text:p>IA P18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柔體夾克</text:p>
            <text:p>（フレックスジャケット）</text:p>
          </table:table-cell>
          <table:table-cell table:style-name="ce93" office:value-type="string" calcext:value-type="string">
            <text:p>紋章/防具</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特別定制的防彈夾克，又輕又不會阻礙行動，還有令人驚訝的耐衝擊性能，和裡社會沒有很深的關係的人無法定做到</text:p>
          </table:table-cell>
          <table:table-cell table:style-name="ce151" office:value-type="string" calcext:value-type="string">
            <text:p>閃避：0   行動值：-1   裝甲值：7</text:p>
            <text:p>取得需要&lt;情報：黑社會&gt;LV4以上；在對你計算HP傷害後使用，你（預定）受到的傷害-2D10</text:p>
            <text:p>該效果1劇本可以使用1次</text:p>
          </table:table-cell>
          <table:table-cell table:style-name="ce148" office:value-type="string" calcext:value-type="string">
            <text:p>IA P18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傷痕天使</text:p>
            <text:p>（スカードエンジェル）</text:p>
          </table:table-cell>
          <table:table-cell table:style-name="ce93" office:value-type="string" calcext:value-type="string">
            <text:p>紋章/載具</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在不良、混混或黑幫之間當做傳說傳唱的改造摩托</text:p>
          </table:table-cell>
          <table:table-cell table:style-name="ce151" office:value-type="string" calcext:value-type="string">
            <text:p>技能：&lt;駕駛：二輪&gt;   攻擊力：8   行動值：4   裝甲值：4   全力移動：250m</text:p>
            <text:p>你進行攻擊的攻擊力+4；該載具只有&lt;駕駛：二輪&gt;LV4以上可以搭乘</text:p>
          </table:table-cell>
          <table:table-cell table:style-name="ce148" office:value-type="string" calcext:value-type="string">
            <text:p>IA P18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關聯：協助者</text:p>
            <text:p>（コネ：協力者）</text:p>
          </table:table-cell>
          <table:table-cell table:style-name="ce93" office:value-type="string" calcext:value-type="string">
            <text:p>紋章/關聯</text:p>
          </table:table-cell>
          <table:table-cell table:style-name="ce148" office:value-type="float" office:value="5" calcext:value-type="float">
            <text:p>5</text:p>
          </table:table-cell>
          <table:table-cell table:style-name="ce148" office:value-type="string" calcext:value-type="string">
            <text:p>3/劇本</text:p>
          </table:table-cell>
          <table:table-cell table:style-name="ce151" office:value-type="string" calcext:value-type="string">
            <text:p>表示一直協助你調查的人們的紋章，他們在你不知道的地方奮鬥著支持你的活動</text:p>
          </table:table-cell>
          <table:table-cell table:style-name="ce151" office:value-type="string" calcext:value-type="string">
            <text:p>取得需要&lt;情報：流言&gt;LV4以上，你進行任意&lt;情報：●●&gt;時使用，可以使用&lt;情報：流言&gt;代替原本的技能</text:p>
            <text:p>該效果1劇本可以使用3次</text:p>
            <text:p>稀有道具</text:p>
          </table:table-cell>
          <table:table-cell table:style-name="ce148" office:value-type="string" calcext:value-type="string">
            <text:p>IA P18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關聯：夥伴</text:p>
            <text:p>（コネ：相棒）</text:p>
          </table:table-cell>
          <table:table-cell table:style-name="ce93" office:value-type="string" calcext:value-type="string">
            <text:p>紋章/關聯</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助手抑或是同僚等，在你身邊支持著你的友人，雖然無法為你在戰鬥中擋刀，但仍會在情報收集等方面支持著你</text:p>
          </table:table-cell>
          <table:table-cell table:style-name="ce151" office:value-type="string" calcext:value-type="string">
            <text:p>你進行的&lt;情報：●●&gt;判定，達成值+2</text:p>
          </table:table-cell>
          <table:table-cell table:style-name="ce148" office:value-type="string" calcext:value-type="string">
            <text:p>IA P18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禁欲</text:p>
            <text:p>（アセティック）</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約束著自己，過著禁欲生活的紋章。拒絕奢侈生活為你帶來了強大的內心</text:p>
          </table:table-cell>
          <table:table-cell table:style-name="ce151" office:value-type="string" calcext:value-type="string">
            <text:p>你進行的使用了【精神】的判定骰數+1個，但你在一次判定中能使用的財富點數變為至多3點</text:p>
          </table:table-cell>
          <table:table-cell table:style-name="ce148" office:value-type="string" calcext:value-type="string">
            <text:p>IA P185</text:p>
          </table:table-cell>
          <table:table-cell table:style-name="ce148"/>
          <table:table-cell table:number-columns-repeated="1016"/>
        </table:table-row>
        <table:table-row table:style-name="ro16">
          <table:table-cell table:style-name="ce148" office:value-type="string" calcext:value-type="string">
            <text:p>餘生</text:p>
            <text:p>（アフターライフ）</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過去曾從屬於某個組織的紋章，直至是脫離組織的現今，過去使用過的道具，抑或是當時磨練出的技術仍伴隨在你身邊</text:p>
          </table:table-cell>
          <table:table-cell table:style-name="ce151" office:value-type="string" calcext:value-type="string">
            <text:p>取得時從其他組織的紋章中選擇一個，你能夠取得所選的紋章；常備化那個紋章所需的經驗點需要另外消耗。選擇需要GM許可的紋章時，同樣需要先征得GM的同意</text:p>
          </table:table-cell>
          <table:table-cell table:style-name="ce148" office:value-type="string" calcext:value-type="string">
            <text:p>IA P185</text:p>
          </table:table-cell>
          <table:table-cell table:style-name="ce148"/>
          <table:table-cell table:number-columns-repeated="1016"/>
        </table:table-row>
        <table:table-row table:style-name="ro16">
          <table:table-cell table:style-name="ce148" office:value-type="string" calcext:value-type="string">
            <text:p>貪婪</text:p>
            <text:p>（グリーディ）</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1/劇本</text:p>
          </table:table-cell>
          <table:table-cell table:style-name="ce151" office:value-type="string" calcext:value-type="string">
            <text:p>表示你十分貪財的紋章，對於自食其力的自由人來說，錢沒了那可是事關生死的大問題，除了貪財，你也十分擅長理財</text:p>
          </table:table-cell>
          <table:table-cell table:style-name="ce151" office:value-type="string" calcext:value-type="string">
            <text:p>主要動作使用，你的財富點數+2D10點，所增加的財富點數，結團時會失去</text:p>
            <text:p>該效果1劇本可以使用1次</text:p>
          </table:table-cell>
          <table:table-cell table:style-name="ce148" office:value-type="string" calcext:value-type="string">
            <text:p>IA P185</text:p>
          </table:table-cell>
          <table:table-cell table:style-name="ce148"/>
          <table:table-cell table:number-columns-repeated="1016"/>
        </table:table-row>
        <table:table-row table:style-name="ro16">
          <table:table-cell table:style-name="ce148" office:value-type="string" calcext:value-type="string">
            <text:p>退休</text:p>
            <text:p>（リタイアード）</text:p>
          </table:table-cell>
          <table:table-cell table:style-name="ce93" office:value-type="string" calcext:value-type="string">
            <text:p>紋章/一般</text:p>
          </table:table-cell>
          <table:table-cell table:style-name="ce148" office:value-type="float" office:value="5" calcext:value-type="float">
            <text:p>5</text:p>
          </table:table-cell>
          <table:table-cell table:style-name="ce148" office:value-type="string" calcext:value-type="string">
            <text:p>-</text:p>
          </table:table-cell>
          <table:table-cell table:style-name="ce151" office:value-type="string" calcext:value-type="string">
            <text:p>表示你因為感到身心極限而退出其他組織的紋章，身體已經因為長期逞強出了問題</text:p>
          </table:table-cell>
          <table:table-cell table:style-name="ce151" office:value-type="string" calcext:value-type="string">
            <text:p>取得時從其他組織的紋章中選擇一個，你能夠取得所選的紋章；常備化那個紋章所需的經驗點需要另外消耗。選擇需要GM許可的紋章時，同樣需要先征得GM的同意</text:p>
            <text:p>該道具最多可以取得3個，但是每取得一個，你的侵蝕率+3</text:p>
          </table:table-cell>
          <table:table-cell table:style-name="ce148" office:value-type="string" calcext:value-type="string">
            <text:p>IA P185</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古怪的包</text:p>
            <text:p>（怪しい鞄）</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因為種種原因轉手到你這裡的裝有大量鈔票或金塊的包，持有它為你帶來了莫大的壓力</text:p>
          </table:table-cell>
          <table:table-cell table:style-name="ce151" office:value-type="string" calcext:value-type="string">
            <text:p>你的常備化點數+10；取得該道具時，你的侵蝕率基本值+4</text:p>
          </table:table-cell>
          <table:table-cell table:style-name="ce148" office:value-type="string" calcext:value-type="string">
            <text:p>IA P18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贓物</text:p>
            <text:p>（故買品）</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text:p>
          </table:table-cell>
          <table:table-cell table:style-name="ce151" office:value-type="string" calcext:value-type="string">
            <text:p>通過違法管道買賣的物品，而你就是向違法管道提供物品的人，當然獲得各種物品就是你的專業領域</text:p>
          </table:table-cell>
          <table:table-cell table:style-name="ce151" office:value-type="string" calcext:value-type="string">
            <text:p>取得需要&lt;籌措&gt;LV4以上；你的常備化點數+15</text:p>
          </table:table-cell>
          <table:table-cell table:style-name="ce148" office:value-type="string" calcext:value-type="string">
            <text:p>IA P18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燈塔</text:p>
            <text:p>（ビーコン）</text:p>
          </table:table-cell>
          <table:table-cell table:style-name="ce93" office:value-type="string" calcext:value-type="string">
            <text:p>紋章/一般</text:p>
          </table:table-cell>
          <table:table-cell table:style-name="ce148" office:value-type="float" office:value="10" calcext:value-type="float">
            <text:p>10</text:p>
          </table:table-cell>
          <table:table-cell table:style-name="ce148" office:value-type="string" calcext:value-type="string">
            <text:p>1/劇本</text:p>
          </table:table-cell>
          <table:table-cell table:style-name="ce151" office:value-type="string" calcext:value-type="string">
            <text:p>表示你有著在痛苦時能夠成為助力的心靈支柱的紋章</text:p>
          </table:table-cell>
          <table:table-cell table:style-name="ce151" office:value-type="string" calcext:value-type="string">
            <text:p>你進行&lt;意志&gt;判定前使用，該判定的達成值+10</text:p>
            <text:p>該效果1劇本可以使用1次</text:p>
          </table:table-cell>
          <table:table-cell table:style-name="ce148" office:value-type="string" calcext:value-type="string">
            <text:p>IA P186</text:p>
          </table:table-cell>
          <table:table-cell table:style-name="ce148"/>
          <table:table-cell table:number-columns-repeated="1016"/>
        </table:table-row>
        <table:table-row table:style-name="ro16">
          <table:table-cell table:style-name="ce148" office:value-type="string" calcext:value-type="string">
            <text:p>天生戰狂</text:p>
            <text:p>（ウォーモンガ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認為戰鬥即是人生意義，是徹頭徹尾的戰士的紋章。只有戰鬥，才能讓你的靈魂熾熱燃燒</text:p>
          </table:table-cell>
          <table:table-cell table:style-name="ce151" office:value-type="string" calcext:value-type="string">
            <text:p>你進行的攻擊傷害+1D10；取得該道具時，你的侵蝕率基本值+5</text:p>
          </table:table-cell>
          <table:table-cell table:style-name="ce148" office:value-type="string" calcext:value-type="string">
            <text:p>IA P186</text:p>
          </table:table-cell>
          <table:table-cell table:style-name="ce148"/>
          <table:table-cell table:number-columns-repeated="1016"/>
        </table:table-row>
        <table:table-row table:style-name="ro16">
          <table:table-cell table:style-name="ce148" office:value-type="string" calcext:value-type="string">
            <text:p>探尋者</text:p>
            <text:p>（シーカ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你在探求真相上付諸生命的紋章，你絕不會讓哪怕再細微的情報溜走，並且一定會挖掘出真相</text:p>
          </table:table-cell>
          <table:table-cell table:style-name="ce151" office:value-type="string" calcext:value-type="string">
            <text:p>主要動作使用，可直接對GM質問疑問點；GM可拒絕回答，此時不消耗使用次數</text:p>
            <text:p>該效果1劇本可以使用1次</text:p>
          </table:table-cell>
          <table:table-cell table:style-name="ce148" office:value-type="string" calcext:value-type="string">
            <text:p>IA P186</text:p>
          </table:table-cell>
          <table:table-cell table:style-name="ce148"/>
          <table:table-cell table:number-columns-repeated="1016"/>
        </table:table-row>
        <table:table-row table:style-name="ro16">
          <table:table-cell table:style-name="ce148" office:value-type="string" calcext:value-type="string">
            <text:p>速度之魂</text:p>
            <text:p>（スピードソウル）</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1/劇本</text:p>
          </table:table-cell>
          <table:table-cell table:style-name="ce151" office:value-type="string" calcext:value-type="string">
            <text:p>表示搬家公司或快遞公司等追求速度之魂的紋章</text:p>
          </table:table-cell>
          <table:table-cell table:style-name="ce151" office:value-type="string" calcext:value-type="string">
            <text:p>準備階段使用，該回合間，你的行動值+10</text:p>
            <text:p>該效果1劇本可以使用1次</text:p>
          </table:table-cell>
          <table:table-cell table:style-name="ce148" office:value-type="string" calcext:value-type="string">
            <text:p>IA P186</text:p>
          </table:table-cell>
          <table:table-cell table:style-name="ce148"/>
          <table:table-cell table:number-columns-repeated="1016"/>
        </table:table-row>
        <table:table-row table:style-name="ro16">
          <table:table-cell table:style-name="ce148" office:value-type="string" calcext:value-type="string">
            <text:p>鷹眼硬幣</text:p>
            <text:p>（鷹の目のコイン）</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3/劇本</text:p>
          </table:table-cell>
          <table:table-cell table:style-name="ce151" office:value-type="string" calcext:value-type="string">
            <text:p>據說是熟練槍手之證的謎之硬幣，也作為熟練狙擊手的證明，會突然贈與解決了大量事件的人</text:p>
          </table:table-cell>
          <table:table-cell table:style-name="ce151" office:value-type="string" calcext:value-type="string">
            <text:p>你進行&lt;射擊&gt;判定前使用，該判定達成值+5，該效果只能在&lt;射擊&gt;LV4以上時使用</text:p>
            <text:p>該效果1劇本可以使用3次</text:p>
          </table:table-cell>
          <table:table-cell table:style-name="ce148" office:value-type="string" calcext:value-type="string">
            <text:p>IA P186</text:p>
          </table:table-cell>
          <table:table-cell table:style-name="ce148"/>
          <table:table-cell table:number-columns-repeated="1016"/>
        </table:table-row>
        <table:table-row table:style-name="ro16">
          <table:table-cell table:style-name="ce148" office:value-type="string" calcext:value-type="string">
            <text:p>冒險癮君</text:p>
            <text:p>（リスクジャンキー）</text:p>
          </table:table-cell>
          <table:table-cell table:style-name="ce93" office:value-type="string" calcext:value-type="string">
            <text:p>紋章/一般</text:p>
          </table:table-cell>
          <table:table-cell table:style-name="ce148" office:value-type="float" office:value="15" calcext:value-type="float">
            <text:p>15</text:p>
          </table:table-cell>
          <table:table-cell table:style-name="ce148" office:value-type="string" calcext:value-type="string">
            <text:p>-</text:p>
          </table:table-cell>
          <table:table-cell table:style-name="ce151" office:value-type="string" calcext:value-type="string">
            <text:p>表示你於冒險之中汲取快感的紋章，平凡的人生什麼的太無聊了。只有能感受到心急如焚的緊張感，身處死亡之鄰的環境才能叫活著</text:p>
          </table:table-cell>
          <table:table-cell table:style-name="ce151" office:value-type="string" calcext:value-type="string">
            <text:p>當你的侵蝕率達到100%以上時，你進行的任何判定骰數+2個</text:p>
          </table:table-cell>
          <table:table-cell table:style-name="ce148" office:value-type="string" calcext:value-type="string">
            <text:p>IA P186</text:p>
          </table:table-cell>
          <table:table-cell table:style-name="ce148"/>
          <table:table-cell table:number-columns-repeated="1016"/>
        </table:table-row>
        <table:table-row table:style-name="ro16">
          <table:table-cell table:style-name="ce148" office:value-type="string" calcext:value-type="string">
            <text:p>匿名的鄰居們</text:p>
            <text:p>（匿名の隣人たち）</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劇本</text:p>
          </table:table-cell>
          <table:table-cell table:style-name="ce151" office:value-type="string" calcext:value-type="string">
            <text:p>表示你受到深交的精英駭客團隊的援助的紋章，當然他們只會認同同樣的精英駭客</text:p>
          </table:table-cell>
          <table:table-cell table:style-name="ce151" office:value-type="string" calcext:value-type="string">
            <text:p>場景中登場的角色進行判定後使用，該判定達成值-10；該效果只能在&lt;知識：機械工程&gt;LV4以上時使用</text:p>
            <text:p>該效果1劇本可以使用1次</text:p>
          </table:table-cell>
          <table:table-cell table:style-name="ce148" office:value-type="string" calcext:value-type="string">
            <text:p>IA P186</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傭兵</text:p>
            <text:p>（マーセナリー）</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text:p>
          </table:table-cell>
          <table:table-cell table:style-name="ce151" office:value-type="string" calcext:value-type="string">
            <text:p>表示你作為自由傭兵擅長籌備重火器的紋章，你可以將任何場所都變為戰場</text:p>
          </table:table-cell>
          <table:table-cell table:style-name="ce151" office:value-type="string" calcext:value-type="string">
            <text:p>選擇一件常備化點數在30以下的道具，取得並常備化</text:p>
          </table:table-cell>
          <table:table-cell table:style-name="ce148" office:value-type="string" calcext:value-type="string">
            <text:p>IA P18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名偵探的帽子</text:p>
            <text:p>（名探偵の帽子）</text:p>
          </table:table-cell>
          <table:table-cell table:style-name="ce93" office:value-type="string" calcext:value-type="string">
            <text:p>紋章/一般</text:p>
          </table:table-cell>
          <table:table-cell table:style-name="ce148" office:value-type="float" office:value="20" calcext:value-type="float">
            <text:p>20</text:p>
          </table:table-cell>
          <table:table-cell table:style-name="ce148" office:value-type="string" calcext:value-type="string">
            <text:p>1/劇本</text:p>
          </table:table-cell>
          <table:table-cell table:style-name="ce151" office:value-type="string" calcext:value-type="string">
            <text:p>給你各種靈感的帽子，有些人也會配上大衣、靴子等其他小零件</text:p>
          </table:table-cell>
          <table:table-cell table:style-name="ce151" office:value-type="string" calcext:value-type="string">
            <text:p>主要動作使用，可直接對GM質問疑問點；GM可拒絕回答，此時不消耗使用次數</text:p>
            <text:p>該效果1劇本可以使用1次</text:p>
          </table:table-cell>
          <table:table-cell table:style-name="ce148" office:value-type="string" calcext:value-type="string">
            <text:p>IA P18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政府機構</text:p>
            <text:p>（エージェンシー）</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text:p>
          </table:table-cell>
          <table:table-cell table:style-name="ce151" office:value-type="string" calcext:value-type="string">
            <text:p>表示你是與政府機關有聯繫的超越者的紋章，你的身份證為裡側工作賦予了特殊許可權</text:p>
          </table:table-cell>
          <table:table-cell table:style-name="ce151" office:value-type="string" calcext:value-type="string">
            <text:p>你進行的【社會】判定骰數+4個；你不會受到員警等公共機關造成的行動限制</text:p>
          </table:table-cell>
          <table:table-cell table:style-name="ce148" office:value-type="string" calcext:value-type="string">
            <text:p>IA P18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黑駕照</text:p>
            <text:p>（ブラックライセンス）</text:p>
          </table:table-cell>
          <table:table-cell table:style-name="ce93" office:value-type="string" calcext:value-type="string">
            <text:p>紋章/一般</text:p>
          </table:table-cell>
          <table:table-cell table:style-name="ce148" office:value-type="float" office:value="25" calcext:value-type="float">
            <text:p>25</text:p>
          </table:table-cell>
          <table:table-cell table:style-name="ce148" office:value-type="string" calcext:value-type="string">
            <text:p>1/劇本</text:p>
          </table:table-cell>
          <table:table-cell table:style-name="ce151" office:value-type="string" calcext:value-type="string">
            <text:p>表示你被稱為熟練老司機、搬運屋之類的的黑社會稱號；你的方向盤永遠臨危不亂</text:p>
          </table:table-cell>
          <table:table-cell table:style-name="ce151" office:value-type="string" calcext:value-type="string">
            <text:p>你處於搭乘狀態時隨時可以使用，取消你受到的[異常狀態：暴走]以外所有的異常狀態和骰子數減少效果；該效果只能在任意&lt;駕駛：●●&gt;LV4以上時使用</text:p>
            <text:p>該效果1劇本可以使用1次</text:p>
          </table:table-cell>
          <table:table-cell table:style-name="ce148" office:value-type="string" calcext:value-type="string">
            <text:p>IA P18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倖存者</text:p>
            <text:p>（サバイバ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有著在各種狀況之中生存的強烈求生意志的紋章，無論是身處何種危險之中，你求生的意志絕不會屈服</text:p>
          </table:table-cell>
          <table:table-cell table:style-name="ce151" office:value-type="string" calcext:value-type="string">
            <text:p>你即將承受HP傷害前使用，你（預定）受到的HP傷害-5D10</text:p>
            <text:p>該效果1劇本可以使用1次</text:p>
          </table:table-cell>
          <table:table-cell table:style-name="ce148" office:value-type="string" calcext:value-type="string">
            <text:p>IA P187</text:p>
          </table:table-cell>
          <table:table-cell table:style-name="ce148"/>
          <table:table-cell table:number-columns-repeated="1016"/>
        </table:table-row>
        <table:table-row table:style-name="ro16">
          <table:table-cell table:style-name="ce148" office:value-type="string" calcext:value-type="string">
            <text:p>市井隱者</text:p>
            <text:p>（市井の隠者）</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時常嚴於律己，訓練自己控制著自己心中的怪物的紋章</text:p>
          </table:table-cell>
          <table:table-cell table:style-name="ce151" office:value-type="string" calcext:value-type="string">
            <text:p>取得需要&lt;意志&gt;LV8以上；你的侵蝕率基本值-5，該效果不會讓侵蝕率基本值降低到[覺醒侵蝕值+衝動侵蝕值]之下</text:p>
          </table:table-cell>
          <table:table-cell table:style-name="ce148" office:value-type="string" calcext:value-type="string">
            <text:p>IA P18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殺手之證</text:p>
            <text:p>（スレイヤーの証）</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text:p>
          </table:table-cell>
          <table:table-cell table:style-name="ce151" office:value-type="string" calcext:value-type="string">
            <text:p>表示你是在裡社會中擅長狩獵超越者和原菌的獵人的證明，能擊退原菌的人無論在何處都被視為珍寶</text:p>
          </table:table-cell>
          <table:table-cell table:style-name="ce151" office:value-type="string" calcext:value-type="string">
            <text:p>你對超越者角色進行攻擊的傷害+3D10</text:p>
          </table:table-cell>
          <table:table-cell table:style-name="ce148" office:value-type="string" calcext:value-type="string">
            <text:p>IA P187</text:p>
          </table:table-cell>
          <table:table-cell table:style-name="ce148" office:value-type="string" calcext:value-type="string">
            <text:p>IA新增</text:p>
          </table:table-cell>
          <table:table-cell table:number-columns-repeated="1016"/>
        </table:table-row>
        <table:table-row table:style-name="ro16">
          <table:table-cell table:style-name="ce148" office:value-type="string" calcext:value-type="string">
            <text:p>鼎鼎大名</text:p>
            <text:p>（ビッグネーム）</text:p>
          </table:table-cell>
          <table:table-cell table:style-name="ce93" office:value-type="string" calcext:value-type="string">
            <text:p>紋章/一般</text:p>
          </table:table-cell>
          <table:table-cell table:style-name="ce148" office:value-type="float" office:value="30" calcext:value-type="float">
            <text:p>30</text:p>
          </table:table-cell>
          <table:table-cell table:style-name="ce148" office:value-type="string" calcext:value-type="string">
            <text:p>1/劇本</text:p>
          </table:table-cell>
          <table:table-cell table:style-name="ce151" office:value-type="string" calcext:value-type="string">
            <text:p>表示你成就了某種偉業，名揚天下的紋章。僅僅是報出你的功績，便足以令聽者瑟縮顫抖，行動遲緩</text:p>
          </table:table-cell>
          <table:table-cell table:style-name="ce151" office:value-type="string" calcext:value-type="string">
            <text:p>你進行判定前使用，對該判定進行的回應動作，骰子數-4個</text:p>
            <text:p>該效果1劇本可以使用1次</text:p>
          </table:table-cell>
          <table:table-cell table:style-name="ce148" office:value-type="string" calcext:value-type="string">
            <text:p>IA P187</text:p>
          </table:table-cell>
          <table:table-cell table:style-name="ce148"/>
          <table:table-cell table:number-columns-repeated="1016"/>
        </table:table-row>
        <table:table-row table:style-name="ro16">
          <table:table-cell table:style-name="ce148" office:value-type="string" calcext:value-type="string">
            <text:p>在世傳奇</text:p>
            <text:p>（リビングレジェンド）</text:p>
          </table:table-cell>
          <table:table-cell table:style-name="ce93" office:value-type="string" calcext:value-type="string">
            <text:p>紋章/一般</text:p>
          </table:table-cell>
          <table:table-cell table:style-name="ce148" office:value-type="float" office:value="35" calcext:value-type="float">
            <text:p>35</text:p>
          </table:table-cell>
          <table:table-cell table:style-name="ce148" office:value-type="string" calcext:value-type="string">
            <text:p>1/劇本</text:p>
          </table:table-cell>
          <table:table-cell table:style-name="ce151" office:value-type="string" calcext:value-type="string">
            <text:p>表示你曾經成就了傳說級別偉業的紋章。大部分人光是聽到你的名字，都會屁滾尿流，束手就擒</text:p>
          </table:table-cell>
          <table:table-cell table:style-name="ce151" office:value-type="string" calcext:value-type="string">
            <text:p>你進行判定前使用，對該判定進行的回應動作，骰子數-5個</text:p>
            <text:p>該效果1劇本可以使用1次</text:p>
          </table:table-cell>
          <table:table-cell table:style-name="ce148" office:value-type="string" calcext:value-type="string">
            <text:p>IA P187</text:p>
          </table:table-cell>
          <table:table-cell table:style-name="ce148" office:value-type="string" calcext:value-type="string">
            <text:p>IA新增</text:p>
          </table:table-cell>
          <table:table-cell table:number-columns-repeated="1016"/>
        </table:table-row>
        <table:table-row table:style-name="ro16" table:number-rows-repeated="477">
          <table:table-cell/>
          <table:table-cell table:style-name="ce150"/>
          <table:table-cell table:number-columns-repeated="2"/>
          <table:table-cell table:style-name="ce137" table:number-columns-repeated="2"/>
          <table:table-cell table:number-columns-repeated="1018"/>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Microsoft Yahei" svg:font-family="'Microsoft Yahei'"/>
    <style:font-face style:name="SimSun" svg:font-family="SimSu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7">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更新記錄及道具分類說明" style:display-name="PageStyle_更新記錄及道具分類說明" style:page-layout-name="Mpm3">
      <style:header style:display="false"/>
      <style:header-left style:display="false"/>
      <style:footer style:display="false"/>
      <style:footer-left style:display="false"/>
    </style:master-page>
    <style:master-page style:name="PageStyle_5f_一般道具" style:display-name="PageStyle_一般道具" style:page-layout-name="Mpm4">
      <style:header style:display="false"/>
      <style:header-left style:display="false"/>
      <style:footer style:display="false"/>
      <style:footer-left style:display="false"/>
    </style:master-page>
    <style:master-page style:name="PageStyle_5f_FH道具" style:display-name="PageStyle_FH道具" style:page-layout-name="Mpm4">
      <style:header style:display="false"/>
      <style:header-left style:display="false"/>
      <style:footer style:display="false"/>
      <style:footer-left style:display="false"/>
    </style:master-page>
    <style:master-page style:name="PageStyle_5f_症候專用獨特道具" style:display-name="PageStyle_症候專用獨特道具" style:page-layout-name="Mpm4">
      <style:header style:display="false"/>
      <style:header-left style:display="false"/>
      <style:footer style:display="false"/>
      <style:footer-left style:display="false"/>
    </style:master-page>
    <style:master-page style:name="PageStyle_5f_獨特道具" style:display-name="PageStyle_獨特道具" style:page-layout-name="Mpm4">
      <style:header style:display="false"/>
      <style:header-left style:display="false"/>
      <style:footer style:display="false"/>
      <style:footer-left style:display="false"/>
    </style:master-page>
    <style:master-page style:name="PageStyle_5f_D-Lois秘密武器專用道具" style:display-name="PageStyle_D-Lois秘密武器專用道具" style:page-layout-name="Mpm5">
      <style:header style:display="false"/>
      <style:header-left style:display="false"/>
      <style:footer style:display="false"/>
      <style:footer-left style:display="false"/>
    </style:master-page>
    <style:master-page style:name="PageStyle_5f_D-Lois遺產繼承者專用道具" style:display-name="PageStyle_D-Lois遺產繼承者專用道具" style:page-layout-name="Mpm5">
      <style:header style:display="false"/>
      <style:header-left style:display="false"/>
      <style:footer style:display="false"/>
      <style:footer-left style:display="false"/>
    </style:master-page>
    <style:master-page style:name="PageStyle_5f_D-lois_20_No.CRC11_20_咒物污染者專用道具_20_咒物" style:display-name="PageStyle_D-lois No.CRC11 咒物污染者專用道具 咒物" style:page-layout-name="Mpm6">
      <style:header style:display="false"/>
      <style:header-left style:display="false"/>
      <style:footer style:display="false"/>
      <style:footer-left style:display="false"/>
    </style:master-page>
    <style:master-page style:name="PageStyle_5f_D-lois_20_No.UA03_20_封具專用道具" style:display-name="PageStyle_D-lois No.UA03 封具專用道具" style:page-layout-name="Mpm6">
      <style:header style:display="false"/>
      <style:header-left style:display="false"/>
      <style:footer style:display="false"/>
      <style:footer-left style:display="false"/>
    </style:master-page>
    <style:master-page style:name="PageStyle_5f_REC道具" style:display-name="PageStyle_REC道具" style:page-layout-name="Mpm7">
      <style:header style:display="false"/>
      <style:header-left style:display="false"/>
      <style:footer style:display="false"/>
      <style:footer-left style:display="false"/>
    </style:master-page>
    <style:master-page style:name="PageStyle_5f_REPLAY道具" style:display-name="PageStyle_REPLAY道具" style:page-layout-name="Mpm7">
      <style:header style:display="false"/>
      <style:header-left style:display="false"/>
      <style:footer style:display="false"/>
      <style:footer-left style:display="false"/>
    </style:master-page>
    <style:master-page style:name="PageStyle_5f_異能力道具" style:display-name="PageStyle_異能力道具" style:page-layout-name="Mpm6">
      <style:header style:display="false"/>
      <style:header-left style:display="false"/>
      <style:footer style:display="false"/>
      <style:footer-left style:display="false"/>
    </style:master-page>
    <style:master-page style:name="PageStyle_5f_道具自定義項" style:display-name="PageStyle_道具自定義項" style:page-layout-name="Mpm4">
      <style:header style:display="false"/>
      <style:header-left style:display="false"/>
      <style:footer style:display="false"/>
      <style:footer-left style:display="false"/>
    </style:master-page>
    <style:master-page style:name="PageStyle_5f_紋章" style:display-name="PageStyle_紋章"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8:01:25</meta:creation-date>
    <meta:initial-creator>Unknown</meta:initial-creator>
    <meta:document-statistic meta:table-count="14" meta:cell-count="11978" meta:object-count="0"/>
    <meta:generator>LibreOfficeDev/6.0.5.2$Linux_X86_64 LibreOffice_project/</meta:generator>
  </office:meta>
</office:document-meta>
</file>